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1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b9bd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3" style:family="table-cell" style:parent-style-name="Default" style:data-style-name="N0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33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o = 10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01" calcext:value-type="float">
            <text:p>0,01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A/dt</text:p>
          </table:table-cell>
          <table:table-cell table:style-name="ce3" office:value-type="string" calcext:value-type="string">
            <text:p>t(i+1)</text:p>
          </table:table-cell>
          <table:table-cell table:style-name="ce3" office:value-type="string" calcext:value-type="string">
            <text:p>A(i+1)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" table:formula="of:=to" office:value-type="float" office:value="0" calcext:value-type="float">
            <text:p>0</text:p>
          </table:table-cell>
          <table:table-cell table:style-name="ce1" table:formula="of:=Ao" office:value-type="float" office:value="1000" calcext:value-type="float">
            <text:p>1000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table:style-name="ce2" office:value-type="float" office:value="1000" calcext:value-type="float">
            <text:p>1000</text:p>
          </table:table-cell>
          <table:table-cell/>
          <table:table-cell table:style-name="ce1" table:formula="of:=[.G2]" office:value-type="float" office:value="0" calcext:value-type="float">
            <text:p>0</text:p>
          </table:table-cell>
          <table:table-cell table:style-name="ce1" table:formula="of:=[.H2]" office:value-type="float" office:value="1000" calcext:value-type="float">
            <text:p>1000</text:p>
          </table:table-cell>
          <table:table-cell table:style-name="ce1" table:formula="of:=- 68 - ([.E3]^2/Ao)" office:value-type="float" office:value="-1068" calcext:value-type="float">
            <text:p>-1068</text:p>
          </table:table-cell>
          <table:table-cell table:style-name="ce1" table:formula="of:=[.G2]+h" office:value-type="float" office:value="0.01" calcext:value-type="float">
            <text:p>0,01</text:p>
          </table:table-cell>
          <table:table-cell table:style-name="ce1" table:formula="of:=[.H2]+ h*[.F3]" office:value-type="float" office:value="989.32" calcext:value-type="float">
            <text:p>989,3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ce1" table:formula="of:=[.G3]" office:value-type="float" office:value="0.01" calcext:value-type="float">
            <text:p>0,01</text:p>
          </table:table-cell>
          <table:table-cell table:style-name="ce1" table:formula="of:=[.H3]" office:value-type="float" office:value="989.32" calcext:value-type="float">
            <text:p>989,32</text:p>
          </table:table-cell>
          <table:table-cell table:style-name="ce1" table:formula="of:=-68 - ([.E4]^2/Ao)" office:value-type="float" office:value="-1046.7540624" calcext:value-type="float">
            <text:p>-1046,7540624</text:p>
          </table:table-cell>
          <table:table-cell table:style-name="ce1" table:formula="of:=[.G3]+h" office:value-type="float" office:value="0.02" calcext:value-type="float">
            <text:p>0,02</text:p>
          </table:table-cell>
          <table:table-cell table:style-name="ce1" table:formula="of:=[.H3]+ h*[.F4]" office:value-type="float" office:value="978.852459376" calcext:value-type="float">
            <text:p>978,852459376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4]" office:value-type="float" office:value="0.02" calcext:value-type="float">
            <text:p>0,02</text:p>
          </table:table-cell>
          <table:table-cell table:style-name="ce1" table:formula="of:=[.H4]" office:value-type="float" office:value="978.852459376" calcext:value-type="float">
            <text:p>978,852459376</text:p>
          </table:table-cell>
          <table:table-cell table:style-name="ce1" table:formula="of:=-68 - ([.E5]^2/Ao)" office:value-type="float" office:value="-1026.15213722644" calcext:value-type="float">
            <text:p>-1026,15213722644</text:p>
          </table:table-cell>
          <table:table-cell table:style-name="ce1" table:formula="of:=[.G4]+h" office:value-type="float" office:value="0.03" calcext:value-type="float">
            <text:p>0,03</text:p>
          </table:table-cell>
          <table:table-cell table:style-name="ce1" table:formula="of:=[.H4]+ h*[.F5]" office:value-type="float" office:value="968.590938003736" calcext:value-type="float">
            <text:p>968,590938003736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5]" office:value-type="float" office:value="0.03" calcext:value-type="float">
            <text:p>0,03</text:p>
          </table:table-cell>
          <table:table-cell table:style-name="ce1" table:formula="of:=[.H5]" office:value-type="float" office:value="968.590938003736" calcext:value-type="float">
            <text:p>968,590938003736</text:p>
          </table:table-cell>
          <table:table-cell table:style-name="ce1" table:formula="of:=-68 - ([.E6]^2/Ao)" office:value-type="float" office:value="-1006.16840518296" calcext:value-type="float">
            <text:p>-1006,16840518296</text:p>
          </table:table-cell>
          <table:table-cell table:style-name="ce1" table:formula="of:=[.G5]+h" office:value-type="float" office:value="0.04" calcext:value-type="float">
            <text:p>0,04</text:p>
          </table:table-cell>
          <table:table-cell table:style-name="ce1" table:formula="of:=[.H5]+ h*[.F6]" office:value-type="float" office:value="958.529253951906" calcext:value-type="float">
            <text:p>958,529253951906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dA/dt = -68 – A² / Ao</text:p>
          </table:table-cell>
          <table:table-cell table:number-columns-repeated="2"/>
          <table:table-cell table:style-name="ce1" table:formula="of:=[.G6]" office:value-type="float" office:value="0.04" calcext:value-type="float">
            <text:p>0,04</text:p>
          </table:table-cell>
          <table:table-cell table:style-name="ce1" table:formula="of:=[.H6]" office:value-type="float" office:value="958.529253951906" calcext:value-type="float">
            <text:p>958,529253951906</text:p>
          </table:table-cell>
          <table:table-cell table:style-name="ce1" table:formula="of:=-68 - ([.E7]^2/Ao)" office:value-type="float" office:value="-986.778330681598" calcext:value-type="float">
            <text:p>-986,778330681598</text:p>
          </table:table-cell>
          <table:table-cell table:style-name="ce1" table:formula="of:=[.G6]+h" office:value-type="float" office:value="0.05" calcext:value-type="float">
            <text:p>0,05</text:p>
          </table:table-cell>
          <table:table-cell table:style-name="ce1" table:formula="of:=[.H6]+ h*[.F7]" office:value-type="float" office:value="948.66147064509" calcext:value-type="float">
            <text:p>948,66147064509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7]" office:value-type="float" office:value="0.05" calcext:value-type="float">
            <text:p>0,05</text:p>
          </table:table-cell>
          <table:table-cell table:style-name="ce1" table:formula="of:=[.H7]" office:value-type="float" office:value="948.66147064509" calcext:value-type="float">
            <text:p>948,66147064509</text:p>
          </table:table-cell>
          <table:table-cell table:style-name="ce1" table:formula="of:=-68 - ([.E8]^2/Ao)" office:value-type="float" office:value="-967.958585886505" calcext:value-type="float">
            <text:p>-967,958585886505</text:p>
          </table:table-cell>
          <table:table-cell table:style-name="ce1" table:formula="of:=[.G7]+h" office:value-type="float" office:value="0.06" calcext:value-type="float">
            <text:p>0,06</text:p>
          </table:table-cell>
          <table:table-cell table:style-name="ce1" table:formula="of:=[.H7]+ h*[.F8]" office:value-type="float" office:value="938.981884786225" calcext:value-type="float">
            <text:p>938,981884786225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8]" office:value-type="float" office:value="0.06" calcext:value-type="float">
            <text:p>0,06</text:p>
          </table:table-cell>
          <table:table-cell table:style-name="ce1" table:formula="of:=[.H8]" office:value-type="float" office:value="938.981884786225" calcext:value-type="float">
            <text:p>938,981884786225</text:p>
          </table:table-cell>
          <table:table-cell table:style-name="ce1" table:formula="of:=-68 - ([.E9]^2/Ao)" office:value-type="float" office:value="-949.686979956692" calcext:value-type="float">
            <text:p>-949,686979956692</text:p>
          </table:table-cell>
          <table:table-cell table:style-name="ce1" table:formula="of:=[.G8]+h" office:value-type="float" office:value="0.07" calcext:value-type="float">
            <text:p>0,07</text:p>
          </table:table-cell>
          <table:table-cell table:style-name="ce1" table:formula="of:=[.H8]+ h*[.F9]" office:value-type="float" office:value="929.485014986658" calcext:value-type="float">
            <text:p>929,485014986658</text:p>
          </table:table-cell>
          <table:table-cell/>
          <table:table-cell table:style-name="ce6"/>
          <table:table-cell/>
          <table:table-cell table:style-name="ce1"/>
        </table:table-row>
        <table:table-row table:style-name="ro2">
          <table:table-cell table:number-columns-repeated="3"/>
          <table:table-cell table:style-name="ce1" table:formula="of:=[.G9]" office:value-type="float" office:value="0.07" calcext:value-type="float">
            <text:p>0,07</text:p>
          </table:table-cell>
          <table:table-cell table:style-name="ce1" table:formula="of:=[.H9]" office:value-type="float" office:value="929.485014986658" calcext:value-type="float">
            <text:p>929,485014986658</text:p>
          </table:table-cell>
          <table:table-cell table:style-name="ce1" table:formula="of:=-68 - ([.E10]^2/Ao)" office:value-type="float" office:value="-931.942393084748" calcext:value-type="float">
            <text:p>-931,942393084748</text:p>
          </table:table-cell>
          <table:table-cell table:style-name="ce1" table:formula="of:=[.G9]+h" office:value-type="float" office:value="0.08" calcext:value-type="float">
            <text:p>0,08</text:p>
          </table:table-cell>
          <table:table-cell table:style-name="ce1" table:formula="of:=[.H9]+ h*[.F10]" office:value-type="float" office:value="920.165591055811" calcext:value-type="float">
            <text:p>920,165591055811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y(i+1) = Yi + h * Y`i</text:p>
          </table:table-cell>
          <table:table-cell table:number-columns-repeated="2"/>
          <table:table-cell table:style-name="ce1" table:formula="of:=[.G10]" office:value-type="float" office:value="0.08" calcext:value-type="float">
            <text:p>0,08</text:p>
          </table:table-cell>
          <table:table-cell table:style-name="ce1" table:formula="of:=[.H10]" office:value-type="float" office:value="920.165591055811" calcext:value-type="float">
            <text:p>920,165591055811</text:p>
          </table:table-cell>
          <table:table-cell table:style-name="ce1" table:formula="of:=-68 - ([.E11]^2/Ao)" office:value-type="float" office:value="-914.704714963089" calcext:value-type="float">
            <text:p>-914,704714963089</text:p>
          </table:table-cell>
          <table:table-cell table:style-name="ce1" table:formula="of:=[.G10]+h" office:value-type="float" office:value="0.09" calcext:value-type="float">
            <text:p>0,09</text:p>
          </table:table-cell>
          <table:table-cell table:style-name="ce1" table:formula="of:=[.H10]+ h*[.F11]" office:value-type="float" office:value="911.01854390618" calcext:value-type="float">
            <text:p>911,01854390618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1]" office:value-type="float" office:value="0.09" calcext:value-type="float">
            <text:p>0,09</text:p>
          </table:table-cell>
          <table:table-cell table:style-name="ce1" table:formula="of:=[.H11]" office:value-type="float" office:value="911.01854390618" calcext:value-type="float">
            <text:p>911,01854390618</text:p>
          </table:table-cell>
          <table:table-cell table:style-name="ce1" table:formula="of:=-68 - ([.E12]^2/Ao)" office:value-type="float" office:value="-897.954787340936" calcext:value-type="float">
            <text:p>-897,954787340936</text:p>
          </table:table-cell>
          <table:table-cell table:style-name="ce1" table:formula="of:=[.G11]+h" office:value-type="float" office:value="0.1" calcext:value-type="float">
            <text:p>0,1</text:p>
          </table:table-cell>
          <table:table-cell table:style-name="ce1" table:formula="of:=[.H11]+ h*[.F12]" office:value-type="float" office:value="902.03899603277" calcext:value-type="float">
            <text:p>902,03899603277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2]" office:value-type="float" office:value="0.1" calcext:value-type="float">
            <text:p>0,1</text:p>
          </table:table-cell>
          <table:table-cell table:style-name="ce1" table:formula="of:=[.H12]" office:value-type="float" office:value="902.03899603277" calcext:value-type="float">
            <text:p>902,03899603277</text:p>
          </table:table-cell>
          <table:table-cell table:style-name="ce1" table:formula="of:=-68 - ([.E13]^2/Ao)" office:value-type="float" office:value="-881.674350363808" calcext:value-type="float">
            <text:p>-881,674350363808</text:p>
          </table:table-cell>
          <table:table-cell table:style-name="ce1" table:formula="of:=[.G12]+h" office:value-type="float" office:value="0.11" calcext:value-type="float">
            <text:p>0,11</text:p>
          </table:table-cell>
          <table:table-cell table:style-name="ce1" table:formula="of:=[.H12]+ h*[.F13]" office:value-type="float" office:value="893.222252529132" calcext:value-type="float">
            <text:p>893,22225252913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3]" office:value-type="float" office:value="0.11" calcext:value-type="float">
            <text:p>0,11</text:p>
          </table:table-cell>
          <table:table-cell table:style-name="ce1" table:formula="of:=[.H13]" office:value-type="float" office:value="893.222252529132" calcext:value-type="float">
            <text:p>893,222252529132</text:p>
          </table:table-cell>
          <table:table-cell table:style-name="ce1" table:formula="of:=-68 - ([.E14]^2/Ao)" office:value-type="float" office:value="-865.845992413217" calcext:value-type="float">
            <text:p>-865,845992413217</text:p>
          </table:table-cell>
          <table:table-cell table:style-name="ce1" table:formula="of:=[.G13]+h" office:value-type="float" office:value="0.12" calcext:value-type="float">
            <text:p>0,12</text:p>
          </table:table-cell>
          <table:table-cell table:style-name="ce1" table:formula="of:=[.H13]+ h*[.F14]" office:value-type="float" office:value="884.563792605" calcext:value-type="float">
            <text:p>884,5637926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]" office:value-type="float" office:value="0.12" calcext:value-type="float">
            <text:p>0,12</text:p>
          </table:table-cell>
          <table:table-cell table:style-name="ce1" table:formula="of:=[.H14]" office:value-type="float" office:value="884.563792605" calcext:value-type="float">
            <text:p>884,563792605</text:p>
          </table:table-cell>
          <table:table-cell table:style-name="ce1" table:formula="of:=-68 - ([.E15]^2/Ao)" office:value-type="float" office:value="-850.453103187742" calcext:value-type="float">
            <text:p>-850,453103187742</text:p>
          </table:table-cell>
          <table:table-cell table:style-name="ce1" table:formula="of:=[.G14]+h" office:value-type="float" office:value="0.13" calcext:value-type="float">
            <text:p>0,13</text:p>
          </table:table-cell>
          <table:table-cell table:style-name="ce1" table:formula="of:=[.H14]+ h*[.F15]" office:value-type="float" office:value="876.059261573123" calcext:value-type="float">
            <text:p>876,0592615731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]" office:value-type="float" office:value="0.13" calcext:value-type="float">
            <text:p>0,13</text:p>
          </table:table-cell>
          <table:table-cell table:style-name="ce1" table:formula="of:=[.H15]" office:value-type="float" office:value="876.059261573123" calcext:value-type="float">
            <text:p>876,059261573123</text:p>
          </table:table-cell>
          <table:table-cell table:style-name="ce1" table:formula="of:=-68 - ([.E16]^2/Ao)" office:value-type="float" office:value="-835.479829788045" calcext:value-type="float">
            <text:p>-835,479829788045</text:p>
          </table:table-cell>
          <table:table-cell table:style-name="ce1" table:formula="of:=[.G15]+h" office:value-type="float" office:value="0.14" calcext:value-type="float">
            <text:p>0,14</text:p>
          </table:table-cell>
          <table:table-cell table:style-name="ce1" table:formula="of:=[.H15]+ h*[.F16]" office:value-type="float" office:value="867.704463275242" calcext:value-type="float">
            <text:p>867,7044632752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]" office:value-type="float" office:value="0.14" calcext:value-type="float">
            <text:p>0,14</text:p>
          </table:table-cell>
          <table:table-cell table:style-name="ce1" table:formula="of:=[.H16]" office:value-type="float" office:value="867.704463275242" calcext:value-type="float">
            <text:p>867,704463275242</text:p>
          </table:table-cell>
          <table:table-cell table:style-name="ce1" table:formula="of:=-68 - ([.E17]^2/Ao)" office:value-type="float" office:value="-820.911035587776" calcext:value-type="float">
            <text:p>-820,911035587776</text:p>
          </table:table-cell>
          <table:table-cell table:style-name="ce1" table:formula="of:=[.G16]+h" office:value-type="float" office:value="0.15" calcext:value-type="float">
            <text:p>0,15</text:p>
          </table:table-cell>
          <table:table-cell table:style-name="ce1" table:formula="of:=[.H16]+ h*[.F17]" office:value-type="float" office:value="859.495352919364" calcext:value-type="float">
            <text:p>859,4953529193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]" office:value-type="float" office:value="0.15" calcext:value-type="float">
            <text:p>0,15</text:p>
          </table:table-cell>
          <table:table-cell table:style-name="ce1" table:formula="of:=[.H17]" office:value-type="float" office:value="859.495352919364" calcext:value-type="float">
            <text:p>859,495352919364</text:p>
          </table:table-cell>
          <table:table-cell table:style-name="ce1" table:formula="of:=-68 - ([.E18]^2/Ao)" office:value-type="float" office:value="-806.732261689983" calcext:value-type="float">
            <text:p>-806,732261689983</text:p>
          </table:table-cell>
          <table:table-cell table:style-name="ce1" table:formula="of:=[.G17]+h" office:value-type="float" office:value="0.16" calcext:value-type="float">
            <text:p>0,16</text:p>
          </table:table-cell>
          <table:table-cell table:style-name="ce1" table:formula="of:=[.H17]+ h*[.F18]" office:value-type="float" office:value="851.428030302465" calcext:value-type="float">
            <text:p>851,4280303024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]" office:value-type="float" office:value="0.16" calcext:value-type="float">
            <text:p>0,16</text:p>
          </table:table-cell>
          <table:table-cell table:style-name="ce1" table:formula="of:=[.H18]" office:value-type="float" office:value="851.428030302465" calcext:value-type="float">
            <text:p>851,428030302465</text:p>
          </table:table-cell>
          <table:table-cell table:style-name="ce1" table:formula="of:=-68 - ([.E19]^2/Ao)" office:value-type="float" office:value="-792.929690784735" calcext:value-type="float">
            <text:p>-792,929690784735</text:p>
          </table:table-cell>
          <table:table-cell table:style-name="ce1" table:formula="of:=[.G18]+h" office:value-type="float" office:value="0.17" calcext:value-type="float">
            <text:p>0,17</text:p>
          </table:table-cell>
          <table:table-cell table:style-name="ce1" table:formula="of:=[.H18]+ h*[.F19]" office:value-type="float" office:value="843.498733394617" calcext:value-type="float">
            <text:p>843,4987333946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]" office:value-type="float" office:value="0.17" calcext:value-type="float">
            <text:p>0,17</text:p>
          </table:table-cell>
          <table:table-cell table:style-name="ce1" table:formula="of:=[.H19]" office:value-type="float" office:value="843.498733394617" calcext:value-type="float">
            <text:p>843,498733394617</text:p>
          </table:table-cell>
          <table:table-cell table:style-name="ce1" table:formula="of:=-68 - ([.E20]^2/Ao)" office:value-type="float" office:value="-779.490113238324" calcext:value-type="float">
            <text:p>-779,490113238324</text:p>
          </table:table-cell>
          <table:table-cell table:style-name="ce1" table:formula="of:=[.G19]+h" office:value-type="float" office:value="0.18" calcext:value-type="float">
            <text:p>0,18</text:p>
          </table:table-cell>
          <table:table-cell table:style-name="ce1" table:formula="of:=[.H19]+ h*[.F20]" office:value-type="float" office:value="835.703832262234" calcext:value-type="float">
            <text:p>835,7038322622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]" office:value-type="float" office:value="0.18" calcext:value-type="float">
            <text:p>0,18</text:p>
          </table:table-cell>
          <table:table-cell table:style-name="ce1" table:formula="of:=[.H20]" office:value-type="float" office:value="835.703832262234" calcext:value-type="float">
            <text:p>835,703832262234</text:p>
          </table:table-cell>
          <table:table-cell table:style-name="ce1" table:formula="of:=-68 - ([.E21]^2/Ao)" office:value-type="float" office:value="-766.400895257784" calcext:value-type="float">
            <text:p>-766,400895257784</text:p>
          </table:table-cell>
          <table:table-cell table:style-name="ce1" table:formula="of:=[.G20]+h" office:value-type="float" office:value="0.19" calcext:value-type="float">
            <text:p>0,19</text:p>
          </table:table-cell>
          <table:table-cell table:style-name="ce1" table:formula="of:=[.H20]+ h*[.F21]" office:value-type="float" office:value="828.039823309656" calcext:value-type="float">
            <text:p>828,0398233096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]" office:value-type="float" office:value="0.19" calcext:value-type="float">
            <text:p>0,19</text:p>
          </table:table-cell>
          <table:table-cell table:style-name="ce1" table:formula="of:=[.H21]" office:value-type="float" office:value="828.039823309656" calcext:value-type="float">
            <text:p>828,039823309656</text:p>
          </table:table-cell>
          <table:table-cell table:style-name="ce1" table:formula="of:=-68 - ([.E22]^2/Ao)" office:value-type="float" office:value="-753.649948986687" calcext:value-type="float">
            <text:p>-753,649948986687</text:p>
          </table:table-cell>
          <table:table-cell table:style-name="ce1" table:formula="of:=[.G21]+h" office:value-type="float" office:value="0.2" calcext:value-type="float">
            <text:p>0,2</text:p>
          </table:table-cell>
          <table:table-cell table:style-name="ce1" table:formula="of:=[.H21]+ h*[.F22]" office:value-type="float" office:value="820.503323819789" calcext:value-type="float">
            <text:p>820,5033238197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]" office:value-type="float" office:value="0.2" calcext:value-type="float">
            <text:p>0,2</text:p>
          </table:table-cell>
          <table:table-cell table:style-name="ce1" table:formula="of:=[.H22]" office:value-type="float" office:value="820.503323819789" calcext:value-type="float">
            <text:p>820,503323819789</text:p>
          </table:table-cell>
          <table:table-cell table:style-name="ce1" table:formula="of:=-68 - ([.E23]^2/Ao)" office:value-type="float" office:value="-741.225704399322" calcext:value-type="float">
            <text:p>-741,225704399322</text:p>
          </table:table-cell>
          <table:table-cell table:style-name="ce1" table:formula="of:=[.G22]+h" office:value-type="float" office:value="0.21" calcext:value-type="float">
            <text:p>0,21</text:p>
          </table:table-cell>
          <table:table-cell table:style-name="ce1" table:formula="of:=[.H22]+ h*[.F23]" office:value-type="float" office:value="813.091066775796" calcext:value-type="float">
            <text:p>813,0910667757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]" office:value-type="float" office:value="0.21" calcext:value-type="float">
            <text:p>0,21</text:p>
          </table:table-cell>
          <table:table-cell table:style-name="ce1" table:formula="of:=[.H23]" office:value-type="float" office:value="813.091066775796" calcext:value-type="float">
            <text:p>813,091066775796</text:p>
          </table:table-cell>
          <table:table-cell table:style-name="ce1" table:formula="of:=-68 - ([.E24]^2/Ao)" office:value-type="float" office:value="-729.117082870602" calcext:value-type="float">
            <text:p>-729,117082870602</text:p>
          </table:table-cell>
          <table:table-cell table:style-name="ce1" table:formula="of:=[.G23]+h" office:value-type="float" office:value="0.22" calcext:value-type="float">
            <text:p>0,22</text:p>
          </table:table-cell>
          <table:table-cell table:style-name="ce1" table:formula="of:=[.H23]+ h*[.F24]" office:value-type="float" office:value="805.79989594709" calcext:value-type="float">
            <text:p>805,799895947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]" office:value-type="float" office:value="0.22" calcext:value-type="float">
            <text:p>0,22</text:p>
          </table:table-cell>
          <table:table-cell table:style-name="ce1" table:formula="of:=[.H24]" office:value-type="float" office:value="805.79989594709" calcext:value-type="float">
            <text:p>805,79989594709</text:p>
          </table:table-cell>
          <table:table-cell table:style-name="ce1" table:formula="of:=-68 - ([.E25]^2/Ao)" office:value-type="float" office:value="-717.313472308341" calcext:value-type="float">
            <text:p>-717,313472308341</text:p>
          </table:table-cell>
          <table:table-cell table:style-name="ce1" table:formula="of:=[.G24]+h" office:value-type="float" office:value="0.23" calcext:value-type="float">
            <text:p>0,23</text:p>
          </table:table-cell>
          <table:table-cell table:style-name="ce1" table:formula="of:=[.H24]+ h*[.F25]" office:value-type="float" office:value="798.626761224007" calcext:value-type="float">
            <text:p>798,6267612240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]" office:value-type="float" office:value="0.23" calcext:value-type="float">
            <text:p>0,23</text:p>
          </table:table-cell>
          <table:table-cell table:style-name="ce1" table:formula="of:=[.H25]" office:value-type="float" office:value="798.626761224007" calcext:value-type="float">
            <text:p>798,626761224007</text:p>
          </table:table-cell>
          <table:table-cell table:style-name="ce1" table:formula="of:=-68 - ([.E26]^2/Ao)" office:value-type="float" office:value="-705.804703743147" calcext:value-type="float">
            <text:p>-705,804703743147</text:p>
          </table:table-cell>
          <table:table-cell table:style-name="ce1" table:formula="of:=[.G25]+h" office:value-type="float" office:value="0.24" calcext:value-type="float">
            <text:p>0,24</text:p>
          </table:table-cell>
          <table:table-cell table:style-name="ce1" table:formula="of:=[.H25]+ h*[.F26]" office:value-type="float" office:value="791.568714186575" calcext:value-type="float">
            <text:p>791,5687141865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]" office:value-type="float" office:value="0.24" calcext:value-type="float">
            <text:p>0,24</text:p>
          </table:table-cell>
          <table:table-cell table:style-name="ce1" table:formula="of:=[.H26]" office:value-type="float" office:value="791.568714186575" calcext:value-type="float">
            <text:p>791,568714186575</text:p>
          </table:table-cell>
          <table:table-cell table:style-name="ce1" table:formula="of:=-68 - ([.E27]^2/Ao)" office:value-type="float" office:value="-694.581029278988" calcext:value-type="float">
            <text:p>-694,581029278988</text:p>
          </table:table-cell>
          <table:table-cell table:style-name="ce1" table:formula="of:=[.G26]+h" office:value-type="float" office:value="0.25" calcext:value-type="float">
            <text:p>0,25</text:p>
          </table:table-cell>
          <table:table-cell table:style-name="ce1" table:formula="of:=[.H26]+ h*[.F27]" office:value-type="float" office:value="784.622903893785" calcext:value-type="float">
            <text:p>784,6229038937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]" office:value-type="float" office:value="0.25" calcext:value-type="float">
            <text:p>0,25</text:p>
          </table:table-cell>
          <table:table-cell table:style-name="ce1" table:formula="of:=[.H27]" office:value-type="float" office:value="784.622903893785" calcext:value-type="float">
            <text:p>784,622903893785</text:p>
          </table:table-cell>
          <table:table-cell table:style-name="ce1" table:formula="of:=-68 - ([.E28]^2/Ao)" office:value-type="float" office:value="-683.633101314716" calcext:value-type="float">
            <text:p>-683,633101314716</text:p>
          </table:table-cell>
          <table:table-cell table:style-name="ce1" table:formula="of:=[.G27]+h" office:value-type="float" office:value="0.26" calcext:value-type="float">
            <text:p>0,26</text:p>
          </table:table-cell>
          <table:table-cell table:style-name="ce1" table:formula="of:=[.H27]+ h*[.F28]" office:value-type="float" office:value="777.786572880638" calcext:value-type="float">
            <text:p>777,7865728806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]" office:value-type="float" office:value="0.26" calcext:value-type="float">
            <text:p>0,26</text:p>
          </table:table-cell>
          <table:table-cell table:style-name="ce1" table:formula="of:=[.H28]" office:value-type="float" office:value="777.786572880638" calcext:value-type="float">
            <text:p>777,786572880638</text:p>
          </table:table-cell>
          <table:table-cell table:style-name="ce1" table:formula="of:=-68 - ([.E29]^2/Ao)" office:value-type="float" office:value="-672.951952953408" calcext:value-type="float">
            <text:p>-672,951952953408</text:p>
          </table:table-cell>
          <table:table-cell table:style-name="ce1" table:formula="of:=[.G28]+h" office:value-type="float" office:value="0.27" calcext:value-type="float">
            <text:p>0,27</text:p>
          </table:table-cell>
          <table:table-cell table:style-name="ce1" table:formula="of:=[.H28]+ h*[.F29]" office:value-type="float" office:value="771.057053351104" calcext:value-type="float">
            <text:p>771,0570533511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]" office:value-type="float" office:value="0.27" calcext:value-type="float">
            <text:p>0,27</text:p>
          </table:table-cell>
          <table:table-cell table:style-name="ce1" table:formula="of:=[.H29]" office:value-type="float" office:value="771.057053351104" calcext:value-type="float">
            <text:p>771,057053351104</text:p>
          </table:table-cell>
          <table:table-cell table:style-name="ce1" table:formula="of:=-68 - ([.E30]^2/Ao)" office:value-type="float" office:value="-662.528979522487" calcext:value-type="float">
            <text:p>-662,528979522487</text:p>
          </table:table-cell>
          <table:table-cell table:style-name="ce1" table:formula="of:=[.G29]+h" office:value-type="float" office:value="0.28" calcext:value-type="float">
            <text:p>0,28</text:p>
          </table:table-cell>
          <table:table-cell table:style-name="ce1" table:formula="of:=[.H29]+ h*[.F30]" office:value-type="float" office:value="764.431763555879" calcext:value-type="float">
            <text:p>764,4317635558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]" office:value-type="float" office:value="0.28" calcext:value-type="float">
            <text:p>0,28</text:p>
          </table:table-cell>
          <table:table-cell table:style-name="ce1" table:formula="of:=[.H30]" office:value-type="float" office:value="764.431763555879" calcext:value-type="float">
            <text:p>764,431763555879</text:p>
          </table:table-cell>
          <table:table-cell table:style-name="ce1" table:formula="of:=-68 - ([.E31]^2/Ao)" office:value-type="float" office:value="-652.355921133152" calcext:value-type="float">
            <text:p>-652,355921133152</text:p>
          </table:table-cell>
          <table:table-cell table:style-name="ce1" table:formula="of:=[.G30]+h" office:value-type="float" office:value="0.29" calcext:value-type="float">
            <text:p>0,29</text:p>
          </table:table-cell>
          <table:table-cell table:style-name="ce1" table:formula="of:=[.H30]+ h*[.F31]" office:value-type="float" office:value="757.908204344548" calcext:value-type="float">
            <text:p>757,9082043445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]" office:value-type="float" office:value="0.29" calcext:value-type="float">
            <text:p>0,29</text:p>
          </table:table-cell>
          <table:table-cell table:style-name="ce1" table:formula="of:=[.H31]" office:value-type="float" office:value="757.908204344548" calcext:value-type="float">
            <text:p>757,908204344548</text:p>
          </table:table-cell>
          <table:table-cell table:style-name="ce1" table:formula="of:=-68 - ([.E32]^2/Ao)" office:value-type="float" office:value="-642.424846212777" calcext:value-type="float">
            <text:p>-642,424846212777</text:p>
          </table:table-cell>
          <table:table-cell table:style-name="ce1" table:formula="of:=[.G31]+h" office:value-type="float" office:value="0.3" calcext:value-type="float">
            <text:p>0,3</text:p>
          </table:table-cell>
          <table:table-cell table:style-name="ce1" table:formula="of:=[.H31]+ h*[.F32]" office:value-type="float" office:value="751.48395588242" calcext:value-type="float">
            <text:p>751,483955882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]" office:value-type="float" office:value="0.3" calcext:value-type="float">
            <text:p>0,3</text:p>
          </table:table-cell>
          <table:table-cell table:style-name="ce1" table:formula="of:=[.H32]" office:value-type="float" office:value="751.48395588242" calcext:value-type="float">
            <text:p>751,48395588242</text:p>
          </table:table-cell>
          <table:table-cell table:style-name="ce1" table:formula="of:=-68 - ([.E33]^2/Ao)" office:value-type="float" office:value="-632.728135948691" calcext:value-type="float">
            <text:p>-632,728135948691</text:p>
          </table:table-cell>
          <table:table-cell table:style-name="ce1" table:formula="of:=[.G32]+h" office:value-type="float" office:value="0.31" calcext:value-type="float">
            <text:p>0,31</text:p>
          </table:table-cell>
          <table:table-cell table:style-name="ce1" table:formula="of:=[.H32]+ h*[.F33]" office:value-type="float" office:value="745.156674522933" calcext:value-type="float">
            <text:p>745,1566745229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]" office:value-type="float" office:value="0.31" calcext:value-type="float">
            <text:p>0,31</text:p>
          </table:table-cell>
          <table:table-cell table:style-name="ce1" table:formula="of:=[.H33]" office:value-type="float" office:value="745.156674522933" calcext:value-type="float">
            <text:p>745,156674522933</text:p>
          </table:table-cell>
          <table:table-cell table:style-name="ce1" table:formula="of:=-68 - ([.E34]^2/Ao)" office:value-type="float" office:value="-623.258469586076" calcext:value-type="float">
            <text:p>-623,258469586076</text:p>
          </table:table-cell>
          <table:table-cell table:style-name="ce1" table:formula="of:=[.G33]+h" office:value-type="float" office:value="0.32" calcext:value-type="float">
            <text:p>0,32</text:p>
          </table:table-cell>
          <table:table-cell table:style-name="ce1" table:formula="of:=[.H33]+ h*[.F34]" office:value-type="float" office:value="738.924089827072" calcext:value-type="float">
            <text:p>738,9240898270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]" office:value-type="float" office:value="0.32" calcext:value-type="float">
            <text:p>0,32</text:p>
          </table:table-cell>
          <table:table-cell table:style-name="ce1" table:formula="of:=[.H34]" office:value-type="float" office:value="738.924089827072" calcext:value-type="float">
            <text:p>738,924089827072</text:p>
          </table:table-cell>
          <table:table-cell table:style-name="ce1" table:formula="of:=-68 - ([.E35]^2/Ao)" office:value-type="float" office:value="-614.008810526767" calcext:value-type="float">
            <text:p>-614,008810526767</text:p>
          </table:table-cell>
          <table:table-cell table:style-name="ce1" table:formula="of:=[.G34]+h" office:value-type="float" office:value="0.33" calcext:value-type="float">
            <text:p>0,33</text:p>
          </table:table-cell>
          <table:table-cell table:style-name="ce1" table:formula="of:=[.H34]+ h*[.F35]" office:value-type="float" office:value="732.784001721804" calcext:value-type="float">
            <text:p>732,7840017218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]" office:value-type="float" office:value="0.33" calcext:value-type="float">
            <text:p>0,33</text:p>
          </table:table-cell>
          <table:table-cell table:style-name="ce1" table:formula="of:=[.H35]" office:value-type="float" office:value="732.784001721804" calcext:value-type="float">
            <text:p>732,784001721804</text:p>
          </table:table-cell>
          <table:table-cell table:style-name="ce1" table:formula="of:=-68 - ([.E36]^2/Ao)" office:value-type="float" office:value="-604.972393179421" calcext:value-type="float">
            <text:p>-604,972393179421</text:p>
          </table:table-cell>
          <table:table-cell table:style-name="ce1" table:formula="of:=[.G35]+h" office:value-type="float" office:value="0.34" calcext:value-type="float">
            <text:p>0,34</text:p>
          </table:table-cell>
          <table:table-cell table:style-name="ce1" table:formula="of:=[.H35]+ h*[.F36]" office:value-type="float" office:value="726.73427779001" calcext:value-type="float">
            <text:p>726,734277790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]" office:value-type="float" office:value="0.34" calcext:value-type="float">
            <text:p>0,34</text:p>
          </table:table-cell>
          <table:table-cell table:style-name="ce1" table:formula="of:=[.H36]" office:value-type="float" office:value="726.73427779001" calcext:value-type="float">
            <text:p>726,73427779001</text:p>
          </table:table-cell>
          <table:table-cell table:style-name="ce1" table:formula="of:=-68 - ([.E37]^2/Ao)" office:value-type="float" office:value="-596.142710514968" calcext:value-type="float">
            <text:p>-596,142710514968</text:p>
          </table:table-cell>
          <table:table-cell table:style-name="ce1" table:formula="of:=[.G36]+h" office:value-type="float" office:value="0.35" calcext:value-type="float">
            <text:p>0,35</text:p>
          </table:table-cell>
          <table:table-cell table:style-name="ce1" table:formula="of:=[.H36]+ h*[.F37]" office:value-type="float" office:value="720.772850684861" calcext:value-type="float">
            <text:p>720,7728506848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]" office:value-type="float" office:value="0.35" calcext:value-type="float">
            <text:p>0,35</text:p>
          </table:table-cell>
          <table:table-cell table:style-name="ce1" table:formula="of:=[.H37]" office:value-type="float" office:value="720.772850684861" calcext:value-type="float">
            <text:p>720,772850684861</text:p>
          </table:table-cell>
          <table:table-cell table:style-name="ce1" table:formula="of:=-68 - ([.E38]^2/Ao)" office:value-type="float" office:value="-587.51350228438" calcext:value-type="float">
            <text:p>-587,51350228438</text:p>
          </table:table-cell>
          <table:table-cell table:style-name="ce1" table:formula="of:=[.G37]+h" office:value-type="float" office:value="0.36" calcext:value-type="float">
            <text:p>0,36</text:p>
          </table:table-cell>
          <table:table-cell table:style-name="ce1" table:formula="of:=[.H37]+ h*[.F38]" office:value-type="float" office:value="714.897715662017" calcext:value-type="float">
            <text:p>714,8977156620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]" office:value-type="float" office:value="0.36" calcext:value-type="float">
            <text:p>0,36</text:p>
          </table:table-cell>
          <table:table-cell table:style-name="ce1" table:formula="of:=[.H38]" office:value-type="float" office:value="714.897715662017" calcext:value-type="float">
            <text:p>714,897715662017</text:p>
          </table:table-cell>
          <table:table-cell table:style-name="ce1" table:formula="of:=-68 - ([.E39]^2/Ao)" office:value-type="float" office:value="-579.07874385877" calcext:value-type="float">
            <text:p>-579,07874385877</text:p>
          </table:table-cell>
          <table:table-cell table:style-name="ce1" table:formula="of:=[.G38]+h" office:value-type="float" office:value="0.37" calcext:value-type="float">
            <text:p>0,37</text:p>
          </table:table-cell>
          <table:table-cell table:style-name="ce1" table:formula="of:=[.H38]+ h*[.F39]" office:value-type="float" office:value="709.106928223429" calcext:value-type="float">
            <text:p>709,1069282234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]" office:value-type="float" office:value="0.37" calcext:value-type="float">
            <text:p>0,37</text:p>
          </table:table-cell>
          <table:table-cell table:style-name="ce1" table:formula="of:=[.H39]" office:value-type="float" office:value="709.106928223429" calcext:value-type="float">
            <text:p>709,106928223429</text:p>
          </table:table-cell>
          <table:table-cell table:style-name="ce1" table:formula="of:=-68 - ([.E40]^2/Ao)" office:value-type="float" office:value="-570.832635654467" calcext:value-type="float">
            <text:p>-570,832635654467</text:p>
          </table:table-cell>
          <table:table-cell table:style-name="ce1" table:formula="of:=[.G39]+h" office:value-type="float" office:value="0.38" calcext:value-type="float">
            <text:p>0,38</text:p>
          </table:table-cell>
          <table:table-cell table:style-name="ce1" table:formula="of:=[.H39]+ h*[.F40]" office:value-type="float" office:value="703.398601866884" calcext:value-type="float">
            <text:p>703,3986018668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]" office:value-type="float" office:value="0.38" calcext:value-type="float">
            <text:p>0,38</text:p>
          </table:table-cell>
          <table:table-cell table:style-name="ce1" table:formula="of:=[.H40]" office:value-type="float" office:value="703.398601866884" calcext:value-type="float">
            <text:p>703,398601866884</text:p>
          </table:table-cell>
          <table:table-cell table:style-name="ce1" table:formula="of:=-68 - ([.E41]^2/Ao)" office:value-type="float" office:value="-562.769593108288" calcext:value-type="float">
            <text:p>-562,769593108288</text:p>
          </table:table-cell>
          <table:table-cell table:style-name="ce1" table:formula="of:=[.G40]+h" office:value-type="float" office:value="0.39" calcext:value-type="float">
            <text:p>0,39</text:p>
          </table:table-cell>
          <table:table-cell table:style-name="ce1" table:formula="of:=[.H40]+ h*[.F41]" office:value-type="float" office:value="697.770905935802" calcext:value-type="float">
            <text:p>697,7709059358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]" office:value-type="float" office:value="0.39" calcext:value-type="float">
            <text:p>0,39</text:p>
          </table:table-cell>
          <table:table-cell table:style-name="ce1" table:formula="of:=[.H41]" office:value-type="float" office:value="697.770905935802" calcext:value-type="float">
            <text:p>697,770905935802</text:p>
          </table:table-cell>
          <table:table-cell table:style-name="ce1" table:formula="of:=-68 - ([.E42]^2/Ao)" office:value-type="float" office:value="-554.884237170469" calcext:value-type="float">
            <text:p>-554,884237170469</text:p>
          </table:table-cell>
          <table:table-cell table:style-name="ce1" table:formula="of:=[.G41]+h" office:value-type="float" office:value="0.4" calcext:value-type="float">
            <text:p>0,4</text:p>
          </table:table-cell>
          <table:table-cell table:style-name="ce1" table:formula="of:=[.H41]+ h*[.F42]" office:value-type="float" office:value="692.222063564097" calcext:value-type="float">
            <text:p>692,2220635640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]" office:value-type="float" office:value="0.4" calcext:value-type="float">
            <text:p>0,4</text:p>
          </table:table-cell>
          <table:table-cell table:style-name="ce1" table:formula="of:=[.H42]" office:value-type="float" office:value="692.222063564097" calcext:value-type="float">
            <text:p>692,222063564097</text:p>
          </table:table-cell>
          <table:table-cell table:style-name="ce1" table:formula="of:=-68 - ([.E43]^2/Ao)" office:value-type="float" office:value="-547.171385284936" calcext:value-type="float">
            <text:p>-547,171385284936</text:p>
          </table:table-cell>
          <table:table-cell table:style-name="ce1" table:formula="of:=[.G42]+h" office:value-type="float" office:value="0.41" calcext:value-type="float">
            <text:p>0,41</text:p>
          </table:table-cell>
          <table:table-cell table:style-name="ce1" table:formula="of:=[.H42]+ h*[.F43]" office:value-type="float" office:value="686.750349711247" calcext:value-type="float">
            <text:p>686,7503497112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]" office:value-type="float" office:value="0.41" calcext:value-type="float">
            <text:p>0,41</text:p>
          </table:table-cell>
          <table:table-cell table:style-name="ce1" table:formula="of:=[.H43]" office:value-type="float" office:value="686.750349711247" calcext:value-type="float">
            <text:p>686,750349711247</text:p>
          </table:table-cell>
          <table:table-cell table:style-name="ce1" table:formula="of:=-68 - ([.E44]^2/Ao)" office:value-type="float" office:value="-539.626042828521" calcext:value-type="float">
            <text:p>-539,626042828521</text:p>
          </table:table-cell>
          <table:table-cell table:style-name="ce1" table:formula="of:=[.G43]+h" office:value-type="float" office:value="0.42" calcext:value-type="float">
            <text:p>0,42</text:p>
          </table:table-cell>
          <table:table-cell table:style-name="ce1" table:formula="of:=[.H43]+ h*[.F44]" office:value-type="float" office:value="681.354089282962" calcext:value-type="float">
            <text:p>681,3540892829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]" office:value-type="float" office:value="0.42" calcext:value-type="float">
            <text:p>0,42</text:p>
          </table:table-cell>
          <table:table-cell table:style-name="ce1" table:formula="of:=[.H44]" office:value-type="float" office:value="681.354089282962" calcext:value-type="float">
            <text:p>681,354089282962</text:p>
          </table:table-cell>
          <table:table-cell table:style-name="ce1" table:formula="of:=-68 - ([.E45]^2/Ao)" office:value-type="float" office:value="-532.243394982615" calcext:value-type="float">
            <text:p>-532,243394982615</text:p>
          </table:table-cell>
          <table:table-cell table:style-name="ce1" table:formula="of:=[.G44]+h" office:value-type="float" office:value="0.43" calcext:value-type="float">
            <text:p>0,43</text:p>
          </table:table-cell>
          <table:table-cell table:style-name="ce1" table:formula="of:=[.H44]+ h*[.F45]" office:value-type="float" office:value="676.031655333136" calcext:value-type="float">
            <text:p>676,0316553331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]" office:value-type="float" office:value="0.43" calcext:value-type="float">
            <text:p>0,43</text:p>
          </table:table-cell>
          <table:table-cell table:style-name="ce1" table:formula="of:=[.H45]" office:value-type="float" office:value="676.031655333136" calcext:value-type="float">
            <text:p>676,031655333136</text:p>
          </table:table-cell>
          <table:table-cell table:style-name="ce1" table:formula="of:=-68 - ([.E46]^2/Ao)" office:value-type="float" office:value="-525.01879901246" calcext:value-type="float">
            <text:p>-525,01879901246</text:p>
          </table:table-cell>
          <table:table-cell table:style-name="ce1" table:formula="of:=[.G45]+h" office:value-type="float" office:value="0.44" calcext:value-type="float">
            <text:p>0,44</text:p>
          </table:table-cell>
          <table:table-cell table:style-name="ce1" table:formula="of:=[.H45]+ h*[.F46]" office:value-type="float" office:value="670.781467343011" calcext:value-type="float">
            <text:p>670,781467343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]" office:value-type="float" office:value="0.44" calcext:value-type="float">
            <text:p>0,44</text:p>
          </table:table-cell>
          <table:table-cell table:style-name="ce1" table:formula="of:=[.H46]" office:value-type="float" office:value="670.781467343011" calcext:value-type="float">
            <text:p>670,781467343011</text:p>
          </table:table-cell>
          <table:table-cell table:style-name="ce1" table:formula="of:=-68 - ([.E47]^2/Ao)" office:value-type="float" office:value="-517.947776930844" calcext:value-type="float">
            <text:p>-517,947776930844</text:p>
          </table:table-cell>
          <table:table-cell table:style-name="ce1" table:formula="of:=[.G46]+h" office:value-type="float" office:value="0.45" calcext:value-type="float">
            <text:p>0,45</text:p>
          </table:table-cell>
          <table:table-cell table:style-name="ce1" table:formula="of:=[.H46]+ h*[.F47]" office:value-type="float" office:value="665.601989573703" calcext:value-type="float">
            <text:p>665,6019895737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]" office:value-type="float" office:value="0.45" calcext:value-type="float">
            <text:p>0,45</text:p>
          </table:table-cell>
          <table:table-cell table:style-name="ce1" table:formula="of:=[.H47]" office:value-type="float" office:value="665.601989573703" calcext:value-type="float">
            <text:p>665,601989573703</text:p>
          </table:table-cell>
          <table:table-cell table:style-name="ce1" table:formula="of:=-68 - ([.E48]^2/Ao)" office:value-type="float" office:value="-511.026008524472" calcext:value-type="float">
            <text:p>-511,026008524472</text:p>
          </table:table-cell>
          <table:table-cell table:style-name="ce1" table:formula="of:=[.G47]+h" office:value-type="float" office:value="0.46" calcext:value-type="float">
            <text:p>0,46</text:p>
          </table:table-cell>
          <table:table-cell table:style-name="ce1" table:formula="of:=[.H47]+ h*[.F48]" office:value-type="float" office:value="660.491729488458" calcext:value-type="float">
            <text:p>660,4917294884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]" office:value-type="float" office:value="0.46" calcext:value-type="float">
            <text:p>0,46</text:p>
          </table:table-cell>
          <table:table-cell table:style-name="ce1" table:formula="of:=[.H48]" office:value-type="float" office:value="660.491729488458" calcext:value-type="float">
            <text:p>660,491729488458</text:p>
          </table:table-cell>
          <table:table-cell table:style-name="ce1" table:formula="of:=-68 - ([.E49]^2/Ao)" office:value-type="float" office:value="-504.249324722655" calcext:value-type="float">
            <text:p>-504,249324722655</text:p>
          </table:table-cell>
          <table:table-cell table:style-name="ce1" table:formula="of:=[.G48]+h" office:value-type="float" office:value="0.47" calcext:value-type="float">
            <text:p>0,47</text:p>
          </table:table-cell>
          <table:table-cell table:style-name="ce1" table:formula="of:=[.H48]+ h*[.F49]" office:value-type="float" office:value="655.449236241232" calcext:value-type="float">
            <text:p>655,4492362412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]" office:value-type="float" office:value="0.47" calcext:value-type="float">
            <text:p>0,47</text:p>
          </table:table-cell>
          <table:table-cell table:style-name="ce1" table:formula="of:=[.H49]" office:value-type="float" office:value="655.449236241232" calcext:value-type="float">
            <text:p>655,449236241232</text:p>
          </table:table-cell>
          <table:table-cell table:style-name="ce1" table:formula="of:=-68 - ([.E50]^2/Ao)" office:value-type="float" office:value="-497.613701289214" calcext:value-type="float">
            <text:p>-497,613701289214</text:p>
          </table:table-cell>
          <table:table-cell table:style-name="ce1" table:formula="of:=[.G49]+h" office:value-type="float" office:value="0.48" calcext:value-type="float">
            <text:p>0,48</text:p>
          </table:table-cell>
          <table:table-cell table:style-name="ce1" table:formula="of:=[.H49]+ h*[.F50]" office:value-type="float" office:value="650.47309922834" calcext:value-type="float">
            <text:p>650,473099228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]" office:value-type="float" office:value="0.48" calcext:value-type="float">
            <text:p>0,48</text:p>
          </table:table-cell>
          <table:table-cell table:style-name="ce1" table:formula="of:=[.H50]" office:value-type="float" office:value="650.47309922834" calcext:value-type="float">
            <text:p>650,47309922834</text:p>
          </table:table-cell>
          <table:table-cell table:style-name="ce1" table:formula="of:=-68 - ([.E51]^2/Ao)" office:value-type="float" office:value="-491.115252819721" calcext:value-type="float">
            <text:p>-491,115252819721</text:p>
          </table:table-cell>
          <table:table-cell table:style-name="ce1" table:formula="of:=[.G50]+h" office:value-type="float" office:value="0.49" calcext:value-type="float">
            <text:p>0,49</text:p>
          </table:table-cell>
          <table:table-cell table:style-name="ce1" table:formula="of:=[.H50]+ h*[.F51]" office:value-type="float" office:value="645.561946700142" calcext:value-type="float">
            <text:p>645,5619467001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]" office:value-type="float" office:value="0.49" calcext:value-type="float">
            <text:p>0,49</text:p>
          </table:table-cell>
          <table:table-cell table:style-name="ce1" table:formula="of:=[.H51]" office:value-type="float" office:value="645.561946700142" calcext:value-type="float">
            <text:p>645,561946700142</text:p>
          </table:table-cell>
          <table:table-cell table:style-name="ce1" table:formula="of:=-68 - ([.E52]^2/Ao)" office:value-type="float" office:value="-484.750227027277" calcext:value-type="float">
            <text:p>-484,750227027277</text:p>
          </table:table-cell>
          <table:table-cell table:style-name="ce1" table:formula="of:=[.G51]+h" office:value-type="float" office:value="0.5" calcext:value-type="float">
            <text:p>0,5</text:p>
          </table:table-cell>
          <table:table-cell table:style-name="ce1" table:formula="of:=[.H51]+ h*[.F52]" office:value-type="float" office:value="640.71444442987" calcext:value-type="float">
            <text:p>640,714444429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]" office:value-type="float" office:value="0.5" calcext:value-type="float">
            <text:p>0,5</text:p>
          </table:table-cell>
          <table:table-cell table:style-name="ce1" table:formula="of:=[.H52]" office:value-type="float" office:value="640.71444442987" calcext:value-type="float">
            <text:p>640,71444442987</text:p>
          </table:table-cell>
          <table:table-cell table:style-name="ce1" table:formula="of:=-68 - ([.E53]^2/Ao)" office:value-type="float" office:value="-478.514999301076" calcext:value-type="float">
            <text:p>-478,514999301076</text:p>
          </table:table-cell>
          <table:table-cell table:style-name="ce1" table:formula="of:=[.G52]+h" office:value-type="float" office:value="0.51" calcext:value-type="float">
            <text:p>0,51</text:p>
          </table:table-cell>
          <table:table-cell table:style-name="ce1" table:formula="of:=[.H52]+ h*[.F53]" office:value-type="float" office:value="635.929294436859" calcext:value-type="float">
            <text:p>635,9292944368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]" office:value-type="float" office:value="0.51" calcext:value-type="float">
            <text:p>0,51</text:p>
          </table:table-cell>
          <table:table-cell table:style-name="ce1" table:formula="of:=[.H53]" office:value-type="float" office:value="635.929294436859" calcext:value-type="float">
            <text:p>635,929294436859</text:p>
          </table:table-cell>
          <table:table-cell table:style-name="ce1" table:formula="of:=-68 - ([.E54]^2/Ao)" office:value-type="float" office:value="-472.406067522961" calcext:value-type="float">
            <text:p>-472,406067522961</text:p>
          </table:table-cell>
          <table:table-cell table:style-name="ce1" table:formula="of:=[.G53]+h" office:value-type="float" office:value="0.52" calcext:value-type="float">
            <text:p>0,52</text:p>
          </table:table-cell>
          <table:table-cell table:style-name="ce1" table:formula="of:=[.H53]+ h*[.F54]" office:value-type="float" office:value="631.205233761629" calcext:value-type="float">
            <text:p>631,2052337616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]" office:value-type="float" office:value="0.52" calcext:value-type="float">
            <text:p>0,52</text:p>
          </table:table-cell>
          <table:table-cell table:style-name="ce1" table:formula="of:=[.H54]" office:value-type="float" office:value="631.205233761629" calcext:value-type="float">
            <text:p>631,205233761629</text:p>
          </table:table-cell>
          <table:table-cell table:style-name="ce1" table:formula="of:=-68 - ([.E55]^2/Ao)" office:value-type="float" office:value="-466.420047128073" calcext:value-type="float">
            <text:p>-466,420047128073</text:p>
          </table:table-cell>
          <table:table-cell table:style-name="ce1" table:formula="of:=[.G54]+h" office:value-type="float" office:value="0.53" calcext:value-type="float">
            <text:p>0,53</text:p>
          </table:table-cell>
          <table:table-cell table:style-name="ce1" table:formula="of:=[.H54]+ h*[.F55]" office:value-type="float" office:value="626.541033290348" calcext:value-type="float">
            <text:p>626,5410332903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]" office:value-type="float" office:value="0.53" calcext:value-type="float">
            <text:p>0,53</text:p>
          </table:table-cell>
          <table:table-cell table:style-name="ce1" table:formula="of:=[.H55]" office:value-type="float" office:value="626.541033290348" calcext:value-type="float">
            <text:p>626,541033290348</text:p>
          </table:table-cell>
          <table:table-cell table:style-name="ce1" table:formula="of:=-68 - ([.E56]^2/Ao)" office:value-type="float" office:value="-460.553666396538" calcext:value-type="float">
            <text:p>-460,553666396538</text:p>
          </table:table-cell>
          <table:table-cell table:style-name="ce1" table:formula="of:=[.G55]+h" office:value-type="float" office:value="0.54" calcext:value-type="float">
            <text:p>0,54</text:p>
          </table:table-cell>
          <table:table-cell table:style-name="ce1" table:formula="of:=[.H55]+ h*[.F56]" office:value-type="float" office:value="621.935496626383" calcext:value-type="float">
            <text:p>621,9354966263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]" office:value-type="float" office:value="0.54" calcext:value-type="float">
            <text:p>0,54</text:p>
          </table:table-cell>
          <table:table-cell table:style-name="ce1" table:formula="of:=[.H56]" office:value-type="float" office:value="621.935496626383" calcext:value-type="float">
            <text:p>621,935496626383</text:p>
          </table:table-cell>
          <table:table-cell table:style-name="ce1" table:formula="of:=-68 - ([.E57]^2/Ao)" office:value-type="float" office:value="-454.803761963906" calcext:value-type="float">
            <text:p>-454,803761963906</text:p>
          </table:table-cell>
          <table:table-cell table:style-name="ce1" table:formula="of:=[.G56]+h" office:value-type="float" office:value="0.55" calcext:value-type="float">
            <text:p>0,55</text:p>
          </table:table-cell>
          <table:table-cell table:style-name="ce1" table:formula="of:=[.H56]+ h*[.F57]" office:value-type="float" office:value="617.387459006744" calcext:value-type="float">
            <text:p>617,3874590067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]" office:value-type="float" office:value="0.55" calcext:value-type="float">
            <text:p>0,55</text:p>
          </table:table-cell>
          <table:table-cell table:style-name="ce1" table:formula="of:=[.H57]" office:value-type="float" office:value="617.387459006744" calcext:value-type="float">
            <text:p>617,387459006744</text:p>
          </table:table-cell>
          <table:table-cell table:style-name="ce1" table:formula="of:=-68 - ([.E58]^2/Ao)" office:value-type="float" office:value="-449.167274538804" calcext:value-type="float">
            <text:p>-449,167274538804</text:p>
          </table:table-cell>
          <table:table-cell table:style-name="ce1" table:formula="of:=[.G57]+h" office:value-type="float" office:value="0.56" calcext:value-type="float">
            <text:p>0,56</text:p>
          </table:table-cell>
          <table:table-cell table:style-name="ce1" table:formula="of:=[.H57]+ h*[.F58]" office:value-type="float" office:value="612.895786261356" calcext:value-type="float">
            <text:p>612,8957862613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]" office:value-type="float" office:value="0.56" calcext:value-type="float">
            <text:p>0,56</text:p>
          </table:table-cell>
          <table:table-cell table:style-name="ce1" table:formula="of:=[.H58]" office:value-type="float" office:value="612.895786261356" calcext:value-type="float">
            <text:p>612,895786261356</text:p>
          </table:table-cell>
          <table:table-cell table:style-name="ce1" table:formula="of:=-68 - ([.E59]^2/Ao)" office:value-type="float" office:value="-443.641244816926" calcext:value-type="float">
            <text:p>-443,641244816926</text:p>
          </table:table-cell>
          <table:table-cell table:style-name="ce1" table:formula="of:=[.G58]+h" office:value-type="float" office:value="0.57" calcext:value-type="float">
            <text:p>0,57</text:p>
          </table:table-cell>
          <table:table-cell table:style-name="ce1" table:formula="of:=[.H58]+ h*[.F59]" office:value-type="float" office:value="608.459373813187" calcext:value-type="float">
            <text:p>608,4593738131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]" office:value-type="float" office:value="0.57" calcext:value-type="float">
            <text:p>0,57</text:p>
          </table:table-cell>
          <table:table-cell table:style-name="ce1" table:formula="of:=[.H59]" office:value-type="float" office:value="608.459373813187" calcext:value-type="float">
            <text:p>608,459373813187</text:p>
          </table:table-cell>
          <table:table-cell table:style-name="ce1" table:formula="of:=-68 - ([.E60]^2/Ao)" office:value-type="float" office:value="-438.222809581135" calcext:value-type="float">
            <text:p>-438,222809581135</text:p>
          </table:table-cell>
          <table:table-cell table:style-name="ce1" table:formula="of:=[.G59]+h" office:value-type="float" office:value="0.58" calcext:value-type="float">
            <text:p>0,58</text:p>
          </table:table-cell>
          <table:table-cell table:style-name="ce1" table:formula="of:=[.H59]+ h*[.F60]" office:value-type="float" office:value="604.077145717375" calcext:value-type="float">
            <text:p>604,0771457173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]" office:value-type="float" office:value="0.58" calcext:value-type="float">
            <text:p>0,58</text:p>
          </table:table-cell>
          <table:table-cell table:style-name="ce1" table:formula="of:=[.H60]" office:value-type="float" office:value="604.077145717375" calcext:value-type="float">
            <text:p>604,077145717375</text:p>
          </table:table-cell>
          <table:table-cell table:style-name="ce1" table:formula="of:=-68 - ([.E61]^2/Ao)" office:value-type="float" office:value="-432.909197978051" calcext:value-type="float">
            <text:p>-432,909197978051</text:p>
          </table:table-cell>
          <table:table-cell table:style-name="ce1" table:formula="of:=[.G60]+h" office:value-type="float" office:value="0.59" calcext:value-type="float">
            <text:p>0,59</text:p>
          </table:table-cell>
          <table:table-cell table:style-name="ce1" table:formula="of:=[.H60]+ h*[.F61]" office:value-type="float" office:value="599.748053737595" calcext:value-type="float">
            <text:p>599,7480537375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]" office:value-type="float" office:value="0.59" calcext:value-type="float">
            <text:p>0,59</text:p>
          </table:table-cell>
          <table:table-cell table:style-name="ce1" table:formula="of:=[.H61]" office:value-type="float" office:value="599.748053737595" calcext:value-type="float">
            <text:p>599,748053737595</text:p>
          </table:table-cell>
          <table:table-cell table:style-name="ce1" table:formula="of:=-68 - ([.E62]^2/Ao)" office:value-type="float" office:value="-427.697727962033" calcext:value-type="float">
            <text:p>-427,697727962033</text:p>
          </table:table-cell>
          <table:table-cell table:style-name="ce1" table:formula="of:=[.G61]+h" office:value-type="float" office:value="0.6" calcext:value-type="float">
            <text:p>0,6</text:p>
          </table:table-cell>
          <table:table-cell table:style-name="ce1" table:formula="of:=[.H61]+ h*[.F62]" office:value-type="float" office:value="595.471076457974" calcext:value-type="float">
            <text:p>595,4710764579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]" office:value-type="float" office:value="0.6" calcext:value-type="float">
            <text:p>0,6</text:p>
          </table:table-cell>
          <table:table-cell table:style-name="ce1" table:formula="of:=[.H62]" office:value-type="float" office:value="595.471076457974" calcext:value-type="float">
            <text:p>595,471076457974</text:p>
          </table:table-cell>
          <table:table-cell table:style-name="ce1" table:formula="of:=-68 - ([.E63]^2/Ao)" office:value-type="float" office:value="-422.585802898019" calcext:value-type="float">
            <text:p>-422,585802898019</text:p>
          </table:table-cell>
          <table:table-cell table:style-name="ce1" table:formula="of:=[.G62]+h" office:value-type="float" office:value="0.61" calcext:value-type="float">
            <text:p>0,61</text:p>
          </table:table-cell>
          <table:table-cell table:style-name="ce1" table:formula="of:=[.H62]+ h*[.F63]" office:value-type="float" office:value="591.245218428994" calcext:value-type="float">
            <text:p>591,2452184289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]" office:value-type="float" office:value="0.61" calcext:value-type="float">
            <text:p>0,61</text:p>
          </table:table-cell>
          <table:table-cell table:style-name="ce1" table:formula="of:=[.H63]" office:value-type="float" office:value="591.245218428994" calcext:value-type="float">
            <text:p>591,245218428994</text:p>
          </table:table-cell>
          <table:table-cell table:style-name="ce1" table:formula="of:=-68 - ([.E64]^2/Ao)" office:value-type="float" office:value="-417.570908315149" calcext:value-type="float">
            <text:p>-417,570908315149</text:p>
          </table:table-cell>
          <table:table-cell table:style-name="ce1" table:formula="of:=[.G63]+h" office:value-type="float" office:value="0.62" calcext:value-type="float">
            <text:p>0,62</text:p>
          </table:table-cell>
          <table:table-cell table:style-name="ce1" table:formula="of:=[.H63]+ h*[.F64]" office:value-type="float" office:value="587.069509345843" calcext:value-type="float">
            <text:p>587,0695093458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]" office:value-type="float" office:value="0.62" calcext:value-type="float">
            <text:p>0,62</text:p>
          </table:table-cell>
          <table:table-cell table:style-name="ce1" table:formula="of:=[.H64]" office:value-type="float" office:value="587.069509345843" calcext:value-type="float">
            <text:p>587,069509345843</text:p>
          </table:table-cell>
          <table:table-cell table:style-name="ce1" table:formula="of:=-68 - ([.E65]^2/Ao)" office:value-type="float" office:value="-412.650608803569" calcext:value-type="float">
            <text:p>-412,650608803569</text:p>
          </table:table-cell>
          <table:table-cell table:style-name="ce1" table:formula="of:=[.G64]+h" office:value-type="float" office:value="0.63" calcext:value-type="float">
            <text:p>0,63</text:p>
          </table:table-cell>
          <table:table-cell table:style-name="ce1" table:formula="of:=[.H64]+ h*[.F65]" office:value-type="float" office:value="582.943003257807" calcext:value-type="float">
            <text:p>582,9430032578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]" office:value-type="float" office:value="0.63" calcext:value-type="float">
            <text:p>0,63</text:p>
          </table:table-cell>
          <table:table-cell table:style-name="ce1" table:formula="of:=[.H65]" office:value-type="float" office:value="582.943003257807" calcext:value-type="float">
            <text:p>582,943003257807</text:p>
          </table:table-cell>
          <table:table-cell table:style-name="ce1" table:formula="of:=-68 - ([.E66]^2/Ao)" office:value-type="float" office:value="-407.822545047232" calcext:value-type="float">
            <text:p>-407,822545047232</text:p>
          </table:table-cell>
          <table:table-cell table:style-name="ce1" table:formula="of:=[.G65]+h" office:value-type="float" office:value="0.64" calcext:value-type="float">
            <text:p>0,64</text:p>
          </table:table-cell>
          <table:table-cell table:style-name="ce1" table:formula="of:=[.H65]+ h*[.F66]" office:value-type="float" office:value="578.864777807335" calcext:value-type="float">
            <text:p>578,8647778073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]" office:value-type="float" office:value="0.64" calcext:value-type="float">
            <text:p>0,64</text:p>
          </table:table-cell>
          <table:table-cell table:style-name="ce1" table:formula="of:=[.H66]" office:value-type="float" office:value="578.864777807335" calcext:value-type="float">
            <text:p>578,864777807335</text:p>
          </table:table-cell>
          <table:table-cell table:style-name="ce1" table:formula="of:=-68 - ([.E67]^2/Ao)" office:value-type="float" office:value="-403.084430985935" calcext:value-type="float">
            <text:p>-403,084430985935</text:p>
          </table:table-cell>
          <table:table-cell table:style-name="ce1" table:formula="of:=[.G66]+h" office:value-type="float" office:value="0.65" calcext:value-type="float">
            <text:p>0,65</text:p>
          </table:table-cell>
          <table:table-cell table:style-name="ce1" table:formula="of:=[.H66]+ h*[.F67]" office:value-type="float" office:value="574.833933497475" calcext:value-type="float">
            <text:p>574,8339334974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]" office:value-type="float" office:value="0.65" calcext:value-type="float">
            <text:p>0,65</text:p>
          </table:table-cell>
          <table:table-cell table:style-name="ce1" table:formula="of:=[.H67]" office:value-type="float" office:value="574.833933497475" calcext:value-type="float">
            <text:p>574,833933497475</text:p>
          </table:table-cell>
          <table:table-cell table:style-name="ce1" table:formula="of:=-68 - ([.E68]^2/Ao)" office:value-type="float" office:value="-398.43405110018" calcext:value-type="float">
            <text:p>-398,43405110018</text:p>
          </table:table-cell>
          <table:table-cell table:style-name="ce1" table:formula="of:=[.G67]+h" office:value-type="float" office:value="0.66" calcext:value-type="float">
            <text:p>0,66</text:p>
          </table:table-cell>
          <table:table-cell table:style-name="ce1" table:formula="of:=[.H67]+ h*[.F68]" office:value-type="float" office:value="570.849592986474" calcext:value-type="float">
            <text:p>570,8495929864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]" office:value-type="float" office:value="0.66" calcext:value-type="float">
            <text:p>0,66</text:p>
          </table:table-cell>
          <table:table-cell table:style-name="ce1" table:formula="of:=[.H68]" office:value-type="float" office:value="570.849592986474" calcext:value-type="float">
            <text:p>570,849592986474</text:p>
          </table:table-cell>
          <table:table-cell table:style-name="ce1" table:formula="of:=-68 - ([.E69]^2/Ao)" office:value-type="float" office:value="-393.869257812822" calcext:value-type="float">
            <text:p>-393,869257812822</text:p>
          </table:table-cell>
          <table:table-cell table:style-name="ce1" table:formula="of:=[.G68]+h" office:value-type="float" office:value="0.67" calcext:value-type="float">
            <text:p>0,67</text:p>
          </table:table-cell>
          <table:table-cell table:style-name="ce1" table:formula="of:=[.H68]+ h*[.F69]" office:value-type="float" office:value="566.910900408345" calcext:value-type="float">
            <text:p>566,9109004083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]" office:value-type="float" office:value="0.67" calcext:value-type="float">
            <text:p>0,67</text:p>
          </table:table-cell>
          <table:table-cell table:style-name="ce1" table:formula="of:=[.H69]" office:value-type="float" office:value="566.910900408345" calcext:value-type="float">
            <text:p>566,910900408345</text:p>
          </table:table-cell>
          <table:table-cell table:style-name="ce1" table:formula="of:=-68 - ([.E70]^2/Ao)" office:value-type="float" office:value="-389.387969001801" calcext:value-type="float">
            <text:p>-389,387969001801</text:p>
          </table:table-cell>
          <table:table-cell table:style-name="ce1" table:formula="of:=[.G69]+h" office:value-type="float" office:value="0.68" calcext:value-type="float">
            <text:p>0,68</text:p>
          </table:table-cell>
          <table:table-cell table:style-name="ce1" table:formula="of:=[.H69]+ h*[.F70]" office:value-type="float" office:value="563.017020718327" calcext:value-type="float">
            <text:p>563,0170207183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]" office:value-type="float" office:value="0.68" calcext:value-type="float">
            <text:p>0,68</text:p>
          </table:table-cell>
          <table:table-cell table:style-name="ce1" table:formula="of:=[.H70]" office:value-type="float" office:value="563.017020718327" calcext:value-type="float">
            <text:p>563,017020718327</text:p>
          </table:table-cell>
          <table:table-cell table:style-name="ce1" table:formula="of:=-68 - ([.E71]^2/Ao)" office:value-type="float" office:value="-384.988165618541" calcext:value-type="float">
            <text:p>-384,988165618541</text:p>
          </table:table-cell>
          <table:table-cell table:style-name="ce1" table:formula="of:=[.G70]+h" office:value-type="float" office:value="0.69" calcext:value-type="float">
            <text:p>0,69</text:p>
          </table:table-cell>
          <table:table-cell table:style-name="ce1" table:formula="of:=[.H70]+ h*[.F71]" office:value-type="float" office:value="559.167139062142" calcext:value-type="float">
            <text:p>559,1671390621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]" office:value-type="float" office:value="0.69" calcext:value-type="float">
            <text:p>0,69</text:p>
          </table:table-cell>
          <table:table-cell table:style-name="ce1" table:formula="of:=[.H71]" office:value-type="float" office:value="559.167139062142" calcext:value-type="float">
            <text:p>559,167139062142</text:p>
          </table:table-cell>
          <table:table-cell table:style-name="ce1" table:formula="of:=-68 - ([.E72]^2/Ao)" office:value-type="float" office:value="-380.667889406941" calcext:value-type="float">
            <text:p>-380,667889406941</text:p>
          </table:table-cell>
          <table:table-cell table:style-name="ce1" table:formula="of:=[.G71]+h" office:value-type="float" office:value="0.7" calcext:value-type="float">
            <text:p>0,7</text:p>
          </table:table-cell>
          <table:table-cell table:style-name="ce1" table:formula="of:=[.H71]+ h*[.F72]" office:value-type="float" office:value="555.360460168072" calcext:value-type="float">
            <text:p>555,3604601680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]" office:value-type="float" office:value="0.7" calcext:value-type="float">
            <text:p>0,7</text:p>
          </table:table-cell>
          <table:table-cell table:style-name="ce1" table:formula="of:=[.H72]" office:value-type="float" office:value="555.360460168072" calcext:value-type="float">
            <text:p>555,360460168072</text:p>
          </table:table-cell>
          <table:table-cell table:style-name="ce1" table:formula="of:=-68 - ([.E73]^2/Ao)" office:value-type="float" office:value="-376.425240718093" calcext:value-type="float">
            <text:p>-376,425240718093</text:p>
          </table:table-cell>
          <table:table-cell table:style-name="ce1" table:formula="of:=[.G72]+h" office:value-type="float" office:value="0.71" calcext:value-type="float">
            <text:p>0,71</text:p>
          </table:table-cell>
          <table:table-cell table:style-name="ce1" table:formula="of:=[.H72]+ h*[.F73]" office:value-type="float" office:value="551.596207760892" calcext:value-type="float">
            <text:p>551,5962077608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]" office:value-type="float" office:value="0.71" calcext:value-type="float">
            <text:p>0,71</text:p>
          </table:table-cell>
          <table:table-cell table:style-name="ce1" table:formula="of:=[.H73]" office:value-type="float" office:value="551.596207760892" calcext:value-type="float">
            <text:p>551,596207760892</text:p>
          </table:table-cell>
          <table:table-cell table:style-name="ce1" table:formula="of:=-68 - ([.E74]^2/Ao)" office:value-type="float" office:value="-372.258376416197" calcext:value-type="float">
            <text:p>-372,258376416197</text:p>
          </table:table-cell>
          <table:table-cell table:style-name="ce1" table:formula="of:=[.G73]+h" office:value-type="float" office:value="0.72" calcext:value-type="float">
            <text:p>0,72</text:p>
          </table:table-cell>
          <table:table-cell table:style-name="ce1" table:formula="of:=[.H73]+ h*[.F74]" office:value-type="float" office:value="547.87362399673" calcext:value-type="float">
            <text:p>547,873623996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]" office:value-type="float" office:value="0.72" calcext:value-type="float">
            <text:p>0,72</text:p>
          </table:table-cell>
          <table:table-cell table:style-name="ce1" table:formula="of:=[.H74]" office:value-type="float" office:value="547.87362399673" calcext:value-type="float">
            <text:p>547,87362399673</text:p>
          </table:table-cell>
          <table:table-cell table:style-name="ce1" table:formula="of:=-68 - ([.E75]^2/Ao)" office:value-type="float" office:value="-368.16550787131" calcext:value-type="float">
            <text:p>-368,16550787131</text:p>
          </table:table-cell>
          <table:table-cell table:style-name="ce1" table:formula="of:=[.G74]+h" office:value-type="float" office:value="0.73" calcext:value-type="float">
            <text:p>0,73</text:p>
          </table:table-cell>
          <table:table-cell table:style-name="ce1" table:formula="of:=[.H74]+ h*[.F75]" office:value-type="float" office:value="544.191968918016" calcext:value-type="float">
            <text:p>544,1919689180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]" office:value-type="float" office:value="0.73" calcext:value-type="float">
            <text:p>0,73</text:p>
          </table:table-cell>
          <table:table-cell table:style-name="ce1" table:formula="of:=[.H75]" office:value-type="float" office:value="544.191968918016" calcext:value-type="float">
            <text:p>544,191968918016</text:p>
          </table:table-cell>
          <table:table-cell table:style-name="ce1" table:formula="of:=-68 - ([.E76]^2/Ao)" office:value-type="float" office:value="-364.144899034867" calcext:value-type="float">
            <text:p>-364,144899034867</text:p>
          </table:table-cell>
          <table:table-cell table:style-name="ce1" table:formula="of:=[.G75]+h" office:value-type="float" office:value="0.74" calcext:value-type="float">
            <text:p>0,74</text:p>
          </table:table-cell>
          <table:table-cell table:style-name="ce1" table:formula="of:=[.H75]+ h*[.F76]" office:value-type="float" office:value="540.550519927668" calcext:value-type="float">
            <text:p>540,5505199276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6]" office:value-type="float" office:value="0.74" calcext:value-type="float">
            <text:p>0,74</text:p>
          </table:table-cell>
          <table:table-cell table:style-name="ce1" table:formula="of:=[.H76]" office:value-type="float" office:value="540.550519927668" calcext:value-type="float">
            <text:p>540,550519927668</text:p>
          </table:table-cell>
          <table:table-cell table:style-name="ce1" table:formula="of:=-68 - ([.E77]^2/Ao)" office:value-type="float" office:value="-360.194864594072" calcext:value-type="float">
            <text:p>-360,194864594072</text:p>
          </table:table-cell>
          <table:table-cell table:style-name="ce1" table:formula="of:=[.G76]+h" office:value-type="float" office:value="0.75" calcext:value-type="float">
            <text:p>0,75</text:p>
          </table:table-cell>
          <table:table-cell table:style-name="ce1" table:formula="of:=[.H76]+ h*[.F77]" office:value-type="float" office:value="536.948571281727" calcext:value-type="float">
            <text:p>536,9485712817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7]" office:value-type="float" office:value="0.75" calcext:value-type="float">
            <text:p>0,75</text:p>
          </table:table-cell>
          <table:table-cell table:style-name="ce1" table:formula="of:=[.H77]" office:value-type="float" office:value="536.948571281727" calcext:value-type="float">
            <text:p>536,948571281727</text:p>
          </table:table-cell>
          <table:table-cell table:style-name="ce1" table:formula="of:=-68 - ([.E78]^2/Ao)" office:value-type="float" office:value="-356.313768201488" calcext:value-type="float">
            <text:p>-356,313768201488</text:p>
          </table:table-cell>
          <table:table-cell table:style-name="ce1" table:formula="of:=[.G77]+h" office:value-type="float" office:value="0.760000000000001" calcext:value-type="float">
            <text:p>0,760000000000001</text:p>
          </table:table-cell>
          <table:table-cell table:style-name="ce1" table:formula="of:=[.H77]+ h*[.F78]" office:value-type="float" office:value="533.385433599712" calcext:value-type="float">
            <text:p>533,3854335997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8]" office:value-type="float" office:value="0.760000000000001" calcext:value-type="float">
            <text:p>0,760000000000001</text:p>
          </table:table-cell>
          <table:table-cell table:style-name="ce1" table:formula="of:=[.H78]" office:value-type="float" office:value="533.385433599712" calcext:value-type="float">
            <text:p>533,385433599712</text:p>
          </table:table-cell>
          <table:table-cell table:style-name="ce1" table:formula="of:=-68 - ([.E79]^2/Ao)" office:value-type="float" office:value="-352.500020776353" calcext:value-type="float">
            <text:p>-352,500020776353</text:p>
          </table:table-cell>
          <table:table-cell table:style-name="ce1" table:formula="of:=[.G78]+h" office:value-type="float" office:value="0.770000000000001" calcext:value-type="float">
            <text:p>0,770000000000001</text:p>
          </table:table-cell>
          <table:table-cell table:style-name="ce1" table:formula="of:=[.H78]+ h*[.F79]" office:value-type="float" office:value="529.860433391949" calcext:value-type="float">
            <text:p>529,8604333919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9]" office:value-type="float" office:value="0.770000000000001" calcext:value-type="float">
            <text:p>0,770000000000001</text:p>
          </table:table-cell>
          <table:table-cell table:style-name="ce1" table:formula="of:=[.H79]" office:value-type="float" office:value="529.860433391949" calcext:value-type="float">
            <text:p>529,860433391949</text:p>
          </table:table-cell>
          <table:table-cell table:style-name="ce1" table:formula="of:=-68 - ([.E80]^2/Ao)" office:value-type="float" office:value="-348.752078874304" calcext:value-type="float">
            <text:p>-348,752078874304</text:p>
          </table:table-cell>
          <table:table-cell table:style-name="ce1" table:formula="of:=[.G79]+h" office:value-type="float" office:value="0.780000000000001" calcext:value-type="float">
            <text:p>0,780000000000001</text:p>
          </table:table-cell>
          <table:table-cell table:style-name="ce1" table:formula="of:=[.H79]+ h*[.F80]" office:value-type="float" office:value="526.372912603206" calcext:value-type="float">
            <text:p>526,3729126032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0]" office:value-type="float" office:value="0.780000000000001" calcext:value-type="float">
            <text:p>0,780000000000001</text:p>
          </table:table-cell>
          <table:table-cell table:style-name="ce1" table:formula="of:=[.H80]" office:value-type="float" office:value="526.372912603206" calcext:value-type="float">
            <text:p>526,372912603206</text:p>
          </table:table-cell>
          <table:table-cell table:style-name="ce1" table:formula="of:=-68 - ([.E81]^2/Ao)" office:value-type="float" office:value="-345.068443122382" calcext:value-type="float">
            <text:p>-345,068443122382</text:p>
          </table:table-cell>
          <table:table-cell table:style-name="ce1" table:formula="of:=[.G80]+h" office:value-type="float" office:value="0.790000000000001" calcext:value-type="float">
            <text:p>0,790000000000001</text:p>
          </table:table-cell>
          <table:table-cell table:style-name="ce1" table:formula="of:=[.H80]+ h*[.F81]" office:value-type="float" office:value="522.922228171982" calcext:value-type="float">
            <text:p>522,9222281719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1]" office:value-type="float" office:value="0.790000000000001" calcext:value-type="float">
            <text:p>0,790000000000001</text:p>
          </table:table-cell>
          <table:table-cell table:style-name="ce1" table:formula="of:=[.H81]" office:value-type="float" office:value="522.922228171982" calcext:value-type="float">
            <text:p>522,922228171982</text:p>
          </table:table-cell>
          <table:table-cell table:style-name="ce1" table:formula="of:=-68 - ([.E82]^2/Ao)" office:value-type="float" office:value="-341.44765671635" calcext:value-type="float">
            <text:p>-341,44765671635</text:p>
          </table:table-cell>
          <table:table-cell table:style-name="ce1" table:formula="of:=[.G81]+h" office:value-type="float" office:value="0.800000000000001" calcext:value-type="float">
            <text:p>0,800000000000001</text:p>
          </table:table-cell>
          <table:table-cell table:style-name="ce1" table:formula="of:=[.H81]+ h*[.F82]" office:value-type="float" office:value="519.507751604818" calcext:value-type="float">
            <text:p>519,5077516048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2]" office:value-type="float" office:value="0.800000000000001" calcext:value-type="float">
            <text:p>0,800000000000001</text:p>
          </table:table-cell>
          <table:table-cell table:style-name="ce1" table:formula="of:=[.H82]" office:value-type="float" office:value="519.507751604818" calcext:value-type="float">
            <text:p>519,507751604818</text:p>
          </table:table-cell>
          <table:table-cell table:style-name="ce1" table:formula="of:=-68 - ([.E83]^2/Ao)" office:value-type="float" office:value="-337.888303977493" calcext:value-type="float">
            <text:p>-337,888303977493</text:p>
          </table:table-cell>
          <table:table-cell table:style-name="ce1" table:formula="of:=[.G82]+h" office:value-type="float" office:value="0.810000000000001" calcext:value-type="float">
            <text:p>0,810000000000001</text:p>
          </table:table-cell>
          <table:table-cell table:style-name="ce1" table:formula="of:=[.H82]+ h*[.F83]" office:value-type="float" office:value="516.128868565043" calcext:value-type="float">
            <text:p>516,1288685650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3]" office:value-type="float" office:value="0.810000000000001" calcext:value-type="float">
            <text:p>0,810000000000001</text:p>
          </table:table-cell>
          <table:table-cell table:style-name="ce1" table:formula="of:=[.H83]" office:value-type="float" office:value="516.128868565043" calcext:value-type="float">
            <text:p>516,128868565043</text:p>
          </table:table-cell>
          <table:table-cell table:style-name="ce1" table:formula="of:=-68 - ([.E84]^2/Ao)" office:value-type="float" office:value="-334.389008966232" calcext:value-type="float">
            <text:p>-334,389008966232</text:p>
          </table:table-cell>
          <table:table-cell table:style-name="ce1" table:formula="of:=[.G83]+h" office:value-type="float" office:value="0.820000000000001" calcext:value-type="float">
            <text:p>0,820000000000001</text:p>
          </table:table-cell>
          <table:table-cell table:style-name="ce1" table:formula="of:=[.H83]+ h*[.F84]" office:value-type="float" office:value="512.784978475381" calcext:value-type="float">
            <text:p>512,7849784753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4]" office:value-type="float" office:value="0.820000000000001" calcext:value-type="float">
            <text:p>0,820000000000001</text:p>
          </table:table-cell>
          <table:table-cell table:style-name="ce1" table:formula="of:=[.H84]" office:value-type="float" office:value="512.784978475381" calcext:value-type="float">
            <text:p>512,784978475381</text:p>
          </table:table-cell>
          <table:table-cell table:style-name="ce1" table:formula="of:=-68 - ([.E85]^2/Ao)" office:value-type="float" office:value="-330.948434149997" calcext:value-type="float">
            <text:p>-330,948434149997</text:p>
          </table:table-cell>
          <table:table-cell table:style-name="ce1" table:formula="of:=[.G84]+h" office:value-type="float" office:value="0.830000000000001" calcext:value-type="float">
            <text:p>0,830000000000001</text:p>
          </table:table-cell>
          <table:table-cell table:style-name="ce1" table:formula="of:=[.H84]+ h*[.F85]" office:value-type="float" office:value="509.475494133881" calcext:value-type="float">
            <text:p>509,4754941338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5]" office:value-type="float" office:value="0.830000000000001" calcext:value-type="float">
            <text:p>0,830000000000001</text:p>
          </table:table-cell>
          <table:table-cell table:style-name="ce1" table:formula="of:=[.H85]" office:value-type="float" office:value="509.475494133881" calcext:value-type="float">
            <text:p>509,475494133881</text:p>
          </table:table-cell>
          <table:table-cell table:style-name="ce1" table:formula="of:=-68 - ([.E86]^2/Ao)" office:value-type="float" office:value="-327.565279122962" calcext:value-type="float">
            <text:p>-327,565279122962</text:p>
          </table:table-cell>
          <table:table-cell table:style-name="ce1" table:formula="of:=[.G85]+h" office:value-type="float" office:value="0.840000000000001" calcext:value-type="float">
            <text:p>0,840000000000001</text:p>
          </table:table-cell>
          <table:table-cell table:style-name="ce1" table:formula="of:=[.H85]+ h*[.F86]" office:value-type="float" office:value="506.199841342651" calcext:value-type="float">
            <text:p>506,1998413426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6]" office:value-type="float" office:value="0.840000000000001" calcext:value-type="float">
            <text:p>0,840000000000001</text:p>
          </table:table-cell>
          <table:table-cell table:style-name="ce1" table:formula="of:=[.H86]" office:value-type="float" office:value="506.199841342651" calcext:value-type="float">
            <text:p>506,199841342651</text:p>
          </table:table-cell>
          <table:table-cell table:style-name="ce1" table:formula="of:=-68 - ([.E87]^2/Ao)" office:value-type="float" office:value="-324.238279375325" calcext:value-type="float">
            <text:p>-324,238279375325</text:p>
          </table:table-cell>
          <table:table-cell table:style-name="ce1" table:formula="of:=[.G86]+h" office:value-type="float" office:value="0.850000000000001" calcext:value-type="float">
            <text:p>0,850000000000001</text:p>
          </table:table-cell>
          <table:table-cell table:style-name="ce1" table:formula="of:=[.H86]+ h*[.F87]" office:value-type="float" office:value="502.957458548898" calcext:value-type="float">
            <text:p>502,9574585488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7]" office:value-type="float" office:value="0.850000000000001" calcext:value-type="float">
            <text:p>0,850000000000001</text:p>
          </table:table-cell>
          <table:table-cell table:style-name="ce1" table:formula="of:=[.H87]" office:value-type="float" office:value="502.957458548898" calcext:value-type="float">
            <text:p>502,957458548898</text:p>
          </table:table-cell>
          <table:table-cell table:style-name="ce1" table:formula="of:=-68 - ([.E88]^2/Ao)" office:value-type="float" office:value="-320.966205109967" calcext:value-type="float">
            <text:p>-320,966205109967</text:p>
          </table:table-cell>
          <table:table-cell table:style-name="ce1" table:formula="of:=[.G87]+h" office:value-type="float" office:value="0.860000000000001" calcext:value-type="float">
            <text:p>0,860000000000001</text:p>
          </table:table-cell>
          <table:table-cell table:style-name="ce1" table:formula="of:=[.H87]+ h*[.F88]" office:value-type="float" office:value="499.747796497798" calcext:value-type="float">
            <text:p>499,7477964977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8]" office:value-type="float" office:value="0.860000000000001" calcext:value-type="float">
            <text:p>0,860000000000001</text:p>
          </table:table-cell>
          <table:table-cell table:style-name="ce1" table:formula="of:=[.H88]" office:value-type="float" office:value="499.747796497798" calcext:value-type="float">
            <text:p>499,747796497798</text:p>
          </table:table-cell>
          <table:table-cell table:style-name="ce1" table:formula="of:=-68 - ([.E89]^2/Ao)" office:value-type="float" office:value="-317.747860104405" calcext:value-type="float">
            <text:p>-317,747860104405</text:p>
          </table:table-cell>
          <table:table-cell table:style-name="ce1" table:formula="of:=[.G88]+h" office:value-type="float" office:value="0.870000000000001" calcext:value-type="float">
            <text:p>0,870000000000001</text:p>
          </table:table-cell>
          <table:table-cell table:style-name="ce1" table:formula="of:=[.H88]+ h*[.F89]" office:value-type="float" office:value="496.570317896754" calcext:value-type="float">
            <text:p>496,5703178967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9]" office:value-type="float" office:value="0.870000000000001" calcext:value-type="float">
            <text:p>0,870000000000001</text:p>
          </table:table-cell>
          <table:table-cell table:style-name="ce1" table:formula="of:=[.H89]" office:value-type="float" office:value="496.570317896754" calcext:value-type="float">
            <text:p>496,570317896754</text:p>
          </table:table-cell>
          <table:table-cell table:style-name="ce1" table:formula="of:=-68 - ([.E90]^2/Ao)" office:value-type="float" office:value="-314.582080616084" calcext:value-type="float">
            <text:p>-314,582080616084</text:p>
          </table:table-cell>
          <table:table-cell table:style-name="ce1" table:formula="of:=[.G89]+h" office:value-type="float" office:value="0.880000000000001" calcext:value-type="float">
            <text:p>0,880000000000001</text:p>
          </table:table-cell>
          <table:table-cell table:style-name="ce1" table:formula="of:=[.H89]+ h*[.F90]" office:value-type="float" office:value="493.424497090594" calcext:value-type="float">
            <text:p>493,4244970905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0]" office:value-type="float" office:value="0.880000000000001" calcext:value-type="float">
            <text:p>0,880000000000001</text:p>
          </table:table-cell>
          <table:table-cell table:style-name="ce1" table:formula="of:=[.H90]" office:value-type="float" office:value="493.424497090594" calcext:value-type="float">
            <text:p>493,424497090594</text:p>
          </table:table-cell>
          <table:table-cell table:style-name="ce1" table:formula="of:=-68 - ([.E91]^2/Ao)" office:value-type="float" office:value="-311.467734329105" calcext:value-type="float">
            <text:p>-311,467734329105</text:p>
          </table:table-cell>
          <table:table-cell table:style-name="ce1" table:formula="of:=[.G90]+h" office:value-type="float" office:value="0.890000000000001" calcext:value-type="float">
            <text:p>0,890000000000001</text:p>
          </table:table-cell>
          <table:table-cell table:style-name="ce1" table:formula="of:=[.H90]+ h*[.F91]" office:value-type="float" office:value="490.309819747302" calcext:value-type="float">
            <text:p>490,3098197473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1]" office:value-type="float" office:value="0.890000000000001" calcext:value-type="float">
            <text:p>0,890000000000001</text:p>
          </table:table-cell>
          <table:table-cell table:style-name="ce1" table:formula="of:=[.H91]" office:value-type="float" office:value="490.309819747302" calcext:value-type="float">
            <text:p>490,309819747302</text:p>
          </table:table-cell>
          <table:table-cell table:style-name="ce1" table:formula="of:=-68 - ([.E92]^2/Ao)" office:value-type="float" office:value="-308.403719340632" calcext:value-type="float">
            <text:p>-308,403719340632</text:p>
          </table:table-cell>
          <table:table-cell table:style-name="ce1" table:formula="of:=[.G91]+h" office:value-type="float" office:value="0.900000000000001" calcext:value-type="float">
            <text:p>0,900000000000001</text:p>
          </table:table-cell>
          <table:table-cell table:style-name="ce1" table:formula="of:=[.H91]+ h*[.F92]" office:value-type="float" office:value="487.225782553896" calcext:value-type="float">
            <text:p>487,2257825538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2]" office:value-type="float" office:value="0.900000000000001" calcext:value-type="float">
            <text:p>0,900000000000001</text:p>
          </table:table-cell>
          <table:table-cell table:style-name="ce1" table:formula="of:=[.H92]" office:value-type="float" office:value="487.225782553896" calcext:value-type="float">
            <text:p>487,225782553896</text:p>
          </table:table-cell>
          <table:table-cell table:style-name="ce1" table:formula="of:=-68 - ([.E93]^2/Ao)" office:value-type="float" office:value="-305.388963185256" calcext:value-type="float">
            <text:p>-305,388963185256</text:p>
          </table:table-cell>
          <table:table-cell table:style-name="ce1" table:formula="of:=[.G92]+h" office:value-type="float" office:value="0.910000000000001" calcext:value-type="float">
            <text:p>0,910000000000001</text:p>
          </table:table-cell>
          <table:table-cell table:style-name="ce1" table:formula="of:=[.H92]+ h*[.F93]" office:value-type="float" office:value="484.171892922044" calcext:value-type="float">
            <text:p>484,1718929220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3]" office:value-type="float" office:value="0.910000000000001" calcext:value-type="float">
            <text:p>0,910000000000001</text:p>
          </table:table-cell>
          <table:table-cell table:style-name="ce1" table:formula="of:=[.H93]" office:value-type="float" office:value="484.171892922044" calcext:value-type="float">
            <text:p>484,171892922044</text:p>
          </table:table-cell>
          <table:table-cell table:style-name="ce1" table:formula="of:=-68 - ([.E94]^2/Ao)" office:value-type="float" office:value="-302.422421895715" calcext:value-type="float">
            <text:p>-302,422421895715</text:p>
          </table:table-cell>
          <table:table-cell table:style-name="ce1" table:formula="of:=[.G93]+h" office:value-type="float" office:value="0.920000000000001" calcext:value-type="float">
            <text:p>0,920000000000001</text:p>
          </table:table-cell>
          <table:table-cell table:style-name="ce1" table:formula="of:=[.H93]+ h*[.F94]" office:value-type="float" office:value="481.147668703086" calcext:value-type="float">
            <text:p>481,1476687030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4]" office:value-type="float" office:value="0.920000000000001" calcext:value-type="float">
            <text:p>0,920000000000001</text:p>
          </table:table-cell>
          <table:table-cell table:style-name="ce1" table:formula="of:=[.H94]" office:value-type="float" office:value="481.147668703086" calcext:value-type="float">
            <text:p>481,147668703086</text:p>
          </table:table-cell>
          <table:table-cell table:style-name="ce1" table:formula="of:=-68 - ([.E95]^2/Ao)" office:value-type="float" office:value="-299.503079098415" calcext:value-type="float">
            <text:p>-299,503079098415</text:p>
          </table:table-cell>
          <table:table-cell table:style-name="ce1" table:formula="of:=[.G94]+h" office:value-type="float" office:value="0.930000000000001" calcext:value-type="float">
            <text:p>0,930000000000001</text:p>
          </table:table-cell>
          <table:table-cell table:style-name="ce1" table:formula="of:=[.H94]+ h*[.F95]" office:value-type="float" office:value="478.152637912102" calcext:value-type="float">
            <text:p>478,1526379121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5]" office:value-type="float" office:value="0.930000000000001" calcext:value-type="float">
            <text:p>0,930000000000001</text:p>
          </table:table-cell>
          <table:table-cell table:style-name="ce1" table:formula="of:=[.H95]" office:value-type="float" office:value="478.152637912102" calcext:value-type="float">
            <text:p>478,152637912102</text:p>
          </table:table-cell>
          <table:table-cell table:style-name="ce1" table:formula="of:=-68 - ([.E96]^2/Ao)" office:value-type="float" office:value="-296.629945142302" calcext:value-type="float">
            <text:p>-296,629945142302</text:p>
          </table:table-cell>
          <table:table-cell table:style-name="ce1" table:formula="of:=[.G95]+h" office:value-type="float" office:value="0.940000000000001" calcext:value-type="float">
            <text:p>0,940000000000001</text:p>
          </table:table-cell>
          <table:table-cell table:style-name="ce1" table:formula="of:=[.H95]+ h*[.F96]" office:value-type="float" office:value="475.186338460679" calcext:value-type="float">
            <text:p>475,1863384606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6]" office:value-type="float" office:value="0.940000000000001" calcext:value-type="float">
            <text:p>0,940000000000001</text:p>
          </table:table-cell>
          <table:table-cell table:style-name="ce1" table:formula="of:=[.H96]" office:value-type="float" office:value="475.186338460679" calcext:value-type="float">
            <text:p>475,186338460679</text:p>
          </table:table-cell>
          <table:table-cell table:style-name="ce1" table:formula="of:=-68 - ([.E97]^2/Ao)" office:value-type="float" office:value="-293.802056259667" calcext:value-type="float">
            <text:p>-293,802056259667</text:p>
          </table:table-cell>
          <table:table-cell table:style-name="ce1" table:formula="of:=[.G96]+h" office:value-type="float" office:value="0.950000000000001" calcext:value-type="float">
            <text:p>0,950000000000001</text:p>
          </table:table-cell>
          <table:table-cell table:style-name="ce1" table:formula="of:=[.H96]+ h*[.F97]" office:value-type="float" office:value="472.248317898083" calcext:value-type="float">
            <text:p>472,2483178980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7]" office:value-type="float" office:value="0.950000000000001" calcext:value-type="float">
            <text:p>0,950000000000001</text:p>
          </table:table-cell>
          <table:table-cell table:style-name="ce1" table:formula="of:=[.H97]" office:value-type="float" office:value="472.248317898083" calcext:value-type="float">
            <text:p>472,248317898083</text:p>
          </table:table-cell>
          <table:table-cell table:style-name="ce1" table:formula="of:=-68 - ([.E98]^2/Ao)" office:value-type="float" office:value="-291.018473757569" calcext:value-type="float">
            <text:p>-291,018473757569</text:p>
          </table:table-cell>
          <table:table-cell table:style-name="ce1" table:formula="of:=[.G97]+h" office:value-type="float" office:value="0.960000000000001" calcext:value-type="float">
            <text:p>0,960000000000001</text:p>
          </table:table-cell>
          <table:table-cell table:style-name="ce1" table:formula="of:=[.H97]+ h*[.F98]" office:value-type="float" office:value="469.338133160507" calcext:value-type="float">
            <text:p>469,3381331605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8]" office:value-type="float" office:value="0.960000000000001" calcext:value-type="float">
            <text:p>0,960000000000001</text:p>
          </table:table-cell>
          <table:table-cell table:style-name="ce1" table:formula="of:=[.H98]" office:value-type="float" office:value="469.338133160507" calcext:value-type="float">
            <text:p>469,338133160507</text:p>
          </table:table-cell>
          <table:table-cell table:style-name="ce1" table:formula="of:=-68 - ([.E99]^2/Ao)" office:value-type="float" office:value="-288.27828323859" calcext:value-type="float">
            <text:p>-288,27828323859</text:p>
          </table:table-cell>
          <table:table-cell table:style-name="ce1" table:formula="of:=[.G98]+h" office:value-type="float" office:value="0.970000000000001" calcext:value-type="float">
            <text:p>0,970000000000001</text:p>
          </table:table-cell>
          <table:table-cell table:style-name="ce1" table:formula="of:=[.H98]+ h*[.F99]" office:value-type="float" office:value="466.455350328121" calcext:value-type="float">
            <text:p>466,4553503281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9]" office:value-type="float" office:value="0.970000000000001" calcext:value-type="float">
            <text:p>0,970000000000001</text:p>
          </table:table-cell>
          <table:table-cell table:style-name="ce1" table:formula="of:=[.H99]" office:value-type="float" office:value="466.455350328121" calcext:value-type="float">
            <text:p>466,455350328121</text:p>
          </table:table-cell>
          <table:table-cell table:style-name="ce1" table:formula="of:=-68 - ([.E100]^2/Ao)" office:value-type="float" office:value="-285.58059384973" calcext:value-type="float">
            <text:p>-285,58059384973</text:p>
          </table:table-cell>
          <table:table-cell table:style-name="ce1" table:formula="of:=[.G99]+h" office:value-type="float" office:value="0.980000000000001" calcext:value-type="float">
            <text:p>0,980000000000001</text:p>
          </table:table-cell>
          <table:table-cell table:style-name="ce1" table:formula="of:=[.H99]+ h*[.F100]" office:value-type="float" office:value="463.599544389624" calcext:value-type="float">
            <text:p>463,5995443896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0]" office:value-type="float" office:value="0.980000000000001" calcext:value-type="float">
            <text:p>0,980000000000001</text:p>
          </table:table-cell>
          <table:table-cell table:style-name="ce1" table:formula="of:=[.H100]" office:value-type="float" office:value="463.599544389624" calcext:value-type="float">
            <text:p>463,599544389624</text:p>
          </table:table-cell>
          <table:table-cell table:style-name="ce1" table:formula="of:=-68 - ([.E101]^2/Ao)" office:value-type="float" office:value="-282.924537558267" calcext:value-type="float">
            <text:p>-282,924537558267</text:p>
          </table:table-cell>
          <table:table-cell table:style-name="ce1" table:formula="of:=[.G100]+h" office:value-type="float" office:value="0.990000000000001" calcext:value-type="float">
            <text:p>0,990000000000001</text:p>
          </table:table-cell>
          <table:table-cell table:style-name="ce1" table:formula="of:=[.H100]+ h*[.F101]" office:value-type="float" office:value="460.770299014041" calcext:value-type="float">
            <text:p>460,7702990140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1]" office:value-type="float" office:value="0.990000000000001" calcext:value-type="float">
            <text:p>0,990000000000001</text:p>
          </table:table-cell>
          <table:table-cell table:style-name="ce1" table:formula="of:=[.H101]" office:value-type="float" office:value="460.770299014041" calcext:value-type="float">
            <text:p>460,770299014041</text:p>
          </table:table-cell>
          <table:table-cell table:style-name="ce1" table:formula="of:=-68 - ([.E102]^2/Ao)" office:value-type="float" office:value="-280.309268453489" calcext:value-type="float">
            <text:p>-280,309268453489</text:p>
          </table:table-cell>
          <table:table-cell table:style-name="ce1" table:formula="of:=[.G101]+h" office:value-type="float" office:value="1" calcext:value-type="float">
            <text:p>1</text:p>
          </table:table-cell>
          <table:table-cell table:style-name="ce1" table:formula="of:=[.H101]+ h*[.F102]" office:value-type="float" office:value="457.967206329506" calcext:value-type="float">
            <text:p>457,9672063295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2]" office:value-type="float" office:value="1" calcext:value-type="float">
            <text:p>1</text:p>
          </table:table-cell>
          <table:table-cell table:style-name="ce1" table:formula="of:=[.H102]" office:value-type="float" office:value="457.967206329506" calcext:value-type="float">
            <text:p>457,967206329506</text:p>
          </table:table-cell>
          <table:table-cell table:style-name="ce1" table:formula="of:=-68 - ([.E103]^2/Ao)" office:value-type="float" office:value="-277.733962073252" calcext:value-type="float">
            <text:p>-277,733962073252</text:p>
          </table:table-cell>
          <table:table-cell table:style-name="ce1" table:formula="of:=[.G102]+h" office:value-type="float" office:value="1.01" calcext:value-type="float">
            <text:p>1,01</text:p>
          </table:table-cell>
          <table:table-cell table:style-name="ce1" table:formula="of:=[.H102]+ h*[.F103]" office:value-type="float" office:value="455.189866708774" calcext:value-type="float">
            <text:p>455,1898667087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3]" office:value-type="float" office:value="1.01" calcext:value-type="float">
            <text:p>1,01</text:p>
          </table:table-cell>
          <table:table-cell table:style-name="ce1" table:formula="of:=[.H103]" office:value-type="float" office:value="455.189866708774" calcext:value-type="float">
            <text:p>455,189866708774</text:p>
          </table:table-cell>
          <table:table-cell table:style-name="ce1" table:formula="of:=-68 - ([.E104]^2/Ao)" office:value-type="float" office:value="-275.197814754351" calcext:value-type="float">
            <text:p>-275,197814754351</text:p>
          </table:table-cell>
          <table:table-cell table:style-name="ce1" table:formula="of:=[.G103]+h" office:value-type="float" office:value="1.02" calcext:value-type="float">
            <text:p>1,02</text:p>
          </table:table-cell>
          <table:table-cell table:style-name="ce1" table:formula="of:=[.H103]+ h*[.F104]" office:value-type="float" office:value="452.43788856123" calcext:value-type="float">
            <text:p>452,437888561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4]" office:value-type="float" office:value="1.02" calcext:value-type="float">
            <text:p>1,02</text:p>
          </table:table-cell>
          <table:table-cell table:style-name="ce1" table:formula="of:=[.H104]" office:value-type="float" office:value="452.43788856123" calcext:value-type="float">
            <text:p>452,43788856123</text:p>
          </table:table-cell>
          <table:table-cell table:style-name="ce1" table:formula="of:=-68 - ([.E105]^2/Ao)" office:value-type="float" office:value="-272.700043005744" calcext:value-type="float">
            <text:p>-272,700043005744</text:p>
          </table:table-cell>
          <table:table-cell table:style-name="ce1" table:formula="of:=[.G104]+h" office:value-type="float" office:value="1.03" calcext:value-type="float">
            <text:p>1,03</text:p>
          </table:table-cell>
          <table:table-cell table:style-name="ce1" table:formula="of:=[.H104]+ h*[.F105]" office:value-type="float" office:value="449.710888131173" calcext:value-type="float">
            <text:p>449,7108881311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5]" office:value-type="float" office:value="1.03" calcext:value-type="float">
            <text:p>1,03</text:p>
          </table:table-cell>
          <table:table-cell table:style-name="ce1" table:formula="of:=[.H105]" office:value-type="float" office:value="449.710888131173" calcext:value-type="float">
            <text:p>449,710888131173</text:p>
          </table:table-cell>
          <table:table-cell table:style-name="ce1" table:formula="of:=-68 - ([.E106]^2/Ao)" office:value-type="float" office:value="-270.239882903728" calcext:value-type="float">
            <text:p>-270,239882903728</text:p>
          </table:table-cell>
          <table:table-cell table:style-name="ce1" table:formula="of:=[.G105]+h" office:value-type="float" office:value="1.04" calcext:value-type="float">
            <text:p>1,04</text:p>
          </table:table-cell>
          <table:table-cell table:style-name="ce1" table:formula="of:=[.H105]+ h*[.F106]" office:value-type="float" office:value="447.008489302135" calcext:value-type="float">
            <text:p>447,0084893021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6]" office:value-type="float" office:value="1.04" calcext:value-type="float">
            <text:p>1,04</text:p>
          </table:table-cell>
          <table:table-cell table:style-name="ce1" table:formula="of:=[.H106]" office:value-type="float" office:value="447.008489302135" calcext:value-type="float">
            <text:p>447,008489302135</text:p>
          </table:table-cell>
          <table:table-cell table:style-name="ce1" table:formula="of:=-68 - ([.E107]^2/Ao)" office:value-type="float" office:value="-267.816589508177" calcext:value-type="float">
            <text:p>-267,816589508177</text:p>
          </table:table-cell>
          <table:table-cell table:style-name="ce1" table:formula="of:=[.G106]+h" office:value-type="float" office:value="1.05" calcext:value-type="float">
            <text:p>1,05</text:p>
          </table:table-cell>
          <table:table-cell table:style-name="ce1" table:formula="of:=[.H106]+ h*[.F107]" office:value-type="float" office:value="444.330323407054" calcext:value-type="float">
            <text:p>444,3303234070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7]" office:value-type="float" office:value="1.05" calcext:value-type="float">
            <text:p>1,05</text:p>
          </table:table-cell>
          <table:table-cell table:style-name="ce1" table:formula="of:=[.H107]" office:value-type="float" office:value="444.330323407054" calcext:value-type="float">
            <text:p>444,330323407054</text:p>
          </table:table-cell>
          <table:table-cell table:style-name="ce1" table:formula="of:=-68 - ([.E108]^2/Ao)" office:value-type="float" office:value="-265.429436299017" calcext:value-type="float">
            <text:p>-265,429436299017</text:p>
          </table:table-cell>
          <table:table-cell table:style-name="ce1" table:formula="of:=[.G107]+h" office:value-type="float" office:value="1.06" calcext:value-type="float">
            <text:p>1,06</text:p>
          </table:table-cell>
          <table:table-cell table:style-name="ce1" table:formula="of:=[.H107]+ h*[.F108]" office:value-type="float" office:value="441.676029044063" calcext:value-type="float">
            <text:p>441,6760290440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8]" office:value-type="float" office:value="1.06" calcext:value-type="float">
            <text:p>1,06</text:p>
          </table:table-cell>
          <table:table-cell table:style-name="ce1" table:formula="of:=[.H108]" office:value-type="float" office:value="441.676029044063" calcext:value-type="float">
            <text:p>441,676029044063</text:p>
          </table:table-cell>
          <table:table-cell table:style-name="ce1" table:formula="of:=-68 - ([.E109]^2/Ao)" office:value-type="float" office:value="-263.077714632132" calcext:value-type="float">
            <text:p>-263,077714632132</text:p>
          </table:table-cell>
          <table:table-cell table:style-name="ce1" table:formula="of:=[.G108]+h" office:value-type="float" office:value="1.07" calcext:value-type="float">
            <text:p>1,07</text:p>
          </table:table-cell>
          <table:table-cell table:style-name="ce1" table:formula="of:=[.H108]+ h*[.F109]" office:value-type="float" office:value="439.045251897742" calcext:value-type="float">
            <text:p>439,0452518977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9]" office:value-type="float" office:value="1.07" calcext:value-type="float">
            <text:p>1,07</text:p>
          </table:table-cell>
          <table:table-cell table:style-name="ce1" table:formula="of:=[.H109]" office:value-type="float" office:value="439.045251897742" calcext:value-type="float">
            <text:p>439,045251897742</text:p>
          </table:table-cell>
          <table:table-cell table:style-name="ce1" table:formula="of:=-68 - ([.E110]^2/Ao)" office:value-type="float" office:value="-260.760733213952" calcext:value-type="float">
            <text:p>-260,760733213952</text:p>
          </table:table-cell>
          <table:table-cell table:style-name="ce1" table:formula="of:=[.G109]+h" office:value-type="float" office:value="1.08" calcext:value-type="float">
            <text:p>1,08</text:p>
          </table:table-cell>
          <table:table-cell table:style-name="ce1" table:formula="of:=[.H109]+ h*[.F110]" office:value-type="float" office:value="436.437644565603" calcext:value-type="float">
            <text:p>436,4376445656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0]" office:value-type="float" office:value="1.08" calcext:value-type="float">
            <text:p>1,08</text:p>
          </table:table-cell>
          <table:table-cell table:style-name="ce1" table:formula="of:=[.H110]" office:value-type="float" office:value="436.437644565603" calcext:value-type="float">
            <text:p>436,437644565603</text:p>
          </table:table-cell>
          <table:table-cell table:style-name="ce1" table:formula="of:=-68 - ([.E111]^2/Ao)" office:value-type="float" office:value="-258.477817593971" calcext:value-type="float">
            <text:p>-258,477817593971</text:p>
          </table:table-cell>
          <table:table-cell table:style-name="ce1" table:formula="of:=[.G110]+h" office:value-type="float" office:value="1.09" calcext:value-type="float">
            <text:p>1,09</text:p>
          </table:table-cell>
          <table:table-cell table:style-name="ce1" table:formula="of:=[.H110]+ h*[.F111]" office:value-type="float" office:value="433.852866389663" calcext:value-type="float">
            <text:p>433,8528663896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1]" office:value-type="float" office:value="1.09" calcext:value-type="float">
            <text:p>1,09</text:p>
          </table:table-cell>
          <table:table-cell table:style-name="ce1" table:formula="of:=[.H111]" office:value-type="float" office:value="433.852866389663" calcext:value-type="float">
            <text:p>433,852866389663</text:p>
          </table:table-cell>
          <table:table-cell table:style-name="ce1" table:formula="of:=-68 - ([.E112]^2/Ao)" office:value-type="float" office:value="-256.228309674527" calcext:value-type="float">
            <text:p>-256,228309674527</text:p>
          </table:table-cell>
          <table:table-cell table:style-name="ce1" table:formula="of:=[.G111]+h" office:value-type="float" office:value="1.1" calcext:value-type="float">
            <text:p>1,1</text:p>
          </table:table-cell>
          <table:table-cell table:style-name="ce1" table:formula="of:=[.H111]+ h*[.F112]" office:value-type="float" office:value="431.290583292918" calcext:value-type="float">
            <text:p>431,2905832929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2]" office:value-type="float" office:value="1.1" calcext:value-type="float">
            <text:p>1,1</text:p>
          </table:table-cell>
          <table:table-cell table:style-name="ce1" table:formula="of:=[.H112]" office:value-type="float" office:value="431.290583292918" calcext:value-type="float">
            <text:p>431,290583292918</text:p>
          </table:table-cell>
          <table:table-cell table:style-name="ce1" table:formula="of:=-68 - ([.E113]^2/Ao)" office:value-type="float" office:value="-254.011567237145" calcext:value-type="float">
            <text:p>-254,011567237145</text:p>
          </table:table-cell>
          <table:table-cell table:style-name="ce1" table:formula="of:=[.G112]+h" office:value-type="float" office:value="1.11" calcext:value-type="float">
            <text:p>1,11</text:p>
          </table:table-cell>
          <table:table-cell table:style-name="ce1" table:formula="of:=[.H112]+ h*[.F113]" office:value-type="float" office:value="428.750467620546" calcext:value-type="float">
            <text:p>428,7504676205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3]" office:value-type="float" office:value="1.11" calcext:value-type="float">
            <text:p>1,11</text:p>
          </table:table-cell>
          <table:table-cell table:style-name="ce1" table:formula="of:=[.H113]" office:value-type="float" office:value="428.750467620546" calcext:value-type="float">
            <text:p>428,750467620546</text:p>
          </table:table-cell>
          <table:table-cell table:style-name="ce1" table:formula="of:=-68 - ([.E114]^2/Ao)" office:value-type="float" office:value="-251.826963484837" calcext:value-type="float">
            <text:p>-251,826963484837</text:p>
          </table:table-cell>
          <table:table-cell table:style-name="ce1" table:formula="of:=[.G113]+h" office:value-type="float" office:value="1.12" calcext:value-type="float">
            <text:p>1,12</text:p>
          </table:table-cell>
          <table:table-cell table:style-name="ce1" table:formula="of:=[.H113]+ h*[.F114]" office:value-type="float" office:value="426.232197985698" calcext:value-type="float">
            <text:p>426,2321979856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4]" office:value-type="float" office:value="1.12" calcext:value-type="float">
            <text:p>1,12</text:p>
          </table:table-cell>
          <table:table-cell table:style-name="ce1" table:formula="of:=[.H114]" office:value-type="float" office:value="426.232197985698" calcext:value-type="float">
            <text:p>426,232197985698</text:p>
          </table:table-cell>
          <table:table-cell table:style-name="ce1" table:formula="of:=-68 - ([.E115]^2/Ao)" office:value-type="float" office:value="-249.673886599719" calcext:value-type="float">
            <text:p>-249,673886599719</text:p>
          </table:table-cell>
          <table:table-cell table:style-name="ce1" table:formula="of:=[.G114]+h" office:value-type="float" office:value="1.13" calcext:value-type="float">
            <text:p>1,13</text:p>
          </table:table-cell>
          <table:table-cell table:style-name="ce1" table:formula="of:=[.H114]+ h*[.F115]" office:value-type="float" office:value="423.735459119701" calcext:value-type="float">
            <text:p>423,7354591197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5]" office:value-type="float" office:value="1.13" calcext:value-type="float">
            <text:p>1,13</text:p>
          </table:table-cell>
          <table:table-cell table:style-name="ce1" table:formula="of:=[.H115]" office:value-type="float" office:value="423.735459119701" calcext:value-type="float">
            <text:p>423,735459119701</text:p>
          </table:table-cell>
          <table:table-cell table:style-name="ce1" table:formula="of:=-68 - ([.E116]^2/Ao)" office:value-type="float" office:value="-247.551739315383" calcext:value-type="float">
            <text:p>-247,551739315383</text:p>
          </table:table-cell>
          <table:table-cell table:style-name="ce1" table:formula="of:=[.G115]+h" office:value-type="float" office:value="1.14" calcext:value-type="float">
            <text:p>1,14</text:p>
          </table:table-cell>
          <table:table-cell table:style-name="ce1" table:formula="of:=[.H115]+ h*[.F116]" office:value-type="float" office:value="421.259941726547" calcext:value-type="float">
            <text:p>421,2599417265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6]" office:value-type="float" office:value="1.14" calcext:value-type="float">
            <text:p>1,14</text:p>
          </table:table-cell>
          <table:table-cell table:style-name="ce1" table:formula="of:=[.H116]" office:value-type="float" office:value="421.259941726547" calcext:value-type="float">
            <text:p>421,259941726547</text:p>
          </table:table-cell>
          <table:table-cell table:style-name="ce1" table:formula="of:=-68 - ([.E117]^2/Ao)" office:value-type="float" office:value="-245.459938503454" calcext:value-type="float">
            <text:p>-245,459938503454</text:p>
          </table:table-cell>
          <table:table-cell table:style-name="ce1" table:formula="of:=[.G116]+h" office:value-type="float" office:value="1.15" calcext:value-type="float">
            <text:p>1,15</text:p>
          </table:table-cell>
          <table:table-cell table:style-name="ce1" table:formula="of:=[.H116]+ h*[.F117]" office:value-type="float" office:value="418.805342341512" calcext:value-type="float">
            <text:p>418,8053423415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7]" office:value-type="float" office:value="1.15" calcext:value-type="float">
            <text:p>1,15</text:p>
          </table:table-cell>
          <table:table-cell table:style-name="ce1" table:formula="of:=[.H117]" office:value-type="float" office:value="418.805342341512" calcext:value-type="float">
            <text:p>418,805342341512</text:p>
          </table:table-cell>
          <table:table-cell table:style-name="ce1" table:formula="of:=-68 - ([.E118]^2/Ao)" office:value-type="float" office:value="-243.397914773791" calcext:value-type="float">
            <text:p>-243,397914773791</text:p>
          </table:table-cell>
          <table:table-cell table:style-name="ce1" table:formula="of:=[.G117]+h" office:value-type="float" office:value="1.16" calcext:value-type="float">
            <text:p>1,16</text:p>
          </table:table-cell>
          <table:table-cell table:style-name="ce1" table:formula="of:=[.H117]+ h*[.F118]" office:value-type="float" office:value="416.371363193774" calcext:value-type="float">
            <text:p>416,3713631937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8]" office:value-type="float" office:value="1.16" calcext:value-type="float">
            <text:p>1,16</text:p>
          </table:table-cell>
          <table:table-cell table:style-name="ce1" table:formula="of:=[.H118]" office:value-type="float" office:value="416.371363193774" calcext:value-type="float">
            <text:p>416,371363193774</text:p>
          </table:table-cell>
          <table:table-cell table:style-name="ce1" table:formula="of:=-68 - ([.E119]^2/Ao)" office:value-type="float" office:value="-241.365112087842" calcext:value-type="float">
            <text:p>-241,365112087842</text:p>
          </table:table-cell>
          <table:table-cell table:style-name="ce1" table:formula="of:=[.G118]+h" office:value-type="float" office:value="1.17" calcext:value-type="float">
            <text:p>1,17</text:p>
          </table:table-cell>
          <table:table-cell table:style-name="ce1" table:formula="of:=[.H118]+ h*[.F119]" office:value-type="float" office:value="413.957712072896" calcext:value-type="float">
            <text:p>413,9577120728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9]" office:value-type="float" office:value="1.17" calcext:value-type="float">
            <text:p>1,17</text:p>
          </table:table-cell>
          <table:table-cell table:style-name="ce1" table:formula="of:=[.H119]" office:value-type="float" office:value="413.957712072896" calcext:value-type="float">
            <text:p>413,957712072896</text:p>
          </table:table-cell>
          <table:table-cell table:style-name="ce1" table:formula="of:=-68 - ([.E120]^2/Ao)" office:value-type="float" office:value="-239.360987384627" calcext:value-type="float">
            <text:p>-239,360987384627</text:p>
          </table:table-cell>
          <table:table-cell table:style-name="ce1" table:formula="of:=[.G119]+h" office:value-type="float" office:value="1.18" calcext:value-type="float">
            <text:p>1,18</text:p>
          </table:table-cell>
          <table:table-cell table:style-name="ce1" table:formula="of:=[.H119]+ h*[.F120]" office:value-type="float" office:value="411.56410219905" calcext:value-type="float">
            <text:p>411,564102199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0]" office:value-type="float" office:value="1.18" calcext:value-type="float">
            <text:p>1,18</text:p>
          </table:table-cell>
          <table:table-cell table:style-name="ce1" table:formula="of:=[.H120]" office:value-type="float" office:value="411.56410219905" calcext:value-type="float">
            <text:p>411,56410219905</text:p>
          </table:table-cell>
          <table:table-cell table:style-name="ce1" table:formula="of:=-68 - ([.E121]^2/Ao)" office:value-type="float" office:value="-237.38501021891" calcext:value-type="float">
            <text:p>-237,38501021891</text:p>
          </table:table-cell>
          <table:table-cell table:style-name="ce1" table:formula="of:=[.G120]+h" office:value-type="float" office:value="1.19" calcext:value-type="float">
            <text:p>1,19</text:p>
          </table:table-cell>
          <table:table-cell table:style-name="ce1" table:formula="of:=[.H120]+ h*[.F121]" office:value-type="float" office:value="409.190252096861" calcext:value-type="float">
            <text:p>409,1902520968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1]" office:value-type="float" office:value="1.19" calcext:value-type="float">
            <text:p>1,19</text:p>
          </table:table-cell>
          <table:table-cell table:style-name="ce1" table:formula="of:=[.H121]" office:value-type="float" office:value="409.190252096861" calcext:value-type="float">
            <text:p>409,190252096861</text:p>
          </table:table-cell>
          <table:table-cell table:style-name="ce1" table:formula="of:=-68 - ([.E122]^2/Ao)" office:value-type="float" office:value="-235.436662411092" calcext:value-type="float">
            <text:p>-235,436662411092</text:p>
          </table:table-cell>
          <table:table-cell table:style-name="ce1" table:formula="of:=[.G121]+h" office:value-type="float" office:value="1.2" calcext:value-type="float">
            <text:p>1,2</text:p>
          </table:table-cell>
          <table:table-cell table:style-name="ce1" table:formula="of:=[.H121]+ h*[.F122]" office:value-type="float" office:value="406.83588547275" calcext:value-type="float">
            <text:p>406,835885472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2]" office:value-type="float" office:value="1.2" calcext:value-type="float">
            <text:p>1,2</text:p>
          </table:table-cell>
          <table:table-cell table:style-name="ce1" table:formula="of:=[.H122]" office:value-type="float" office:value="406.83588547275" calcext:value-type="float">
            <text:p>406,83588547275</text:p>
          </table:table-cell>
          <table:table-cell table:style-name="ce1" table:formula="of:=-68 - ([.E123]^2/Ao)" office:value-type="float" office:value="-233.515437708396" calcext:value-type="float">
            <text:p>-233,515437708396</text:p>
          </table:table-cell>
          <table:table-cell table:style-name="ce1" table:formula="of:=[.G122]+h" office:value-type="float" office:value="1.21" calcext:value-type="float">
            <text:p>1,21</text:p>
          </table:table-cell>
          <table:table-cell table:style-name="ce1" table:formula="of:=[.H122]+ h*[.F123]" office:value-type="float" office:value="404.500731095666" calcext:value-type="float">
            <text:p>404,5007310956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3]" office:value-type="float" office:value="1.21" calcext:value-type="float">
            <text:p>1,21</text:p>
          </table:table-cell>
          <table:table-cell table:style-name="ce1" table:formula="of:=[.H123]" office:value-type="float" office:value="404.500731095666" calcext:value-type="float">
            <text:p>404,500731095666</text:p>
          </table:table-cell>
          <table:table-cell table:style-name="ce1" table:formula="of:=-68 - ([.E124]^2/Ao)" office:value-type="float" office:value="-231.620841456928" calcext:value-type="float">
            <text:p>-231,620841456928</text:p>
          </table:table-cell>
          <table:table-cell table:style-name="ce1" table:formula="of:=[.G123]+h" office:value-type="float" office:value="1.22" calcext:value-type="float">
            <text:p>1,22</text:p>
          </table:table-cell>
          <table:table-cell table:style-name="ce1" table:formula="of:=[.H123]+ h*[.F124]" office:value-type="float" office:value="402.184522681096" calcext:value-type="float">
            <text:p>402,1845226810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4]" office:value-type="float" office:value="1.22" calcext:value-type="float">
            <text:p>1,22</text:p>
          </table:table-cell>
          <table:table-cell table:style-name="ce1" table:formula="of:=[.H124]" office:value-type="float" office:value="402.184522681096" calcext:value-type="float">
            <text:p>402,184522681096</text:p>
          </table:table-cell>
          <table:table-cell table:style-name="ce1" table:formula="of:=-68 - ([.E125]^2/Ao)" office:value-type="float" office:value="-229.752390284221" calcext:value-type="float">
            <text:p>-229,752390284221</text:p>
          </table:table-cell>
          <table:table-cell table:style-name="ce1" table:formula="of:=[.G124]+h" office:value-type="float" office:value="1.23" calcext:value-type="float">
            <text:p>1,23</text:p>
          </table:table-cell>
          <table:table-cell table:style-name="ce1" table:formula="of:=[.H124]+ h*[.F125]" office:value-type="float" office:value="399.886998778254" calcext:value-type="float">
            <text:p>399,8869987782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5]" office:value-type="float" office:value="1.23" calcext:value-type="float">
            <text:p>1,23</text:p>
          </table:table-cell>
          <table:table-cell table:style-name="ce1" table:formula="of:=[.H125]" office:value-type="float" office:value="399.886998778254" calcext:value-type="float">
            <text:p>399,886998778254</text:p>
          </table:table-cell>
          <table:table-cell table:style-name="ce1" table:formula="of:=-68 - ([.E126]^2/Ao)" office:value-type="float" office:value="-227.909611791879" calcext:value-type="float">
            <text:p>-227,909611791879</text:p>
          </table:table-cell>
          <table:table-cell table:style-name="ce1" table:formula="of:=[.G125]+h" office:value-type="float" office:value="1.24" calcext:value-type="float">
            <text:p>1,24</text:p>
          </table:table-cell>
          <table:table-cell table:style-name="ce1" table:formula="of:=[.H125]+ h*[.F126]" office:value-type="float" office:value="397.607902660335" calcext:value-type="float">
            <text:p>397,6079026603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6]" office:value-type="float" office:value="1.24" calcext:value-type="float">
            <text:p>1,24</text:p>
          </table:table-cell>
          <table:table-cell table:style-name="ce1" table:formula="of:=[.H126]" office:value-type="float" office:value="397.607902660335" calcext:value-type="float">
            <text:p>397,607902660335</text:p>
          </table:table-cell>
          <table:table-cell table:style-name="ce1" table:formula="of:=-68 - ([.E127]^2/Ao)" office:value-type="float" office:value="-226.092044257951" calcext:value-type="float">
            <text:p>-226,092044257951</text:p>
          </table:table-cell>
          <table:table-cell table:style-name="ce1" table:formula="of:=[.G126]+h" office:value-type="float" office:value="1.25" calcext:value-type="float">
            <text:p>1,25</text:p>
          </table:table-cell>
          <table:table-cell table:style-name="ce1" table:formula="of:=[.H126]+ h*[.F127]" office:value-type="float" office:value="395.346982217756" calcext:value-type="float">
            <text:p>395,3469822177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7]" office:value-type="float" office:value="1.25" calcext:value-type="float">
            <text:p>1,25</text:p>
          </table:table-cell>
          <table:table-cell table:style-name="ce1" table:formula="of:=[.H127]" office:value-type="float" office:value="395.346982217756" calcext:value-type="float">
            <text:p>395,346982217756</text:p>
          </table:table-cell>
          <table:table-cell table:style-name="ce1" table:formula="of:=-68 - ([.E128]^2/Ao)" office:value-type="float" office:value="-224.299236348687" calcext:value-type="float">
            <text:p>-224,299236348687</text:p>
          </table:table-cell>
          <table:table-cell table:style-name="ce1" table:formula="of:=[.G127]+h" office:value-type="float" office:value="1.26" calcext:value-type="float">
            <text:p>1,26</text:p>
          </table:table-cell>
          <table:table-cell table:style-name="ce1" table:formula="of:=[.H127]+ h*[.F128]" office:value-type="float" office:value="393.103989854269" calcext:value-type="float">
            <text:p>393,1039898542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8]" office:value-type="float" office:value="1.26" calcext:value-type="float">
            <text:p>1,26</text:p>
          </table:table-cell>
          <table:table-cell table:style-name="ce1" table:formula="of:=[.H128]" office:value-type="float" office:value="393.103989854269" calcext:value-type="float">
            <text:p>393,103989854269</text:p>
          </table:table-cell>
          <table:table-cell table:style-name="ce1" table:formula="of:=-68 - ([.E129]^2/Ao)" office:value-type="float" office:value="-222.530746839345" calcext:value-type="float">
            <text:p>-222,530746839345</text:p>
          </table:table-cell>
          <table:table-cell table:style-name="ce1" table:formula="of:=[.G128]+h" office:value-type="float" office:value="1.27" calcext:value-type="float">
            <text:p>1,27</text:p>
          </table:table-cell>
          <table:table-cell table:style-name="ce1" table:formula="of:=[.H128]+ h*[.F129]" office:value-type="float" office:value="390.878682385876" calcext:value-type="float">
            <text:p>390,8786823858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9]" office:value-type="float" office:value="1.27" calcext:value-type="float">
            <text:p>1,27</text:p>
          </table:table-cell>
          <table:table-cell table:style-name="ce1" table:formula="of:=[.H129]" office:value-type="float" office:value="390.878682385876" calcext:value-type="float">
            <text:p>390,878682385876</text:p>
          </table:table-cell>
          <table:table-cell table:style-name="ce1" table:formula="of:=-68 - ([.E130]^2/Ao)" office:value-type="float" office:value="-220.786144343718" calcext:value-type="float">
            <text:p>-220,786144343718</text:p>
          </table:table-cell>
          <table:table-cell table:style-name="ce1" table:formula="of:=[.G129]+h" office:value-type="float" office:value="1.28" calcext:value-type="float">
            <text:p>1,28</text:p>
          </table:table-cell>
          <table:table-cell table:style-name="ce1" table:formula="of:=[.H129]+ h*[.F130]" office:value-type="float" office:value="388.670820942438" calcext:value-type="float">
            <text:p>388,6708209424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0]" office:value-type="float" office:value="1.28" calcext:value-type="float">
            <text:p>1,28</text:p>
          </table:table-cell>
          <table:table-cell table:style-name="ce1" table:formula="of:=[.H130]" office:value-type="float" office:value="388.670820942438" calcext:value-type="float">
            <text:p>388,670820942438</text:p>
          </table:table-cell>
          <table:table-cell table:style-name="ce1" table:formula="of:=-68 - ([.E131]^2/Ao)" office:value-type="float" office:value="-219.065007052069" calcext:value-type="float">
            <text:p>-219,065007052069</text:p>
          </table:table-cell>
          <table:table-cell table:style-name="ce1" table:formula="of:=[.G130]+h" office:value-type="float" office:value="1.29" calcext:value-type="float">
            <text:p>1,29</text:p>
          </table:table-cell>
          <table:table-cell table:style-name="ce1" table:formula="of:=[.H130]+ h*[.F131]" office:value-type="float" office:value="386.480170871918" calcext:value-type="float">
            <text:p>386,4801708719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1]" office:value-type="float" office:value="1.29" calcext:value-type="float">
            <text:p>1,29</text:p>
          </table:table-cell>
          <table:table-cell table:style-name="ce1" table:formula="of:=[.H131]" office:value-type="float" office:value="386.480170871918" calcext:value-type="float">
            <text:p>386,480170871918</text:p>
          </table:table-cell>
          <table:table-cell table:style-name="ce1" table:formula="of:=-68 - ([.E132]^2/Ao)" office:value-type="float" office:value="-217.366922477187" calcext:value-type="float">
            <text:p>-217,366922477187</text:p>
          </table:table-cell>
          <table:table-cell table:style-name="ce1" table:formula="of:=[.G131]+h" office:value-type="float" office:value="1.3" calcext:value-type="float">
            <text:p>1,3</text:p>
          </table:table-cell>
          <table:table-cell table:style-name="ce1" table:formula="of:=[.H131]+ h*[.F132]" office:value-type="float" office:value="384.306501647146" calcext:value-type="float">
            <text:p>384,3065016471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2]" office:value-type="float" office:value="1.3" calcext:value-type="float">
            <text:p>1,3</text:p>
          </table:table-cell>
          <table:table-cell table:style-name="ce1" table:formula="of:=[.H132]" office:value-type="float" office:value="384.306501647146" calcext:value-type="float">
            <text:p>384,306501647146</text:p>
          </table:table-cell>
          <table:table-cell table:style-name="ce1" table:formula="of:=-68 - ([.E133]^2/Ao)" office:value-type="float" office:value="-215.691487208268" calcext:value-type="float">
            <text:p>-215,691487208268</text:p>
          </table:table-cell>
          <table:table-cell table:style-name="ce1" table:formula="of:=[.G132]+h" office:value-type="float" office:value="1.31" calcext:value-type="float">
            <text:p>1,31</text:p>
          </table:table-cell>
          <table:table-cell table:style-name="ce1" table:formula="of:=[.H132]+ h*[.F133]" office:value-type="float" office:value="382.149586775063" calcext:value-type="float">
            <text:p>382,1495867750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3]" office:value-type="float" office:value="1.31" calcext:value-type="float">
            <text:p>1,31</text:p>
          </table:table-cell>
          <table:table-cell table:style-name="ce1" table:formula="of:=[.H133]" office:value-type="float" office:value="382.149586775063" calcext:value-type="float">
            <text:p>382,149586775063</text:p>
          </table:table-cell>
          <table:table-cell table:style-name="ce1" table:formula="of:=-68 - ([.E134]^2/Ao)" office:value-type="float" office:value="-214.038306672351" calcext:value-type="float">
            <text:p>-214,038306672351</text:p>
          </table:table-cell>
          <table:table-cell table:style-name="ce1" table:formula="of:=[.G133]+h" office:value-type="float" office:value="1.32" calcext:value-type="float">
            <text:p>1,32</text:p>
          </table:table-cell>
          <table:table-cell table:style-name="ce1" table:formula="of:=[.H133]+ h*[.F134]" office:value-type="float" office:value="380.00920370834" calcext:value-type="float">
            <text:p>380,009203708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4]" office:value-type="float" office:value="1.32" calcext:value-type="float">
            <text:p>1,32</text:p>
          </table:table-cell>
          <table:table-cell table:style-name="ce1" table:formula="of:=[.H134]" office:value-type="float" office:value="380.00920370834" calcext:value-type="float">
            <text:p>380,00920370834</text:p>
          </table:table-cell>
          <table:table-cell table:style-name="ce1" table:formula="of:=-68 - ([.E135]^2/Ao)" office:value-type="float" office:value="-212.406994903046" calcext:value-type="float">
            <text:p>-212,406994903046</text:p>
          </table:table-cell>
          <table:table-cell table:style-name="ce1" table:formula="of:=[.G134]+h" office:value-type="float" office:value="1.33" calcext:value-type="float">
            <text:p>1,33</text:p>
          </table:table-cell>
          <table:table-cell table:style-name="ce1" table:formula="of:=[.H134]+ h*[.F135]" office:value-type="float" office:value="377.885133759309" calcext:value-type="float">
            <text:p>377,8851337593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5]" office:value-type="float" office:value="1.33" calcext:value-type="float">
            <text:p>1,33</text:p>
          </table:table-cell>
          <table:table-cell table:style-name="ce1" table:formula="of:=[.H135]" office:value-type="float" office:value="377.885133759309" calcext:value-type="float">
            <text:p>377,885133759309</text:p>
          </table:table-cell>
          <table:table-cell table:style-name="ce1" table:formula="of:=-68 - ([.E136]^2/Ao)" office:value-type="float" office:value="-210.797174316291" calcext:value-type="float">
            <text:p>-210,797174316291</text:p>
          </table:table-cell>
          <table:table-cell table:style-name="ce1" table:formula="of:=[.G135]+h" office:value-type="float" office:value="1.34" calcext:value-type="float">
            <text:p>1,34</text:p>
          </table:table-cell>
          <table:table-cell table:style-name="ce1" table:formula="of:=[.H135]+ h*[.F136]" office:value-type="float" office:value="375.777162016146" calcext:value-type="float">
            <text:p>375,7771620161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6]" office:value-type="float" office:value="1.34" calcext:value-type="float">
            <text:p>1,34</text:p>
          </table:table-cell>
          <table:table-cell table:style-name="ce1" table:formula="of:=[.H136]" office:value-type="float" office:value="375.777162016146" calcext:value-type="float">
            <text:p>375,777162016146</text:p>
          </table:table-cell>
          <table:table-cell table:style-name="ce1" table:formula="of:=-68 - ([.E137]^2/Ao)" office:value-type="float" office:value="-209.208475492909" calcext:value-type="float">
            <text:p>-209,208475492909</text:p>
          </table:table-cell>
          <table:table-cell table:style-name="ce1" table:formula="of:=[.G136]+h" office:value-type="float" office:value="1.35" calcext:value-type="float">
            <text:p>1,35</text:p>
          </table:table-cell>
          <table:table-cell table:style-name="ce1" table:formula="of:=[.H136]+ h*[.F137]" office:value-type="float" office:value="373.685077261217" calcext:value-type="float">
            <text:p>373,6850772612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7]" office:value-type="float" office:value="1.35" calcext:value-type="float">
            <text:p>1,35</text:p>
          </table:table-cell>
          <table:table-cell table:style-name="ce1" table:formula="of:=[.H137]" office:value-type="float" office:value="373.685077261217" calcext:value-type="float">
            <text:p>373,685077261217</text:p>
          </table:table-cell>
          <table:table-cell table:style-name="ce1" table:formula="of:=-68 - ([.E138]^2/Ao)" office:value-type="float" office:value="-207.640536967722" calcext:value-type="float">
            <text:p>-207,640536967722</text:p>
          </table:table-cell>
          <table:table-cell table:style-name="ce1" table:formula="of:=[.G137]+h" office:value-type="float" office:value="1.36" calcext:value-type="float">
            <text:p>1,36</text:p>
          </table:table-cell>
          <table:table-cell table:style-name="ce1" table:formula="of:=[.H137]+ h*[.F138]" office:value-type="float" office:value="371.60867189154" calcext:value-type="float">
            <text:p>371,608671891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8]" office:value-type="float" office:value="1.36" calcext:value-type="float">
            <text:p>1,36</text:p>
          </table:table-cell>
          <table:table-cell table:style-name="ce1" table:formula="of:=[.H138]" office:value-type="float" office:value="371.60867189154" calcext:value-type="float">
            <text:p>371,60867189154</text:p>
          </table:table-cell>
          <table:table-cell table:style-name="ce1" table:formula="of:=-68 - ([.E139]^2/Ao)" office:value-type="float" office:value="-206.093005024994" calcext:value-type="float">
            <text:p>-206,093005024994</text:p>
          </table:table-cell>
          <table:table-cell table:style-name="ce1" table:formula="of:=[.G138]+h" office:value-type="float" office:value="1.37" calcext:value-type="float">
            <text:p>1,37</text:p>
          </table:table-cell>
          <table:table-cell table:style-name="ce1" table:formula="of:=[.H138]+ h*[.F139]" office:value-type="float" office:value="369.54774184129" calcext:value-type="float">
            <text:p>369,547741841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9]" office:value-type="float" office:value="1.37" calcext:value-type="float">
            <text:p>1,37</text:p>
          </table:table-cell>
          <table:table-cell table:style-name="ce1" table:formula="of:=[.H139]" office:value-type="float" office:value="369.54774184129" calcext:value-type="float">
            <text:p>369,54774184129</text:p>
          </table:table-cell>
          <table:table-cell table:style-name="ce1" table:formula="of:=-68 - ([.E140]^2/Ao)" office:value-type="float" office:value="-204.565533499997" calcext:value-type="float">
            <text:p>-204,565533499997</text:p>
          </table:table-cell>
          <table:table-cell table:style-name="ce1" table:formula="of:=[.G139]+h" office:value-type="float" office:value="1.38" calcext:value-type="float">
            <text:p>1,38</text:p>
          </table:table-cell>
          <table:table-cell table:style-name="ce1" table:formula="of:=[.H139]+ h*[.F140]" office:value-type="float" office:value="367.50208650629" calcext:value-type="float">
            <text:p>367,502086506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0]" office:value-type="float" office:value="1.38" calcext:value-type="float">
            <text:p>1,38</text:p>
          </table:table-cell>
          <table:table-cell table:style-name="ce1" table:formula="of:=[.H140]" office:value-type="float" office:value="367.50208650629" calcext:value-type="float">
            <text:p>367,50208650629</text:p>
          </table:table-cell>
          <table:table-cell table:style-name="ce1" table:formula="of:=-68 - ([.E141]^2/Ao)" office:value-type="float" office:value="-203.057783586477" calcext:value-type="float">
            <text:p>-203,057783586477</text:p>
          </table:table-cell>
          <table:table-cell table:style-name="ce1" table:formula="of:=[.G140]+h" office:value-type="float" office:value="1.39" calcext:value-type="float">
            <text:p>1,39</text:p>
          </table:table-cell>
          <table:table-cell table:style-name="ce1" table:formula="of:=[.H140]+ h*[.F141]" office:value-type="float" office:value="365.471508670425" calcext:value-type="float">
            <text:p>365,4715086704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1]" office:value-type="float" office:value="1.39" calcext:value-type="float">
            <text:p>1,39</text:p>
          </table:table-cell>
          <table:table-cell table:style-name="ce1" table:formula="of:=[.H141]" office:value-type="float" office:value="365.471508670425" calcext:value-type="float">
            <text:p>365,471508670425</text:p>
          </table:table-cell>
          <table:table-cell table:style-name="ce1" table:formula="of:=-68 - ([.E142]^2/Ao)" office:value-type="float" office:value="-201.569423649837" calcext:value-type="float">
            <text:p>-201,569423649837</text:p>
          </table:table-cell>
          <table:table-cell table:style-name="ce1" table:formula="of:=[.G141]+h" office:value-type="float" office:value="1.4" calcext:value-type="float">
            <text:p>1,4</text:p>
          </table:table-cell>
          <table:table-cell table:style-name="ce1" table:formula="of:=[.H141]+ h*[.F142]" office:value-type="float" office:value="363.455814433927" calcext:value-type="float">
            <text:p>363,4558144339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2]" office:value-type="float" office:value="1.4" calcext:value-type="float">
            <text:p>1,4</text:p>
          </table:table-cell>
          <table:table-cell table:style-name="ce1" table:formula="of:=[.H142]" office:value-type="float" office:value="363.455814433927" calcext:value-type="float">
            <text:p>363,455814433927</text:p>
          </table:table-cell>
          <table:table-cell table:style-name="ce1" table:formula="of:=-68 - ([.E143]^2/Ao)" office:value-type="float" office:value="-200.100129045829" calcext:value-type="float">
            <text:p>-200,100129045829</text:p>
          </table:table-cell>
          <table:table-cell table:style-name="ce1" table:formula="of:=[.G142]+h" office:value-type="float" office:value="1.41" calcext:value-type="float">
            <text:p>1,41</text:p>
          </table:table-cell>
          <table:table-cell table:style-name="ce1" table:formula="of:=[.H142]+ h*[.F143]" office:value-type="float" office:value="361.454813143468" calcext:value-type="float">
            <text:p>361,4548131434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3]" office:value-type="float" office:value="1.41" calcext:value-type="float">
            <text:p>1,41</text:p>
          </table:table-cell>
          <table:table-cell table:style-name="ce1" table:formula="of:=[.H143]" office:value-type="float" office:value="361.454813143468" calcext:value-type="float">
            <text:p>361,454813143468</text:p>
          </table:table-cell>
          <table:table-cell table:style-name="ce1" table:formula="of:=-68 - ([.E144]^2/Ao)" office:value-type="float" office:value="-198.64958194458" calcext:value-type="float">
            <text:p>-198,64958194458</text:p>
          </table:table-cell>
          <table:table-cell table:style-name="ce1" table:formula="of:=[.G143]+h" office:value-type="float" office:value="1.42" calcext:value-type="float">
            <text:p>1,42</text:p>
          </table:table-cell>
          <table:table-cell table:style-name="ce1" table:formula="of:=[.H143]+ h*[.F144]" office:value-type="float" office:value="359.468317324023" calcext:value-type="float">
            <text:p>359,4683173240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4]" office:value-type="float" office:value="1.42" calcext:value-type="float">
            <text:p>1,42</text:p>
          </table:table-cell>
          <table:table-cell table:style-name="ce1" table:formula="of:=[.H144]" office:value-type="float" office:value="359.468317324023" calcext:value-type="float">
            <text:p>359,468317324023</text:p>
          </table:table-cell>
          <table:table-cell table:style-name="ce1" table:formula="of:=-68 - ([.E145]^2/Ao)" office:value-type="float" office:value="-197.217471159764" calcext:value-type="float">
            <text:p>-197,217471159764</text:p>
          </table:table-cell>
          <table:table-cell table:style-name="ce1" table:formula="of:=[.G144]+h" office:value-type="float" office:value="1.43" calcext:value-type="float">
            <text:p>1,43</text:p>
          </table:table-cell>
          <table:table-cell table:style-name="ce1" table:formula="of:=[.H144]+ h*[.F145]" office:value-type="float" office:value="357.496142612425" calcext:value-type="float">
            <text:p>357,4961426124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5]" office:value-type="float" office:value="1.43" calcext:value-type="float">
            <text:p>1,43</text:p>
          </table:table-cell>
          <table:table-cell table:style-name="ce1" table:formula="of:=[.H145]" office:value-type="float" office:value="357.496142612425" calcext:value-type="float">
            <text:p>357,496142612425</text:p>
          </table:table-cell>
          <table:table-cell table:style-name="ce1" table:formula="of:=-68 - ([.E146]^2/Ao)" office:value-type="float" office:value="-195.803491982763" calcext:value-type="float">
            <text:p>-195,803491982763</text:p>
          </table:table-cell>
          <table:table-cell table:style-name="ce1" table:formula="of:=[.G145]+h" office:value-type="float" office:value="1.44" calcext:value-type="float">
            <text:p>1,44</text:p>
          </table:table-cell>
          <table:table-cell table:style-name="ce1" table:formula="of:=[.H145]+ h*[.F146]" office:value-type="float" office:value="355.538107692597" calcext:value-type="float">
            <text:p>355,5381076925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6]" office:value-type="float" office:value="1.44" calcext:value-type="float">
            <text:p>1,44</text:p>
          </table:table-cell>
          <table:table-cell table:style-name="ce1" table:formula="of:=[.H146]" office:value-type="float" office:value="355.538107692597" calcext:value-type="float">
            <text:p>355,538107692597</text:p>
          </table:table-cell>
          <table:table-cell table:style-name="ce1" table:formula="of:=-68 - ([.E147]^2/Ao)" office:value-type="float" office:value="-194.407346021633" calcext:value-type="float">
            <text:p>-194,407346021633</text:p>
          </table:table-cell>
          <table:table-cell table:style-name="ce1" table:formula="of:=[.G146]+h" office:value-type="float" office:value="1.45" calcext:value-type="float">
            <text:p>1,45</text:p>
          </table:table-cell>
          <table:table-cell table:style-name="ce1" table:formula="of:=[.H146]+ h*[.F147]" office:value-type="float" office:value="353.594034232381" calcext:value-type="float">
            <text:p>353,5940342323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7]" office:value-type="float" office:value="1.45" calcext:value-type="float">
            <text:p>1,45</text:p>
          </table:table-cell>
          <table:table-cell table:style-name="ce1" table:formula="of:=[.H147]" office:value-type="float" office:value="353.594034232381" calcext:value-type="float">
            <text:p>353,594034232381</text:p>
          </table:table-cell>
          <table:table-cell table:style-name="ce1" table:formula="of:=-68 - ([.E148]^2/Ao)" office:value-type="float" office:value="-193.02874104473" calcext:value-type="float">
            <text:p>-193,02874104473</text:p>
          </table:table-cell>
          <table:table-cell table:style-name="ce1" table:formula="of:=[.G147]+h" office:value-type="float" office:value="1.46" calcext:value-type="float">
            <text:p>1,46</text:p>
          </table:table-cell>
          <table:table-cell table:style-name="ce1" table:formula="of:=[.H147]+ h*[.F148]" office:value-type="float" office:value="351.663746821934" calcext:value-type="float">
            <text:p>351,6637468219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8]" office:value-type="float" office:value="1.46" calcext:value-type="float">
            <text:p>1,46</text:p>
          </table:table-cell>
          <table:table-cell table:style-name="ce1" table:formula="of:=[.H148]" office:value-type="float" office:value="351.663746821934" calcext:value-type="float">
            <text:p>351,663746821934</text:p>
          </table:table-cell>
          <table:table-cell table:style-name="ce1" table:formula="of:=-68 - ([.E149]^2/Ao)" office:value-type="float" office:value="-191.667390828841" calcext:value-type="float">
            <text:p>-191,667390828841</text:p>
          </table:table-cell>
          <table:table-cell table:style-name="ce1" table:formula="of:=[.G148]+h" office:value-type="float" office:value="1.47" calcext:value-type="float">
            <text:p>1,47</text:p>
          </table:table-cell>
          <table:table-cell table:style-name="ce1" table:formula="of:=[.H148]+ h*[.F149]" office:value-type="float" office:value="349.747072913645" calcext:value-type="float">
            <text:p>349,7470729136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9]" office:value-type="float" office:value="1.47" calcext:value-type="float">
            <text:p>1,47</text:p>
          </table:table-cell>
          <table:table-cell table:style-name="ce1" table:formula="of:=[.H149]" office:value-type="float" office:value="349.747072913645" calcext:value-type="float">
            <text:p>349,747072913645</text:p>
          </table:table-cell>
          <table:table-cell table:style-name="ce1" table:formula="of:=-68 - ([.E150]^2/Ao)" office:value-type="float" office:value="-190.323015011663" calcext:value-type="float">
            <text:p>-190,323015011663</text:p>
          </table:table-cell>
          <table:table-cell table:style-name="ce1" table:formula="of:=[.G149]+h" office:value-type="float" office:value="1.48" calcext:value-type="float">
            <text:p>1,48</text:p>
          </table:table-cell>
          <table:table-cell table:style-name="ce1" table:formula="of:=[.H149]+ h*[.F150]" office:value-type="float" office:value="347.843842763529" calcext:value-type="float">
            <text:p>347,8438427635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0]" office:value-type="float" office:value="1.48" calcext:value-type="float">
            <text:p>1,48</text:p>
          </table:table-cell>
          <table:table-cell table:style-name="ce1" table:formula="of:=[.H150]" office:value-type="float" office:value="347.843842763529" calcext:value-type="float">
            <text:p>347,843842763529</text:p>
          </table:table-cell>
          <table:table-cell table:style-name="ce1" table:formula="of:=-68 - ([.E151]^2/Ao)" office:value-type="float" office:value="-188.995338948499" calcext:value-type="float">
            <text:p>-188,995338948499</text:p>
          </table:table-cell>
          <table:table-cell table:style-name="ce1" table:formula="of:=[.G150]+h" office:value-type="float" office:value="1.49" calcext:value-type="float">
            <text:p>1,49</text:p>
          </table:table-cell>
          <table:table-cell table:style-name="ce1" table:formula="of:=[.H150]+ h*[.F151]" office:value-type="float" office:value="345.953889374044" calcext:value-type="float">
            <text:p>345,9538893740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1]" office:value-type="float" office:value="1.49" calcext:value-type="float">
            <text:p>1,49</text:p>
          </table:table-cell>
          <table:table-cell table:style-name="ce1" table:formula="of:=[.H151]" office:value-type="float" office:value="345.953889374044" calcext:value-type="float">
            <text:p>345,953889374044</text:p>
          </table:table-cell>
          <table:table-cell table:style-name="ce1" table:formula="of:=-68 - ([.E152]^2/Ao)" office:value-type="float" office:value="-187.684093573028" calcext:value-type="float">
            <text:p>-187,684093573028</text:p>
          </table:table-cell>
          <table:table-cell table:style-name="ce1" table:formula="of:=[.G151]+h" office:value-type="float" office:value="1.5" calcext:value-type="float">
            <text:p>1,5</text:p>
          </table:table-cell>
          <table:table-cell table:style-name="ce1" table:formula="of:=[.H151]+ h*[.F152]" office:value-type="float" office:value="344.077048438313" calcext:value-type="float">
            <text:p>344,0770484383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2]" office:value-type="float" office:value="1.5" calcext:value-type="float">
            <text:p>1,5</text:p>
          </table:table-cell>
          <table:table-cell table:style-name="ce1" table:formula="of:=[.H152]" office:value-type="float" office:value="344.077048438313" calcext:value-type="float">
            <text:p>344,077048438313</text:p>
          </table:table-cell>
          <table:table-cell table:style-name="ce1" table:formula="of:=-68 - ([.E153]^2/Ao)" office:value-type="float" office:value="-186.389015262022" calcext:value-type="float">
            <text:p>-186,389015262022</text:p>
          </table:table-cell>
          <table:table-cell table:style-name="ce1" table:formula="of:=[.G152]+h" office:value-type="float" office:value="1.51" calcext:value-type="float">
            <text:p>1,51</text:p>
          </table:table-cell>
          <table:table-cell table:style-name="ce1" table:formula="of:=[.H152]+ h*[.F153]" office:value-type="float" office:value="342.213158285693" calcext:value-type="float">
            <text:p>342,2131582856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3]" office:value-type="float" office:value="1.51" calcext:value-type="float">
            <text:p>1,51</text:p>
          </table:table-cell>
          <table:table-cell table:style-name="ce1" table:formula="of:=[.H153]" office:value-type="float" office:value="342.213158285693" calcext:value-type="float">
            <text:p>342,213158285693</text:p>
          </table:table-cell>
          <table:table-cell table:style-name="ce1" table:formula="of:=-68 - ([.E154]^2/Ao)" office:value-type="float" office:value="-185.109845703869" calcext:value-type="float">
            <text:p>-185,109845703869</text:p>
          </table:table-cell>
          <table:table-cell table:style-name="ce1" table:formula="of:=[.G153]+h" office:value-type="float" office:value="1.52" calcext:value-type="float">
            <text:p>1,52</text:p>
          </table:table-cell>
          <table:table-cell table:style-name="ce1" table:formula="of:=[.H153]+ h*[.F154]" office:value-type="float" office:value="340.362059828655" calcext:value-type="float">
            <text:p>340,3620598286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4]" office:value-type="float" office:value="1.52" calcext:value-type="float">
            <text:p>1,52</text:p>
          </table:table-cell>
          <table:table-cell table:style-name="ce1" table:formula="of:=[.H154]" office:value-type="float" office:value="340.362059828655" calcext:value-type="float">
            <text:p>340,362059828655</text:p>
          </table:table-cell>
          <table:table-cell table:style-name="ce1" table:formula="of:=-68 - ([.E155]^2/Ao)" office:value-type="float" office:value="-183.846331770805" calcext:value-type="float">
            <text:p>-183,846331770805</text:p>
          </table:table-cell>
          <table:table-cell table:style-name="ce1" table:formula="of:=[.G154]+h" office:value-type="float" office:value="1.53" calcext:value-type="float">
            <text:p>1,53</text:p>
          </table:table-cell>
          <table:table-cell table:style-name="ce1" table:formula="of:=[.H154]+ h*[.F155]" office:value-type="float" office:value="338.523596510947" calcext:value-type="float">
            <text:p>338,5235965109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5]" office:value-type="float" office:value="1.53" calcext:value-type="float">
            <text:p>1,53</text:p>
          </table:table-cell>
          <table:table-cell table:style-name="ce1" table:formula="of:=[.H155]" office:value-type="float" office:value="338.523596510947" calcext:value-type="float">
            <text:p>338,523596510947</text:p>
          </table:table-cell>
          <table:table-cell table:style-name="ce1" table:formula="of:=-68 - ([.E156]^2/Ao)" office:value-type="float" office:value="-182.598225394706" calcext:value-type="float">
            <text:p>-182,598225394706</text:p>
          </table:table-cell>
          <table:table-cell table:style-name="ce1" table:formula="of:=[.G155]+h" office:value-type="float" office:value="1.54" calcext:value-type="float">
            <text:p>1,54</text:p>
          </table:table-cell>
          <table:table-cell table:style-name="ce1" table:formula="of:=[.H155]+ h*[.F156]" office:value-type="float" office:value="336.697614256999" calcext:value-type="float">
            <text:p>336,6976142569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6]" office:value-type="float" office:value="1.54" calcext:value-type="float">
            <text:p>1,54</text:p>
          </table:table-cell>
          <table:table-cell table:style-name="ce1" table:formula="of:=[.H156]" office:value-type="float" office:value="336.697614256999" calcext:value-type="float">
            <text:p>336,697614256999</text:p>
          </table:table-cell>
          <table:table-cell table:style-name="ce1" table:formula="of:=-68 - ([.E157]^2/Ao)" office:value-type="float" office:value="-181.365283446355" calcext:value-type="float">
            <text:p>-181,365283446355</text:p>
          </table:table-cell>
          <table:table-cell table:style-name="ce1" table:formula="of:=[.G156]+h" office:value-type="float" office:value="1.55" calcext:value-type="float">
            <text:p>1,55</text:p>
          </table:table-cell>
          <table:table-cell table:style-name="ce1" table:formula="of:=[.H156]+ h*[.F157]" office:value-type="float" office:value="334.883961422536" calcext:value-type="float">
            <text:p>334,8839614225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7]" office:value-type="float" office:value="1.55" calcext:value-type="float">
            <text:p>1,55</text:p>
          </table:table-cell>
          <table:table-cell table:style-name="ce1" table:formula="of:=[.H157]" office:value-type="float" office:value="334.883961422536" calcext:value-type="float">
            <text:p>334,883961422536</text:p>
          </table:table-cell>
          <table:table-cell table:style-name="ce1" table:formula="of:=-68 - ([.E158]^2/Ao)" office:value-type="float" office:value="-180.147267618051" calcext:value-type="float">
            <text:p>-180,147267618051</text:p>
          </table:table-cell>
          <table:table-cell table:style-name="ce1" table:formula="of:=[.G157]+h" office:value-type="float" office:value="1.56" calcext:value-type="float">
            <text:p>1,56</text:p>
          </table:table-cell>
          <table:table-cell table:style-name="ce1" table:formula="of:=[.H157]+ h*[.F158]" office:value-type="float" office:value="333.082488746355" calcext:value-type="float">
            <text:p>333,0824887463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8]" office:value-type="float" office:value="1.56" calcext:value-type="float">
            <text:p>1,56</text:p>
          </table:table-cell>
          <table:table-cell table:style-name="ce1" table:formula="of:=[.H158]" office:value-type="float" office:value="333.082488746355" calcext:value-type="float">
            <text:p>333,082488746355</text:p>
          </table:table-cell>
          <table:table-cell table:style-name="ce1" table:formula="of:=-68 - ([.E159]^2/Ao)" office:value-type="float" office:value="-178.943944309466" calcext:value-type="float">
            <text:p>-178,943944309466</text:p>
          </table:table-cell>
          <table:table-cell table:style-name="ce1" table:formula="of:=[.G158]+h" office:value-type="float" office:value="1.57" calcext:value-type="float">
            <text:p>1,57</text:p>
          </table:table-cell>
          <table:table-cell table:style-name="ce1" table:formula="of:=[.H158]+ h*[.F159]" office:value-type="float" office:value="331.293049303261" calcext:value-type="float">
            <text:p>331,2930493032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9]" office:value-type="float" office:value="1.57" calcext:value-type="float">
            <text:p>1,57</text:p>
          </table:table-cell>
          <table:table-cell table:style-name="ce1" table:formula="of:=[.H159]" office:value-type="float" office:value="331.293049303261" calcext:value-type="float">
            <text:p>331,293049303261</text:p>
          </table:table-cell>
          <table:table-cell table:style-name="ce1" table:formula="of:=-68 - ([.E160]^2/Ao)" office:value-type="float" office:value="-177.755084516653" calcext:value-type="float">
            <text:p>-177,755084516653</text:p>
          </table:table-cell>
          <table:table-cell table:style-name="ce1" table:formula="of:=[.G159]+h" office:value-type="float" office:value="1.58" calcext:value-type="float">
            <text:p>1,58</text:p>
          </table:table-cell>
          <table:table-cell table:style-name="ce1" table:formula="of:=[.H159]+ h*[.F160]" office:value-type="float" office:value="329.515498458094" calcext:value-type="float">
            <text:p>329,5154984580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0]" office:value-type="float" office:value="1.58" calcext:value-type="float">
            <text:p>1,58</text:p>
          </table:table-cell>
          <table:table-cell table:style-name="ce1" table:formula="of:=[.H160]" office:value-type="float" office:value="329.515498458094" calcext:value-type="float">
            <text:p>329,515498458094</text:p>
          </table:table-cell>
          <table:table-cell table:style-name="ce1" table:formula="of:=-68 - ([.E161]^2/Ao)" office:value-type="float" office:value="-176.580463724086" calcext:value-type="float">
            <text:p>-176,580463724086</text:p>
          </table:table-cell>
          <table:table-cell table:style-name="ce1" table:formula="of:=[.G160]+h" office:value-type="float" office:value="1.59" calcext:value-type="float">
            <text:p>1,59</text:p>
          </table:table-cell>
          <table:table-cell table:style-name="ce1" table:formula="of:=[.H160]+ h*[.F161]" office:value-type="float" office:value="327.749693820853" calcext:value-type="float">
            <text:p>327,7496938208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1]" office:value-type="float" office:value="1.59" calcext:value-type="float">
            <text:p>1,59</text:p>
          </table:table-cell>
          <table:table-cell table:style-name="ce1" table:formula="of:=[.H161]" office:value-type="float" office:value="327.749693820853" calcext:value-type="float">
            <text:p>327,749693820853</text:p>
          </table:table-cell>
          <table:table-cell table:style-name="ce1" table:formula="of:=-68 - ([.E162]^2/Ao)" office:value-type="float" office:value="-175.419861799663" calcext:value-type="float">
            <text:p>-175,419861799663</text:p>
          </table:table-cell>
          <table:table-cell table:style-name="ce1" table:formula="of:=[.G161]+h" office:value-type="float" office:value="1.6" calcext:value-type="float">
            <text:p>1,6</text:p>
          </table:table-cell>
          <table:table-cell table:style-name="ce1" table:formula="of:=[.H161]+ h*[.F162]" office:value-type="float" office:value="325.995495202857" calcext:value-type="float">
            <text:p>325,9954952028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2]" office:value-type="float" office:value="1.6" calcext:value-type="float">
            <text:p>1,6</text:p>
          </table:table-cell>
          <table:table-cell table:style-name="ce1" table:formula="of:=[.H162]" office:value-type="float" office:value="325.995495202857" calcext:value-type="float">
            <text:p>325,995495202857</text:p>
          </table:table-cell>
          <table:table-cell table:style-name="ce1" table:formula="of:=-68 - ([.E163]^2/Ao)" office:value-type="float" office:value="-174.273062892556" calcext:value-type="float">
            <text:p>-174,273062892556</text:p>
          </table:table-cell>
          <table:table-cell table:style-name="ce1" table:formula="of:=[.G162]+h" office:value-type="float" office:value="1.61" calcext:value-type="float">
            <text:p>1,61</text:p>
          </table:table-cell>
          <table:table-cell table:style-name="ce1" table:formula="of:=[.H162]+ h*[.F163]" office:value-type="float" office:value="324.252764573931" calcext:value-type="float">
            <text:p>324,2527645739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3]" office:value-type="float" office:value="1.61" calcext:value-type="float">
            <text:p>1,61</text:p>
          </table:table-cell>
          <table:table-cell table:style-name="ce1" table:formula="of:=[.H163]" office:value-type="float" office:value="324.252764573931" calcext:value-type="float">
            <text:p>324,252764573931</text:p>
          </table:table-cell>
          <table:table-cell table:style-name="ce1" table:formula="of:=-68 - ([.E164]^2/Ao)" office:value-type="float" office:value="-173.139855333837" calcext:value-type="float">
            <text:p>-173,139855333837</text:p>
          </table:table-cell>
          <table:table-cell table:style-name="ce1" table:formula="of:=[.G163]+h" office:value-type="float" office:value="1.62" calcext:value-type="float">
            <text:p>1,62</text:p>
          </table:table-cell>
          <table:table-cell table:style-name="ce1" table:formula="of:=[.H163]+ h*[.F164]" office:value-type="float" office:value="322.521366020593" calcext:value-type="float">
            <text:p>322,5213660205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4]" office:value-type="float" office:value="1.62" calcext:value-type="float">
            <text:p>1,62</text:p>
          </table:table-cell>
          <table:table-cell table:style-name="ce1" table:formula="of:=[.H164]" office:value-type="float" office:value="322.521366020593" calcext:value-type="float">
            <text:p>322,521366020593</text:p>
          </table:table-cell>
          <table:table-cell table:style-name="ce1" table:formula="of:=-68 - ([.E165]^2/Ao)" office:value-type="float" office:value="-172.020031539789" calcext:value-type="float">
            <text:p>-172,020031539789</text:p>
          </table:table-cell>
          <table:table-cell table:style-name="ce1" table:formula="of:=[.G164]+h" office:value-type="float" office:value="1.63" calcext:value-type="float">
            <text:p>1,63</text:p>
          </table:table-cell>
          <table:table-cell table:style-name="ce1" table:formula="of:=[.H164]+ h*[.F165]" office:value-type="float" office:value="320.801165705195" calcext:value-type="float">
            <text:p>320,8011657051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5]" office:value-type="float" office:value="1.63" calcext:value-type="float">
            <text:p>1,63</text:p>
          </table:table-cell>
          <table:table-cell table:style-name="ce1" table:formula="of:=[.H165]" office:value-type="float" office:value="320.801165705195" calcext:value-type="float">
            <text:p>320,801165705195</text:p>
          </table:table-cell>
          <table:table-cell table:style-name="ce1" table:formula="of:=-68 - ([.E166]^2/Ao)" office:value-type="float" office:value="-170.913387917812" calcext:value-type="float">
            <text:p>-170,913387917812</text:p>
          </table:table-cell>
          <table:table-cell table:style-name="ce1" table:formula="of:=[.G165]+h" office:value-type="float" office:value="1.64" calcext:value-type="float">
            <text:p>1,64</text:p>
          </table:table-cell>
          <table:table-cell table:style-name="ce1" table:formula="of:=[.H165]+ h*[.F166]" office:value-type="float" office:value="319.092031826017" calcext:value-type="float">
            <text:p>319,0920318260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6]" office:value-type="float" office:value="1.64" calcext:value-type="float">
            <text:p>1,64</text:p>
          </table:table-cell>
          <table:table-cell table:style-name="ce1" table:formula="of:=[.H166]" office:value-type="float" office:value="319.092031826017" calcext:value-type="float">
            <text:p>319,092031826017</text:p>
          </table:table-cell>
          <table:table-cell table:style-name="ce1" table:formula="of:=-68 - ([.E167]^2/Ao)" office:value-type="float" office:value="-169.819724774856" calcext:value-type="float">
            <text:p>-169,819724774856</text:p>
          </table:table-cell>
          <table:table-cell table:style-name="ce1" table:formula="of:=[.G166]+h" office:value-type="float" office:value="1.65" calcext:value-type="float">
            <text:p>1,65</text:p>
          </table:table-cell>
          <table:table-cell table:style-name="ce1" table:formula="of:=[.H166]+ h*[.F167]" office:value-type="float" office:value="317.393834578268" calcext:value-type="float">
            <text:p>317,3938345782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7]" office:value-type="float" office:value="1.65" calcext:value-type="float">
            <text:p>1,65</text:p>
          </table:table-cell>
          <table:table-cell table:style-name="ce1" table:formula="of:=[.H167]" office:value-type="float" office:value="317.393834578268" calcext:value-type="float">
            <text:p>317,393834578268</text:p>
          </table:table-cell>
          <table:table-cell table:style-name="ce1" table:formula="of:=-68 - ([.E168]^2/Ao)" office:value-type="float" office:value="-168.738846228297" calcext:value-type="float">
            <text:p>-168,738846228297</text:p>
          </table:table-cell>
          <table:table-cell table:style-name="ce1" table:formula="of:=[.G167]+h" office:value-type="float" office:value="1.66" calcext:value-type="float">
            <text:p>1,66</text:p>
          </table:table-cell>
          <table:table-cell table:style-name="ce1" table:formula="of:=[.H167]+ h*[.F168]" office:value-type="float" office:value="315.706446115985" calcext:value-type="float">
            <text:p>315,7064461159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8]" office:value-type="float" office:value="1.66" calcext:value-type="float">
            <text:p>1,66</text:p>
          </table:table-cell>
          <table:table-cell table:style-name="ce1" table:formula="of:=[.H168]" office:value-type="float" office:value="315.706446115985" calcext:value-type="float">
            <text:p>315,706446115985</text:p>
          </table:table-cell>
          <table:table-cell table:style-name="ce1" table:formula="of:=-68 - ([.E169]^2/Ao)" office:value-type="float" office:value="-167.670560119186" calcext:value-type="float">
            <text:p>-167,670560119186</text:p>
          </table:table-cell>
          <table:table-cell table:style-name="ce1" table:formula="of:=[.G168]+h" office:value-type="float" office:value="1.67" calcext:value-type="float">
            <text:p>1,67</text:p>
          </table:table-cell>
          <table:table-cell table:style-name="ce1" table:formula="of:=[.H168]+ h*[.F169]" office:value-type="float" office:value="314.029740514793" calcext:value-type="float">
            <text:p>314,0297405147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9]" office:value-type="float" office:value="1.67" calcext:value-type="float">
            <text:p>1,67</text:p>
          </table:table-cell>
          <table:table-cell table:style-name="ce1" table:formula="of:=[.H169]" office:value-type="float" office:value="314.029740514793" calcext:value-type="float">
            <text:p>314,029740514793</text:p>
          </table:table-cell>
          <table:table-cell table:style-name="ce1" table:formula="of:=-68 - ([.E170]^2/Ao)" office:value-type="float" office:value="-166.614677927789" calcext:value-type="float">
            <text:p>-166,614677927789</text:p>
          </table:table-cell>
          <table:table-cell table:style-name="ce1" table:formula="of:=[.G169]+h" office:value-type="float" office:value="1.68" calcext:value-type="float">
            <text:p>1,68</text:p>
          </table:table-cell>
          <table:table-cell table:style-name="ce1" table:formula="of:=[.H169]+ h*[.F170]" office:value-type="float" office:value="312.363593735516" calcext:value-type="float">
            <text:p>312,3635937355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0]" office:value-type="float" office:value="1.68" calcext:value-type="float">
            <text:p>1,68</text:p>
          </table:table-cell>
          <table:table-cell table:style-name="ce1" table:formula="of:=[.H170]" office:value-type="float" office:value="312.363593735516" calcext:value-type="float">
            <text:p>312,363593735516</text:p>
          </table:table-cell>
          <table:table-cell table:style-name="ce1" table:formula="of:=-68 - ([.E171]^2/Ao)" office:value-type="float" office:value="-165.571014691366" calcext:value-type="float">
            <text:p>-165,571014691366</text:p>
          </table:table-cell>
          <table:table-cell table:style-name="ce1" table:formula="of:=[.G170]+h" office:value-type="float" office:value="1.69" calcext:value-type="float">
            <text:p>1,69</text:p>
          </table:table-cell>
          <table:table-cell table:style-name="ce1" table:formula="of:=[.H170]+ h*[.F171]" office:value-type="float" office:value="310.707883588602" calcext:value-type="float">
            <text:p>310,7078835886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1]" office:value-type="float" office:value="1.69" calcext:value-type="float">
            <text:p>1,69</text:p>
          </table:table-cell>
          <table:table-cell table:style-name="ce1" table:formula="of:=[.H171]" office:value-type="float" office:value="310.707883588602" calcext:value-type="float">
            <text:p>310,707883588602</text:p>
          </table:table-cell>
          <table:table-cell table:style-name="ce1" table:formula="of:=-68 - ([.E172]^2/Ao)" office:value-type="float" office:value="-164.539388924108" calcext:value-type="float">
            <text:p>-164,539388924108</text:p>
          </table:table-cell>
          <table:table-cell table:style-name="ce1" table:formula="of:=[.G171]+h" office:value-type="float" office:value="1.7" calcext:value-type="float">
            <text:p>1,7</text:p>
          </table:table-cell>
          <table:table-cell table:style-name="ce1" table:formula="of:=[.H171]+ h*[.F172]" office:value-type="float" office:value="309.062489699361" calcext:value-type="float">
            <text:p>309,0624896993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2]" office:value-type="float" office:value="1.7" calcext:value-type="float">
            <text:p>1,7</text:p>
          </table:table-cell>
          <table:table-cell table:style-name="ce1" table:formula="of:=[.H172]" office:value-type="float" office:value="309.062489699361" calcext:value-type="float">
            <text:p>309,062489699361</text:p>
          </table:table-cell>
          <table:table-cell table:style-name="ce1" table:formula="of:=-68 - ([.E173]^2/Ao)" office:value-type="float" office:value="-163.519622539168" calcext:value-type="float">
            <text:p>-163,519622539168</text:p>
          </table:table-cell>
          <table:table-cell table:style-name="ce1" table:formula="of:=[.G172]+h" office:value-type="float" office:value="1.71" calcext:value-type="float">
            <text:p>1,71</text:p>
          </table:table-cell>
          <table:table-cell table:style-name="ce1" table:formula="of:=[.H172]+ h*[.F173]" office:value-type="float" office:value="307.427293473969" calcext:value-type="float">
            <text:p>307,4272934739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3]" office:value-type="float" office:value="1.71" calcext:value-type="float">
            <text:p>1,71</text:p>
          </table:table-cell>
          <table:table-cell table:style-name="ce1" table:formula="of:=[.H173]" office:value-type="float" office:value="307.427293473969" calcext:value-type="float">
            <text:p>307,427293473969</text:p>
          </table:table-cell>
          <table:table-cell table:style-name="ce1" table:formula="of:=-68 - ([.E174]^2/Ao)" office:value-type="float" office:value="-162.51154077273" calcext:value-type="float">
            <text:p>-162,51154077273</text:p>
          </table:table-cell>
          <table:table-cell table:style-name="ce1" table:formula="of:=[.G173]+h" office:value-type="float" office:value="1.72" calcext:value-type="float">
            <text:p>1,72</text:p>
          </table:table-cell>
          <table:table-cell table:style-name="ce1" table:formula="of:=[.H173]+ h*[.F174]" office:value-type="float" office:value="305.802178066242" calcext:value-type="float">
            <text:p>305,8021780662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4]" office:value-type="float" office:value="1.72" calcext:value-type="float">
            <text:p>1,72</text:p>
          </table:table-cell>
          <table:table-cell table:style-name="ce1" table:formula="of:=[.H174]" office:value-type="float" office:value="305.802178066242" calcext:value-type="float">
            <text:p>305,802178066242</text:p>
          </table:table-cell>
          <table:table-cell table:style-name="ce1" table:formula="of:=-68 - ([.E175]^2/Ao)" office:value-type="float" office:value="-161.514972110058" calcext:value-type="float">
            <text:p>-161,514972110058</text:p>
          </table:table-cell>
          <table:table-cell table:style-name="ce1" table:formula="of:=[.G174]+h" office:value-type="float" office:value="1.73" calcext:value-type="float">
            <text:p>1,73</text:p>
          </table:table-cell>
          <table:table-cell table:style-name="ce1" table:formula="of:=[.H174]+ h*[.F175]" office:value-type="float" office:value="304.187028345141" calcext:value-type="float">
            <text:p>304,1870283451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5]" office:value-type="float" office:value="1.73" calcext:value-type="float">
            <text:p>1,73</text:p>
          </table:table-cell>
          <table:table-cell table:style-name="ce1" table:formula="of:=[.H175]" office:value-type="float" office:value="304.187028345141" calcext:value-type="float">
            <text:p>304,187028345141</text:p>
          </table:table-cell>
          <table:table-cell table:style-name="ce1" table:formula="of:=-68 - ([.E176]^2/Ao)" office:value-type="float" office:value="-160.529748213448" calcext:value-type="float">
            <text:p>-160,529748213448</text:p>
          </table:table-cell>
          <table:table-cell table:style-name="ce1" table:formula="of:=[.G175]+h" office:value-type="float" office:value="1.74" calcext:value-type="float">
            <text:p>1,74</text:p>
          </table:table-cell>
          <table:table-cell table:style-name="ce1" table:formula="of:=[.H175]+ h*[.F176]" office:value-type="float" office:value="302.581730863007" calcext:value-type="float">
            <text:p>302,5817308630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6]" office:value-type="float" office:value="1.74" calcext:value-type="float">
            <text:p>1,74</text:p>
          </table:table-cell>
          <table:table-cell table:style-name="ce1" table:formula="of:=[.H176]" office:value-type="float" office:value="302.581730863007" calcext:value-type="float">
            <text:p>302,581730863007</text:p>
          </table:table-cell>
          <table:table-cell table:style-name="ce1" table:formula="of:=-68 - ([.E177]^2/Ao)" office:value-type="float" office:value="-159.555703852053" calcext:value-type="float">
            <text:p>-159,555703852053</text:p>
          </table:table-cell>
          <table:table-cell table:style-name="ce1" table:formula="of:=[.G176]+h" office:value-type="float" office:value="1.75" calcext:value-type="float">
            <text:p>1,75</text:p>
          </table:table-cell>
          <table:table-cell table:style-name="ce1" table:formula="of:=[.H176]+ h*[.F177]" office:value-type="float" office:value="300.986173824486" calcext:value-type="float">
            <text:p>300,9861738244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7]" office:value-type="float" office:value="1.75" calcext:value-type="float">
            <text:p>1,75</text:p>
          </table:table-cell>
          <table:table-cell table:style-name="ce1" table:formula="of:=[.H177]" office:value-type="float" office:value="300.986173824486" calcext:value-type="float">
            <text:p>300,986173824486</text:p>
          </table:table-cell>
          <table:table-cell table:style-name="ce1" table:formula="of:=-68 - ([.E178]^2/Ao)" office:value-type="float" office:value="-158.592676833504" calcext:value-type="float">
            <text:p>-158,592676833504</text:p>
          </table:table-cell>
          <table:table-cell table:style-name="ce1" table:formula="of:=[.G177]+h" office:value-type="float" office:value="1.76" calcext:value-type="float">
            <text:p>1,76</text:p>
          </table:table-cell>
          <table:table-cell table:style-name="ce1" table:formula="of:=[.H177]+ h*[.F178]" office:value-type="float" office:value="299.400247056151" calcext:value-type="float">
            <text:p>299,4002470561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8]" office:value-type="float" office:value="1.76" calcext:value-type="float">
            <text:p>1,76</text:p>
          </table:table-cell>
          <table:table-cell table:style-name="ce1" table:formula="of:=[.H178]" office:value-type="float" office:value="299.400247056151" calcext:value-type="float">
            <text:p>299,400247056151</text:p>
          </table:table-cell>
          <table:table-cell table:style-name="ce1" table:formula="of:=-68 - ([.E179]^2/Ao)" office:value-type="float" office:value="-157.640507937284" calcext:value-type="float">
            <text:p>-157,640507937284</text:p>
          </table:table-cell>
          <table:table-cell table:style-name="ce1" table:formula="of:=[.G178]+h" office:value-type="float" office:value="1.77" calcext:value-type="float">
            <text:p>1,77</text:p>
          </table:table-cell>
          <table:table-cell table:style-name="ce1" table:formula="of:=[.H178]+ h*[.F179]" office:value-type="float" office:value="297.823841976778" calcext:value-type="float">
            <text:p>297,8238419767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9]" office:value-type="float" office:value="1.77" calcext:value-type="float">
            <text:p>1,77</text:p>
          </table:table-cell>
          <table:table-cell table:style-name="ce1" table:formula="of:=[.H179]" office:value-type="float" office:value="297.823841976778" calcext:value-type="float">
            <text:p>297,823841976778</text:p>
          </table:table-cell>
          <table:table-cell table:style-name="ce1" table:formula="of:=-68 - ([.E180]^2/Ao)" office:value-type="float" office:value="-156.699040849809" calcext:value-type="float">
            <text:p>-156,699040849809</text:p>
          </table:table-cell>
          <table:table-cell table:style-name="ce1" table:formula="of:=[.G179]+h" office:value-type="float" office:value="1.78" calcext:value-type="float">
            <text:p>1,78</text:p>
          </table:table-cell>
          <table:table-cell table:style-name="ce1" table:formula="of:=[.H179]+ h*[.F180]" office:value-type="float" office:value="296.25685156828" calcext:value-type="float">
            <text:p>296,256851568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0]" office:value-type="float" office:value="1.78" calcext:value-type="float">
            <text:p>1,78</text:p>
          </table:table-cell>
          <table:table-cell table:style-name="ce1" table:formula="of:=[.H180]" office:value-type="float" office:value="296.25685156828" calcext:value-type="float">
            <text:p>296,25685156828</text:p>
          </table:table-cell>
          <table:table-cell table:style-name="ce1" table:formula="of:=-68 - ([.E181]^2/Ao)" office:value-type="float" office:value="-155.76812210115" calcext:value-type="float">
            <text:p>-155,76812210115</text:p>
          </table:table-cell>
          <table:table-cell table:style-name="ce1" table:formula="of:=[.G180]+h" office:value-type="float" office:value="1.79" calcext:value-type="float">
            <text:p>1,79</text:p>
          </table:table-cell>
          <table:table-cell table:style-name="ce1" table:formula="of:=[.H180]+ h*[.F181]" office:value-type="float" office:value="294.699170347269" calcext:value-type="float">
            <text:p>294,6991703472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1]" office:value-type="float" office:value="1.79" calcext:value-type="float">
            <text:p>1,79</text:p>
          </table:table-cell>
          <table:table-cell table:style-name="ce1" table:formula="of:=[.H181]" office:value-type="float" office:value="294.699170347269" calcext:value-type="float">
            <text:p>294,699170347269</text:p>
          </table:table-cell>
          <table:table-cell table:style-name="ce1" table:formula="of:=-68 - ([.E182]^2/Ao)" office:value-type="float" office:value="-154.847601003369" calcext:value-type="float">
            <text:p>-154,847601003369</text:p>
          </table:table-cell>
          <table:table-cell table:style-name="ce1" table:formula="of:=[.G181]+h" office:value-type="float" office:value="1.8" calcext:value-type="float">
            <text:p>1,8</text:p>
          </table:table-cell>
          <table:table-cell table:style-name="ce1" table:formula="of:=[.H181]+ h*[.F182]" office:value-type="float" office:value="293.150694337235" calcext:value-type="float">
            <text:p>293,1506943372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2]" office:value-type="float" office:value="1.8" calcext:value-type="float">
            <text:p>1,8</text:p>
          </table:table-cell>
          <table:table-cell table:style-name="ce1" table:formula="of:=[.H182]" office:value-type="float" office:value="293.150694337235" calcext:value-type="float">
            <text:p>293,150694337235</text:p>
          </table:table-cell>
          <table:table-cell table:style-name="ce1" table:formula="of:=-68 - ([.E183]^2/Ao)" office:value-type="float" office:value="-153.937329590403" calcext:value-type="float">
            <text:p>-153,937329590403</text:p>
          </table:table-cell>
          <table:table-cell table:style-name="ce1" table:formula="of:=[.G182]+h" office:value-type="float" office:value="1.81" calcext:value-type="float">
            <text:p>1,81</text:p>
          </table:table-cell>
          <table:table-cell table:style-name="ce1" table:formula="of:=[.H182]+ h*[.F183]" office:value-type="float" office:value="291.611321041331" calcext:value-type="float">
            <text:p>291,6113210413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3]" office:value-type="float" office:value="1.81" calcext:value-type="float">
            <text:p>1,81</text:p>
          </table:table-cell>
          <table:table-cell table:style-name="ce1" table:formula="of:=[.H183]" office:value-type="float" office:value="291.611321041331" calcext:value-type="float">
            <text:p>291,611321041331</text:p>
          </table:table-cell>
          <table:table-cell table:style-name="ce1" table:formula="of:=-68 - ([.E184]^2/Ao)" office:value-type="float" office:value="-153.03716255947" calcext:value-type="float">
            <text:p>-153,03716255947</text:p>
          </table:table-cell>
          <table:table-cell table:style-name="ce1" table:formula="of:=[.G183]+h" office:value-type="float" office:value="1.82" calcext:value-type="float">
            <text:p>1,82</text:p>
          </table:table-cell>
          <table:table-cell table:style-name="ce1" table:formula="of:=[.H183]+ h*[.F184]" office:value-type="float" office:value="290.080949415736" calcext:value-type="float">
            <text:p>290,0809494157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4]" office:value-type="float" office:value="1.82" calcext:value-type="float">
            <text:p>1,82</text:p>
          </table:table-cell>
          <table:table-cell table:style-name="ce1" table:formula="of:=[.H184]" office:value-type="float" office:value="290.080949415736" calcext:value-type="float">
            <text:p>290,080949415736</text:p>
          </table:table-cell>
          <table:table-cell table:style-name="ce1" table:formula="of:=-68 - ([.E185]^2/Ao)" office:value-type="float" office:value="-152.146957213935" calcext:value-type="float">
            <text:p>-152,146957213935</text:p>
          </table:table-cell>
          <table:table-cell table:style-name="ce1" table:formula="of:=[.G184]+h" office:value-type="float" office:value="1.83" calcext:value-type="float">
            <text:p>1,83</text:p>
          </table:table-cell>
          <table:table-cell table:style-name="ce1" table:formula="of:=[.H184]+ h*[.F185]" office:value-type="float" office:value="288.559479843597" calcext:value-type="float">
            <text:p>288,5594798435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5]" office:value-type="float" office:value="1.83" calcext:value-type="float">
            <text:p>1,83</text:p>
          </table:table-cell>
          <table:table-cell table:style-name="ce1" table:formula="of:=[.H185]" office:value-type="float" office:value="288.559479843597" calcext:value-type="float">
            <text:p>288,559479843597</text:p>
          </table:table-cell>
          <table:table-cell table:style-name="ce1" table:formula="of:=-68 - ([.E186]^2/Ao)" office:value-type="float" office:value="-151.266573407607" calcext:value-type="float">
            <text:p>-151,266573407607</text:p>
          </table:table-cell>
          <table:table-cell table:style-name="ce1" table:formula="of:=[.G185]+h" office:value-type="float" office:value="1.84" calcext:value-type="float">
            <text:p>1,84</text:p>
          </table:table-cell>
          <table:table-cell table:style-name="ce1" table:formula="of:=[.H185]+ h*[.F186]" office:value-type="float" office:value="287.046814109521" calcext:value-type="float">
            <text:p>287,0468141095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6]" office:value-type="float" office:value="1.84" calcext:value-type="float">
            <text:p>1,84</text:p>
          </table:table-cell>
          <table:table-cell table:style-name="ce1" table:formula="of:=[.H186]" office:value-type="float" office:value="287.046814109521" calcext:value-type="float">
            <text:p>287,046814109521</text:p>
          </table:table-cell>
          <table:table-cell table:style-name="ce1" table:formula="of:=-68 - ([.E187]^2/Ao)" office:value-type="float" office:value="-150.395873490426" calcext:value-type="float">
            <text:p>-150,395873490426</text:p>
          </table:table-cell>
          <table:table-cell table:style-name="ce1" table:formula="of:=[.G186]+h" office:value-type="float" office:value="1.85" calcext:value-type="float">
            <text:p>1,85</text:p>
          </table:table-cell>
          <table:table-cell table:style-name="ce1" table:formula="of:=[.H186]+ h*[.F187]" office:value-type="float" office:value="285.542855374617" calcext:value-type="float">
            <text:p>285,5428553746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7]" office:value-type="float" office:value="1.85" calcext:value-type="float">
            <text:p>1,85</text:p>
          </table:table-cell>
          <table:table-cell table:style-name="ce1" table:formula="of:=[.H187]" office:value-type="float" office:value="285.542855374617" calcext:value-type="float">
            <text:p>285,542855374617</text:p>
          </table:table-cell>
          <table:table-cell table:style-name="ce1" table:formula="of:=-68 - ([.E188]^2/Ao)" office:value-type="float" office:value="-149.534722255489" calcext:value-type="float">
            <text:p>-149,534722255489</text:p>
          </table:table-cell>
          <table:table-cell table:style-name="ce1" table:formula="of:=[.G187]+h" office:value-type="float" office:value="1.86" calcext:value-type="float">
            <text:p>1,86</text:p>
          </table:table-cell>
          <table:table-cell table:style-name="ce1" table:formula="of:=[.H187]+ h*[.F188]" office:value-type="float" office:value="284.047508152062" calcext:value-type="float">
            <text:p>284,0475081520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8]" office:value-type="float" office:value="1.86" calcext:value-type="float">
            <text:p>1,86</text:p>
          </table:table-cell>
          <table:table-cell table:style-name="ce1" table:formula="of:=[.H188]" office:value-type="float" office:value="284.047508152062" calcext:value-type="float">
            <text:p>284,047508152062</text:p>
          </table:table-cell>
          <table:table-cell table:style-name="ce1" table:formula="of:=-68 - ([.E189]^2/Ao)" office:value-type="float" office:value="-148.682986887396" calcext:value-type="float">
            <text:p>-148,682986887396</text:p>
          </table:table-cell>
          <table:table-cell table:style-name="ce1" table:formula="of:=[.G188]+h" office:value-type="float" office:value="1.87" calcext:value-type="float">
            <text:p>1,87</text:p>
          </table:table-cell>
          <table:table-cell table:style-name="ce1" table:formula="of:=[.H188]+ h*[.F189]" office:value-type="float" office:value="282.560678283188" calcext:value-type="float">
            <text:p>282,5606782831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9]" office:value-type="float" office:value="1.87" calcext:value-type="float">
            <text:p>1,87</text:p>
          </table:table-cell>
          <table:table-cell table:style-name="ce1" table:formula="of:=[.H189]" office:value-type="float" office:value="282.560678283188" calcext:value-type="float">
            <text:p>282,560678283188</text:p>
          </table:table-cell>
          <table:table-cell table:style-name="ce1" table:formula="of:=-68 - ([.E190]^2/Ao)" office:value-type="float" office:value="-147.840536911855" calcext:value-type="float">
            <text:p>-147,840536911855</text:p>
          </table:table-cell>
          <table:table-cell table:style-name="ce1" table:formula="of:=[.G189]+h" office:value-type="float" office:value="1.88" calcext:value-type="float">
            <text:p>1,88</text:p>
          </table:table-cell>
          <table:table-cell table:style-name="ce1" table:formula="of:=[.H189]+ h*[.F190]" office:value-type="float" office:value="281.082272914069" calcext:value-type="float">
            <text:p>281,0822729140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0]" office:value-type="float" office:value="1.88" calcext:value-type="float">
            <text:p>1,88</text:p>
          </table:table-cell>
          <table:table-cell table:style-name="ce1" table:formula="of:=[.H190]" office:value-type="float" office:value="281.082272914069" calcext:value-type="float">
            <text:p>281,082272914069</text:p>
          </table:table-cell>
          <table:table-cell table:style-name="ce1" table:formula="of:=-68 - ([.E191]^2/Ao)" office:value-type="float" office:value="-147.007244146539" calcext:value-type="float">
            <text:p>-147,007244146539</text:p>
          </table:table-cell>
          <table:table-cell table:style-name="ce1" table:formula="of:=[.G190]+h" office:value-type="float" office:value="1.89" calcext:value-type="float">
            <text:p>1,89</text:p>
          </table:table-cell>
          <table:table-cell table:style-name="ce1" table:formula="of:=[.H190]+ h*[.F191]" office:value-type="float" office:value="279.612200472604" calcext:value-type="float">
            <text:p>279,6122004726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1]" office:value-type="float" office:value="1.89" calcext:value-type="float">
            <text:p>1,89</text:p>
          </table:table-cell>
          <table:table-cell table:style-name="ce1" table:formula="of:=[.H191]" office:value-type="float" office:value="279.612200472604" calcext:value-type="float">
            <text:p>279,612200472604</text:p>
          </table:table-cell>
          <table:table-cell table:style-name="ce1" table:formula="of:=-68 - ([.E192]^2/Ao)" office:value-type="float" office:value="-146.182982653132" calcext:value-type="float">
            <text:p>-146,182982653132</text:p>
          </table:table-cell>
          <table:table-cell table:style-name="ce1" table:formula="of:=[.G191]+h" office:value-type="float" office:value="1.9" calcext:value-type="float">
            <text:p>1,9</text:p>
          </table:table-cell>
          <table:table-cell table:style-name="ce1" table:formula="of:=[.H191]+ h*[.F192]" office:value-type="float" office:value="278.150370646073" calcext:value-type="float">
            <text:p>278,1503706460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2]" office:value-type="float" office:value="1.9" calcext:value-type="float">
            <text:p>1,9</text:p>
          </table:table-cell>
          <table:table-cell table:style-name="ce1" table:formula="of:=[.H192]" office:value-type="float" office:value="278.150370646073" calcext:value-type="float">
            <text:p>278,150370646073</text:p>
          </table:table-cell>
          <table:table-cell table:style-name="ce1" table:formula="of:=-68 - ([.E193]^2/Ao)" office:value-type="float" office:value="-145.367628690548" calcext:value-type="float">
            <text:p>-145,367628690548</text:p>
          </table:table-cell>
          <table:table-cell table:style-name="ce1" table:formula="of:=[.G192]+h" office:value-type="float" office:value="1.91" calcext:value-type="float">
            <text:p>1,91</text:p>
          </table:table-cell>
          <table:table-cell table:style-name="ce1" table:formula="of:=[.H192]+ h*[.F193]" office:value-type="float" office:value="276.696694359167" calcext:value-type="float">
            <text:p>276,6966943591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3]" office:value-type="float" office:value="1.91" calcext:value-type="float">
            <text:p>1,91</text:p>
          </table:table-cell>
          <table:table-cell table:style-name="ce1" table:formula="of:=[.H193]" office:value-type="float" office:value="276.696694359167" calcext:value-type="float">
            <text:p>276,696694359167</text:p>
          </table:table-cell>
          <table:table-cell table:style-name="ce1" table:formula="of:=-68 - ([.E194]^2/Ao)" office:value-type="float" office:value="-144.56106066929" calcext:value-type="float">
            <text:p>-144,56106066929</text:p>
          </table:table-cell>
          <table:table-cell table:style-name="ce1" table:formula="of:=[.G193]+h" office:value-type="float" office:value="1.92" calcext:value-type="float">
            <text:p>1,92</text:p>
          </table:table-cell>
          <table:table-cell table:style-name="ce1" table:formula="of:=[.H193]+ h*[.F194]" office:value-type="float" office:value="275.251083752474" calcext:value-type="float">
            <text:p>275,2510837524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4]" office:value-type="float" office:value="1.92" calcext:value-type="float">
            <text:p>1,92</text:p>
          </table:table-cell>
          <table:table-cell table:style-name="ce1" table:formula="of:=[.H194]" office:value-type="float" office:value="275.251083752474" calcext:value-type="float">
            <text:p>275,251083752474</text:p>
          </table:table-cell>
          <table:table-cell table:style-name="ce1" table:formula="of:=-68 - ([.E195]^2/Ao)" office:value-type="float" office:value="-143.763159106912" calcext:value-type="float">
            <text:p>-143,763159106912</text:p>
          </table:table-cell>
          <table:table-cell table:style-name="ce1" table:formula="of:=[.G194]+h" office:value-type="float" office:value="1.93" calcext:value-type="float">
            <text:p>1,93</text:p>
          </table:table-cell>
          <table:table-cell table:style-name="ce1" table:formula="of:=[.H194]+ h*[.F195]" office:value-type="float" office:value="273.813452161405" calcext:value-type="float">
            <text:p>273,8134521614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5]" office:value-type="float" office:value="1.93" calcext:value-type="float">
            <text:p>1,93</text:p>
          </table:table-cell>
          <table:table-cell table:style-name="ce1" table:formula="of:=[.H195]" office:value-type="float" office:value="273.813452161405" calcext:value-type="float">
            <text:p>273,813452161405</text:p>
          </table:table-cell>
          <table:table-cell table:style-name="ce1" table:formula="of:=-68 - ([.E196]^2/Ao)" office:value-type="float" office:value="-142.973806584546" calcext:value-type="float">
            <text:p>-142,973806584546</text:p>
          </table:table-cell>
          <table:table-cell table:style-name="ce1" table:formula="of:=[.G195]+h" office:value-type="float" office:value="1.94" calcext:value-type="float">
            <text:p>1,94</text:p>
          </table:table-cell>
          <table:table-cell table:style-name="ce1" table:formula="of:=[.H195]+ h*[.F196]" office:value-type="float" office:value="272.38371409556" calcext:value-type="float">
            <text:p>272,383714095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6]" office:value-type="float" office:value="1.94" calcext:value-type="float">
            <text:p>1,94</text:p>
          </table:table-cell>
          <table:table-cell table:style-name="ce1" table:formula="of:=[.H196]" office:value-type="float" office:value="272.38371409556" calcext:value-type="float">
            <text:p>272,38371409556</text:p>
          </table:table-cell>
          <table:table-cell table:style-name="ce1" table:formula="of:=-68 - ([.E197]^2/Ao)" office:value-type="float" office:value="-142.192887704492" calcext:value-type="float">
            <text:p>-142,192887704492</text:p>
          </table:table-cell>
          <table:table-cell table:style-name="ce1" table:formula="of:=[.G196]+h" office:value-type="float" office:value="1.95" calcext:value-type="float">
            <text:p>1,95</text:p>
          </table:table-cell>
          <table:table-cell table:style-name="ce1" table:formula="of:=[.H196]+ h*[.F197]" office:value-type="float" office:value="270.961785218515" calcext:value-type="float">
            <text:p>270,9617852185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7]" office:value-type="float" office:value="1.95" calcext:value-type="float">
            <text:p>1,95</text:p>
          </table:table-cell>
          <table:table-cell table:style-name="ce1" table:formula="of:=[.H197]" office:value-type="float" office:value="270.961785218515" calcext:value-type="float">
            <text:p>270,961785218515</text:p>
          </table:table-cell>
          <table:table-cell table:style-name="ce1" table:formula="of:=-68 - ([.E198]^2/Ao)" office:value-type="float" office:value="-141.420289048805" calcext:value-type="float">
            <text:p>-141,420289048805</text:p>
          </table:table-cell>
          <table:table-cell table:style-name="ce1" table:formula="of:=[.G197]+h" office:value-type="float" office:value="1.96" calcext:value-type="float">
            <text:p>1,96</text:p>
          </table:table-cell>
          <table:table-cell table:style-name="ce1" table:formula="of:=[.H197]+ h*[.F198]" office:value-type="float" office:value="269.547582328027" calcext:value-type="float">
            <text:p>269,5475823280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8]" office:value-type="float" office:value="1.96" calcext:value-type="float">
            <text:p>1,96</text:p>
          </table:table-cell>
          <table:table-cell table:style-name="ce1" table:formula="of:=[.H198]" office:value-type="float" office:value="269.547582328027" calcext:value-type="float">
            <text:p>269,547582328027</text:p>
          </table:table-cell>
          <table:table-cell table:style-name="ce1" table:formula="of:=-68 - ([.E199]^2/Ao)" office:value-type="float" office:value="-140.655899138884" calcext:value-type="float">
            <text:p>-140,655899138884</text:p>
          </table:table-cell>
          <table:table-cell table:style-name="ce1" table:formula="of:=[.G198]+h" office:value-type="float" office:value="1.97" calcext:value-type="float">
            <text:p>1,97</text:p>
          </table:table-cell>
          <table:table-cell table:style-name="ce1" table:formula="of:=[.H198]+ h*[.F199]" office:value-type="float" office:value="268.141023336638" calcext:value-type="float">
            <text:p>268,1410233366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9]" office:value-type="float" office:value="1.97" calcext:value-type="float">
            <text:p>1,97</text:p>
          </table:table-cell>
          <table:table-cell table:style-name="ce1" table:formula="of:=[.H199]" office:value-type="float" office:value="268.141023336638" calcext:value-type="float">
            <text:p>268,141023336638</text:p>
          </table:table-cell>
          <table:table-cell table:style-name="ce1" table:formula="of:=-68 - ([.E200]^2/Ao)" office:value-type="float" office:value="-139.899608396019" calcext:value-type="float">
            <text:p>-139,899608396019</text:p>
          </table:table-cell>
          <table:table-cell table:style-name="ce1" table:formula="of:=[.G199]+h" office:value-type="float" office:value="1.98" calcext:value-type="float">
            <text:p>1,98</text:p>
          </table:table-cell>
          <table:table-cell table:style-name="ce1" table:formula="of:=[.H199]+ h*[.F200]" office:value-type="float" office:value="266.742027252678" calcext:value-type="float">
            <text:p>266,7420272526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0]" office:value-type="float" office:value="1.98" calcext:value-type="float">
            <text:p>1,98</text:p>
          </table:table-cell>
          <table:table-cell table:style-name="ce1" table:formula="of:=[.H200]" office:value-type="float" office:value="266.742027252678" calcext:value-type="float">
            <text:p>266,742027252678</text:p>
          </table:table-cell>
          <table:table-cell table:style-name="ce1" table:formula="of:=-68 - ([.E201]^2/Ao)" office:value-type="float" office:value="-139.151309102868" calcext:value-type="float">
            <text:p>-139,151309102868</text:p>
          </table:table-cell>
          <table:table-cell table:style-name="ce1" table:formula="of:=[.G200]+h" office:value-type="float" office:value="1.99" calcext:value-type="float">
            <text:p>1,99</text:p>
          </table:table-cell>
          <table:table-cell table:style-name="ce1" table:formula="of:=[.H200]+ h*[.F201]" office:value-type="float" office:value="265.350514161649" calcext:value-type="float">
            <text:p>265,3505141616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1]" office:value-type="float" office:value="1.99" calcext:value-type="float">
            <text:p>1,99</text:p>
          </table:table-cell>
          <table:table-cell table:style-name="ce1" table:formula="of:=[.H201]" office:value-type="float" office:value="265.350514161649" calcext:value-type="float">
            <text:p>265,350514161649</text:p>
          </table:table-cell>
          <table:table-cell table:style-name="ce1" table:formula="of:=-68 - ([.E202]^2/Ao)" office:value-type="float" office:value="-138.410895365852" calcext:value-type="float">
            <text:p>-138,410895365852</text:p>
          </table:table-cell>
          <table:table-cell table:style-name="ce1" table:formula="of:=[.G201]+h" office:value-type="float" office:value="2" calcext:value-type="float">
            <text:p>2</text:p>
          </table:table-cell>
          <table:table-cell table:style-name="ce1" table:formula="of:=[.H201]+ h*[.F202]" office:value-type="float" office:value="263.966405207991" calcext:value-type="float">
            <text:p>263,9664052079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2]" office:value-type="float" office:value="2" calcext:value-type="float">
            <text:p>2</text:p>
          </table:table-cell>
          <table:table-cell table:style-name="ce1" table:formula="of:=[.H202]" office:value-type="float" office:value="263.966405207991" calcext:value-type="float">
            <text:p>263,966405207991</text:p>
          </table:table-cell>
          <table:table-cell table:style-name="ce1" table:formula="of:=-68 - ([.E203]^2/Ao)" office:value-type="float" office:value="-137.678263078429" calcext:value-type="float">
            <text:p>-137,678263078429</text:p>
          </table:table-cell>
          <table:table-cell table:style-name="ce1" table:formula="of:=[.G202]+h" office:value-type="float" office:value="2.01" calcext:value-type="float">
            <text:p>2,01</text:p>
          </table:table-cell>
          <table:table-cell table:style-name="ce1" table:formula="of:=[.H202]+ h*[.F203]" office:value-type="float" office:value="262.589622577206" calcext:value-type="float">
            <text:p>262,5896225772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3]" office:value-type="float" office:value="2.01" calcext:value-type="float">
            <text:p>2,01</text:p>
          </table:table-cell>
          <table:table-cell table:style-name="ce1" table:formula="of:=[.H203]" office:value-type="float" office:value="262.589622577206" calcext:value-type="float">
            <text:p>262,589622577206</text:p>
          </table:table-cell>
          <table:table-cell table:style-name="ce1" table:formula="of:=-68 - ([.E204]^2/Ao)" office:value-type="float" office:value="-136.95330988524" calcext:value-type="float">
            <text:p>-136,95330988524</text:p>
          </table:table-cell>
          <table:table-cell table:style-name="ce1" table:formula="of:=[.G203]+h" office:value-type="float" office:value="2.02" calcext:value-type="float">
            <text:p>2,02</text:p>
          </table:table-cell>
          <table:table-cell table:style-name="ce1" table:formula="of:=[.H203]+ h*[.F204]" office:value-type="float" office:value="261.220089478354" calcext:value-type="float">
            <text:p>261,2200894783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4]" office:value-type="float" office:value="2.02" calcext:value-type="float">
            <text:p>2,02</text:p>
          </table:table-cell>
          <table:table-cell table:style-name="ce1" table:formula="of:=[.H204]" office:value-type="float" office:value="261.220089478354" calcext:value-type="float">
            <text:p>261,220089478354</text:p>
          </table:table-cell>
          <table:table-cell table:style-name="ce1" table:formula="of:=-68 - ([.E205]^2/Ao)" office:value-type="float" office:value="-136.235935147079" calcext:value-type="float">
            <text:p>-136,235935147079</text:p>
          </table:table-cell>
          <table:table-cell table:style-name="ce1" table:formula="of:=[.G204]+h" office:value-type="float" office:value="2.03" calcext:value-type="float">
            <text:p>2,03</text:p>
          </table:table-cell>
          <table:table-cell table:style-name="ce1" table:formula="of:=[.H204]+ h*[.F205]" office:value-type="float" office:value="259.857730126883" calcext:value-type="float">
            <text:p>259,8577301268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5]" office:value-type="float" office:value="2.03" calcext:value-type="float">
            <text:p>2,03</text:p>
          </table:table-cell>
          <table:table-cell table:style-name="ce1" table:formula="of:=[.H205]" office:value-type="float" office:value="259.857730126883" calcext:value-type="float">
            <text:p>259,857730126883</text:p>
          </table:table-cell>
          <table:table-cell table:style-name="ce1" table:formula="of:=-68 - ([.E206]^2/Ao)" office:value-type="float" office:value="-135.526039906696" calcext:value-type="float">
            <text:p>-135,526039906696</text:p>
          </table:table-cell>
          <table:table-cell table:style-name="ce1" table:formula="of:=[.G205]+h" office:value-type="float" office:value="2.04" calcext:value-type="float">
            <text:p>2,04</text:p>
          </table:table-cell>
          <table:table-cell table:style-name="ce1" table:formula="of:=[.H205]+ h*[.F206]" office:value-type="float" office:value="258.502469727816" calcext:value-type="float">
            <text:p>258,5024697278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6]" office:value-type="float" office:value="2.04" calcext:value-type="float">
            <text:p>2,04</text:p>
          </table:table-cell>
          <table:table-cell table:style-name="ce1" table:formula="of:=[.H206]" office:value-type="float" office:value="258.502469727816" calcext:value-type="float">
            <text:p>258,502469727816</text:p>
          </table:table-cell>
          <table:table-cell table:style-name="ce1" table:formula="of:=-68 - ([.E207]^2/Ao)" office:value-type="float" office:value="-134.82352685538" calcext:value-type="float">
            <text:p>-134,82352685538</text:p>
          </table:table-cell>
          <table:table-cell table:style-name="ce1" table:formula="of:=[.G206]+h" office:value-type="float" office:value="2.05" calcext:value-type="float">
            <text:p>2,05</text:p>
          </table:table-cell>
          <table:table-cell table:style-name="ce1" table:formula="of:=[.H206]+ h*[.F207]" office:value-type="float" office:value="257.154234459262" calcext:value-type="float">
            <text:p>257,1542344592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7]" office:value-type="float" office:value="2.05" calcext:value-type="float">
            <text:p>2,05</text:p>
          </table:table-cell>
          <table:table-cell table:style-name="ce1" table:formula="of:=[.H207]" office:value-type="float" office:value="257.154234459262" calcext:value-type="float">
            <text:p>257,154234459262</text:p>
          </table:table-cell>
          <table:table-cell table:style-name="ce1" table:formula="of:=-68 - ([.E208]^2/Ao)" office:value-type="float" office:value="-134.128300300329" calcext:value-type="float">
            <text:p>-134,128300300329</text:p>
          </table:table-cell>
          <table:table-cell table:style-name="ce1" table:formula="of:=[.G207]+h" office:value-type="float" office:value="2.06" calcext:value-type="float">
            <text:p>2,06</text:p>
          </table:table-cell>
          <table:table-cell table:style-name="ce1" table:formula="of:=[.H207]+ h*[.F208]" office:value-type="float" office:value="255.812951456259" calcext:value-type="float">
            <text:p>255,8129514562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8]" office:value-type="float" office:value="2.06" calcext:value-type="float">
            <text:p>2,06</text:p>
          </table:table-cell>
          <table:table-cell table:style-name="ce1" table:formula="of:=[.H208]" office:value-type="float" office:value="255.812951456259" calcext:value-type="float">
            <text:p>255,812951456259</text:p>
          </table:table-cell>
          <table:table-cell table:style-name="ce1" table:formula="of:=-68 - ([.E209]^2/Ao)" office:value-type="float" office:value="-133.440266132762" calcext:value-type="float">
            <text:p>-133,440266132762</text:p>
          </table:table-cell>
          <table:table-cell table:style-name="ce1" table:formula="of:=[.G208]+h" office:value-type="float" office:value="2.07" calcext:value-type="float">
            <text:p>2,07</text:p>
          </table:table-cell>
          <table:table-cell table:style-name="ce1" table:formula="of:=[.H208]+ h*[.F209]" office:value-type="float" office:value="254.478548794931" calcext:value-type="float">
            <text:p>254,4785487949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9]" office:value-type="float" office:value="2.07" calcext:value-type="float">
            <text:p>2,07</text:p>
          </table:table-cell>
          <table:table-cell table:style-name="ce1" table:formula="of:=[.H209]" office:value-type="float" office:value="254.478548794931" calcext:value-type="float">
            <text:p>254,478548794931</text:p>
          </table:table-cell>
          <table:table-cell table:style-name="ce1" table:formula="of:=-68 - ([.E210]^2/Ao)" office:value-type="float" office:value="-132.759331796774" calcext:value-type="float">
            <text:p>-132,759331796774</text:p>
          </table:table-cell>
          <table:table-cell table:style-name="ce1" table:formula="of:=[.G209]+h" office:value-type="float" office:value="2.08" calcext:value-type="float">
            <text:p>2,08</text:p>
          </table:table-cell>
          <table:table-cell table:style-name="ce1" table:formula="of:=[.H209]+ h*[.F210]" office:value-type="float" office:value="253.150955476964" calcext:value-type="float">
            <text:p>253,1509554769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0]" office:value-type="float" office:value="2.08" calcext:value-type="float">
            <text:p>2,08</text:p>
          </table:table-cell>
          <table:table-cell table:style-name="ce1" table:formula="of:=[.H210]" office:value-type="float" office:value="253.150955476964" calcext:value-type="float">
            <text:p>253,150955476964</text:p>
          </table:table-cell>
          <table:table-cell table:style-name="ce1" table:formula="of:=-68 - ([.E211]^2/Ao)" office:value-type="float" office:value="-132.0854062589" calcext:value-type="float">
            <text:p>-132,0854062589</text:p>
          </table:table-cell>
          <table:table-cell table:style-name="ce1" table:formula="of:=[.G210]+h" office:value-type="float" office:value="2.09" calcext:value-type="float">
            <text:p>2,09</text:p>
          </table:table-cell>
          <table:table-cell table:style-name="ce1" table:formula="of:=[.H210]+ h*[.F211]" office:value-type="float" office:value="251.830101414375" calcext:value-type="float">
            <text:p>251,8301014143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1]" office:value-type="float" office:value="2.09" calcext:value-type="float">
            <text:p>2,09</text:p>
          </table:table-cell>
          <table:table-cell table:style-name="ce1" table:formula="of:=[.H211]" office:value-type="float" office:value="251.830101414375" calcext:value-type="float">
            <text:p>251,830101414375</text:p>
          </table:table-cell>
          <table:table-cell table:style-name="ce1" table:formula="of:=-68 - ([.E212]^2/Ao)" office:value-type="float" office:value="-131.418399978374" calcext:value-type="float">
            <text:p>-131,418399978374</text:p>
          </table:table-cell>
          <table:table-cell table:style-name="ce1" table:formula="of:=[.G211]+h" office:value-type="float" office:value="2.1" calcext:value-type="float">
            <text:p>2,1</text:p>
          </table:table-cell>
          <table:table-cell table:style-name="ce1" table:formula="of:=[.H211]+ h*[.F212]" office:value-type="float" office:value="250.515917414591" calcext:value-type="float">
            <text:p>250,5159174145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2]" office:value-type="float" office:value="2.1" calcext:value-type="float">
            <text:p>2,1</text:p>
          </table:table-cell>
          <table:table-cell table:style-name="ce1" table:formula="of:=[.H212]" office:value-type="float" office:value="250.515917414591" calcext:value-type="float">
            <text:p>250,515917414591</text:p>
          </table:table-cell>
          <table:table-cell table:style-name="ce1" table:formula="of:=-68 - ([.E213]^2/Ao)" office:value-type="float" office:value="-130.758224878074" calcext:value-type="float">
            <text:p>-130,758224878074</text:p>
          </table:table-cell>
          <table:table-cell table:style-name="ce1" table:formula="of:=[.G212]+h" office:value-type="float" office:value="2.11" calcext:value-type="float">
            <text:p>2,11</text:p>
          </table:table-cell>
          <table:table-cell table:style-name="ce1" table:formula="of:=[.H212]+ h*[.F213]" office:value-type="float" office:value="249.20833516581" calcext:value-type="float">
            <text:p>249,208335165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3]" office:value-type="float" office:value="2.11" calcext:value-type="float">
            <text:p>2,11</text:p>
          </table:table-cell>
          <table:table-cell table:style-name="ce1" table:formula="of:=[.H213]" office:value-type="float" office:value="249.20833516581" calcext:value-type="float">
            <text:p>249,20833516581</text:p>
          </table:table-cell>
          <table:table-cell table:style-name="ce1" table:formula="of:=-68 - ([.E214]^2/Ao)" office:value-type="float" office:value="-130.104794316115" calcext:value-type="float">
            <text:p>-130,104794316115</text:p>
          </table:table-cell>
          <table:table-cell table:style-name="ce1" table:formula="of:=[.G213]+h" office:value-type="float" office:value="2.12" calcext:value-type="float">
            <text:p>2,12</text:p>
          </table:table-cell>
          <table:table-cell table:style-name="ce1" table:formula="of:=[.H213]+ h*[.F214]" office:value-type="float" office:value="247.907287222649" calcext:value-type="float">
            <text:p>247,9072872226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4]" office:value-type="float" office:value="2.12" calcext:value-type="float">
            <text:p>2,12</text:p>
          </table:table-cell>
          <table:table-cell table:style-name="ce1" table:formula="of:=[.H214]" office:value-type="float" office:value="247.907287222649" calcext:value-type="float">
            <text:p>247,907287222649</text:p>
          </table:table-cell>
          <table:table-cell table:style-name="ce1" table:formula="of:=-68 - ([.E215]^2/Ao)" office:value-type="float" office:value="-129.458023058093" calcext:value-type="float">
            <text:p>-129,458023058093</text:p>
          </table:table-cell>
          <table:table-cell table:style-name="ce1" table:formula="of:=[.G214]+h" office:value-type="float" office:value="2.13" calcext:value-type="float">
            <text:p>2,13</text:p>
          </table:table-cell>
          <table:table-cell table:style-name="ce1" table:formula="of:=[.H214]+ h*[.F215]" office:value-type="float" office:value="246.612706992068" calcext:value-type="float">
            <text:p>246,6127069920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5]" office:value-type="float" office:value="2.13" calcext:value-type="float">
            <text:p>2,13</text:p>
          </table:table-cell>
          <table:table-cell table:style-name="ce1" table:formula="of:=[.H215]" office:value-type="float" office:value="246.612706992068" calcext:value-type="float">
            <text:p>246,612706992068</text:p>
          </table:table-cell>
          <table:table-cell table:style-name="ce1" table:formula="of:=-68 - ([.E216]^2/Ao)" office:value-type="float" office:value="-128.817827249956" calcext:value-type="float">
            <text:p>-128,817827249956</text:p>
          </table:table-cell>
          <table:table-cell table:style-name="ce1" table:formula="of:=[.G215]+h" office:value-type="float" office:value="2.14" calcext:value-type="float">
            <text:p>2,14</text:p>
          </table:table-cell>
          <table:table-cell table:style-name="ce1" table:formula="of:=[.H215]+ h*[.F216]" office:value-type="float" office:value="245.324528719568" calcext:value-type="float">
            <text:p>245,3245287195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6]" office:value-type="float" office:value="2.14" calcext:value-type="float">
            <text:p>2,14</text:p>
          </table:table-cell>
          <table:table-cell table:style-name="ce1" table:formula="of:=[.H216]" office:value-type="float" office:value="245.324528719568" calcext:value-type="float">
            <text:p>245,324528719568</text:p>
          </table:table-cell>
          <table:table-cell table:style-name="ce1" table:formula="of:=-68 - ([.E217]^2/Ao)" office:value-type="float" office:value="-128.184124391478" calcext:value-type="float">
            <text:p>-128,184124391478</text:p>
          </table:table-cell>
          <table:table-cell table:style-name="ce1" table:formula="of:=[.G216]+h" office:value-type="float" office:value="2.15" calcext:value-type="float">
            <text:p>2,15</text:p>
          </table:table-cell>
          <table:table-cell table:style-name="ce1" table:formula="of:=[.H216]+ h*[.F217]" office:value-type="float" office:value="244.042687475654" calcext:value-type="float">
            <text:p>244,0426874756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7]" office:value-type="float" office:value="2.15" calcext:value-type="float">
            <text:p>2,15</text:p>
          </table:table-cell>
          <table:table-cell table:style-name="ce1" table:formula="of:=[.H217]" office:value-type="float" office:value="244.042687475654" calcext:value-type="float">
            <text:p>244,042687475654</text:p>
          </table:table-cell>
          <table:table-cell table:style-name="ce1" table:formula="of:=-68 - ([.E218]^2/Ao)" office:value-type="float" office:value="-127.55683331034" calcext:value-type="float">
            <text:p>-127,55683331034</text:p>
          </table:table-cell>
          <table:table-cell table:style-name="ce1" table:formula="of:=[.G217]+h" office:value-type="float" office:value="2.16" calcext:value-type="float">
            <text:p>2,16</text:p>
          </table:table-cell>
          <table:table-cell table:style-name="ce1" table:formula="of:=[.H217]+ h*[.F218]" office:value-type="float" office:value="242.76711914255" calcext:value-type="float">
            <text:p>242,767119142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8]" office:value-type="float" office:value="2.16" calcext:value-type="float">
            <text:p>2,16</text:p>
          </table:table-cell>
          <table:table-cell table:style-name="ce1" table:formula="of:=[.H218]" office:value-type="float" office:value="242.76711914255" calcext:value-type="float">
            <text:p>242,76711914255</text:p>
          </table:table-cell>
          <table:table-cell table:style-name="ce1" table:formula="of:=-68 - ([.E219]^2/Ao)" office:value-type="float" office:value="-126.935874136773" calcext:value-type="float">
            <text:p>-126,935874136773</text:p>
          </table:table-cell>
          <table:table-cell table:style-name="ce1" table:formula="of:=[.G218]+h" office:value-type="float" office:value="2.17" calcext:value-type="float">
            <text:p>2,17</text:p>
          </table:table-cell>
          <table:table-cell table:style-name="ce1" table:formula="of:=[.H218]+ h*[.F219]" office:value-type="float" office:value="241.497760401183" calcext:value-type="float">
            <text:p>241,4977604011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9]" office:value-type="float" office:value="2.17" calcext:value-type="float">
            <text:p>2,17</text:p>
          </table:table-cell>
          <table:table-cell table:style-name="ce1" table:formula="of:=[.H219]" office:value-type="float" office:value="241.497760401183" calcext:value-type="float">
            <text:p>241,497760401183</text:p>
          </table:table-cell>
          <table:table-cell table:style-name="ce1" table:formula="of:=-68 - ([.E220]^2/Ao)" office:value-type="float" office:value="-126.321168278787" calcext:value-type="float">
            <text:p>-126,321168278787</text:p>
          </table:table-cell>
          <table:table-cell table:style-name="ce1" table:formula="of:=[.G219]+h" office:value-type="float" office:value="2.18" calcext:value-type="float">
            <text:p>2,18</text:p>
          </table:table-cell>
          <table:table-cell table:style-name="ce1" table:formula="of:=[.H219]+ h*[.F220]" office:value-type="float" office:value="240.234548718395" calcext:value-type="float">
            <text:p>240,2345487183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0]" office:value-type="float" office:value="2.18" calcext:value-type="float">
            <text:p>2,18</text:p>
          </table:table-cell>
          <table:table-cell table:style-name="ce1" table:formula="of:=[.H220]" office:value-type="float" office:value="240.234548718395" calcext:value-type="float">
            <text:p>240,234548718395</text:p>
          </table:table-cell>
          <table:table-cell table:style-name="ce1" table:formula="of:=-68 - ([.E221]^2/Ao)" office:value-type="float" office:value="-125.712638397931" calcext:value-type="float">
            <text:p>-125,712638397931</text:p>
          </table:table-cell>
          <table:table-cell table:style-name="ce1" table:formula="of:=[.G220]+h" office:value-type="float" office:value="2.19" calcext:value-type="float">
            <text:p>2,19</text:p>
          </table:table-cell>
          <table:table-cell table:style-name="ce1" table:formula="of:=[.H220]+ h*[.F221]" office:value-type="float" office:value="238.977422334415" calcext:value-type="float">
            <text:p>238,9774223344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1]" office:value-type="float" office:value="2.19" calcext:value-type="float">
            <text:p>2,19</text:p>
          </table:table-cell>
          <table:table-cell table:style-name="ce1" table:formula="of:=[.H221]" office:value-type="float" office:value="238.977422334415" calcext:value-type="float">
            <text:p>238,977422334415</text:p>
          </table:table-cell>
          <table:table-cell table:style-name="ce1" table:formula="of:=-68 - ([.E222]^2/Ao)" office:value-type="float" office:value="-125.110208385602" calcext:value-type="float">
            <text:p>-125,110208385602</text:p>
          </table:table-cell>
          <table:table-cell table:style-name="ce1" table:formula="of:=[.G221]+h" office:value-type="float" office:value="2.2" calcext:value-type="float">
            <text:p>2,2</text:p>
          </table:table-cell>
          <table:table-cell table:style-name="ce1" table:formula="of:=[.H221]+ h*[.F222]" office:value-type="float" office:value="237.726320250559" calcext:value-type="float">
            <text:p>237,7263202505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2]" office:value-type="float" office:value="2.2" calcext:value-type="float">
            <text:p>2,2</text:p>
          </table:table-cell>
          <table:table-cell table:style-name="ce1" table:formula="of:=[.H222]" office:value-type="float" office:value="237.726320250559" calcext:value-type="float">
            <text:p>237,726320250559</text:p>
          </table:table-cell>
          <table:table-cell table:style-name="ce1" table:formula="of:=-68 - ([.E223]^2/Ao)" office:value-type="float" office:value="-124.513803339872" calcext:value-type="float">
            <text:p>-124,513803339872</text:p>
          </table:table-cell>
          <table:table-cell table:style-name="ce1" table:formula="of:=[.G222]+h" office:value-type="float" office:value="2.21" calcext:value-type="float">
            <text:p>2,21</text:p>
          </table:table-cell>
          <table:table-cell table:style-name="ce1" table:formula="of:=[.H222]+ h*[.F223]" office:value-type="float" office:value="236.481182217161" calcext:value-type="float">
            <text:p>236,4811822171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3]" office:value-type="float" office:value="2.21" calcext:value-type="float">
            <text:p>2,21</text:p>
          </table:table-cell>
          <table:table-cell table:style-name="ce1" table:formula="of:=[.H223]" office:value-type="float" office:value="236.481182217161" calcext:value-type="float">
            <text:p>236,481182217161</text:p>
          </table:table-cell>
          <table:table-cell table:style-name="ce1" table:formula="of:=-68 - ([.E224]^2/Ao)" office:value-type="float" office:value="-123.923349542826" calcext:value-type="float">
            <text:p>-123,923349542826</text:p>
          </table:table-cell>
          <table:table-cell table:style-name="ce1" table:formula="of:=[.G223]+h" office:value-type="float" office:value="2.22" calcext:value-type="float">
            <text:p>2,22</text:p>
          </table:table-cell>
          <table:table-cell table:style-name="ce1" table:formula="of:=[.H223]+ h*[.F224]" office:value-type="float" office:value="235.241948721732" calcext:value-type="float">
            <text:p>235,2419487217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4]" office:value-type="float" office:value="2.22" calcext:value-type="float">
            <text:p>2,22</text:p>
          </table:table-cell>
          <table:table-cell table:style-name="ce1" table:formula="of:=[.H224]" office:value-type="float" office:value="235.241948721732" calcext:value-type="float">
            <text:p>235,241948721732</text:p>
          </table:table-cell>
          <table:table-cell table:style-name="ce1" table:formula="of:=-68 - ([.E225]^2/Ao)" office:value-type="float" office:value="-123.338774438398" calcext:value-type="float">
            <text:p>-123,338774438398</text:p>
          </table:table-cell>
          <table:table-cell table:style-name="ce1" table:formula="of:=[.G224]+h" office:value-type="float" office:value="2.23" calcext:value-type="float">
            <text:p>2,23</text:p>
          </table:table-cell>
          <table:table-cell table:style-name="ce1" table:formula="of:=[.H224]+ h*[.F225]" office:value-type="float" office:value="234.008560977348" calcext:value-type="float">
            <text:p>234,0085609773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5]" office:value-type="float" office:value="2.23" calcext:value-type="float">
            <text:p>2,23</text:p>
          </table:table-cell>
          <table:table-cell table:style-name="ce1" table:formula="of:=[.H225]" office:value-type="float" office:value="234.008560977348" calcext:value-type="float">
            <text:p>234,008560977348</text:p>
          </table:table-cell>
          <table:table-cell table:style-name="ce1" table:formula="of:=-68 - ([.E226]^2/Ao)" office:value-type="float" office:value="-122.760006610689" calcext:value-type="float">
            <text:p>-122,760006610689</text:p>
          </table:table-cell>
          <table:table-cell table:style-name="ce1" table:formula="of:=[.G225]+h" office:value-type="float" office:value="2.24" calcext:value-type="float">
            <text:p>2,24</text:p>
          </table:table-cell>
          <table:table-cell table:style-name="ce1" table:formula="of:=[.H225]+ h*[.F226]" office:value-type="float" office:value="232.780960911242" calcext:value-type="float">
            <text:p>232,7809609112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6]" office:value-type="float" office:value="2.24" calcext:value-type="float">
            <text:p>2,24</text:p>
          </table:table-cell>
          <table:table-cell table:style-name="ce1" table:formula="of:=[.H226]" office:value-type="float" office:value="232.780960911242" calcext:value-type="float">
            <text:p>232,780960911242</text:p>
          </table:table-cell>
          <table:table-cell table:style-name="ce1" table:formula="of:=-68 - ([.E227]^2/Ao)" office:value-type="float" office:value="-122.186975762761" calcext:value-type="float">
            <text:p>-122,186975762761</text:p>
          </table:table-cell>
          <table:table-cell table:style-name="ce1" table:formula="of:=[.G226]+h" office:value-type="float" office:value="2.25" calcext:value-type="float">
            <text:p>2,25</text:p>
          </table:table-cell>
          <table:table-cell table:style-name="ce1" table:formula="of:=[.H226]+ h*[.F227]" office:value-type="float" office:value="231.559091153614" calcext:value-type="float">
            <text:p>231,5590911536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7]" office:value-type="float" office:value="2.25" calcext:value-type="float">
            <text:p>2,25</text:p>
          </table:table-cell>
          <table:table-cell table:style-name="ce1" table:formula="of:=[.H227]" office:value-type="float" office:value="231.559091153614" calcext:value-type="float">
            <text:p>231,559091153614</text:p>
          </table:table-cell>
          <table:table-cell table:style-name="ce1" table:formula="of:=-68 - ([.E228]^2/Ao)" office:value-type="float" office:value="-121.619612695888" calcext:value-type="float">
            <text:p>-121,619612695888</text:p>
          </table:table-cell>
          <table:table-cell table:style-name="ce1" table:formula="of:=[.G227]+h" office:value-type="float" office:value="2.26" calcext:value-type="float">
            <text:p>2,26</text:p>
          </table:table-cell>
          <table:table-cell table:style-name="ce1" table:formula="of:=[.H227]+ h*[.F228]" office:value-type="float" office:value="230.342895026655" calcext:value-type="float">
            <text:p>230,3428950266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8]" office:value-type="float" office:value="2.26" calcext:value-type="float">
            <text:p>2,26</text:p>
          </table:table-cell>
          <table:table-cell table:style-name="ce1" table:formula="of:=[.H228]" office:value-type="float" office:value="230.342895026655" calcext:value-type="float">
            <text:p>230,342895026655</text:p>
          </table:table-cell>
          <table:table-cell table:style-name="ce1" table:formula="of:=-68 - ([.E229]^2/Ao)" office:value-type="float" office:value="-121.057849289261" calcext:value-type="float">
            <text:p>-121,057849289261</text:p>
          </table:table-cell>
          <table:table-cell table:style-name="ce1" table:formula="of:=[.G228]+h" office:value-type="float" office:value="2.27" calcext:value-type="float">
            <text:p>2,27</text:p>
          </table:table-cell>
          <table:table-cell table:style-name="ce1" table:formula="of:=[.H228]+ h*[.F229]" office:value-type="float" office:value="229.132316533762" calcext:value-type="float">
            <text:p>229,1323165337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9]" office:value-type="float" office:value="2.27" calcext:value-type="float">
            <text:p>2,27</text:p>
          </table:table-cell>
          <table:table-cell table:style-name="ce1" table:formula="of:=[.H229]" office:value-type="float" office:value="229.132316533762" calcext:value-type="float">
            <text:p>229,132316533762</text:p>
          </table:table-cell>
          <table:table-cell table:style-name="ce1" table:formula="of:=-68 - ([.E230]^2/Ao)" office:value-type="float" office:value="-120.501618480128" calcext:value-type="float">
            <text:p>-120,501618480128</text:p>
          </table:table-cell>
          <table:table-cell table:style-name="ce1" table:formula="of:=[.G229]+h" office:value-type="float" office:value="2.28" calcext:value-type="float">
            <text:p>2,28</text:p>
          </table:table-cell>
          <table:table-cell table:style-name="ce1" table:formula="of:=[.H229]+ h*[.F230]" office:value-type="float" office:value="227.927300348961" calcext:value-type="float">
            <text:p>227,9273003489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0]" office:value-type="float" office:value="2.28" calcext:value-type="float">
            <text:p>2,28</text:p>
          </table:table-cell>
          <table:table-cell table:style-name="ce1" table:formula="of:=[.H230]" office:value-type="float" office:value="227.927300348961" calcext:value-type="float">
            <text:p>227,927300348961</text:p>
          </table:table-cell>
          <table:table-cell table:style-name="ce1" table:formula="of:=-68 - ([.E231]^2/Ao)" office:value-type="float" office:value="-119.950854244366" calcext:value-type="float">
            <text:p>-119,950854244366</text:p>
          </table:table-cell>
          <table:table-cell table:style-name="ce1" table:formula="of:=[.G230]+h" office:value-type="float" office:value="2.29" calcext:value-type="float">
            <text:p>2,29</text:p>
          </table:table-cell>
          <table:table-cell table:style-name="ce1" table:formula="of:=[.H230]+ h*[.F231]" office:value-type="float" office:value="226.727791806517" calcext:value-type="float">
            <text:p>226,7277918065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1]" office:value-type="float" office:value="2.29" calcext:value-type="float">
            <text:p>2,29</text:p>
          </table:table-cell>
          <table:table-cell table:style-name="ce1" table:formula="of:=[.H231]" office:value-type="float" office:value="226.727791806517" calcext:value-type="float">
            <text:p>226,727791806517</text:p>
          </table:table-cell>
          <table:table-cell table:style-name="ce1" table:formula="of:=-68 - ([.E232]^2/Ao)" office:value-type="float" office:value="-119.40549157746" calcext:value-type="float">
            <text:p>-119,40549157746</text:p>
          </table:table-cell>
          <table:table-cell table:style-name="ce1" table:formula="of:=[.G231]+h" office:value-type="float" office:value="2.3" calcext:value-type="float">
            <text:p>2,3</text:p>
          </table:table-cell>
          <table:table-cell table:style-name="ce1" table:formula="of:=[.H231]+ h*[.F232]" office:value-type="float" office:value="225.533736890743" calcext:value-type="float">
            <text:p>225,5337368907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2]" office:value-type="float" office:value="2.3" calcext:value-type="float">
            <text:p>2,3</text:p>
          </table:table-cell>
          <table:table-cell table:style-name="ce1" table:formula="of:=[.H232]" office:value-type="float" office:value="225.533736890743" calcext:value-type="float">
            <text:p>225,533736890743</text:p>
          </table:table-cell>
          <table:table-cell table:style-name="ce1" table:formula="of:=-68 - ([.E233]^2/Ao)" office:value-type="float" office:value="-118.865466475903" calcext:value-type="float">
            <text:p>-118,865466475903</text:p>
          </table:table-cell>
          <table:table-cell table:style-name="ce1" table:formula="of:=[.G232]+h" office:value-type="float" office:value="2.30999999999999" calcext:value-type="float">
            <text:p>2,30999999999999</text:p>
          </table:table-cell>
          <table:table-cell table:style-name="ce1" table:formula="of:=[.H232]+ h*[.F233]" office:value-type="float" office:value="224.345082225984" calcext:value-type="float">
            <text:p>224,3450822259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3]" office:value-type="float" office:value="2.30999999999999" calcext:value-type="float">
            <text:p>2,30999999999999</text:p>
          </table:table-cell>
          <table:table-cell table:style-name="ce1" table:formula="of:=[.H233]" office:value-type="float" office:value="224.345082225984" calcext:value-type="float">
            <text:p>224,345082225984</text:p>
          </table:table-cell>
          <table:table-cell table:style-name="ce1" table:formula="of:=-68 - ([.E234]^2/Ao)" office:value-type="float" office:value="-118.330715918983" calcext:value-type="float">
            <text:p>-118,330715918983</text:p>
          </table:table-cell>
          <table:table-cell table:style-name="ce1" table:formula="of:=[.G233]+h" office:value-type="float" office:value="2.31999999999999" calcext:value-type="float">
            <text:p>2,31999999999999</text:p>
          </table:table-cell>
          <table:table-cell table:style-name="ce1" table:formula="of:=[.H233]+ h*[.F234]" office:value-type="float" office:value="223.161775066794" calcext:value-type="float">
            <text:p>223,1617750667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4]" office:value-type="float" office:value="2.31999999999999" calcext:value-type="float">
            <text:p>2,31999999999999</text:p>
          </table:table-cell>
          <table:table-cell table:style-name="ce1" table:formula="of:=[.H234]" office:value-type="float" office:value="223.161775066794" calcext:value-type="float">
            <text:p>223,161775066794</text:p>
          </table:table-cell>
          <table:table-cell table:style-name="ce1" table:formula="of:=-68 - ([.E235]^2/Ao)" office:value-type="float" office:value="-117.801177850962" calcext:value-type="float">
            <text:p>-117,801177850962</text:p>
          </table:table-cell>
          <table:table-cell table:style-name="ce1" table:formula="of:=[.G234]+h" office:value-type="float" office:value="2.32999999999999" calcext:value-type="float">
            <text:p>2,32999999999999</text:p>
          </table:table-cell>
          <table:table-cell table:style-name="ce1" table:formula="of:=[.H234]+ h*[.F235]" office:value-type="float" office:value="221.983763288284" calcext:value-type="float">
            <text:p>221,9837632882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5]" office:value-type="float" office:value="2.32999999999999" calcext:value-type="float">
            <text:p>2,32999999999999</text:p>
          </table:table-cell>
          <table:table-cell table:style-name="ce1" table:formula="of:=[.H235]" office:value-type="float" office:value="221.983763288284" calcext:value-type="float">
            <text:p>221,983763288284</text:p>
          </table:table-cell>
          <table:table-cell table:style-name="ce1" table:formula="of:=-68 - ([.E236]^2/Ao)" office:value-type="float" office:value="-117.276791163629" calcext:value-type="float">
            <text:p>-117,276791163629</text:p>
          </table:table-cell>
          <table:table-cell table:style-name="ce1" table:formula="of:=[.G235]+h" office:value-type="float" office:value="2.33999999999999" calcext:value-type="float">
            <text:p>2,33999999999999</text:p>
          </table:table-cell>
          <table:table-cell table:style-name="ce1" table:formula="of:=[.H235]+ h*[.F236]" office:value-type="float" office:value="220.810995376648" calcext:value-type="float">
            <text:p>220,8109953766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6]" office:value-type="float" office:value="2.33999999999999" calcext:value-type="float">
            <text:p>2,33999999999999</text:p>
          </table:table-cell>
          <table:table-cell table:style-name="ce1" table:formula="of:=[.H236]" office:value-type="float" office:value="220.810995376648" calcext:value-type="float">
            <text:p>220,810995376648</text:p>
          </table:table-cell>
          <table:table-cell table:style-name="ce1" table:formula="of:=-68 - ([.E237]^2/Ao)" office:value-type="float" office:value="-116.757495679226" calcext:value-type="float">
            <text:p>-116,757495679226</text:p>
          </table:table-cell>
          <table:table-cell table:style-name="ce1" table:formula="of:=[.G236]+h" office:value-type="float" office:value="2.34999999999999" calcext:value-type="float">
            <text:p>2,34999999999999</text:p>
          </table:table-cell>
          <table:table-cell table:style-name="ce1" table:formula="of:=[.H236]+ h*[.F237]" office:value-type="float" office:value="219.643420419856" calcext:value-type="float">
            <text:p>219,6434204198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7]" office:value-type="float" office:value="2.34999999999999" calcext:value-type="float">
            <text:p>2,34999999999999</text:p>
          </table:table-cell>
          <table:table-cell table:style-name="ce1" table:formula="of:=[.H237]" office:value-type="float" office:value="219.643420419856" calcext:value-type="float">
            <text:p>219,643420419856</text:p>
          </table:table-cell>
          <table:table-cell table:style-name="ce1" table:formula="of:=-68 - ([.E238]^2/Ao)" office:value-type="float" office:value="-116.243232133734" calcext:value-type="float">
            <text:p>-116,243232133734</text:p>
          </table:table-cell>
          <table:table-cell table:style-name="ce1" table:formula="of:=[.G237]+h" office:value-type="float" office:value="2.35999999999999" calcext:value-type="float">
            <text:p>2,35999999999999</text:p>
          </table:table-cell>
          <table:table-cell table:style-name="ce1" table:formula="of:=[.H237]+ h*[.F238]" office:value-type="float" office:value="218.480988098518" calcext:value-type="float">
            <text:p>218,4809880985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8]" office:value-type="float" office:value="2.35999999999999" calcext:value-type="float">
            <text:p>2,35999999999999</text:p>
          </table:table-cell>
          <table:table-cell table:style-name="ce1" table:formula="of:=[.H238]" office:value-type="float" office:value="218.480988098518" calcext:value-type="float">
            <text:p>218,480988098518</text:p>
          </table:table-cell>
          <table:table-cell table:style-name="ce1" table:formula="of:=-68 - ([.E239]^2/Ao)" office:value-type="float" office:value="-115.733942160505" calcext:value-type="float">
            <text:p>-115,733942160505</text:p>
          </table:table-cell>
          <table:table-cell table:style-name="ce1" table:formula="of:=[.G238]+h" office:value-type="float" office:value="2.36999999999999" calcext:value-type="float">
            <text:p>2,36999999999999</text:p>
          </table:table-cell>
          <table:table-cell table:style-name="ce1" table:formula="of:=[.H238]+ h*[.F239]" office:value-type="float" office:value="217.323648676913" calcext:value-type="float">
            <text:p>217,3236486769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9]" office:value-type="float" office:value="2.36999999999999" calcext:value-type="float">
            <text:p>2,36999999999999</text:p>
          </table:table-cell>
          <table:table-cell table:style-name="ce1" table:formula="of:=[.H239]" office:value-type="float" office:value="217.323648676913" calcext:value-type="float">
            <text:p>217,323648676913</text:p>
          </table:table-cell>
          <table:table-cell table:style-name="ce1" table:formula="of:=-68 - ([.E240]^2/Ao)" office:value-type="float" office:value="-115.229568274246" calcext:value-type="float">
            <text:p>-115,229568274246</text:p>
          </table:table-cell>
          <table:table-cell table:style-name="ce1" table:formula="of:=[.G239]+h" office:value-type="float" office:value="2.37999999999999" calcext:value-type="float">
            <text:p>2,37999999999999</text:p>
          </table:table-cell>
          <table:table-cell table:style-name="ce1" table:formula="of:=[.H239]+ h*[.F240]" office:value-type="float" office:value="216.171352994171" calcext:value-type="float">
            <text:p>216,1713529941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0]" office:value-type="float" office:value="2.37999999999999" calcext:value-type="float">
            <text:p>2,37999999999999</text:p>
          </table:table-cell>
          <table:table-cell table:style-name="ce1" table:formula="of:=[.H240]" office:value-type="float" office:value="216.171352994171" calcext:value-type="float">
            <text:p>216,171352994171</text:p>
          </table:table-cell>
          <table:table-cell table:style-name="ce1" table:formula="of:=-68 - ([.E241]^2/Ao)" office:value-type="float" office:value="-114.73005385533" calcext:value-type="float">
            <text:p>-114,73005385533</text:p>
          </table:table-cell>
          <table:table-cell table:style-name="ce1" table:formula="of:=[.G240]+h" office:value-type="float" office:value="2.38999999999999" calcext:value-type="float">
            <text:p>2,38999999999999</text:p>
          </table:table-cell>
          <table:table-cell table:style-name="ce1" table:formula="of:=[.H240]+ h*[.F241]" office:value-type="float" office:value="215.024052455618" calcext:value-type="float">
            <text:p>215,0240524556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1]" office:value-type="float" office:value="2.38999999999999" calcext:value-type="float">
            <text:p>2,38999999999999</text:p>
          </table:table-cell>
          <table:table-cell table:style-name="ce1" table:formula="of:=[.H241]" office:value-type="float" office:value="215.024052455618" calcext:value-type="float">
            <text:p>215,024052455618</text:p>
          </table:table-cell>
          <table:table-cell table:style-name="ce1" table:formula="of:=-68 - ([.E242]^2/Ao)" office:value-type="float" office:value="-114.235343134436" calcext:value-type="float">
            <text:p>-114,235343134436</text:p>
          </table:table-cell>
          <table:table-cell table:style-name="ce1" table:formula="of:=[.G241]+h" office:value-type="float" office:value="2.39999999999999" calcext:value-type="float">
            <text:p>2,39999999999999</text:p>
          </table:table-cell>
          <table:table-cell table:style-name="ce1" table:formula="of:=[.H241]+ h*[.F242]" office:value-type="float" office:value="213.881699024273" calcext:value-type="float">
            <text:p>213,8816990242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2]" office:value-type="float" office:value="2.39999999999999" calcext:value-type="float">
            <text:p>2,39999999999999</text:p>
          </table:table-cell>
          <table:table-cell table:style-name="ce1" table:formula="of:=[.H242]" office:value-type="float" office:value="213.881699024273" calcext:value-type="float">
            <text:p>213,881699024273</text:p>
          </table:table-cell>
          <table:table-cell table:style-name="ce1" table:formula="of:=-68 - ([.E243]^2/Ao)" office:value-type="float" office:value="-113.74538117751" calcext:value-type="float">
            <text:p>-113,74538117751</text:p>
          </table:table-cell>
          <table:table-cell table:style-name="ce1" table:formula="of:=[.G242]+h" office:value-type="float" office:value="2.40999999999999" calcext:value-type="float">
            <text:p>2,40999999999999</text:p>
          </table:table-cell>
          <table:table-cell table:style-name="ce1" table:formula="of:=[.H242]+ h*[.F243]" office:value-type="float" office:value="212.744245212498" calcext:value-type="float">
            <text:p>212,7442452124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3]" office:value-type="float" office:value="2.40999999999999" calcext:value-type="float">
            <text:p>2,40999999999999</text:p>
          </table:table-cell>
          <table:table-cell table:style-name="ce1" table:formula="of:=[.H243]" office:value-type="float" office:value="212.744245212498" calcext:value-type="float">
            <text:p>212,744245212498</text:p>
          </table:table-cell>
          <table:table-cell table:style-name="ce1" table:formula="of:=-68 - ([.E244]^2/Ao)" office:value-type="float" office:value="-113.260113871036" calcext:value-type="float">
            <text:p>-113,260113871036</text:p>
          </table:table-cell>
          <table:table-cell table:style-name="ce1" table:formula="of:=[.G243]+h" office:value-type="float" office:value="2.41999999999999" calcext:value-type="float">
            <text:p>2,41999999999999</text:p>
          </table:table-cell>
          <table:table-cell table:style-name="ce1" table:formula="of:=[.H243]+ h*[.F244]" office:value-type="float" office:value="211.611644073788" calcext:value-type="float">
            <text:p>211,6116440737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4]" office:value-type="float" office:value="2.41999999999999" calcext:value-type="float">
            <text:p>2,41999999999999</text:p>
          </table:table-cell>
          <table:table-cell table:style-name="ce1" table:formula="of:=[.H244]" office:value-type="float" office:value="211.611644073788" calcext:value-type="float">
            <text:p>211,611644073788</text:p>
          </table:table-cell>
          <table:table-cell table:style-name="ce1" table:formula="of:=-68 - ([.E245]^2/Ao)" office:value-type="float" office:value="-112.779487907611" calcext:value-type="float">
            <text:p>-112,779487907611</text:p>
          </table:table-cell>
          <table:table-cell table:style-name="ce1" table:formula="of:=[.G244]+h" office:value-type="float" office:value="2.42999999999999" calcext:value-type="float">
            <text:p>2,42999999999999</text:p>
          </table:table-cell>
          <table:table-cell table:style-name="ce1" table:formula="of:=[.H244]+ h*[.F245]" office:value-type="float" office:value="210.483849194712" calcext:value-type="float">
            <text:p>210,4838491947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5]" office:value-type="float" office:value="2.42999999999999" calcext:value-type="float">
            <text:p>2,42999999999999</text:p>
          </table:table-cell>
          <table:table-cell table:style-name="ce1" table:formula="of:=[.H245]" office:value-type="float" office:value="210.483849194712" calcext:value-type="float">
            <text:p>210,483849194712</text:p>
          </table:table-cell>
          <table:table-cell table:style-name="ce1" table:formula="of:=-68 - ([.E246]^2/Ao)" office:value-type="float" office:value="-112.303450771822" calcext:value-type="float">
            <text:p>-112,303450771822</text:p>
          </table:table-cell>
          <table:table-cell table:style-name="ce1" table:formula="of:=[.G245]+h" office:value-type="float" office:value="2.43999999999999" calcext:value-type="float">
            <text:p>2,43999999999999</text:p>
          </table:table-cell>
          <table:table-cell table:style-name="ce1" table:formula="of:=[.H245]+ h*[.F246]" office:value-type="float" office:value="209.360814686994" calcext:value-type="float">
            <text:p>209,3608146869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6]" office:value-type="float" office:value="2.43999999999999" calcext:value-type="float">
            <text:p>2,43999999999999</text:p>
          </table:table-cell>
          <table:table-cell table:style-name="ce1" table:formula="of:=[.H246]" office:value-type="float" office:value="209.360814686994" calcext:value-type="float">
            <text:p>209,360814686994</text:p>
          </table:table-cell>
          <table:table-cell table:style-name="ce1" table:formula="of:=-68 - ([.E247]^2/Ao)" office:value-type="float" office:value="-111.831950726402" calcext:value-type="float">
            <text:p>-111,831950726402</text:p>
          </table:table-cell>
          <table:table-cell table:style-name="ce1" table:formula="of:=[.G246]+h" office:value-type="float" office:value="2.44999999999999" calcext:value-type="float">
            <text:p>2,44999999999999</text:p>
          </table:table-cell>
          <table:table-cell table:style-name="ce1" table:formula="of:=[.H246]+ h*[.F247]" office:value-type="float" office:value="208.24249517973" calcext:value-type="float">
            <text:p>208,242495179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7]" office:value-type="float" office:value="2.44999999999999" calcext:value-type="float">
            <text:p>2,44999999999999</text:p>
          </table:table-cell>
          <table:table-cell table:style-name="ce1" table:formula="of:=[.H247]" office:value-type="float" office:value="208.24249517973" calcext:value-type="float">
            <text:p>208,24249517973</text:p>
          </table:table-cell>
          <table:table-cell table:style-name="ce1" table:formula="of:=-68 - ([.E248]^2/Ao)" office:value-type="float" office:value="-111.36493679868" calcext:value-type="float">
            <text:p>-111,36493679868</text:p>
          </table:table-cell>
          <table:table-cell table:style-name="ce1" table:formula="of:=[.G247]+h" office:value-type="float" office:value="2.45999999999999" calcext:value-type="float">
            <text:p>2,45999999999999</text:p>
          </table:table-cell>
          <table:table-cell table:style-name="ce1" table:formula="of:=[.H247]+ h*[.F248]" office:value-type="float" office:value="207.128845811743" calcext:value-type="float">
            <text:p>207,1288458117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8]" office:value-type="float" office:value="2.45999999999999" calcext:value-type="float">
            <text:p>2,45999999999999</text:p>
          </table:table-cell>
          <table:table-cell table:style-name="ce1" table:formula="of:=[.H248]" office:value-type="float" office:value="207.128845811743" calcext:value-type="float">
            <text:p>207,128845811743</text:p>
          </table:table-cell>
          <table:table-cell table:style-name="ce1" table:formula="of:=-68 - ([.E249]^2/Ao)" office:value-type="float" office:value="-110.902358767305" calcext:value-type="float">
            <text:p>-110,902358767305</text:p>
          </table:table-cell>
          <table:table-cell table:style-name="ce1" table:formula="of:=[.G248]+h" office:value-type="float" office:value="2.46999999999999" calcext:value-type="float">
            <text:p>2,46999999999999</text:p>
          </table:table-cell>
          <table:table-cell table:style-name="ce1" table:formula="of:=[.H248]+ h*[.F249]" office:value-type="float" office:value="206.01982222407" calcext:value-type="float">
            <text:p>206,019822224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9]" office:value-type="float" office:value="2.46999999999999" calcext:value-type="float">
            <text:p>2,46999999999999</text:p>
          </table:table-cell>
          <table:table-cell table:style-name="ce1" table:formula="of:=[.H249]" office:value-type="float" office:value="206.01982222407" calcext:value-type="float">
            <text:p>206,01982222407</text:p>
          </table:table-cell>
          <table:table-cell table:style-name="ce1" table:formula="of:=-68 - ([.E250]^2/Ao)" office:value-type="float" office:value="-110.444167149237" calcext:value-type="float">
            <text:p>-110,444167149237</text:p>
          </table:table-cell>
          <table:table-cell table:style-name="ce1" table:formula="of:=[.G249]+h" office:value-type="float" office:value="2.47999999999999" calcext:value-type="float">
            <text:p>2,47999999999999</text:p>
          </table:table-cell>
          <table:table-cell table:style-name="ce1" table:formula="of:=[.H249]+ h*[.F250]" office:value-type="float" office:value="204.915380552577" calcext:value-type="float">
            <text:p>204,9153805525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0]" office:value-type="float" office:value="2.47999999999999" calcext:value-type="float">
            <text:p>2,47999999999999</text:p>
          </table:table-cell>
          <table:table-cell table:style-name="ce1" table:formula="of:=[.H250]" office:value-type="float" office:value="204.915380552577" calcext:value-type="float">
            <text:p>204,915380552577</text:p>
          </table:table-cell>
          <table:table-cell table:style-name="ce1" table:formula="of:=-68 - ([.E251]^2/Ao)" office:value-type="float" office:value="-109.990313187008" calcext:value-type="float">
            <text:p>-109,990313187008</text:p>
          </table:table-cell>
          <table:table-cell table:style-name="ce1" table:formula="of:=[.G250]+h" office:value-type="float" office:value="2.48999999999999" calcext:value-type="float">
            <text:p>2,48999999999999</text:p>
          </table:table-cell>
          <table:table-cell table:style-name="ce1" table:formula="of:=[.H250]+ h*[.F251]" office:value-type="float" office:value="203.815477420707" calcext:value-type="float">
            <text:p>203,8154774207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1]" office:value-type="float" office:value="2.48999999999999" calcext:value-type="float">
            <text:p>2,48999999999999</text:p>
          </table:table-cell>
          <table:table-cell table:style-name="ce1" table:formula="of:=[.H251]" office:value-type="float" office:value="203.815477420707" calcext:value-type="float">
            <text:p>203,815477420707</text:p>
          </table:table-cell>
          <table:table-cell table:style-name="ce1" table:formula="of:=-68 - ([.E252]^2/Ao)" office:value-type="float" office:value="-109.540748836231" calcext:value-type="float">
            <text:p>-109,540748836231</text:p>
          </table:table-cell>
          <table:table-cell table:style-name="ce1" table:formula="of:=[.G251]+h" office:value-type="float" office:value="2.49999999999999" calcext:value-type="float">
            <text:p>2,49999999999999</text:p>
          </table:table-cell>
          <table:table-cell table:style-name="ce1" table:formula="of:=[.H251]+ h*[.F252]" office:value-type="float" office:value="202.720069932345" calcext:value-type="float">
            <text:p>202,7200699323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2]" office:value-type="float" office:value="2.49999999999999" calcext:value-type="float">
            <text:p>2,49999999999999</text:p>
          </table:table-cell>
          <table:table-cell table:style-name="ce1" table:formula="of:=[.H252]" office:value-type="float" office:value="202.720069932345" calcext:value-type="float">
            <text:p>202,720069932345</text:p>
          </table:table-cell>
          <table:table-cell table:style-name="ce1" table:formula="of:=-68 - ([.E253]^2/Ao)" office:value-type="float" office:value="-109.095426753375" calcext:value-type="float">
            <text:p>-109,095426753375</text:p>
          </table:table-cell>
          <table:table-cell table:style-name="ce1" table:formula="of:=[.G252]+h" office:value-type="float" office:value="2.50999999999999" calcext:value-type="float">
            <text:p>2,50999999999999</text:p>
          </table:table-cell>
          <table:table-cell table:style-name="ce1" table:formula="of:=[.H252]+ h*[.F253]" office:value-type="float" office:value="201.629115664811" calcext:value-type="float">
            <text:p>201,6291156648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3]" office:value-type="float" office:value="2.50999999999999" calcext:value-type="float">
            <text:p>2,50999999999999</text:p>
          </table:table-cell>
          <table:table-cell table:style-name="ce1" table:formula="of:=[.H253]" office:value-type="float" office:value="201.629115664811" calcext:value-type="float">
            <text:p>201,629115664811</text:p>
          </table:table-cell>
          <table:table-cell table:style-name="ce1" table:formula="of:=-68 - ([.E254]^2/Ao)" office:value-type="float" office:value="-108.654300283774" calcext:value-type="float">
            <text:p>-108,654300283774</text:p>
          </table:table-cell>
          <table:table-cell table:style-name="ce1" table:formula="of:=[.G253]+h" office:value-type="float" office:value="2.51999999999999" calcext:value-type="float">
            <text:p>2,51999999999999</text:p>
          </table:table-cell>
          <table:table-cell table:style-name="ce1" table:formula="of:=[.H253]+ h*[.F254]" office:value-type="float" office:value="200.542572661973" calcext:value-type="float">
            <text:p>200,5425726619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4]" office:value-type="float" office:value="2.51999999999999" calcext:value-type="float">
            <text:p>2,51999999999999</text:p>
          </table:table-cell>
          <table:table-cell table:style-name="ce1" table:formula="of:=[.H254]" office:value-type="float" office:value="200.542572661973" calcext:value-type="float">
            <text:p>200,542572661973</text:p>
          </table:table-cell>
          <table:table-cell table:style-name="ce1" table:formula="of:=-68 - ([.E255]^2/Ao)" office:value-type="float" office:value="-108.217323449883" calcext:value-type="float">
            <text:p>-108,217323449883</text:p>
          </table:table-cell>
          <table:table-cell table:style-name="ce1" table:formula="of:=[.G254]+h" office:value-type="float" office:value="2.52999999999999" calcext:value-type="float">
            <text:p>2,52999999999999</text:p>
          </table:table-cell>
          <table:table-cell table:style-name="ce1" table:formula="of:=[.H254]+ h*[.F255]" office:value-type="float" office:value="199.460399427475" calcext:value-type="float">
            <text:p>199,4603994274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5]" office:value-type="float" office:value="2.52999999999999" calcext:value-type="float">
            <text:p>2,52999999999999</text:p>
          </table:table-cell>
          <table:table-cell table:style-name="ce1" table:formula="of:=[.H255]" office:value-type="float" office:value="199.460399427475" calcext:value-type="float">
            <text:p>199,460399427475</text:p>
          </table:table-cell>
          <table:table-cell table:style-name="ce1" table:formula="of:=-68 - ([.E256]^2/Ao)" office:value-type="float" office:value="-107.784450939768" calcext:value-type="float">
            <text:p>-107,784450939768</text:p>
          </table:table-cell>
          <table:table-cell table:style-name="ce1" table:formula="of:=[.G255]+h" office:value-type="float" office:value="2.53999999999999" calcext:value-type="float">
            <text:p>2,53999999999999</text:p>
          </table:table-cell>
          <table:table-cell table:style-name="ce1" table:formula="of:=[.H255]+ h*[.F256]" office:value-type="float" office:value="198.382554918077" calcext:value-type="float">
            <text:p>198,3825549180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6]" office:value-type="float" office:value="2.53999999999999" calcext:value-type="float">
            <text:p>2,53999999999999</text:p>
          </table:table-cell>
          <table:table-cell table:style-name="ce1" table:formula="of:=[.H256]" office:value-type="float" office:value="198.382554918077" calcext:value-type="float">
            <text:p>198,382554918077</text:p>
          </table:table-cell>
          <table:table-cell table:style-name="ce1" table:formula="of:=-68 - ([.E257]^2/Ao)" office:value-type="float" office:value="-107.355638095824" calcext:value-type="float">
            <text:p>-107,355638095824</text:p>
          </table:table-cell>
          <table:table-cell table:style-name="ce1" table:formula="of:=[.G256]+h" office:value-type="float" office:value="2.54999999999999" calcext:value-type="float">
            <text:p>2,54999999999999</text:p>
          </table:table-cell>
          <table:table-cell table:style-name="ce1" table:formula="of:=[.H256]+ h*[.F257]" office:value-type="float" office:value="197.308998537119" calcext:value-type="float">
            <text:p>197,3089985371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7]" office:value-type="float" office:value="2.54999999999999" calcext:value-type="float">
            <text:p>2,54999999999999</text:p>
          </table:table-cell>
          <table:table-cell table:style-name="ce1" table:formula="of:=[.H257]" office:value-type="float" office:value="197.308998537119" calcext:value-type="float">
            <text:p>197,308998537119</text:p>
          </table:table-cell>
          <table:table-cell table:style-name="ce1" table:formula="of:=-68 - ([.E258]^2/Ao)" office:value-type="float" office:value="-106.930840903721" calcext:value-type="float">
            <text:p>-106,930840903721</text:p>
          </table:table-cell>
          <table:table-cell table:style-name="ce1" table:formula="of:=[.G257]+h" office:value-type="float" office:value="2.55999999999999" calcext:value-type="float">
            <text:p>2,55999999999999</text:p>
          </table:table-cell>
          <table:table-cell table:style-name="ce1" table:formula="of:=[.H257]+ h*[.F258]" office:value-type="float" office:value="196.239690128081" calcext:value-type="float">
            <text:p>196,2396901280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8]" office:value-type="float" office:value="2.55999999999999" calcext:value-type="float">
            <text:p>2,55999999999999</text:p>
          </table:table-cell>
          <table:table-cell table:style-name="ce1" table:formula="of:=[.H258]" office:value-type="float" office:value="196.239690128081" calcext:value-type="float">
            <text:p>196,239690128081</text:p>
          </table:table-cell>
          <table:table-cell table:style-name="ce1" table:formula="of:=-68 - ([.E259]^2/Ao)" office:value-type="float" office:value="-106.510015981565" calcext:value-type="float">
            <text:p>-106,510015981565</text:p>
          </table:table-cell>
          <table:table-cell table:style-name="ce1" table:formula="of:=[.G258]+h" office:value-type="float" office:value="2.56999999999999" calcext:value-type="float">
            <text:p>2,56999999999999</text:p>
          </table:table-cell>
          <table:table-cell table:style-name="ce1" table:formula="of:=[.H258]+ h*[.F259]" office:value-type="float" office:value="195.174589968266" calcext:value-type="float">
            <text:p>195,1745899682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9]" office:value-type="float" office:value="2.56999999999999" calcext:value-type="float">
            <text:p>2,56999999999999</text:p>
          </table:table-cell>
          <table:table-cell table:style-name="ce1" table:formula="of:=[.H259]" office:value-type="float" office:value="195.174589968266" calcext:value-type="float">
            <text:p>195,174589968266</text:p>
          </table:table-cell>
          <table:table-cell table:style-name="ce1" table:formula="of:=-68 - ([.E260]^2/Ao)" office:value-type="float" office:value="-106.093120569281" calcext:value-type="float">
            <text:p>-106,093120569281</text:p>
          </table:table-cell>
          <table:table-cell table:style-name="ce1" table:formula="of:=[.G259]+h" office:value-type="float" office:value="2.57999999999999" calcext:value-type="float">
            <text:p>2,57999999999999</text:p>
          </table:table-cell>
          <table:table-cell table:style-name="ce1" table:formula="of:=[.H259]+ h*[.F260]" office:value-type="float" office:value="194.113658762573" calcext:value-type="float">
            <text:p>194,1136587625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0]" office:value-type="float" office:value="2.57999999999999" calcext:value-type="float">
            <text:p>2,57999999999999</text:p>
          </table:table-cell>
          <table:table-cell table:style-name="ce1" table:formula="of:=[.H260]" office:value-type="float" office:value="194.113658762573" calcext:value-type="float">
            <text:p>194,113658762573</text:p>
          </table:table-cell>
          <table:table-cell table:style-name="ce1" table:formula="of:=-68 - ([.E261]^2/Ao)" office:value-type="float" office:value="-105.680112518193" calcext:value-type="float">
            <text:p>-105,680112518193</text:p>
          </table:table-cell>
          <table:table-cell table:style-name="ce1" table:formula="of:=[.G260]+h" office:value-type="float" office:value="2.58999999999999" calcext:value-type="float">
            <text:p>2,58999999999999</text:p>
          </table:table-cell>
          <table:table-cell table:style-name="ce1" table:formula="of:=[.H260]+ h*[.F261]" office:value-type="float" office:value="193.056857637391" calcext:value-type="float">
            <text:p>193,0568576373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1]" office:value-type="float" office:value="2.58999999999999" calcext:value-type="float">
            <text:p>2,58999999999999</text:p>
          </table:table-cell>
          <table:table-cell table:style-name="ce1" table:formula="of:=[.H261]" office:value-type="float" office:value="193.056857637391" calcext:value-type="float">
            <text:p>193,056857637391</text:p>
          </table:table-cell>
          <table:table-cell table:style-name="ce1" table:formula="of:=-68 - ([.E262]^2/Ao)" office:value-type="float" office:value="-105.270950280824" calcext:value-type="float">
            <text:p>-105,270950280824</text:p>
          </table:table-cell>
          <table:table-cell table:style-name="ce1" table:formula="of:=[.G261]+h" office:value-type="float" office:value="2.59999999999999" calcext:value-type="float">
            <text:p>2,59999999999999</text:p>
          </table:table-cell>
          <table:table-cell table:style-name="ce1" table:formula="of:=[.H261]+ h*[.F262]" office:value-type="float" office:value="192.004148134583" calcext:value-type="float">
            <text:p>192,0041481345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2]" office:value-type="float" office:value="2.59999999999999" calcext:value-type="float">
            <text:p>2,59999999999999</text:p>
          </table:table-cell>
          <table:table-cell table:style-name="ce1" table:formula="of:=[.H262]" office:value-type="float" office:value="192.004148134583" calcext:value-type="float">
            <text:p>192,004148134583</text:p>
          </table:table-cell>
          <table:table-cell table:style-name="ce1" table:formula="of:=-68 - ([.E263]^2/Ao)" office:value-type="float" office:value="-104.865592900887" calcext:value-type="float">
            <text:p>-104,865592900887</text:p>
          </table:table-cell>
          <table:table-cell table:style-name="ce1" table:formula="of:=[.G262]+h" office:value-type="float" office:value="2.60999999999999" calcext:value-type="float">
            <text:p>2,60999999999999</text:p>
          </table:table-cell>
          <table:table-cell table:style-name="ce1" table:formula="of:=[.H262]+ h*[.F263]" office:value-type="float" office:value="190.955492205574" calcext:value-type="float">
            <text:p>190,9554922055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3]" office:value-type="float" office:value="2.60999999999999" calcext:value-type="float">
            <text:p>2,60999999999999</text:p>
          </table:table-cell>
          <table:table-cell table:style-name="ce1" table:formula="of:=[.H263]" office:value-type="float" office:value="190.955492205574" calcext:value-type="float">
            <text:p>190,955492205574</text:p>
          </table:table-cell>
          <table:table-cell table:style-name="ce1" table:formula="of:=-68 - ([.E264]^2/Ao)" office:value-type="float" office:value="-104.464000003473" calcext:value-type="float">
            <text:p>-104,464000003473</text:p>
          </table:table-cell>
          <table:table-cell table:style-name="ce1" table:formula="of:=[.G263]+h" office:value-type="float" office:value="2.61999999999999" calcext:value-type="float">
            <text:p>2,61999999999999</text:p>
          </table:table-cell>
          <table:table-cell table:style-name="ce1" table:formula="of:=[.H263]+ h*[.F264]" office:value-type="float" office:value="189.910852205539" calcext:value-type="float">
            <text:p>189,9108522055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4]" office:value-type="float" office:value="2.61999999999999" calcext:value-type="float">
            <text:p>2,61999999999999</text:p>
          </table:table-cell>
          <table:table-cell table:style-name="ce1" table:formula="of:=[.H264]" office:value-type="float" office:value="189.910852205539" calcext:value-type="float">
            <text:p>189,910852205539</text:p>
          </table:table-cell>
          <table:table-cell table:style-name="ce1" table:formula="of:=-68 - ([.E265]^2/Ao)" office:value-type="float" office:value="-104.066131785434" calcext:value-type="float">
            <text:p>-104,066131785434</text:p>
          </table:table-cell>
          <table:table-cell table:style-name="ce1" table:formula="of:=[.G264]+h" office:value-type="float" office:value="2.62999999999999" calcext:value-type="float">
            <text:p>2,62999999999999</text:p>
          </table:table-cell>
          <table:table-cell table:style-name="ce1" table:formula="of:=[.H264]+ h*[.F265]" office:value-type="float" office:value="188.870190887685" calcext:value-type="float">
            <text:p>188,8701908876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5]" office:value-type="float" office:value="2.62999999999999" calcext:value-type="float">
            <text:p>2,62999999999999</text:p>
          </table:table-cell>
          <table:table-cell table:style-name="ce1" table:formula="of:=[.H265]" office:value-type="float" office:value="188.870190887685" calcext:value-type="float">
            <text:p>188,870190887685</text:p>
          </table:table-cell>
          <table:table-cell table:style-name="ce1" table:formula="of:=-68 - ([.E266]^2/Ao)" office:value-type="float" office:value="-103.671949005951" calcext:value-type="float">
            <text:p>-103,671949005951</text:p>
          </table:table-cell>
          <table:table-cell table:style-name="ce1" table:formula="of:=[.G265]+h" office:value-type="float" office:value="2.63999999999999" calcext:value-type="float">
            <text:p>2,63999999999999</text:p>
          </table:table-cell>
          <table:table-cell table:style-name="ce1" table:formula="of:=[.H265]+ h*[.F266]" office:value-type="float" office:value="187.833471397625" calcext:value-type="float">
            <text:p>187,8334713976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6]" office:value-type="float" office:value="2.63999999999999" calcext:value-type="float">
            <text:p>2,63999999999999</text:p>
          </table:table-cell>
          <table:table-cell table:style-name="ce1" table:formula="of:=[.H266]" office:value-type="float" office:value="187.833471397625" calcext:value-type="float">
            <text:p>187,833471397625</text:p>
          </table:table-cell>
          <table:table-cell table:style-name="ce1" table:formula="of:=-68 - ([.E267]^2/Ao)" office:value-type="float" office:value="-103.281412977283" calcext:value-type="float">
            <text:p>-103,281412977283</text:p>
          </table:table-cell>
          <table:table-cell table:style-name="ce1" table:formula="of:=[.G266]+h" office:value-type="float" office:value="2.64999999999999" calcext:value-type="float">
            <text:p>2,64999999999999</text:p>
          </table:table-cell>
          <table:table-cell table:style-name="ce1" table:formula="of:=[.H266]+ h*[.F267]" office:value-type="float" office:value="186.800657267853" calcext:value-type="float">
            <text:p>186,8006572678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7]" office:value-type="float" office:value="2.64999999999999" calcext:value-type="float">
            <text:p>2,64999999999999</text:p>
          </table:table-cell>
          <table:table-cell table:style-name="ce1" table:formula="of:=[.H267]" office:value-type="float" office:value="186.800657267853" calcext:value-type="float">
            <text:p>186,800657267853</text:p>
          </table:table-cell>
          <table:table-cell table:style-name="ce1" table:formula="of:=-68 - ([.E268]^2/Ao)" office:value-type="float" office:value="-102.894485555702" calcext:value-type="float">
            <text:p>-102,894485555702</text:p>
          </table:table-cell>
          <table:table-cell table:style-name="ce1" table:formula="of:=[.G267]+h" office:value-type="float" office:value="2.65999999999999" calcext:value-type="float">
            <text:p>2,65999999999999</text:p>
          </table:table-cell>
          <table:table-cell table:style-name="ce1" table:formula="of:=[.H267]+ h*[.F268]" office:value-type="float" office:value="185.771712412296" calcext:value-type="float">
            <text:p>185,7717124122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8]" office:value-type="float" office:value="2.65999999999999" calcext:value-type="float">
            <text:p>2,65999999999999</text:p>
          </table:table-cell>
          <table:table-cell table:style-name="ce1" table:formula="of:=[.H268]" office:value-type="float" office:value="185.771712412296" calcext:value-type="float">
            <text:p>185,771712412296</text:p>
          </table:table-cell>
          <table:table-cell table:style-name="ce1" table:formula="of:=-68 - ([.E269]^2/Ao)" office:value-type="float" office:value="-102.511129132597" calcext:value-type="float">
            <text:p>-102,511129132597</text:p>
          </table:table-cell>
          <table:table-cell table:style-name="ce1" table:formula="of:=[.G268]+h" office:value-type="float" office:value="2.66999999999999" calcext:value-type="float">
            <text:p>2,66999999999999</text:p>
          </table:table-cell>
          <table:table-cell table:style-name="ce1" table:formula="of:=[.H268]+ h*[.F269]" office:value-type="float" office:value="184.74660112097" calcext:value-type="float">
            <text:p>184,746601120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9]" office:value-type="float" office:value="2.66999999999999" calcext:value-type="float">
            <text:p>2,66999999999999</text:p>
          </table:table-cell>
          <table:table-cell table:style-name="ce1" table:formula="of:=[.H269]" office:value-type="float" office:value="184.74660112097" calcext:value-type="float">
            <text:p>184,74660112097</text:p>
          </table:table-cell>
          <table:table-cell table:style-name="ce1" table:formula="of:=-68 - ([.E270]^2/Ao)" office:value-type="float" office:value="-102.131306625751" calcext:value-type="float">
            <text:p>-102,131306625751</text:p>
          </table:table-cell>
          <table:table-cell table:style-name="ce1" table:formula="of:=[.G269]+h" office:value-type="float" office:value="2.67999999999999" calcext:value-type="float">
            <text:p>2,67999999999999</text:p>
          </table:table-cell>
          <table:table-cell table:style-name="ce1" table:formula="of:=[.H269]+ h*[.F270]" office:value-type="float" office:value="183.725288054712" calcext:value-type="float">
            <text:p>183,7252880547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0]" office:value-type="float" office:value="2.67999999999999" calcext:value-type="float">
            <text:p>2,67999999999999</text:p>
          </table:table-cell>
          <table:table-cell table:style-name="ce1" table:formula="of:=[.H270]" office:value-type="float" office:value="183.725288054712" calcext:value-type="float">
            <text:p>183,725288054712</text:p>
          </table:table-cell>
          <table:table-cell table:style-name="ce1" table:formula="of:=-68 - ([.E271]^2/Ao)" office:value-type="float" office:value="-101.754981470787" calcext:value-type="float">
            <text:p>-101,754981470787</text:p>
          </table:table-cell>
          <table:table-cell table:style-name="ce1" table:formula="of:=[.G270]+h" office:value-type="float" office:value="2.68999999999999" calcext:value-type="float">
            <text:p>2,68999999999999</text:p>
          </table:table-cell>
          <table:table-cell table:style-name="ce1" table:formula="of:=[.H270]+ h*[.F271]" office:value-type="float" office:value="182.707738240004" calcext:value-type="float">
            <text:p>182,7077382400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1]" office:value-type="float" office:value="2.68999999999999" calcext:value-type="float">
            <text:p>2,68999999999999</text:p>
          </table:table-cell>
          <table:table-cell table:style-name="ce1" table:formula="of:=[.H271]" office:value-type="float" office:value="182.707738240004" calcext:value-type="float">
            <text:p>182,707738240004</text:p>
          </table:table-cell>
          <table:table-cell table:style-name="ce1" table:formula="of:=-68 - ([.E272]^2/Ao)" office:value-type="float" office:value="-101.382117612778" calcext:value-type="float">
            <text:p>-101,382117612778</text:p>
          </table:table-cell>
          <table:table-cell table:style-name="ce1" table:formula="of:=[.G271]+h" office:value-type="float" office:value="2.69999999999999" calcext:value-type="float">
            <text:p>2,69999999999999</text:p>
          </table:table-cell>
          <table:table-cell table:style-name="ce1" table:formula="of:=[.H271]+ h*[.F272]" office:value-type="float" office:value="181.693917063876" calcext:value-type="float">
            <text:p>181,6939170638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2]" office:value-type="float" office:value="2.69999999999999" calcext:value-type="float">
            <text:p>2,69999999999999</text:p>
          </table:table-cell>
          <table:table-cell table:style-name="ce1" table:formula="of:=[.H272]" office:value-type="float" office:value="181.693917063876" calcext:value-type="float">
            <text:p>181,693917063876</text:p>
          </table:table-cell>
          <table:table-cell table:style-name="ce1" table:formula="of:=-68 - ([.E273]^2/Ao)" office:value-type="float" office:value="-101.012679498015" calcext:value-type="float">
            <text:p>-101,012679498015</text:p>
          </table:table-cell>
          <table:table-cell table:style-name="ce1" table:formula="of:=[.G272]+h" office:value-type="float" office:value="2.70999999999999" calcext:value-type="float">
            <text:p>2,70999999999999</text:p>
          </table:table-cell>
          <table:table-cell table:style-name="ce1" table:formula="of:=[.H272]+ h*[.F273]" office:value-type="float" office:value="180.683790268896" calcext:value-type="float">
            <text:p>180,6837902688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3]" office:value-type="float" office:value="2.70999999999999" calcext:value-type="float">
            <text:p>2,70999999999999</text:p>
          </table:table-cell>
          <table:table-cell table:style-name="ce1" table:formula="of:=[.H273]" office:value-type="float" office:value="180.683790268896" calcext:value-type="float">
            <text:p>180,683790268896</text:p>
          </table:table-cell>
          <table:table-cell table:style-name="ce1" table:formula="of:=-68 - ([.E274]^2/Ao)" office:value-type="float" office:value="-100.646632065935" calcext:value-type="float">
            <text:p>-100,646632065935</text:p>
          </table:table-cell>
          <table:table-cell table:style-name="ce1" table:formula="of:=[.G273]+h" office:value-type="float" office:value="2.71999999999999" calcext:value-type="float">
            <text:p>2,71999999999999</text:p>
          </table:table-cell>
          <table:table-cell table:style-name="ce1" table:formula="of:=[.H273]+ h*[.F274]" office:value-type="float" office:value="179.677323948237" calcext:value-type="float">
            <text:p>179,6773239482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4]" office:value-type="float" office:value="2.71999999999999" calcext:value-type="float">
            <text:p>2,71999999999999</text:p>
          </table:table-cell>
          <table:table-cell table:style-name="ce1" table:formula="of:=[.H274]" office:value-type="float" office:value="179.677323948237" calcext:value-type="float">
            <text:p>179,677323948237</text:p>
          </table:table-cell>
          <table:table-cell table:style-name="ce1" table:formula="of:=-68 - ([.E275]^2/Ao)" office:value-type="float" office:value="-100.2839407412" calcext:value-type="float">
            <text:p>-100,2839407412</text:p>
          </table:table-cell>
          <table:table-cell table:style-name="ce1" table:formula="of:=[.G274]+h" office:value-type="float" office:value="2.72999999999999" calcext:value-type="float">
            <text:p>2,72999999999999</text:p>
          </table:table-cell>
          <table:table-cell table:style-name="ce1" table:formula="of:=[.H274]+ h*[.F275]" office:value-type="float" office:value="178.674484540825" calcext:value-type="float">
            <text:p>178,6744845408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5]" office:value-type="float" office:value="2.72999999999999" calcext:value-type="float">
            <text:p>2,72999999999999</text:p>
          </table:table-cell>
          <table:table-cell table:style-name="ce1" table:formula="of:=[.H275]" office:value-type="float" office:value="178.674484540825" calcext:value-type="float">
            <text:p>178,674484540825</text:p>
          </table:table-cell>
          <table:table-cell table:style-name="ce1" table:formula="of:=-68 - ([.E276]^2/Ao)" office:value-type="float" office:value="-99.9245714259295" calcext:value-type="float">
            <text:p>-99,9245714259295</text:p>
          </table:table-cell>
          <table:table-cell table:style-name="ce1" table:formula="of:=[.G275]+h" office:value-type="float" office:value="2.73999999999999" calcext:value-type="float">
            <text:p>2,73999999999999</text:p>
          </table:table-cell>
          <table:table-cell table:style-name="ce1" table:formula="of:=[.H275]+ h*[.F276]" office:value-type="float" office:value="177.675238826566" calcext:value-type="float">
            <text:p>177,6752388265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6]" office:value-type="float" office:value="2.73999999999999" calcext:value-type="float">
            <text:p>2,73999999999999</text:p>
          </table:table-cell>
          <table:table-cell table:style-name="ce1" table:formula="of:=[.H276]" office:value-type="float" office:value="177.675238826566" calcext:value-type="float">
            <text:p>177,675238826566</text:p>
          </table:table-cell>
          <table:table-cell table:style-name="ce1" table:formula="of:=-68 - ([.E277]^2/Ao)" office:value-type="float" office:value="-99.5684904920772" calcext:value-type="float">
            <text:p>-99,5684904920772</text:p>
          </table:table-cell>
          <table:table-cell table:style-name="ce1" table:formula="of:=[.G276]+h" office:value-type="float" office:value="2.74999999999999" calcext:value-type="float">
            <text:p>2,74999999999999</text:p>
          </table:table-cell>
          <table:table-cell table:style-name="ce1" table:formula="of:=[.H276]+ h*[.F277]" office:value-type="float" office:value="176.679553921645" calcext:value-type="float">
            <text:p>176,6795539216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7]" office:value-type="float" office:value="2.74999999999999" calcext:value-type="float">
            <text:p>2,74999999999999</text:p>
          </table:table-cell>
          <table:table-cell table:style-name="ce1" table:formula="of:=[.H277]" office:value-type="float" office:value="176.679553921645" calcext:value-type="float">
            <text:p>176,679553921645</text:p>
          </table:table-cell>
          <table:table-cell table:style-name="ce1" table:formula="of:=-68 - ([.E278]^2/Ao)" office:value-type="float" office:value="-99.2156647739514" calcext:value-type="float">
            <text:p>-99,2156647739514</text:p>
          </table:table-cell>
          <table:table-cell table:style-name="ce1" table:formula="of:=[.G277]+h" office:value-type="float" office:value="2.75999999999999" calcext:value-type="float">
            <text:p>2,75999999999999</text:p>
          </table:table-cell>
          <table:table-cell table:style-name="ce1" table:formula="of:=[.H277]+ h*[.F278]" office:value-type="float" office:value="175.687397273905" calcext:value-type="float">
            <text:p>175,6873972739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8]" office:value-type="float" office:value="2.75999999999999" calcext:value-type="float">
            <text:p>2,75999999999999</text:p>
          </table:table-cell>
          <table:table-cell table:style-name="ce1" table:formula="of:=[.H278]" office:value-type="float" office:value="175.687397273905" calcext:value-type="float">
            <text:p>175,687397273905</text:p>
          </table:table-cell>
          <table:table-cell table:style-name="ce1" table:formula="of:=-68 - ([.E279]^2/Ao)" office:value-type="float" office:value="-98.8660615608791" calcext:value-type="float">
            <text:p>-98,8660615608791</text:p>
          </table:table-cell>
          <table:table-cell table:style-name="ce1" table:formula="of:=[.G278]+h" office:value-type="float" office:value="2.76999999999999" calcext:value-type="float">
            <text:p>2,76999999999999</text:p>
          </table:table-cell>
          <table:table-cell table:style-name="ce1" table:formula="of:=[.H278]+ h*[.F279]" office:value-type="float" office:value="174.698736658297" calcext:value-type="float">
            <text:p>174,6987366582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9]" office:value-type="float" office:value="2.76999999999999" calcext:value-type="float">
            <text:p>2,76999999999999</text:p>
          </table:table-cell>
          <table:table-cell table:style-name="ce1" table:formula="of:=[.H279]" office:value-type="float" office:value="174.698736658297" calcext:value-type="float">
            <text:p>174,698736658297</text:p>
          </table:table-cell>
          <table:table-cell table:style-name="ce1" table:formula="of:=-68 - ([.E280]^2/Ao)" office:value-type="float" office:value="-98.5196485900049" calcext:value-type="float">
            <text:p>-98,5196485900049</text:p>
          </table:table-cell>
          <table:table-cell table:style-name="ce1" table:formula="of:=[.G279]+h" office:value-type="float" office:value="2.77999999999998" calcext:value-type="float">
            <text:p>2,77999999999998</text:p>
          </table:table-cell>
          <table:table-cell table:style-name="ce1" table:formula="of:=[.H279]+ h*[.F280]" office:value-type="float" office:value="173.713540172397" calcext:value-type="float">
            <text:p>173,7135401723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0]" office:value-type="float" office:value="2.77999999999998" calcext:value-type="float">
            <text:p>2,77999999999998</text:p>
          </table:table-cell>
          <table:table-cell table:style-name="ce1" table:formula="of:=[.H280]" office:value-type="float" office:value="173.713540172397" calcext:value-type="float">
            <text:p>173,713540172397</text:p>
          </table:table-cell>
          <table:table-cell table:style-name="ce1" table:formula="of:=-68 - ([.E281]^2/Ao)" office:value-type="float" office:value="-98.1763940392268" calcext:value-type="float">
            <text:p>-98,1763940392268</text:p>
          </table:table-cell>
          <table:table-cell table:style-name="ce1" table:formula="of:=[.G280]+h" office:value-type="float" office:value="2.78999999999998" calcext:value-type="float">
            <text:p>2,78999999999998</text:p>
          </table:table-cell>
          <table:table-cell table:style-name="ce1" table:formula="of:=[.H280]+ h*[.F281]" office:value-type="float" office:value="172.731776232004" calcext:value-type="float">
            <text:p>172,7317762320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1]" office:value-type="float" office:value="2.78999999999998" calcext:value-type="float">
            <text:p>2,78999999999998</text:p>
          </table:table-cell>
          <table:table-cell table:style-name="ce1" table:formula="of:=[.H281]" office:value-type="float" office:value="172.731776232004" calcext:value-type="float">
            <text:p>172,731776232004</text:p>
          </table:table-cell>
          <table:table-cell table:style-name="ce1" table:formula="of:=-68 - ([.E282]^2/Ao)" office:value-type="float" office:value="-97.8362665202632" calcext:value-type="float">
            <text:p>-97,8362665202632</text:p>
          </table:table-cell>
          <table:table-cell table:style-name="ce1" table:formula="of:=[.G281]+h" office:value-type="float" office:value="2.79999999999998" calcext:value-type="float">
            <text:p>2,79999999999998</text:p>
          </table:table-cell>
          <table:table-cell table:style-name="ce1" table:formula="of:=[.H281]+ h*[.F282]" office:value-type="float" office:value="171.753413566802" calcext:value-type="float">
            <text:p>171,7534135668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2]" office:value-type="float" office:value="2.79999999999998" calcext:value-type="float">
            <text:p>2,79999999999998</text:p>
          </table:table-cell>
          <table:table-cell table:style-name="ce1" table:formula="of:=[.H282]" office:value-type="float" office:value="171.753413566802" calcext:value-type="float">
            <text:p>171,753413566802</text:p>
          </table:table-cell>
          <table:table-cell table:style-name="ce1" table:formula="of:=-68 - ([.E283]^2/Ao)" office:value-type="float" office:value="-97.4992350718488" calcext:value-type="float">
            <text:p>-97,4992350718488</text:p>
          </table:table-cell>
          <table:table-cell table:style-name="ce1" table:formula="of:=[.G282]+h" office:value-type="float" office:value="2.80999999999998" calcext:value-type="float">
            <text:p>2,80999999999998</text:p>
          </table:table-cell>
          <table:table-cell table:style-name="ce1" table:formula="of:=[.H282]+ h*[.F283]" office:value-type="float" office:value="170.778421216083" calcext:value-type="float">
            <text:p>170,7784212160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3]" office:value-type="float" office:value="2.80999999999998" calcext:value-type="float">
            <text:p>2,80999999999998</text:p>
          </table:table-cell>
          <table:table-cell table:style-name="ce1" table:formula="of:=[.H283]" office:value-type="float" office:value="170.778421216083" calcext:value-type="float">
            <text:p>170,778421216083</text:p>
          </table:table-cell>
          <table:table-cell table:style-name="ce1" table:formula="of:=-68 - ([.E284]^2/Ao)" office:value-type="float" office:value="-97.1652691530579" calcext:value-type="float">
            <text:p>-97,1652691530579</text:p>
          </table:table-cell>
          <table:table-cell table:style-name="ce1" table:formula="of:=[.G283]+h" office:value-type="float" office:value="2.81999999999998" calcext:value-type="float">
            <text:p>2,81999999999998</text:p>
          </table:table-cell>
          <table:table-cell table:style-name="ce1" table:formula="of:=[.H283]+ h*[.F284]" office:value-type="float" office:value="169.806768524553" calcext:value-type="float">
            <text:p>169,8067685245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4]" office:value-type="float" office:value="2.81999999999998" calcext:value-type="float">
            <text:p>2,81999999999998</text:p>
          </table:table-cell>
          <table:table-cell table:style-name="ce1" table:formula="of:=[.H284]" office:value-type="float" office:value="169.806768524553" calcext:value-type="float">
            <text:p>169,806768524553</text:p>
          </table:table-cell>
          <table:table-cell table:style-name="ce1" table:formula="of:=-68 - ([.E285]^2/Ao)" office:value-type="float" office:value="-96.834338636751" calcext:value-type="float">
            <text:p>-96,834338636751</text:p>
          </table:table-cell>
          <table:table-cell table:style-name="ce1" table:formula="of:=[.G284]+h" office:value-type="float" office:value="2.82999999999998" calcext:value-type="float">
            <text:p>2,82999999999998</text:p>
          </table:table-cell>
          <table:table-cell table:style-name="ce1" table:formula="of:=[.H284]+ h*[.F285]" office:value-type="float" office:value="168.838425138185" calcext:value-type="float">
            <text:p>168,8384251381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5]" office:value-type="float" office:value="2.82999999999998" calcext:value-type="float">
            <text:p>2,82999999999998</text:p>
          </table:table-cell>
          <table:table-cell table:style-name="ce1" table:formula="of:=[.H285]" office:value-type="float" office:value="168.838425138185" calcext:value-type="float">
            <text:p>168,838425138185</text:p>
          </table:table-cell>
          <table:table-cell table:style-name="ce1" table:formula="of:=-68 - ([.E286]^2/Ao)" office:value-type="float" office:value="-96.5064138031425" calcext:value-type="float">
            <text:p>-96,5064138031425</text:p>
          </table:table-cell>
          <table:table-cell table:style-name="ce1" table:formula="of:=[.G285]+h" office:value-type="float" office:value="2.83999999999998" calcext:value-type="float">
            <text:p>2,83999999999998</text:p>
          </table:table-cell>
          <table:table-cell table:style-name="ce1" table:formula="of:=[.H285]+ h*[.F286]" office:value-type="float" office:value="167.873361000154" calcext:value-type="float">
            <text:p>167,8733610001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6]" office:value-type="float" office:value="2.83999999999998" calcext:value-type="float">
            <text:p>2,83999999999998</text:p>
          </table:table-cell>
          <table:table-cell table:style-name="ce1" table:formula="of:=[.H286]" office:value-type="float" office:value="167.873361000154" calcext:value-type="float">
            <text:p>167,873361000154</text:p>
          </table:table-cell>
          <table:table-cell table:style-name="ce1" table:formula="of:=-68 - ([.E287]^2/Ao)" office:value-type="float" office:value="-96.1814653334879" calcext:value-type="float">
            <text:p>-96,1814653334879</text:p>
          </table:table-cell>
          <table:table-cell table:style-name="ce1" table:formula="of:=[.G286]+h" office:value-type="float" office:value="2.84999999999998" calcext:value-type="float">
            <text:p>2,84999999999998</text:p>
          </table:table-cell>
          <table:table-cell table:style-name="ce1" table:formula="of:=[.H286]+ h*[.F287]" office:value-type="float" office:value="166.911546346819" calcext:value-type="float">
            <text:p>166,9115463468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7]" office:value-type="float" office:value="2.84999999999998" calcext:value-type="float">
            <text:p>2,84999999999998</text:p>
          </table:table-cell>
          <table:table-cell table:style-name="ce1" table:formula="of:=[.H287]" office:value-type="float" office:value="166.911546346819" calcext:value-type="float">
            <text:p>166,911546346819</text:p>
          </table:table-cell>
          <table:table-cell table:style-name="ce1" table:formula="of:=-68 - ([.E288]^2/Ao)" office:value-type="float" office:value="-95.8594643038862" calcext:value-type="float">
            <text:p>-95,8594643038862</text:p>
          </table:table-cell>
          <table:table-cell table:style-name="ce1" table:formula="of:=[.G287]+h" office:value-type="float" office:value="2.85999999999998" calcext:value-type="float">
            <text:p>2,85999999999998</text:p>
          </table:table-cell>
          <table:table-cell table:style-name="ce1" table:formula="of:=[.H287]+ h*[.F288]" office:value-type="float" office:value="165.95295170378" calcext:value-type="float">
            <text:p>165,952951703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8]" office:value-type="float" office:value="2.85999999999998" calcext:value-type="float">
            <text:p>2,85999999999998</text:p>
          </table:table-cell>
          <table:table-cell table:style-name="ce1" table:formula="of:=[.H288]" office:value-type="float" office:value="165.95295170378" calcext:value-type="float">
            <text:p>165,95295170378</text:p>
          </table:table-cell>
          <table:table-cell table:style-name="ce1" table:formula="of:=-68 - ([.E289]^2/Ao)" office:value-type="float" office:value="-95.5403821791971" calcext:value-type="float">
            <text:p>-95,5403821791971</text:p>
          </table:table-cell>
          <table:table-cell table:style-name="ce1" table:formula="of:=[.G288]+h" office:value-type="float" office:value="2.86999999999998" calcext:value-type="float">
            <text:p>2,86999999999998</text:p>
          </table:table-cell>
          <table:table-cell table:style-name="ce1" table:formula="of:=[.H288]+ h*[.F289]" office:value-type="float" office:value="164.997547881988" calcext:value-type="float">
            <text:p>164,9975478819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9]" office:value-type="float" office:value="2.86999999999998" calcext:value-type="float">
            <text:p>2,86999999999998</text:p>
          </table:table-cell>
          <table:table-cell table:style-name="ce1" table:formula="of:=[.H289]" office:value-type="float" office:value="164.997547881988" calcext:value-type="float">
            <text:p>164,997547881988</text:p>
          </table:table-cell>
          <table:table-cell table:style-name="ce1" table:formula="of:=-68 - ([.E290]^2/Ao)" office:value-type="float" office:value="-95.2241908070689" calcext:value-type="float">
            <text:p>-95,2241908070689</text:p>
          </table:table-cell>
          <table:table-cell table:style-name="ce1" table:formula="of:=[.G289]+h" office:value-type="float" office:value="2.87999999999998" calcext:value-type="float">
            <text:p>2,87999999999998</text:p>
          </table:table-cell>
          <table:table-cell table:style-name="ce1" table:formula="of:=[.H289]+ h*[.F290]" office:value-type="float" office:value="164.045305973917" calcext:value-type="float">
            <text:p>164,0453059739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0]" office:value-type="float" office:value="2.87999999999998" calcext:value-type="float">
            <text:p>2,87999999999998</text:p>
          </table:table-cell>
          <table:table-cell table:style-name="ce1" table:formula="of:=[.H290]" office:value-type="float" office:value="164.045305973917" calcext:value-type="float">
            <text:p>164,045305973917</text:p>
          </table:table-cell>
          <table:table-cell table:style-name="ce1" table:formula="of:=-68 - ([.E291]^2/Ao)" office:value-type="float" office:value="-94.9108624120761" calcext:value-type="float">
            <text:p>-94,9108624120761</text:p>
          </table:table-cell>
          <table:table-cell table:style-name="ce1" table:formula="of:=[.G290]+h" office:value-type="float" office:value="2.88999999999998" calcext:value-type="float">
            <text:p>2,88999999999998</text:p>
          </table:table-cell>
          <table:table-cell table:style-name="ce1" table:formula="of:=[.H290]+ h*[.F291]" office:value-type="float" office:value="163.096197349797" calcext:value-type="float">
            <text:p>163,0961973497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1]" office:value-type="float" office:value="2.88999999999998" calcext:value-type="float">
            <text:p>2,88999999999998</text:p>
          </table:table-cell>
          <table:table-cell table:style-name="ce1" table:formula="of:=[.H291]" office:value-type="float" office:value="163.096197349797" calcext:value-type="float">
            <text:p>163,096197349797</text:p>
          </table:table-cell>
          <table:table-cell table:style-name="ce1" table:formula="of:=-68 - ([.E292]^2/Ao)" office:value-type="float" office:value="-94.6003695899638" calcext:value-type="float">
            <text:p>-94,6003695899638</text:p>
          </table:table-cell>
          <table:table-cell table:style-name="ce1" table:formula="of:=[.G291]+h" office:value-type="float" office:value="2.89999999999998" calcext:value-type="float">
            <text:p>2,89999999999998</text:p>
          </table:table-cell>
          <table:table-cell table:style-name="ce1" table:formula="of:=[.H291]+ h*[.F292]" office:value-type="float" office:value="162.150193653897" calcext:value-type="float">
            <text:p>162,1501936538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2]" office:value-type="float" office:value="2.89999999999998" calcext:value-type="float">
            <text:p>2,89999999999998</text:p>
          </table:table-cell>
          <table:table-cell table:style-name="ce1" table:formula="of:=[.H292]" office:value-type="float" office:value="162.150193653897" calcext:value-type="float">
            <text:p>162,150193653897</text:p>
          </table:table-cell>
          <table:table-cell table:style-name="ce1" table:formula="of:=-68 - ([.E293]^2/Ao)" office:value-type="float" office:value="-94.2926853019963" calcext:value-type="float">
            <text:p>-94,2926853019963</text:p>
          </table:table-cell>
          <table:table-cell table:style-name="ce1" table:formula="of:=[.G292]+h" office:value-type="float" office:value="2.90999999999998" calcext:value-type="float">
            <text:p>2,90999999999998</text:p>
          </table:table-cell>
          <table:table-cell table:style-name="ce1" table:formula="of:=[.H292]+ h*[.F293]" office:value-type="float" office:value="161.207266800877" calcext:value-type="float">
            <text:p>161,2072668008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3]" office:value-type="float" office:value="2.90999999999998" calcext:value-type="float">
            <text:p>2,90999999999998</text:p>
          </table:table-cell>
          <table:table-cell table:style-name="ce1" table:formula="of:=[.H293]" office:value-type="float" office:value="161.207266800877" calcext:value-type="float">
            <text:p>161,207266800877</text:p>
          </table:table-cell>
          <table:table-cell table:style-name="ce1" table:formula="of:=-68 - ([.E294]^2/Ao)" office:value-type="float" office:value="-93.9877828694091" calcext:value-type="float">
            <text:p>-93,9877828694091</text:p>
          </table:table-cell>
          <table:table-cell table:style-name="ce1" table:formula="of:=[.G293]+h" office:value-type="float" office:value="2.91999999999998" calcext:value-type="float">
            <text:p>2,91999999999998</text:p>
          </table:table-cell>
          <table:table-cell table:style-name="ce1" table:formula="of:=[.H293]+ h*[.F294]" office:value-type="float" office:value="160.267388972183" calcext:value-type="float">
            <text:p>160,2673889721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4]" office:value-type="float" office:value="2.91999999999998" calcext:value-type="float">
            <text:p>2,91999999999998</text:p>
          </table:table-cell>
          <table:table-cell table:style-name="ce1" table:formula="of:=[.H294]" office:value-type="float" office:value="160.267388972183" calcext:value-type="float">
            <text:p>160,267388972183</text:p>
          </table:table-cell>
          <table:table-cell table:style-name="ce1" table:formula="of:=-68 - ([.E295]^2/Ao)" office:value-type="float" office:value="-93.685635967961" calcext:value-type="float">
            <text:p>-93,685635967961</text:p>
          </table:table-cell>
          <table:table-cell table:style-name="ce1" table:formula="of:=[.G294]+h" office:value-type="float" office:value="2.92999999999998" calcext:value-type="float">
            <text:p>2,92999999999998</text:p>
          </table:table-cell>
          <table:table-cell table:style-name="ce1" table:formula="of:=[.H294]+ h*[.F295]" office:value-type="float" office:value="159.330532612503" calcext:value-type="float">
            <text:p>159,3305326125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5]" office:value-type="float" office:value="2.92999999999998" calcext:value-type="float">
            <text:p>2,92999999999998</text:p>
          </table:table-cell>
          <table:table-cell table:style-name="ce1" table:formula="of:=[.H295]" office:value-type="float" office:value="159.330532612503" calcext:value-type="float">
            <text:p>159,330532612503</text:p>
          </table:table-cell>
          <table:table-cell table:style-name="ce1" table:formula="of:=-68 - ([.E296]^2/Ao)" office:value-type="float" office:value="-93.386218622584" calcext:value-type="float">
            <text:p>-93,386218622584</text:p>
          </table:table-cell>
          <table:table-cell table:style-name="ce1" table:formula="of:=[.G295]+h" office:value-type="float" office:value="2.93999999999998" calcext:value-type="float">
            <text:p>2,93999999999998</text:p>
          </table:table-cell>
          <table:table-cell table:style-name="ce1" table:formula="of:=[.H295]+ h*[.F296]" office:value-type="float" office:value="158.396670426277" calcext:value-type="float">
            <text:p>158,3966704262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6]" office:value-type="float" office:value="2.93999999999998" calcext:value-type="float">
            <text:p>2,93999999999998</text:p>
          </table:table-cell>
          <table:table-cell table:style-name="ce1" table:formula="of:=[.H296]" office:value-type="float" office:value="158.396670426277" calcext:value-type="float">
            <text:p>158,396670426277</text:p>
          </table:table-cell>
          <table:table-cell table:style-name="ce1" table:formula="of:=-68 - ([.E297]^2/Ao)" office:value-type="float" office:value="-93.0895052021307" calcext:value-type="float">
            <text:p>-93,0895052021307</text:p>
          </table:table-cell>
          <table:table-cell table:style-name="ce1" table:formula="of:=[.G296]+h" office:value-type="float" office:value="2.94999999999998" calcext:value-type="float">
            <text:p>2,94999999999998</text:p>
          </table:table-cell>
          <table:table-cell table:style-name="ce1" table:formula="of:=[.H296]+ h*[.F297]" office:value-type="float" office:value="157.465775374256" calcext:value-type="float">
            <text:p>157,4657753742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7]" office:value-type="float" office:value="2.94999999999998" calcext:value-type="float">
            <text:p>2,94999999999998</text:p>
          </table:table-cell>
          <table:table-cell table:style-name="ce1" table:formula="of:=[.H297]" office:value-type="float" office:value="157.465775374256" calcext:value-type="float">
            <text:p>157,465775374256</text:p>
          </table:table-cell>
          <table:table-cell table:style-name="ce1" table:formula="of:=-68 - ([.E298]^2/Ao)" office:value-type="float" office:value="-92.7954704142157" calcext:value-type="float">
            <text:p>-92,7954704142157</text:p>
          </table:table-cell>
          <table:table-cell table:style-name="ce1" table:formula="of:=[.G297]+h" office:value-type="float" office:value="2.95999999999998" calcext:value-type="float">
            <text:p>2,95999999999998</text:p>
          </table:table-cell>
          <table:table-cell table:style-name="ce1" table:formula="of:=[.H297]+ h*[.F298]" office:value-type="float" office:value="156.537820670114" calcext:value-type="float">
            <text:p>156,5378206701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8]" office:value-type="float" office:value="2.95999999999998" calcext:value-type="float">
            <text:p>2,95999999999998</text:p>
          </table:table-cell>
          <table:table-cell table:style-name="ce1" table:formula="of:=[.H298]" office:value-type="float" office:value="156.537820670114" calcext:value-type="float">
            <text:p>156,537820670114</text:p>
          </table:table-cell>
          <table:table-cell table:style-name="ce1" table:formula="of:=-68 - ([.E299]^2/Ao)" office:value-type="float" office:value="-92.5040893001488" calcext:value-type="float">
            <text:p>-92,5040893001488</text:p>
          </table:table-cell>
          <table:table-cell table:style-name="ce1" table:formula="of:=[.G298]+h" office:value-type="float" office:value="2.96999999999998" calcext:value-type="float">
            <text:p>2,96999999999998</text:p>
          </table:table-cell>
          <table:table-cell table:style-name="ce1" table:formula="of:=[.H298]+ h*[.F299]" office:value-type="float" office:value="155.612779777112" calcext:value-type="float">
            <text:p>155,6127797771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9]" office:value-type="float" office:value="2.96999999999998" calcext:value-type="float">
            <text:p>2,96999999999998</text:p>
          </table:table-cell>
          <table:table-cell table:style-name="ce1" table:formula="of:=[.H299]" office:value-type="float" office:value="155.612779777112" calcext:value-type="float">
            <text:p>155,612779777112</text:p>
          </table:table-cell>
          <table:table-cell table:style-name="ce1" table:formula="of:=-68 - ([.E300]^2/Ao)" office:value-type="float" office:value="-92.2153372299601" calcext:value-type="float">
            <text:p>-92,2153372299601</text:p>
          </table:table-cell>
          <table:table-cell table:style-name="ce1" table:formula="of:=[.G299]+h" office:value-type="float" office:value="2.97999999999998" calcext:value-type="float">
            <text:p>2,97999999999998</text:p>
          </table:table-cell>
          <table:table-cell table:style-name="ce1" table:formula="of:=[.H299]+ h*[.F300]" office:value-type="float" office:value="154.690626404813" calcext:value-type="float">
            <text:p>154,6906264048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0]" office:value-type="float" office:value="2.97999999999998" calcext:value-type="float">
            <text:p>2,97999999999998</text:p>
          </table:table-cell>
          <table:table-cell table:style-name="ce1" table:formula="of:=[.H300]" office:value-type="float" office:value="154.690626404813" calcext:value-type="float">
            <text:p>154,690626404813</text:p>
          </table:table-cell>
          <table:table-cell table:style-name="ce1" table:formula="of:=-68 - ([.E301]^2/Ao)" office:value-type="float" office:value="-91.9291898975134" calcext:value-type="float">
            <text:p>-91,9291898975134</text:p>
          </table:table-cell>
          <table:table-cell table:style-name="ce1" table:formula="of:=[.G300]+h" office:value-type="float" office:value="2.98999999999998" calcext:value-type="float">
            <text:p>2,98999999999998</text:p>
          </table:table-cell>
          <table:table-cell table:style-name="ce1" table:formula="of:=[.H300]+ h*[.F301]" office:value-type="float" office:value="153.771334505838" calcext:value-type="float">
            <text:p>153,7713345058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1]" office:value-type="float" office:value="2.98999999999998" calcext:value-type="float">
            <text:p>2,98999999999998</text:p>
          </table:table-cell>
          <table:table-cell table:style-name="ce1" table:formula="of:=[.H301]" office:value-type="float" office:value="153.771334505838" calcext:value-type="float">
            <text:p>153,771334505838</text:p>
          </table:table-cell>
          <table:table-cell table:style-name="ce1" table:formula="of:=-68 - ([.E302]^2/Ao)" office:value-type="float" office:value="-91.6456233157063" calcext:value-type="float">
            <text:p>-91,6456233157063</text:p>
          </table:table-cell>
          <table:table-cell table:style-name="ce1" table:formula="of:=[.G301]+h" office:value-type="float" office:value="2.99999999999998" calcext:value-type="float">
            <text:p>2,99999999999998</text:p>
          </table:table-cell>
          <table:table-cell table:style-name="ce1" table:formula="of:=[.H301]+ h*[.F302]" office:value-type="float" office:value="152.854878272681" calcext:value-type="float">
            <text:p>152,8548782726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2]" office:value-type="float" office:value="2.99999999999998" calcext:value-type="float">
            <text:p>2,99999999999998</text:p>
          </table:table-cell>
          <table:table-cell table:style-name="ce1" table:formula="of:=[.H302]" office:value-type="float" office:value="152.854878272681" calcext:value-type="float">
            <text:p>152,854878272681</text:p>
          </table:table-cell>
          <table:table-cell table:style-name="ce1" table:formula="of:=-68 - ([.E303]^2/Ao)" office:value-type="float" office:value="-91.364613811756" calcext:value-type="float">
            <text:p>-91,364613811756</text:p>
          </table:table-cell>
          <table:table-cell table:style-name="ce1" table:formula="of:=[.G302]+h" office:value-type="float" office:value="3.00999999999998" calcext:value-type="float">
            <text:p>3,00999999999998</text:p>
          </table:table-cell>
          <table:table-cell table:style-name="ce1" table:formula="of:=[.H302]+ h*[.F303]" office:value-type="float" office:value="151.941232134563" calcext:value-type="float">
            <text:p>151,9412321345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3]" office:value-type="float" office:value="3.00999999999998" calcext:value-type="float">
            <text:p>3,00999999999998</text:p>
          </table:table-cell>
          <table:table-cell table:style-name="ce1" table:formula="of:=[.H303]" office:value-type="float" office:value="151.941232134563" calcext:value-type="float">
            <text:p>151,941232134563</text:p>
          </table:table-cell>
          <table:table-cell table:style-name="ce1" table:formula="of:=-68 - ([.E304]^2/Ao)" office:value-type="float" office:value="-91.0861380225692" calcext:value-type="float">
            <text:p>-91,0861380225692</text:p>
          </table:table-cell>
          <table:table-cell table:style-name="ce1" table:formula="of:=[.G303]+h" office:value-type="float" office:value="3.01999999999998" calcext:value-type="float">
            <text:p>3,01999999999998</text:p>
          </table:table-cell>
          <table:table-cell table:style-name="ce1" table:formula="of:=[.H303]+ h*[.F304]" office:value-type="float" office:value="151.030370754337" calcext:value-type="float">
            <text:p>151,0303707543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4]" office:value-type="float" office:value="3.01999999999998" calcext:value-type="float">
            <text:p>3,01999999999998</text:p>
          </table:table-cell>
          <table:table-cell table:style-name="ce1" table:formula="of:=[.H304]" office:value-type="float" office:value="151.030370754337" calcext:value-type="float">
            <text:p>151,030370754337</text:p>
          </table:table-cell>
          <table:table-cell table:style-name="ce1" table:formula="of:=-68 - ([.E305]^2/Ao)" office:value-type="float" office:value="-90.8101728901926" calcext:value-type="float">
            <text:p>-90,8101728901926</text:p>
          </table:table-cell>
          <table:table-cell table:style-name="ce1" table:formula="of:=[.G304]+h" office:value-type="float" office:value="3.02999999999998" calcext:value-type="float">
            <text:p>3,02999999999998</text:p>
          </table:table-cell>
          <table:table-cell table:style-name="ce1" table:formula="of:=[.H304]+ h*[.F305]" office:value-type="float" office:value="150.122269025436" calcext:value-type="float">
            <text:p>150,1222690254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5]" office:value-type="float" office:value="3.02999999999998" calcext:value-type="float">
            <text:p>3,02999999999998</text:p>
          </table:table-cell>
          <table:table-cell table:style-name="ce1" table:formula="of:=[.H305]" office:value-type="float" office:value="150.122269025436" calcext:value-type="float">
            <text:p>150,122269025436</text:p>
          </table:table-cell>
          <table:table-cell table:style-name="ce1" table:formula="of:=-68 - ([.E306]^2/Ao)" office:value-type="float" office:value="-90.5366956573452" calcext:value-type="float">
            <text:p>-90,5366956573452</text:p>
          </table:table-cell>
          <table:table-cell table:style-name="ce1" table:formula="of:=[.G305]+h" office:value-type="float" office:value="3.03999999999998" calcext:value-type="float">
            <text:p>3,03999999999998</text:p>
          </table:table-cell>
          <table:table-cell table:style-name="ce1" table:formula="of:=[.H305]+ h*[.F306]" office:value-type="float" office:value="149.216902068862" calcext:value-type="float">
            <text:p>149,2169020688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6]" office:value-type="float" office:value="3.03999999999998" calcext:value-type="float">
            <text:p>3,03999999999998</text:p>
          </table:table-cell>
          <table:table-cell table:style-name="ce1" table:formula="of:=[.H306]" office:value-type="float" office:value="149.216902068862" calcext:value-type="float">
            <text:p>149,216902068862</text:p>
          </table:table-cell>
          <table:table-cell table:style-name="ce1" table:formula="of:=-68 - ([.E307]^2/Ao)" office:value-type="float" office:value="-90.2656838630284" calcext:value-type="float">
            <text:p>-90,2656838630284</text:p>
          </table:table-cell>
          <table:table-cell table:style-name="ce1" table:formula="of:=[.G306]+h" office:value-type="float" office:value="3.04999999999998" calcext:value-type="float">
            <text:p>3,04999999999998</text:p>
          </table:table-cell>
          <table:table-cell table:style-name="ce1" table:formula="of:=[.H306]+ h*[.F307]" office:value-type="float" office:value="148.314245230232" calcext:value-type="float">
            <text:p>148,3142452302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7]" office:value-type="float" office:value="3.04999999999998" calcext:value-type="float">
            <text:p>3,04999999999998</text:p>
          </table:table-cell>
          <table:table-cell table:style-name="ce1" table:formula="of:=[.H307]" office:value-type="float" office:value="148.314245230232" calcext:value-type="float">
            <text:p>148,314245230232</text:p>
          </table:table-cell>
          <table:table-cell table:style-name="ce1" table:formula="of:=-68 - ([.E308]^2/Ao)" office:value-type="float" office:value="-89.9971153382133" calcext:value-type="float">
            <text:p>-89,9971153382133</text:p>
          </table:table-cell>
          <table:table-cell table:style-name="ce1" table:formula="of:=[.G307]+h" office:value-type="float" office:value="3.05999999999998" calcext:value-type="float">
            <text:p>3,05999999999998</text:p>
          </table:table-cell>
          <table:table-cell table:style-name="ce1" table:formula="of:=[.H307]+ h*[.F308]" office:value-type="float" office:value="147.41427407685" calcext:value-type="float">
            <text:p>147,414274076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8]" office:value-type="float" office:value="3.05999999999998" calcext:value-type="float">
            <text:p>3,05999999999998</text:p>
          </table:table-cell>
          <table:table-cell table:style-name="ce1" table:formula="of:=[.H308]" office:value-type="float" office:value="147.41427407685" calcext:value-type="float">
            <text:p>147,41427407685</text:p>
          </table:table-cell>
          <table:table-cell table:style-name="ce1" table:formula="of:=-68 - ([.E309]^2/Ao)" office:value-type="float" office:value="-89.7309682016045" calcext:value-type="float">
            <text:p>-89,7309682016045</text:p>
          </table:table-cell>
          <table:table-cell table:style-name="ce1" table:formula="of:=[.G308]+h" office:value-type="float" office:value="3.06999999999998" calcext:value-type="float">
            <text:p>3,06999999999998</text:p>
          </table:table-cell>
          <table:table-cell table:style-name="ce1" table:formula="of:=[.H308]+ h*[.F309]" office:value-type="float" office:value="146.516964394834" calcext:value-type="float">
            <text:p>146,5169643948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9]" office:value-type="float" office:value="3.06999999999998" calcext:value-type="float">
            <text:p>3,06999999999998</text:p>
          </table:table-cell>
          <table:table-cell table:style-name="ce1" table:formula="of:=[.H309]" office:value-type="float" office:value="146.516964394834" calcext:value-type="float">
            <text:p>146,516964394834</text:p>
          </table:table-cell>
          <table:table-cell table:style-name="ce1" table:formula="of:=-68 - ([.E310]^2/Ao)" office:value-type="float" office:value="-89.4672208554769" calcext:value-type="float">
            <text:p>-89,4672208554769</text:p>
          </table:table-cell>
          <table:table-cell table:style-name="ce1" table:formula="of:=[.G309]+h" office:value-type="float" office:value="3.07999999999998" calcext:value-type="float">
            <text:p>3,07999999999998</text:p>
          </table:table-cell>
          <table:table-cell table:style-name="ce1" table:formula="of:=[.H309]+ h*[.F310]" office:value-type="float" office:value="145.622292186279" calcext:value-type="float">
            <text:p>145,6222921862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0]" office:value-type="float" office:value="3.07999999999998" calcext:value-type="float">
            <text:p>3,07999999999998</text:p>
          </table:table-cell>
          <table:table-cell table:style-name="ce1" table:formula="of:=[.H310]" office:value-type="float" office:value="145.622292186279" calcext:value-type="float">
            <text:p>145,622292186279</text:p>
          </table:table-cell>
          <table:table-cell table:style-name="ce1" table:formula="of:=-68 - ([.E311]^2/Ao)" office:value-type="float" office:value="-89.205851981586" calcext:value-type="float">
            <text:p>-89,205851981586</text:p>
          </table:table-cell>
          <table:table-cell table:style-name="ce1" table:formula="of:=[.G310]+h" office:value-type="float" office:value="3.08999999999998" calcext:value-type="float">
            <text:p>3,08999999999998</text:p>
          </table:table-cell>
          <table:table-cell table:style-name="ce1" table:formula="of:=[.H310]+ h*[.F311]" office:value-type="float" office:value="144.730233666463" calcext:value-type="float">
            <text:p>144,7302336664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1]" office:value-type="float" office:value="3.08999999999998" calcext:value-type="float">
            <text:p>3,08999999999998</text:p>
          </table:table-cell>
          <table:table-cell table:style-name="ce1" table:formula="of:=[.H311]" office:value-type="float" office:value="144.730233666463" calcext:value-type="float">
            <text:p>144,730233666463</text:p>
          </table:table-cell>
          <table:table-cell table:style-name="ce1" table:formula="of:=-68 - ([.E312]^2/Ao)" office:value-type="float" office:value="-88.946840537149" calcext:value-type="float">
            <text:p>-88,946840537149</text:p>
          </table:table-cell>
          <table:table-cell table:style-name="ce1" table:formula="of:=[.G311]+h" office:value-type="float" office:value="3.09999999999998" calcext:value-type="float">
            <text:p>3,09999999999998</text:p>
          </table:table-cell>
          <table:table-cell table:style-name="ce1" table:formula="of:=[.H311]+ h*[.F312]" office:value-type="float" office:value="143.840765261091" calcext:value-type="float">
            <text:p>143,8407652610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2]" office:value-type="float" office:value="3.09999999999998" calcext:value-type="float">
            <text:p>3,09999999999998</text:p>
          </table:table-cell>
          <table:table-cell table:style-name="ce1" table:formula="of:=[.H312]" office:value-type="float" office:value="143.840765261091" calcext:value-type="float">
            <text:p>143,840765261091</text:p>
          </table:table-cell>
          <table:table-cell table:style-name="ce1" table:formula="of:=-68 - ([.E313]^2/Ao)" office:value-type="float" office:value="-88.6901657508964" calcext:value-type="float">
            <text:p>-88,6901657508964</text:p>
          </table:table-cell>
          <table:table-cell table:style-name="ce1" table:formula="of:=[.G312]+h" office:value-type="float" office:value="3.10999999999998" calcext:value-type="float">
            <text:p>3,10999999999998</text:p>
          </table:table-cell>
          <table:table-cell table:style-name="ce1" table:formula="of:=[.H312]+ h*[.F313]" office:value-type="float" office:value="142.953863603582" calcext:value-type="float">
            <text:p>142,9538636035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3]" office:value-type="float" office:value="3.10999999999998" calcext:value-type="float">
            <text:p>3,10999999999998</text:p>
          </table:table-cell>
          <table:table-cell table:style-name="ce1" table:formula="of:=[.H313]" office:value-type="float" office:value="142.953863603582" calcext:value-type="float">
            <text:p>142,953863603582</text:p>
          </table:table-cell>
          <table:table-cell table:style-name="ce1" table:formula="of:=-68 - ([.E314]^2/Ao)" office:value-type="float" office:value="-88.4358071191917" calcext:value-type="float">
            <text:p>-88,4358071191917</text:p>
          </table:table-cell>
          <table:table-cell table:style-name="ce1" table:formula="of:=[.G313]+h" office:value-type="float" office:value="3.11999999999998" calcext:value-type="float">
            <text:p>3,11999999999998</text:p>
          </table:table-cell>
          <table:table-cell table:style-name="ce1" table:formula="of:=[.H313]+ h*[.F314]" office:value-type="float" office:value="142.069505532391" calcext:value-type="float">
            <text:p>142,0695055323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4]" office:value-type="float" office:value="3.11999999999998" calcext:value-type="float">
            <text:p>3,11999999999998</text:p>
          </table:table-cell>
          <table:table-cell table:style-name="ce1" table:formula="of:=[.H314]" office:value-type="float" office:value="142.069505532391" calcext:value-type="float">
            <text:p>142,069505532391</text:p>
          </table:table-cell>
          <table:table-cell table:style-name="ce1" table:formula="of:=-68 - ([.E315]^2/Ao)" office:value-type="float" office:value="-88.183744402218" calcext:value-type="float">
            <text:p>-88,183744402218</text:p>
          </table:table-cell>
          <table:table-cell table:style-name="ce1" table:formula="of:=[.G314]+h" office:value-type="float" office:value="3.12999999999998" calcext:value-type="float">
            <text:p>3,12999999999998</text:p>
          </table:table-cell>
          <table:table-cell table:style-name="ce1" table:formula="of:=[.H314]+ h*[.F315]" office:value-type="float" office:value="141.187668088368" calcext:value-type="float">
            <text:p>141,1876680883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5]" office:value-type="float" office:value="3.12999999999998" calcext:value-type="float">
            <text:p>3,12999999999998</text:p>
          </table:table-cell>
          <table:table-cell table:style-name="ce1" table:formula="of:=[.H315]" office:value-type="float" office:value="141.187668088368" calcext:value-type="float">
            <text:p>141,187668088368</text:p>
          </table:table-cell>
          <table:table-cell table:style-name="ce1" table:formula="of:=-68 - ([.E316]^2/Ao)" office:value-type="float" office:value="-87.9339576202313" calcext:value-type="float">
            <text:p>-87,9339576202313</text:p>
          </table:table-cell>
          <table:table-cell table:style-name="ce1" table:formula="of:=[.G315]+h" office:value-type="float" office:value="3.13999999999998" calcext:value-type="float">
            <text:p>3,13999999999998</text:p>
          </table:table-cell>
          <table:table-cell table:style-name="ce1" table:formula="of:=[.H315]+ h*[.F316]" office:value-type="float" office:value="140.308328512166" calcext:value-type="float">
            <text:p>140,3083285121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6]" office:value-type="float" office:value="3.13999999999998" calcext:value-type="float">
            <text:p>3,13999999999998</text:p>
          </table:table-cell>
          <table:table-cell table:style-name="ce1" table:formula="of:=[.H316]" office:value-type="float" office:value="140.308328512166" calcext:value-type="float">
            <text:p>140,308328512166</text:p>
          </table:table-cell>
          <table:table-cell table:style-name="ce1" table:formula="of:=-68 - ([.E317]^2/Ao)" office:value-type="float" office:value="-87.6864270498779" calcext:value-type="float">
            <text:p>-87,6864270498779</text:p>
          </table:table-cell>
          <table:table-cell table:style-name="ce1" table:formula="of:=[.G316]+h" office:value-type="float" office:value="3.14999999999998" calcext:value-type="float">
            <text:p>3,14999999999998</text:p>
          </table:table-cell>
          <table:table-cell table:style-name="ce1" table:formula="of:=[.H316]+ h*[.F317]" office:value-type="float" office:value="139.431464241667" calcext:value-type="float">
            <text:p>139,4314642416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7]" office:value-type="float" office:value="3.14999999999998" calcext:value-type="float">
            <text:p>3,14999999999998</text:p>
          </table:table-cell>
          <table:table-cell table:style-name="ce1" table:formula="of:=[.H317]" office:value-type="float" office:value="139.431464241667" calcext:value-type="float">
            <text:p>139,431464241667</text:p>
          </table:table-cell>
          <table:table-cell table:style-name="ce1" table:formula="of:=-68 - ([.E318]^2/Ao)" office:value-type="float" office:value="-87.4411332205754" calcext:value-type="float">
            <text:p>-87,4411332205754</text:p>
          </table:table-cell>
          <table:table-cell table:style-name="ce1" table:formula="of:=[.G317]+h" office:value-type="float" office:value="3.15999999999998" calcext:value-type="float">
            <text:p>3,15999999999998</text:p>
          </table:table-cell>
          <table:table-cell table:style-name="ce1" table:formula="of:=[.H317]+ h*[.F318]" office:value-type="float" office:value="138.557052909462" calcext:value-type="float">
            <text:p>138,5570529094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8]" office:value-type="float" office:value="3.15999999999998" calcext:value-type="float">
            <text:p>3,15999999999998</text:p>
          </table:table-cell>
          <table:table-cell table:style-name="ce1" table:formula="of:=[.H318]" office:value-type="float" office:value="138.557052909462" calcext:value-type="float">
            <text:p>138,557052909462</text:p>
          </table:table-cell>
          <table:table-cell table:style-name="ce1" table:formula="of:=-68 - ([.E319]^2/Ao)" office:value-type="float" office:value="-87.1980569109553" calcext:value-type="float">
            <text:p>-87,1980569109553</text:p>
          </table:table-cell>
          <table:table-cell table:style-name="ce1" table:formula="of:=[.G318]+h" office:value-type="float" office:value="3.16999999999998" calcext:value-type="float">
            <text:p>3,16999999999998</text:p>
          </table:table-cell>
          <table:table-cell table:style-name="ce1" table:formula="of:=[.H318]+ h*[.F319]" office:value-type="float" office:value="137.685072340352" calcext:value-type="float">
            <text:p>137,6850723403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9]" office:value-type="float" office:value="3.16999999999998" calcext:value-type="float">
            <text:p>3,16999999999998</text:p>
          </table:table-cell>
          <table:table-cell table:style-name="ce1" table:formula="of:=[.H319]" office:value-type="float" office:value="137.685072340352" calcext:value-type="float">
            <text:p>137,685072340352</text:p>
          </table:table-cell>
          <table:table-cell table:style-name="ce1" table:formula="of:=-68 - ([.E320]^2/Ao)" office:value-type="float" office:value="-86.957179145368" calcext:value-type="float">
            <text:p>-86,957179145368</text:p>
          </table:table-cell>
          <table:table-cell table:style-name="ce1" table:formula="of:=[.G319]+h" office:value-type="float" office:value="3.17999999999998" calcext:value-type="float">
            <text:p>3,17999999999998</text:p>
          </table:table-cell>
          <table:table-cell table:style-name="ce1" table:formula="of:=[.H319]+ h*[.F320]" office:value-type="float" office:value="136.815500548898" calcext:value-type="float">
            <text:p>136,8155005488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0]" office:value-type="float" office:value="3.17999999999998" calcext:value-type="float">
            <text:p>3,17999999999998</text:p>
          </table:table-cell>
          <table:table-cell table:style-name="ce1" table:formula="of:=[.H320]" office:value-type="float" office:value="136.815500548898" calcext:value-type="float">
            <text:p>136,815500548898</text:p>
          </table:table-cell>
          <table:table-cell table:style-name="ce1" table:formula="of:=-68 - ([.E321]^2/Ao)" office:value-type="float" office:value="-86.7184811904456" calcext:value-type="float">
            <text:p>-86,7184811904456</text:p>
          </table:table-cell>
          <table:table-cell table:style-name="ce1" table:formula="of:=[.G320]+h" office:value-type="float" office:value="3.18999999999998" calcext:value-type="float">
            <text:p>3,18999999999998</text:p>
          </table:table-cell>
          <table:table-cell table:style-name="ce1" table:formula="of:=[.H320]+ h*[.F321]" office:value-type="float" office:value="135.948315736994" calcext:value-type="float">
            <text:p>135,9483157369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1]" office:value-type="float" office:value="3.18999999999998" calcext:value-type="float">
            <text:p>3,18999999999998</text:p>
          </table:table-cell>
          <table:table-cell table:style-name="ce1" table:formula="of:=[.H321]" office:value-type="float" office:value="135.948315736994" calcext:value-type="float">
            <text:p>135,948315736994</text:p>
          </table:table-cell>
          <table:table-cell table:style-name="ce1" table:formula="of:=-68 - ([.E322]^2/Ao)" office:value-type="float" office:value="-86.4819445517254" calcext:value-type="float">
            <text:p>-86,4819445517254</text:p>
          </table:table-cell>
          <table:table-cell table:style-name="ce1" table:formula="of:=[.G321]+h" office:value-type="float" office:value="3.19999999999998" calcext:value-type="float">
            <text:p>3,19999999999998</text:p>
          </table:table-cell>
          <table:table-cell table:style-name="ce1" table:formula="of:=[.H321]+ h*[.F322]" office:value-type="float" office:value="135.083496291477" calcext:value-type="float">
            <text:p>135,0834962914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2]" office:value-type="float" office:value="3.19999999999998" calcext:value-type="float">
            <text:p>3,19999999999998</text:p>
          </table:table-cell>
          <table:table-cell table:style-name="ce1" table:formula="of:=[.H322]" office:value-type="float" office:value="135.083496291477" calcext:value-type="float">
            <text:p>135,083496291477</text:p>
          </table:table-cell>
          <table:table-cell table:style-name="ce1" table:formula="of:=-68 - ([.E323]^2/Ao)" office:value-type="float" office:value="-86.2475509703294" calcext:value-type="float">
            <text:p>-86,2475509703294</text:p>
          </table:table-cell>
          <table:table-cell table:style-name="ce1" table:formula="of:=[.G322]+h" office:value-type="float" office:value="3.20999999999998" calcext:value-type="float">
            <text:p>3,20999999999998</text:p>
          </table:table-cell>
          <table:table-cell table:style-name="ce1" table:formula="of:=[.H322]+ h*[.F323]" office:value-type="float" office:value="134.221020781773" calcext:value-type="float">
            <text:p>134,2210207817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3]" office:value-type="float" office:value="3.20999999999998" calcext:value-type="float">
            <text:p>3,20999999999998</text:p>
          </table:table-cell>
          <table:table-cell table:style-name="ce1" table:formula="of:=[.H323]" office:value-type="float" office:value="134.221020781773" calcext:value-type="float">
            <text:p>134,221020781773</text:p>
          </table:table-cell>
          <table:table-cell table:style-name="ce1" table:formula="of:=-68 - ([.E324]^2/Ao)" office:value-type="float" office:value="-86.0152824197012" calcext:value-type="float">
            <text:p>-86,0152824197012</text:p>
          </table:table-cell>
          <table:table-cell table:style-name="ce1" table:formula="of:=[.G323]+h" office:value-type="float" office:value="3.21999999999998" calcext:value-type="float">
            <text:p>3,21999999999998</text:p>
          </table:table-cell>
          <table:table-cell table:style-name="ce1" table:formula="of:=[.H323]+ h*[.F324]" office:value-type="float" office:value="133.360867957576" calcext:value-type="float">
            <text:p>133,3608679575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4]" office:value-type="float" office:value="3.21999999999998" calcext:value-type="float">
            <text:p>3,21999999999998</text:p>
          </table:table-cell>
          <table:table-cell table:style-name="ce1" table:formula="of:=[.H324]" office:value-type="float" office:value="133.360867957576" calcext:value-type="float">
            <text:p>133,360867957576</text:p>
          </table:table-cell>
          <table:table-cell table:style-name="ce1" table:formula="of:=-68 - ([.E325]^2/Ao)" office:value-type="float" office:value="-85.7851211023981" calcext:value-type="float">
            <text:p>-85,7851211023981</text:p>
          </table:table-cell>
          <table:table-cell table:style-name="ce1" table:formula="of:=[.G324]+h" office:value-type="float" office:value="3.22999999999998" calcext:value-type="float">
            <text:p>3,22999999999998</text:p>
          </table:table-cell>
          <table:table-cell table:style-name="ce1" table:formula="of:=[.H324]+ h*[.F325]" office:value-type="float" office:value="132.503016746552" calcext:value-type="float">
            <text:p>132,5030167465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5]" office:value-type="float" office:value="3.22999999999998" calcext:value-type="float">
            <text:p>3,22999999999998</text:p>
          </table:table-cell>
          <table:table-cell table:style-name="ce1" table:formula="of:=[.H325]" office:value-type="float" office:value="132.503016746552" calcext:value-type="float">
            <text:p>132,503016746552</text:p>
          </table:table-cell>
          <table:table-cell table:style-name="ce1" table:formula="of:=-68 - ([.E326]^2/Ao)" office:value-type="float" office:value="-85.5570494469371" calcext:value-type="float">
            <text:p>-85,5570494469371</text:p>
          </table:table-cell>
          <table:table-cell table:style-name="ce1" table:formula="of:=[.G325]+h" office:value-type="float" office:value="3.23999999999998" calcext:value-type="float">
            <text:p>3,23999999999998</text:p>
          </table:table-cell>
          <table:table-cell table:style-name="ce1" table:formula="of:=[.H325]+ h*[.F326]" office:value-type="float" office:value="131.647446252083" calcext:value-type="float">
            <text:p>131,6474462520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6]" office:value-type="float" office:value="3.23999999999998" calcext:value-type="float">
            <text:p>3,23999999999998</text:p>
          </table:table-cell>
          <table:table-cell table:style-name="ce1" table:formula="of:=[.H326]" office:value-type="float" office:value="131.647446252083" calcext:value-type="float">
            <text:p>131,647446252083</text:p>
          </table:table-cell>
          <table:table-cell table:style-name="ce1" table:formula="of:=-68 - ([.E327]^2/Ao)" office:value-type="float" office:value="-85.3310501046951" calcext:value-type="float">
            <text:p>-85,3310501046951</text:p>
          </table:table-cell>
          <table:table-cell table:style-name="ce1" table:formula="of:=[.G326]+h" office:value-type="float" office:value="3.24999999999997" calcext:value-type="float">
            <text:p>3,24999999999997</text:p>
          </table:table-cell>
          <table:table-cell table:style-name="ce1" table:formula="of:=[.H326]+ h*[.F327]" office:value-type="float" office:value="130.794135751036" calcext:value-type="float">
            <text:p>130,7941357510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7]" office:value-type="float" office:value="3.24999999999997" calcext:value-type="float">
            <text:p>3,24999999999997</text:p>
          </table:table-cell>
          <table:table-cell table:style-name="ce1" table:formula="of:=[.H327]" office:value-type="float" office:value="130.794135751036" calcext:value-type="float">
            <text:p>130,794135751036</text:p>
          </table:table-cell>
          <table:table-cell table:style-name="ce1" table:formula="of:=-68 - ([.E328]^2/Ao)" office:value-type="float" office:value="-85.1071059468604" calcext:value-type="float">
            <text:p>-85,1071059468604</text:p>
          </table:table-cell>
          <table:table-cell table:style-name="ce1" table:formula="of:=[.G327]+h" office:value-type="float" office:value="3.25999999999997" calcext:value-type="float">
            <text:p>3,25999999999997</text:p>
          </table:table-cell>
          <table:table-cell table:style-name="ce1" table:formula="of:=[.H327]+ h*[.F328]" office:value-type="float" office:value="129.943064691567" calcext:value-type="float">
            <text:p>129,9430646915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8]" office:value-type="float" office:value="3.25999999999997" calcext:value-type="float">
            <text:p>3,25999999999997</text:p>
          </table:table-cell>
          <table:table-cell table:style-name="ce1" table:formula="of:=[.H328]" office:value-type="float" office:value="129.943064691567" calcext:value-type="float">
            <text:p>129,943064691567</text:p>
          </table:table-cell>
          <table:table-cell table:style-name="ce1" table:formula="of:=-68 - ([.E329]^2/Ao)" office:value-type="float" office:value="-84.8852000614369" calcext:value-type="float">
            <text:p>-84,8852000614369</text:p>
          </table:table-cell>
          <table:table-cell table:style-name="ce1" table:formula="of:=[.G328]+h" office:value-type="float" office:value="3.26999999999997" calcext:value-type="float">
            <text:p>3,26999999999997</text:p>
          </table:table-cell>
          <table:table-cell table:style-name="ce1" table:formula="of:=[.H328]+ h*[.F329]" office:value-type="float" office:value="129.094212690953" calcext:value-type="float">
            <text:p>129,094212690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9]" office:value-type="float" office:value="3.26999999999997" calcext:value-type="float">
            <text:p>3,26999999999997</text:p>
          </table:table-cell>
          <table:table-cell table:style-name="ce1" table:formula="of:=[.H329]" office:value-type="float" office:value="129.094212690953" calcext:value-type="float">
            <text:p>129,094212690953</text:p>
          </table:table-cell>
          <table:table-cell table:style-name="ce1" table:formula="of:=-68 - ([.E330]^2/Ao)" office:value-type="float" office:value="-84.665315750297" calcext:value-type="float">
            <text:p>-84,665315750297</text:p>
          </table:table-cell>
          <table:table-cell table:style-name="ce1" table:formula="of:=[.G329]+h" office:value-type="float" office:value="3.27999999999997" calcext:value-type="float">
            <text:p>3,27999999999997</text:p>
          </table:table-cell>
          <table:table-cell table:style-name="ce1" table:formula="of:=[.H329]+ h*[.F330]" office:value-type="float" office:value="128.24755953345" calcext:value-type="float">
            <text:p>128,247559533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0]" office:value-type="float" office:value="3.27999999999997" calcext:value-type="float">
            <text:p>3,27999999999997</text:p>
          </table:table-cell>
          <table:table-cell table:style-name="ce1" table:formula="of:=[.H330]" office:value-type="float" office:value="128.24755953345" calcext:value-type="float">
            <text:p>128,24755953345</text:p>
          </table:table-cell>
          <table:table-cell table:style-name="ce1" table:formula="of:=-68 - ([.E331]^2/Ao)" office:value-type="float" office:value="-84.4474365262858" calcext:value-type="float">
            <text:p>-84,4474365262858</text:p>
          </table:table-cell>
          <table:table-cell table:style-name="ce1" table:formula="of:=[.G330]+h" office:value-type="float" office:value="3.28999999999997" calcext:value-type="float">
            <text:p>3,28999999999997</text:p>
          </table:table-cell>
          <table:table-cell table:style-name="ce1" table:formula="of:=[.H330]+ h*[.F331]" office:value-type="float" office:value="127.403085168187" calcext:value-type="float">
            <text:p>127,4030851681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1]" office:value-type="float" office:value="3.28999999999997" calcext:value-type="float">
            <text:p>3,28999999999997</text:p>
          </table:table-cell>
          <table:table-cell table:style-name="ce1" table:formula="of:=[.H331]" office:value-type="float" office:value="127.403085168187" calcext:value-type="float">
            <text:p>127,403085168187</text:p>
          </table:table-cell>
          <table:table-cell table:style-name="ce1" table:formula="of:=-68 - ([.E332]^2/Ao)" office:value-type="float" office:value="-84.2315461103724" calcext:value-type="float">
            <text:p>-84,2315461103724</text:p>
          </table:table-cell>
          <table:table-cell table:style-name="ce1" table:formula="of:=[.G331]+h" office:value-type="float" office:value="3.29999999999997" calcext:value-type="float">
            <text:p>3,29999999999997</text:p>
          </table:table-cell>
          <table:table-cell table:style-name="ce1" table:formula="of:=[.H331]+ h*[.F332]" office:value-type="float" office:value="126.560769707084" calcext:value-type="float">
            <text:p>126,5607697070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2]" office:value-type="float" office:value="3.29999999999997" calcext:value-type="float">
            <text:p>3,29999999999997</text:p>
          </table:table-cell>
          <table:table-cell table:style-name="ce1" table:formula="of:=[.H332]" office:value-type="float" office:value="126.560769707084" calcext:value-type="float">
            <text:p>126,560769707084</text:p>
          </table:table-cell>
          <table:table-cell table:style-name="ce1" table:formula="of:=-68 - ([.E333]^2/Ao)" office:value-type="float" office:value="-84.0176284288494" calcext:value-type="float">
            <text:p>-84,0176284288494</text:p>
          </table:table-cell>
          <table:table-cell table:style-name="ce1" table:formula="of:=[.G332]+h" office:value-type="float" office:value="3.30999999999997" calcext:value-type="float">
            <text:p>3,30999999999997</text:p>
          </table:table-cell>
          <table:table-cell table:style-name="ce1" table:formula="of:=[.H332]+ h*[.F333]" office:value-type="float" office:value="125.720593422795" calcext:value-type="float">
            <text:p>125,7205934227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3]" office:value-type="float" office:value="3.30999999999997" calcext:value-type="float">
            <text:p>3,30999999999997</text:p>
          </table:table-cell>
          <table:table-cell table:style-name="ce1" table:formula="of:=[.H333]" office:value-type="float" office:value="125.720593422795" calcext:value-type="float">
            <text:p>125,720593422795</text:p>
          </table:table-cell>
          <table:table-cell table:style-name="ce1" table:formula="of:=-68 - ([.E334]^2/Ao)" office:value-type="float" office:value="-83.8056676105797" calcext:value-type="float">
            <text:p>-83,8056676105797</text:p>
          </table:table-cell>
          <table:table-cell table:style-name="ce1" table:formula="of:=[.G333]+h" office:value-type="float" office:value="3.31999999999997" calcext:value-type="float">
            <text:p>3,31999999999997</text:p>
          </table:table-cell>
          <table:table-cell table:style-name="ce1" table:formula="of:=[.H333]+ h*[.F334]" office:value-type="float" office:value="124.882536746689" calcext:value-type="float">
            <text:p>124,8825367466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4]" office:value-type="float" office:value="3.31999999999997" calcext:value-type="float">
            <text:p>3,31999999999997</text:p>
          </table:table-cell>
          <table:table-cell table:style-name="ce1" table:formula="of:=[.H334]" office:value-type="float" office:value="124.882536746689" calcext:value-type="float">
            <text:p>124,882536746689</text:p>
          </table:table-cell>
          <table:table-cell table:style-name="ce1" table:formula="of:=-68 - ([.E335]^2/Ao)" office:value-type="float" office:value="-83.5956479842882" calcext:value-type="float">
            <text:p>-83,5956479842882</text:p>
          </table:table-cell>
          <table:table-cell table:style-name="ce1" table:formula="of:=[.G334]+h" office:value-type="float" office:value="3.32999999999997" calcext:value-type="float">
            <text:p>3,32999999999997</text:p>
          </table:table-cell>
          <table:table-cell table:style-name="ce1" table:formula="of:=[.H334]+ h*[.F335]" office:value-type="float" office:value="124.046580266846" calcext:value-type="float">
            <text:p>124,0465802668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5]" office:value-type="float" office:value="3.32999999999997" calcext:value-type="float">
            <text:p>3,32999999999997</text:p>
          </table:table-cell>
          <table:table-cell table:style-name="ce1" table:formula="of:=[.H335]" office:value-type="float" office:value="124.046580266846" calcext:value-type="float">
            <text:p>124,046580266846</text:p>
          </table:table-cell>
          <table:table-cell table:style-name="ce1" table:formula="of:=-68 - ([.E336]^2/Ao)" office:value-type="float" office:value="-83.3875540758992" calcext:value-type="float">
            <text:p>-83,3875540758992</text:p>
          </table:table-cell>
          <table:table-cell table:style-name="ce1" table:formula="of:=[.G335]+h" office:value-type="float" office:value="3.33999999999997" calcext:value-type="float">
            <text:p>3,33999999999997</text:p>
          </table:table-cell>
          <table:table-cell table:style-name="ce1" table:formula="of:=[.H335]+ h*[.F336]" office:value-type="float" office:value="123.212704726087" calcext:value-type="float">
            <text:p>123,2127047260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6]" office:value-type="float" office:value="3.33999999999997" calcext:value-type="float">
            <text:p>3,33999999999997</text:p>
          </table:table-cell>
          <table:table-cell table:style-name="ce1" table:formula="of:=[.H336]" office:value-type="float" office:value="123.212704726087" calcext:value-type="float">
            <text:p>123,212704726087</text:p>
          </table:table-cell>
          <table:table-cell table:style-name="ce1" table:formula="of:=-68 - ([.E337]^2/Ao)" office:value-type="float" office:value="-83.181370605918" calcext:value-type="float">
            <text:p>-83,181370605918</text:p>
          </table:table-cell>
          <table:table-cell table:style-name="ce1" table:formula="of:=[.G336]+h" office:value-type="float" office:value="3.34999999999997" calcext:value-type="float">
            <text:p>3,34999999999997</text:p>
          </table:table-cell>
          <table:table-cell table:style-name="ce1" table:formula="of:=[.H336]+ h*[.F337]" office:value-type="float" office:value="122.380891020028" calcext:value-type="float">
            <text:p>122,3808910200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7]" office:value-type="float" office:value="3.34999999999997" calcext:value-type="float">
            <text:p>3,34999999999997</text:p>
          </table:table-cell>
          <table:table-cell table:style-name="ce1" table:formula="of:=[.H337]" office:value-type="float" office:value="122.380891020028" calcext:value-type="float">
            <text:p>122,380891020028</text:p>
          </table:table-cell>
          <table:table-cell table:style-name="ce1" table:formula="of:=-68 - ([.E338]^2/Ao)" office:value-type="float" office:value="-82.977082486856" calcext:value-type="float">
            <text:p>-82,977082486856</text:p>
          </table:table-cell>
          <table:table-cell table:style-name="ce1" table:formula="of:=[.G337]+h" office:value-type="float" office:value="3.35999999999997" calcext:value-type="float">
            <text:p>3,35999999999997</text:p>
          </table:table-cell>
          <table:table-cell table:style-name="ce1" table:formula="of:=[.H337]+ h*[.F338]" office:value-type="float" office:value="121.55112019516" calcext:value-type="float">
            <text:p>121,551120195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8]" office:value-type="float" office:value="3.35999999999997" calcext:value-type="float">
            <text:p>3,35999999999997</text:p>
          </table:table-cell>
          <table:table-cell table:style-name="ce1" table:formula="of:=[.H338]" office:value-type="float" office:value="121.55112019516" calcext:value-type="float">
            <text:p>121,55112019516</text:p>
          </table:table-cell>
          <table:table-cell table:style-name="ce1" table:formula="of:=-68 - ([.E339]^2/Ao)" office:value-type="float" office:value="-82.7746748206981" calcext:value-type="float">
            <text:p>-82,7746748206981</text:p>
          </table:table-cell>
          <table:table-cell table:style-name="ce1" table:formula="of:=[.G338]+h" office:value-type="float" office:value="3.36999999999997" calcext:value-type="float">
            <text:p>3,36999999999997</text:p>
          </table:table-cell>
          <table:table-cell table:style-name="ce1" table:formula="of:=[.H338]+ h*[.F339]" office:value-type="float" office:value="120.723373446953" calcext:value-type="float">
            <text:p>120,723373446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9]" office:value-type="float" office:value="3.36999999999997" calcext:value-type="float">
            <text:p>3,36999999999997</text:p>
          </table:table-cell>
          <table:table-cell table:style-name="ce1" table:formula="of:=[.H339]" office:value-type="float" office:value="120.723373446953" calcext:value-type="float">
            <text:p>120,723373446953</text:p>
          </table:table-cell>
          <table:table-cell table:style-name="ce1" table:formula="of:=-68 - ([.E340]^2/Ao)" office:value-type="float" office:value="-82.5741328964124" calcext:value-type="float">
            <text:p>-82,5741328964124</text:p>
          </table:table-cell>
          <table:table-cell table:style-name="ce1" table:formula="of:=[.G339]+h" office:value-type="float" office:value="3.37999999999997" calcext:value-type="float">
            <text:p>3,37999999999997</text:p>
          </table:table-cell>
          <table:table-cell table:style-name="ce1" table:formula="of:=[.H339]+ h*[.F340]" office:value-type="float" office:value="119.897632117989" calcext:value-type="float">
            <text:p>119,8976321179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0]" office:value-type="float" office:value="3.37999999999997" calcext:value-type="float">
            <text:p>3,37999999999997</text:p>
          </table:table-cell>
          <table:table-cell table:style-name="ce1" table:formula="of:=[.H340]" office:value-type="float" office:value="119.897632117989" calcext:value-type="float">
            <text:p>119,897632117989</text:p>
          </table:table-cell>
          <table:table-cell table:style-name="ce1" table:formula="of:=-68 - ([.E341]^2/Ao)" office:value-type="float" office:value="-82.3754421875005" calcext:value-type="float">
            <text:p>-82,3754421875005</text:p>
          </table:table-cell>
          <table:table-cell table:style-name="ce1" table:formula="of:=[.G340]+h" office:value-type="float" office:value="3.38999999999997" calcext:value-type="float">
            <text:p>3,38999999999997</text:p>
          </table:table-cell>
          <table:table-cell table:style-name="ce1" table:formula="of:=[.H340]+ h*[.F341]" office:value-type="float" office:value="119.073877696113" calcext:value-type="float">
            <text:p>119,0738776961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1]" office:value-type="float" office:value="3.38999999999997" calcext:value-type="float">
            <text:p>3,38999999999997</text:p>
          </table:table-cell>
          <table:table-cell table:style-name="ce1" table:formula="of:=[.H341]" office:value-type="float" office:value="119.073877696113" calcext:value-type="float">
            <text:p>119,073877696113</text:p>
          </table:table-cell>
          <table:table-cell table:style-name="ce1" table:formula="of:=-68 - ([.E342]^2/Ao)" office:value-type="float" office:value="-82.178588349589" calcext:value-type="float">
            <text:p>-82,178588349589</text:p>
          </table:table-cell>
          <table:table-cell table:style-name="ce1" table:formula="of:=[.G341]+h" office:value-type="float" office:value="3.39999999999997" calcext:value-type="float">
            <text:p>3,39999999999997</text:p>
          </table:table-cell>
          <table:table-cell table:style-name="ce1" table:formula="of:=[.H341]+ h*[.F342]" office:value-type="float" office:value="118.252091812618" calcext:value-type="float">
            <text:p>118,2520918126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2]" office:value-type="float" office:value="3.39999999999997" calcext:value-type="float">
            <text:p>3,39999999999997</text:p>
          </table:table-cell>
          <table:table-cell table:style-name="ce1" table:formula="of:=[.H342]" office:value-type="float" office:value="118.252091812618" calcext:value-type="float">
            <text:p>118,252091812618</text:p>
          </table:table-cell>
          <table:table-cell table:style-name="ce1" table:formula="of:=-68 - ([.E343]^2/Ao)" office:value-type="float" office:value="-81.9835572180597" calcext:value-type="float">
            <text:p>-81,9835572180597</text:p>
          </table:table-cell>
          <table:table-cell table:style-name="ce1" table:formula="of:=[.G342]+h" office:value-type="float" office:value="3.40999999999997" calcext:value-type="float">
            <text:p>3,40999999999997</text:p>
          </table:table-cell>
          <table:table-cell table:style-name="ce1" table:formula="of:=[.H342]+ h*[.F343]" office:value-type="float" office:value="117.432256240437" calcext:value-type="float">
            <text:p>117,4322562404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3]" office:value-type="float" office:value="3.40999999999997" calcext:value-type="float">
            <text:p>3,40999999999997</text:p>
          </table:table-cell>
          <table:table-cell table:style-name="ce1" table:formula="of:=[.H343]" office:value-type="float" office:value="117.432256240437" calcext:value-type="float">
            <text:p>117,432256240437</text:p>
          </table:table-cell>
          <table:table-cell table:style-name="ce1" table:formula="of:=-68 - ([.E344]^2/Ao)" office:value-type="float" office:value="-81.7903348057197" calcext:value-type="float">
            <text:p>-81,7903348057197</text:p>
          </table:table-cell>
          <table:table-cell table:style-name="ce1" table:formula="of:=[.G343]+h" office:value-type="float" office:value="3.41999999999997" calcext:value-type="float">
            <text:p>3,41999999999997</text:p>
          </table:table-cell>
          <table:table-cell table:style-name="ce1" table:formula="of:=[.H343]+ h*[.F344]" office:value-type="float" office:value="116.61435289238" calcext:value-type="float">
            <text:p>116,614352892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4]" office:value-type="float" office:value="3.41999999999997" calcext:value-type="float">
            <text:p>3,41999999999997</text:p>
          </table:table-cell>
          <table:table-cell table:style-name="ce1" table:formula="of:=[.H344]" office:value-type="float" office:value="116.61435289238" calcext:value-type="float">
            <text:p>116,61435289238</text:p>
          </table:table-cell>
          <table:table-cell table:style-name="ce1" table:formula="of:=-68 - ([.E345]^2/Ao)" office:value-type="float" office:value="-81.5989073005085" calcext:value-type="float">
            <text:p>-81,5989073005085</text:p>
          </table:table-cell>
          <table:table-cell table:style-name="ce1" table:formula="of:=[.G344]+h" office:value-type="float" office:value="3.42999999999997" calcext:value-type="float">
            <text:p>3,42999999999997</text:p>
          </table:table-cell>
          <table:table-cell table:style-name="ce1" table:formula="of:=[.H344]+ h*[.F345]" office:value-type="float" office:value="115.798363819375" calcext:value-type="float">
            <text:p>115,7983638193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5]" office:value-type="float" office:value="3.42999999999997" calcext:value-type="float">
            <text:p>3,42999999999997</text:p>
          </table:table-cell>
          <table:table-cell table:style-name="ce1" table:formula="of:=[.H345]" office:value-type="float" office:value="115.798363819375" calcext:value-type="float">
            <text:p>115,798363819375</text:p>
          </table:table-cell>
          <table:table-cell table:style-name="ce1" table:formula="of:=-68 - ([.E346]^2/Ao)" office:value-type="float" office:value="-81.4092610632443" calcext:value-type="float">
            <text:p>-81,4092610632443</text:p>
          </table:table-cell>
          <table:table-cell table:style-name="ce1" table:formula="of:=[.G345]+h" office:value-type="float" office:value="3.43999999999997" calcext:value-type="float">
            <text:p>3,43999999999997</text:p>
          </table:table-cell>
          <table:table-cell table:style-name="ce1" table:formula="of:=[.H345]+ h*[.F346]" office:value-type="float" office:value="114.984271208742" calcext:value-type="float">
            <text:p>114,9842712087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6]" office:value-type="float" office:value="3.43999999999997" calcext:value-type="float">
            <text:p>3,43999999999997</text:p>
          </table:table-cell>
          <table:table-cell table:style-name="ce1" table:formula="of:=[.H346]" office:value-type="float" office:value="114.984271208742" calcext:value-type="float">
            <text:p>114,984271208742</text:p>
          </table:table-cell>
          <table:table-cell table:style-name="ce1" table:formula="of:=-68 - ([.E347]^2/Ao)" office:value-type="float" office:value="-81.2213826254056" calcext:value-type="float">
            <text:p>-81,2213826254056</text:p>
          </table:table-cell>
          <table:table-cell table:style-name="ce1" table:formula="of:=[.G346]+h" office:value-type="float" office:value="3.44999999999997" calcext:value-type="float">
            <text:p>3,44999999999997</text:p>
          </table:table-cell>
          <table:table-cell table:style-name="ce1" table:formula="of:=[.H346]+ h*[.F347]" office:value-type="float" office:value="114.172057382488" calcext:value-type="float">
            <text:p>114,1720573824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7]" office:value-type="float" office:value="3.44999999999997" calcext:value-type="float">
            <text:p>3,44999999999997</text:p>
          </table:table-cell>
          <table:table-cell table:style-name="ce1" table:formula="of:=[.H347]" office:value-type="float" office:value="114.172057382488" calcext:value-type="float">
            <text:p>114,172057382488</text:p>
          </table:table-cell>
          <table:table-cell table:style-name="ce1" table:formula="of:=-68 - ([.E348]^2/Ao)" office:value-type="float" office:value="-81.0352586869502" calcext:value-type="float">
            <text:p>-81,0352586869502</text:p>
          </table:table-cell>
          <table:table-cell table:style-name="ce1" table:formula="of:=[.G347]+h" office:value-type="float" office:value="3.45999999999997" calcext:value-type="float">
            <text:p>3,45999999999997</text:p>
          </table:table-cell>
          <table:table-cell table:style-name="ce1" table:formula="of:=[.H347]+ h*[.F348]" office:value-type="float" office:value="113.361704795619" calcext:value-type="float">
            <text:p>113,3617047956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8]" office:value-type="float" office:value="3.45999999999997" calcext:value-type="float">
            <text:p>3,45999999999997</text:p>
          </table:table-cell>
          <table:table-cell table:style-name="ce1" table:formula="of:=[.H348]" office:value-type="float" office:value="113.361704795619" calcext:value-type="float">
            <text:p>113,361704795619</text:p>
          </table:table-cell>
          <table:table-cell table:style-name="ce1" table:formula="of:=-68 - ([.E349]^2/Ao)" office:value-type="float" office:value="-80.850876114169" calcext:value-type="float">
            <text:p>-80,850876114169</text:p>
          </table:table-cell>
          <table:table-cell table:style-name="ce1" table:formula="of:=[.G348]+h" office:value-type="float" office:value="3.46999999999997" calcext:value-type="float">
            <text:p>3,46999999999997</text:p>
          </table:table-cell>
          <table:table-cell table:style-name="ce1" table:formula="of:=[.H348]+ h*[.F349]" office:value-type="float" office:value="112.553196034477" calcext:value-type="float">
            <text:p>112,5531960344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9]" office:value-type="float" office:value="3.46999999999997" calcext:value-type="float">
            <text:p>3,46999999999997</text:p>
          </table:table-cell>
          <table:table-cell table:style-name="ce1" table:formula="of:=[.H349]" office:value-type="float" office:value="112.553196034477" calcext:value-type="float">
            <text:p>112,553196034477</text:p>
          </table:table-cell>
          <table:table-cell table:style-name="ce1" table:formula="of:=-68 - ([.E350]^2/Ao)" office:value-type="float" office:value="-80.6682219375754" calcext:value-type="float">
            <text:p>-80,6682219375754</text:p>
          </table:table-cell>
          <table:table-cell table:style-name="ce1" table:formula="of:=[.G349]+h" office:value-type="float" office:value="3.47999999999997" calcext:value-type="float">
            <text:p>3,47999999999997</text:p>
          </table:table-cell>
          <table:table-cell table:style-name="ce1" table:formula="of:=[.H349]+ h*[.F350]" office:value-type="float" office:value="111.746513815101" calcext:value-type="float">
            <text:p>111,7465138151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0]" office:value-type="float" office:value="3.47999999999997" calcext:value-type="float">
            <text:p>3,47999999999997</text:p>
          </table:table-cell>
          <table:table-cell table:style-name="ce1" table:formula="of:=[.H350]" office:value-type="float" office:value="111.746513815101" calcext:value-type="float">
            <text:p>111,746513815101</text:p>
          </table:table-cell>
          <table:table-cell table:style-name="ce1" table:formula="of:=-68 - ([.E351]^2/Ao)" office:value-type="float" office:value="-80.4872833498286" calcext:value-type="float">
            <text:p>-80,4872833498286</text:p>
          </table:table-cell>
          <table:table-cell table:style-name="ce1" table:formula="of:=[.G350]+h" office:value-type="float" office:value="3.48999999999997" calcext:value-type="float">
            <text:p>3,48999999999997</text:p>
          </table:table-cell>
          <table:table-cell table:style-name="ce1" table:formula="of:=[.H350]+ h*[.F351]" office:value-type="float" office:value="110.941640981603" calcext:value-type="float">
            <text:p>110,9416409816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1]" office:value-type="float" office:value="3.48999999999997" calcext:value-type="float">
            <text:p>3,48999999999997</text:p>
          </table:table-cell>
          <table:table-cell table:style-name="ce1" table:formula="of:=[.H351]" office:value-type="float" office:value="110.941640981603" calcext:value-type="float">
            <text:p>110,941640981603</text:p>
          </table:table-cell>
          <table:table-cell table:style-name="ce1" table:formula="of:=-68 - ([.E352]^2/Ao)" office:value-type="float" office:value="-80.3080477036909" calcext:value-type="float">
            <text:p>-80,3080477036909</text:p>
          </table:table-cell>
          <table:table-cell table:style-name="ce1" table:formula="of:=[.G351]+h" office:value-type="float" office:value="3.49999999999997" calcext:value-type="float">
            <text:p>3,49999999999997</text:p>
          </table:table-cell>
          <table:table-cell table:style-name="ce1" table:formula="of:=[.H351]+ h*[.F352]" office:value-type="float" office:value="110.138560504566" calcext:value-type="float">
            <text:p>110,1385605045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2]" office:value-type="float" office:value="3.49999999999997" calcext:value-type="float">
            <text:p>3,49999999999997</text:p>
          </table:table-cell>
          <table:table-cell table:style-name="ce1" table:formula="of:=[.H352]" office:value-type="float" office:value="110.138560504566" calcext:value-type="float">
            <text:p>110,138560504566</text:p>
          </table:table-cell>
          <table:table-cell table:style-name="ce1" table:formula="of:=-68 - ([.E353]^2/Ao)" office:value-type="float" office:value="-80.130502510018" calcext:value-type="float">
            <text:p>-80,130502510018</text:p>
          </table:table-cell>
          <table:table-cell table:style-name="ce1" table:formula="of:=[.G352]+h" office:value-type="float" office:value="3.50999999999997" calcext:value-type="float">
            <text:p>3,50999999999997</text:p>
          </table:table-cell>
          <table:table-cell table:style-name="ce1" table:formula="of:=[.H352]+ h*[.F353]" office:value-type="float" office:value="109.337255479466" calcext:value-type="float">
            <text:p>109,3372554794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3]" office:value-type="float" office:value="3.50999999999997" calcext:value-type="float">
            <text:p>3,50999999999997</text:p>
          </table:table-cell>
          <table:table-cell table:style-name="ce1" table:formula="of:=[.H353]" office:value-type="float" office:value="109.337255479466" calcext:value-type="float">
            <text:p>109,337255479466</text:p>
          </table:table-cell>
          <table:table-cell table:style-name="ce1" table:formula="of:=-68 - ([.E354]^2/Ao)" office:value-type="float" office:value="-79.954635435782" calcext:value-type="float">
            <text:p>-79,954635435782</text:p>
          </table:table-cell>
          <table:table-cell table:style-name="ce1" table:formula="of:=[.G353]+h" office:value-type="float" office:value="3.51999999999997" calcext:value-type="float">
            <text:p>3,51999999999997</text:p>
          </table:table-cell>
          <table:table-cell table:style-name="ce1" table:formula="of:=[.H353]+ h*[.F354]" office:value-type="float" office:value="108.537709125108" calcext:value-type="float">
            <text:p>108,5377091251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4]" office:value-type="float" office:value="3.51999999999997" calcext:value-type="float">
            <text:p>3,51999999999997</text:p>
          </table:table-cell>
          <table:table-cell table:style-name="ce1" table:formula="of:=[.H354]" office:value-type="float" office:value="108.537709125108" calcext:value-type="float">
            <text:p>108,537709125108</text:p>
          </table:table-cell>
          <table:table-cell table:style-name="ce1" table:formula="of:=-68 - ([.E355]^2/Ao)" office:value-type="float" office:value="-79.7804343021266" calcext:value-type="float">
            <text:p>-79,7804343021266</text:p>
          </table:table-cell>
          <table:table-cell table:style-name="ce1" table:formula="of:=[.G354]+h" office:value-type="float" office:value="3.52999999999997" calcext:value-type="float">
            <text:p>3,52999999999997</text:p>
          </table:table-cell>
          <table:table-cell table:style-name="ce1" table:formula="of:=[.H354]+ h*[.F355]" office:value-type="float" office:value="107.739904782087" calcext:value-type="float">
            <text:p>107,7399047820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5]" office:value-type="float" office:value="3.52999999999997" calcext:value-type="float">
            <text:p>3,52999999999997</text:p>
          </table:table-cell>
          <table:table-cell table:style-name="ce1" table:formula="of:=[.H355]" office:value-type="float" office:value="107.739904782087" calcext:value-type="float">
            <text:p>107,739904782087</text:p>
          </table:table-cell>
          <table:table-cell table:style-name="ce1" table:formula="of:=-68 - ([.E356]^2/Ao)" office:value-type="float" office:value="-79.6078870824531" calcext:value-type="float">
            <text:p>-79,6078870824531</text:p>
          </table:table-cell>
          <table:table-cell table:style-name="ce1" table:formula="of:=[.G355]+h" office:value-type="float" office:value="3.53999999999997" calcext:value-type="float">
            <text:p>3,53999999999997</text:p>
          </table:table-cell>
          <table:table-cell table:style-name="ce1" table:formula="of:=[.H355]+ h*[.F356]" office:value-type="float" office:value="106.943825911262" calcext:value-type="float">
            <text:p>106,9438259112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6]" office:value-type="float" office:value="3.53999999999997" calcext:value-type="float">
            <text:p>3,53999999999997</text:p>
          </table:table-cell>
          <table:table-cell table:style-name="ce1" table:formula="of:=[.H356]" office:value-type="float" office:value="106.943825911262" calcext:value-type="float">
            <text:p>106,943825911262</text:p>
          </table:table-cell>
          <table:table-cell table:style-name="ce1" table:formula="of:=-68 - ([.E357]^2/Ao)" office:value-type="float" office:value="-79.4369819005384" calcext:value-type="float">
            <text:p>-79,4369819005384</text:p>
          </table:table-cell>
          <table:table-cell table:style-name="ce1" table:formula="of:=[.G356]+h" office:value-type="float" office:value="3.54999999999997" calcext:value-type="float">
            <text:p>3,54999999999997</text:p>
          </table:table-cell>
          <table:table-cell table:style-name="ce1" table:formula="of:=[.H356]+ h*[.F357]" office:value-type="float" office:value="106.149456092257" calcext:value-type="float">
            <text:p>106,1494560922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7]" office:value-type="float" office:value="3.54999999999997" calcext:value-type="float">
            <text:p>3,54999999999997</text:p>
          </table:table-cell>
          <table:table-cell table:style-name="ce1" table:formula="of:=[.H357]" office:value-type="float" office:value="106.149456092257" calcext:value-type="float">
            <text:p>106,149456092257</text:p>
          </table:table-cell>
          <table:table-cell table:style-name="ce1" table:formula="of:=-68 - ([.E358]^2/Ao)" office:value-type="float" office:value="-79.267707028682" calcext:value-type="float">
            <text:p>-79,267707028682</text:p>
          </table:table-cell>
          <table:table-cell table:style-name="ce1" table:formula="of:=[.G357]+h" office:value-type="float" office:value="3.55999999999997" calcext:value-type="float">
            <text:p>3,55999999999997</text:p>
          </table:table-cell>
          <table:table-cell table:style-name="ce1" table:formula="of:=[.H357]+ h*[.F358]" office:value-type="float" office:value="105.35677902197" calcext:value-type="float">
            <text:p>105,356779021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8]" office:value-type="float" office:value="3.55999999999997" calcext:value-type="float">
            <text:p>3,55999999999997</text:p>
          </table:table-cell>
          <table:table-cell table:style-name="ce1" table:formula="of:=[.H358]" office:value-type="float" office:value="105.35677902197" calcext:value-type="float">
            <text:p>105,35677902197</text:p>
          </table:table-cell>
          <table:table-cell table:style-name="ce1" table:formula="of:=-68 - ([.E359]^2/Ao)" office:value-type="float" office:value="-79.1000508858842" calcext:value-type="float">
            <text:p>-79,1000508858842</text:p>
          </table:table-cell>
          <table:table-cell table:style-name="ce1" table:formula="of:=[.G358]+h" office:value-type="float" office:value="3.56999999999997" calcext:value-type="float">
            <text:p>3,56999999999997</text:p>
          </table:table-cell>
          <table:table-cell table:style-name="ce1" table:formula="of:=[.H358]+ h*[.F359]" office:value-type="float" office:value="104.565778513111" calcext:value-type="float">
            <text:p>104,5657785131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9]" office:value-type="float" office:value="3.56999999999997" calcext:value-type="float">
            <text:p>3,56999999999997</text:p>
          </table:table-cell>
          <table:table-cell table:style-name="ce1" table:formula="of:=[.H359]" office:value-type="float" office:value="104.565778513111" calcext:value-type="float">
            <text:p>104,565778513111</text:p>
          </table:table-cell>
          <table:table-cell table:style-name="ce1" table:formula="of:=-68 - ([.E360]^2/Ao)" office:value-type="float" office:value="-78.934002036053" calcext:value-type="float">
            <text:p>-78,934002036053</text:p>
          </table:table-cell>
          <table:table-cell table:style-name="ce1" table:formula="of:=[.G359]+h" office:value-type="float" office:value="3.57999999999997" calcext:value-type="float">
            <text:p>3,57999999999997</text:p>
          </table:table-cell>
          <table:table-cell table:style-name="ce1" table:formula="of:=[.H359]+ h*[.F360]" office:value-type="float" office:value="103.776438492751" calcext:value-type="float">
            <text:p>103,7764384927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0]" office:value-type="float" office:value="3.57999999999997" calcext:value-type="float">
            <text:p>3,57999999999997</text:p>
          </table:table-cell>
          <table:table-cell table:style-name="ce1" table:formula="of:=[.H360]" office:value-type="float" office:value="103.776438492751" calcext:value-type="float">
            <text:p>103,776438492751</text:p>
          </table:table-cell>
          <table:table-cell table:style-name="ce1" table:formula="of:=-68 - ([.E361]^2/Ao)" office:value-type="float" office:value="-78.7695491862397" calcext:value-type="float">
            <text:p>-78,7695491862397</text:p>
          </table:table-cell>
          <table:table-cell table:style-name="ce1" table:formula="of:=[.G360]+h" office:value-type="float" office:value="3.58999999999997" calcext:value-type="float">
            <text:p>3,58999999999997</text:p>
          </table:table-cell>
          <table:table-cell table:style-name="ce1" table:formula="of:=[.H360]+ h*[.F361]" office:value-type="float" office:value="102.988743000888" calcext:value-type="float">
            <text:p>102,9887430008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1]" office:value-type="float" office:value="3.58999999999997" calcext:value-type="float">
            <text:p>3,58999999999997</text:p>
          </table:table-cell>
          <table:table-cell table:style-name="ce1" table:formula="of:=[.H361]" office:value-type="float" office:value="102.988743000888" calcext:value-type="float">
            <text:p>102,988743000888</text:p>
          </table:table-cell>
          <table:table-cell table:style-name="ce1" table:formula="of:=-68 - ([.E362]^2/Ao)" office:value-type="float" office:value="-78.606681184903" calcext:value-type="float">
            <text:p>-78,606681184903</text:p>
          </table:table-cell>
          <table:table-cell table:style-name="ce1" table:formula="of:=[.G361]+h" office:value-type="float" office:value="3.59999999999997" calcext:value-type="float">
            <text:p>3,59999999999997</text:p>
          </table:table-cell>
          <table:table-cell table:style-name="ce1" table:formula="of:=[.H361]+ h*[.F362]" office:value-type="float" office:value="102.202676189039" calcext:value-type="float">
            <text:p>102,2026761890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2]" office:value-type="float" office:value="3.59999999999997" calcext:value-type="float">
            <text:p>3,59999999999997</text:p>
          </table:table-cell>
          <table:table-cell table:style-name="ce1" table:formula="of:=[.H362]" office:value-type="float" office:value="102.202676189039" calcext:value-type="float">
            <text:p>102,202676189039</text:p>
          </table:table-cell>
          <table:table-cell table:style-name="ce1" table:formula="of:=-68 - ([.E363]^2/Ao)" office:value-type="float" office:value="-78.4453870202016" calcext:value-type="float">
            <text:p>-78,4453870202016</text:p>
          </table:table-cell>
          <table:table-cell table:style-name="ce1" table:formula="of:=[.G362]+h" office:value-type="float" office:value="3.60999999999997" calcext:value-type="float">
            <text:p>3,60999999999997</text:p>
          </table:table-cell>
          <table:table-cell table:style-name="ce1" table:formula="of:=[.H362]+ h*[.F363]" office:value-type="float" office:value="101.418222318837" calcext:value-type="float">
            <text:p>101,4182223188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3]" office:value-type="float" office:value="3.60999999999997" calcext:value-type="float">
            <text:p>3,60999999999997</text:p>
          </table:table-cell>
          <table:table-cell table:style-name="ce1" table:formula="of:=[.H363]" office:value-type="float" office:value="101.418222318837" calcext:value-type="float">
            <text:p>101,418222318837</text:p>
          </table:table-cell>
          <table:table-cell table:style-name="ce1" table:formula="of:=-68 - ([.E364]^2/Ao)" office:value-type="float" office:value="-78.2856558183131" calcext:value-type="float">
            <text:p>-78,2856558183131</text:p>
          </table:table-cell>
          <table:table-cell table:style-name="ce1" table:formula="of:=[.G363]+h" office:value-type="float" office:value="3.61999999999997" calcext:value-type="float">
            <text:p>3,61999999999997</text:p>
          </table:table-cell>
          <table:table-cell table:style-name="ce1" table:formula="of:=[.H363]+ h*[.F364]" office:value-type="float" office:value="100.635365760654" calcext:value-type="float">
            <text:p>100,6353657606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4]" office:value-type="float" office:value="3.61999999999997" calcext:value-type="float">
            <text:p>3,61999999999997</text:p>
          </table:table-cell>
          <table:table-cell table:style-name="ce1" table:formula="of:=[.H364]" office:value-type="float" office:value="100.635365760654" calcext:value-type="float">
            <text:p>100,635365760654</text:p>
          </table:table-cell>
          <table:table-cell table:style-name="ce1" table:formula="of:=-68 - ([.E365]^2/Ao)" office:value-type="float" office:value="-78.1274768417807" calcext:value-type="float">
            <text:p>-78,1274768417807</text:p>
          </table:table-cell>
          <table:table-cell table:style-name="ce1" table:formula="of:=[.G364]+h" office:value-type="float" office:value="3.62999999999997" calcext:value-type="float">
            <text:p>3,62999999999997</text:p>
          </table:table-cell>
          <table:table-cell table:style-name="ce1" table:formula="of:=[.H364]+ h*[.F365]" office:value-type="float" office:value="99.8540909922364" calcext:value-type="float">
            <text:p>99,85409099223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5]" office:value-type="float" office:value="3.62999999999997" calcext:value-type="float">
            <text:p>3,62999999999997</text:p>
          </table:table-cell>
          <table:table-cell table:style-name="ce1" table:formula="of:=[.H365]" office:value-type="float" office:value="99.8540909922364" calcext:value-type="float">
            <text:p>99,8540909922364</text:p>
          </table:table-cell>
          <table:table-cell table:style-name="ce1" table:formula="of:=-68 - ([.E366]^2/Ao)" office:value-type="float" office:value="-77.9708394878858" calcext:value-type="float">
            <text:p>-77,9708394878858</text:p>
          </table:table-cell>
          <table:table-cell table:style-name="ce1" table:formula="of:=[.G365]+h" office:value-type="float" office:value="3.63999999999997" calcext:value-type="float">
            <text:p>3,63999999999997</text:p>
          </table:table-cell>
          <table:table-cell table:style-name="ce1" table:formula="of:=[.H365]+ h*[.F366]" office:value-type="float" office:value="99.0743825973575" calcext:value-type="float">
            <text:p>99,07438259735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6]" office:value-type="float" office:value="3.63999999999997" calcext:value-type="float">
            <text:p>3,63999999999997</text:p>
          </table:table-cell>
          <table:table-cell table:style-name="ce1" table:formula="of:=[.H366]" office:value-type="float" office:value="99.0743825973575" calcext:value-type="float">
            <text:p>99,0743825973575</text:p>
          </table:table-cell>
          <table:table-cell table:style-name="ce1" table:formula="of:=-68 - ([.E367]^2/Ao)" office:value-type="float" office:value="-77.8157332870476" calcext:value-type="float">
            <text:p>-77,8157332870476</text:p>
          </table:table-cell>
          <table:table-cell table:style-name="ce1" table:formula="of:=[.G366]+h" office:value-type="float" office:value="3.64999999999997" calcext:value-type="float">
            <text:p>3,64999999999997</text:p>
          </table:table-cell>
          <table:table-cell table:style-name="ce1" table:formula="of:=[.H366]+ h*[.F367]" office:value-type="float" office:value="98.296225264487" calcext:value-type="float">
            <text:p>98,2962252644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7]" office:value-type="float" office:value="3.64999999999997" calcext:value-type="float">
            <text:p>3,64999999999997</text:p>
          </table:table-cell>
          <table:table-cell table:style-name="ce1" table:formula="of:=[.H367]" office:value-type="float" office:value="98.296225264487" calcext:value-type="float">
            <text:p>98,296225264487</text:p>
          </table:table-cell>
          <table:table-cell table:style-name="ce1" table:formula="of:=-68 - ([.E368]^2/Ao)" office:value-type="float" office:value="-77.6621479012468" calcext:value-type="float">
            <text:p>-77,6621479012468</text:p>
          </table:table-cell>
          <table:table-cell table:style-name="ce1" table:formula="of:=[.G367]+h" office:value-type="float" office:value="3.65999999999997" calcext:value-type="float">
            <text:p>3,65999999999997</text:p>
          </table:table-cell>
          <table:table-cell table:style-name="ce1" table:formula="of:=[.H367]+ h*[.F368]" office:value-type="float" office:value="97.5196037854746" calcext:value-type="float">
            <text:p>97,51960378547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8]" office:value-type="float" office:value="3.65999999999997" calcext:value-type="float">
            <text:p>3,65999999999997</text:p>
          </table:table-cell>
          <table:table-cell table:style-name="ce1" table:formula="of:=[.H368]" office:value-type="float" office:value="97.5196037854746" calcext:value-type="float">
            <text:p>97,5196037854746</text:p>
          </table:table-cell>
          <table:table-cell table:style-name="ce1" table:formula="of:=-68 - ([.E369]^2/Ao)" office:value-type="float" office:value="-77.5100731224759" calcext:value-type="float">
            <text:p>-77,5100731224759</text:p>
          </table:table-cell>
          <table:table-cell table:style-name="ce1" table:formula="of:=[.G368]+h" office:value-type="float" office:value="3.66999999999997" calcext:value-type="float">
            <text:p>3,66999999999997</text:p>
          </table:table-cell>
          <table:table-cell table:style-name="ce1" table:formula="of:=[.H368]+ h*[.F369]" office:value-type="float" office:value="96.7445030542498" calcext:value-type="float">
            <text:p>96,74450305424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9]" office:value-type="float" office:value="3.66999999999997" calcext:value-type="float">
            <text:p>3,66999999999997</text:p>
          </table:table-cell>
          <table:table-cell table:style-name="ce1" table:formula="of:=[.H369]" office:value-type="float" office:value="96.7445030542498" calcext:value-type="float">
            <text:p>96,7445030542498</text:p>
          </table:table-cell>
          <table:table-cell table:style-name="ce1" table:formula="of:=-68 - ([.E370]^2/Ao)" office:value-type="float" office:value="-77.3594988712138" calcext:value-type="float">
            <text:p>-77,3594988712138</text:p>
          </table:table-cell>
          <table:table-cell table:style-name="ce1" table:formula="of:=[.G369]+h" office:value-type="float" office:value="3.67999999999997" calcext:value-type="float">
            <text:p>3,67999999999997</text:p>
          </table:table-cell>
          <table:table-cell table:style-name="ce1" table:formula="of:=[.H369]+ h*[.F370]" office:value-type="float" office:value="95.9709080655377" calcext:value-type="float">
            <text:p>95,97090806553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0]" office:value-type="float" office:value="3.67999999999997" calcext:value-type="float">
            <text:p>3,67999999999997</text:p>
          </table:table-cell>
          <table:table-cell table:style-name="ce1" table:formula="of:=[.H370]" office:value-type="float" office:value="95.9709080655377" calcext:value-type="float">
            <text:p>95,9709080655377</text:p>
          </table:table-cell>
          <table:table-cell table:style-name="ce1" table:formula="of:=-68 - ([.E371]^2/Ao)" office:value-type="float" office:value="-77.2104151949239" calcext:value-type="float">
            <text:p>-77,2104151949239</text:p>
          </table:table-cell>
          <table:table-cell table:style-name="ce1" table:formula="of:=[.G370]+h" office:value-type="float" office:value="3.68999999999997" calcext:value-type="float">
            <text:p>3,68999999999997</text:p>
          </table:table-cell>
          <table:table-cell table:style-name="ce1" table:formula="of:=[.H370]+ h*[.F371]" office:value-type="float" office:value="95.1988039135884" calcext:value-type="float">
            <text:p>95,19880391358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1]" office:value-type="float" office:value="3.68999999999997" calcext:value-type="float">
            <text:p>3,68999999999997</text:p>
          </table:table-cell>
          <table:table-cell table:style-name="ce1" table:formula="of:=[.H371]" office:value-type="float" office:value="95.1988039135884" calcext:value-type="float">
            <text:p>95,1988039135884</text:p>
          </table:table-cell>
          <table:table-cell table:style-name="ce1" table:formula="of:=-68 - ([.E372]^2/Ao)" office:value-type="float" office:value="-77.0628122665779" calcext:value-type="float">
            <text:p>-77,0628122665779</text:p>
          </table:table-cell>
          <table:table-cell table:style-name="ce1" table:formula="of:=[.G371]+h" office:value-type="float" office:value="3.69999999999997" calcext:value-type="float">
            <text:p>3,69999999999997</text:p>
          </table:table-cell>
          <table:table-cell table:style-name="ce1" table:formula="of:=[.H371]+ h*[.F372]" office:value-type="float" office:value="94.4281757909227" calcext:value-type="float">
            <text:p>94,42817579092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2]" office:value-type="float" office:value="3.69999999999997" calcext:value-type="float">
            <text:p>3,69999999999997</text:p>
          </table:table-cell>
          <table:table-cell table:style-name="ce1" table:formula="of:=[.H372]" office:value-type="float" office:value="94.4281757909227" calcext:value-type="float">
            <text:p>94,4281757909227</text:p>
          </table:table-cell>
          <table:table-cell table:style-name="ce1" table:formula="of:=-68 - ([.E373]^2/Ao)" office:value-type="float" office:value="-76.9166803832014" calcext:value-type="float">
            <text:p>-76,9166803832014</text:p>
          </table:table-cell>
          <table:table-cell table:style-name="ce1" table:formula="of:=[.G372]+h" office:value-type="float" office:value="3.70999999999997" calcext:value-type="float">
            <text:p>3,70999999999997</text:p>
          </table:table-cell>
          <table:table-cell table:style-name="ce1" table:formula="of:=[.H372]+ h*[.F373]" office:value-type="float" office:value="93.6590089870906" calcext:value-type="float">
            <text:p>93,65900898709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3]" office:value-type="float" office:value="3.70999999999997" calcext:value-type="float">
            <text:p>3,70999999999997</text:p>
          </table:table-cell>
          <table:table-cell table:style-name="ce1" table:formula="of:=[.H373]" office:value-type="float" office:value="93.6590089870906" calcext:value-type="float">
            <text:p>93,6590089870906</text:p>
          </table:table-cell>
          <table:table-cell table:style-name="ce1" table:formula="of:=-68 - ([.E374]^2/Ao)" office:value-type="float" office:value="-76.7720099644439" calcext:value-type="float">
            <text:p>-76,7720099644439</text:p>
          </table:table-cell>
          <table:table-cell table:style-name="ce1" table:formula="of:=[.G373]+h" office:value-type="float" office:value="3.71999999999996" calcext:value-type="float">
            <text:p>3,71999999999996</text:p>
          </table:table-cell>
          <table:table-cell table:style-name="ce1" table:formula="of:=[.H373]+ h*[.F374]" office:value-type="float" office:value="92.8912888874462" calcext:value-type="float">
            <text:p>92,89128888744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4]" office:value-type="float" office:value="3.71999999999996" calcext:value-type="float">
            <text:p>3,71999999999996</text:p>
          </table:table-cell>
          <table:table-cell table:style-name="ce1" table:formula="of:=[.H374]" office:value-type="float" office:value="92.8912888874462" calcext:value-type="float">
            <text:p>92,8912888874462</text:p>
          </table:table-cell>
          <table:table-cell table:style-name="ce1" table:formula="of:=-68 - ([.E375]^2/Ao)" office:value-type="float" office:value="-76.628791551171" calcext:value-type="float">
            <text:p>-76,628791551171</text:p>
          </table:table-cell>
          <table:table-cell table:style-name="ce1" table:formula="of:=[.G374]+h" office:value-type="float" office:value="3.72999999999996" calcext:value-type="float">
            <text:p>3,72999999999996</text:p>
          </table:table-cell>
          <table:table-cell table:style-name="ce1" table:formula="of:=[.H374]+ h*[.F375]" office:value-type="float" office:value="92.1250009719345" calcext:value-type="float">
            <text:p>92,12500097193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5]" office:value-type="float" office:value="3.72999999999996" calcext:value-type="float">
            <text:p>3,72999999999996</text:p>
          </table:table-cell>
          <table:table-cell table:style-name="ce1" table:formula="of:=[.H375]" office:value-type="float" office:value="92.1250009719345" calcext:value-type="float">
            <text:p>92,1250009719345</text:p>
          </table:table-cell>
          <table:table-cell table:style-name="ce1" table:formula="of:=-68 - ([.E376]^2/Ao)" office:value-type="float" office:value="-76.4870158040789" calcext:value-type="float">
            <text:p>-76,4870158040789</text:p>
          </table:table-cell>
          <table:table-cell table:style-name="ce1" table:formula="of:=[.G375]+h" office:value-type="float" office:value="3.73999999999996" calcext:value-type="float">
            <text:p>3,73999999999996</text:p>
          </table:table-cell>
          <table:table-cell table:style-name="ce1" table:formula="of:=[.H375]+ h*[.F376]" office:value-type="float" office:value="91.3601308138937" calcext:value-type="float">
            <text:p>91,36013081389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6]" office:value-type="float" office:value="3.73999999999996" calcext:value-type="float">
            <text:p>3,73999999999996</text:p>
          </table:table-cell>
          <table:table-cell table:style-name="ce1" table:formula="of:=[.H376]" office:value-type="float" office:value="91.3601308138937" calcext:value-type="float">
            <text:p>91,3601308138937</text:p>
          </table:table-cell>
          <table:table-cell table:style-name="ce1" table:formula="of:=-68 - ([.E377]^2/Ao)" office:value-type="float" office:value="-76.3466735023318" calcext:value-type="float">
            <text:p>-76,3466735023318</text:p>
          </table:table-cell>
          <table:table-cell table:style-name="ce1" table:formula="of:=[.G376]+h" office:value-type="float" office:value="3.74999999999996" calcext:value-type="float">
            <text:p>3,74999999999996</text:p>
          </table:table-cell>
          <table:table-cell table:style-name="ce1" table:formula="of:=[.H376]+ h*[.F377]" office:value-type="float" office:value="90.5966640788704" calcext:value-type="float">
            <text:p>90,59666407887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7]" office:value-type="float" office:value="3.74999999999996" calcext:value-type="float">
            <text:p>3,74999999999996</text:p>
          </table:table-cell>
          <table:table-cell table:style-name="ce1" table:formula="of:=[.H377]" office:value-type="float" office:value="90.5966640788704" calcext:value-type="float">
            <text:p>90,5966640788704</text:p>
          </table:table-cell>
          <table:table-cell table:style-name="ce1" table:formula="of:=-68 - ([.E378]^2/Ao)" office:value-type="float" office:value="-76.2077555422197" calcext:value-type="float">
            <text:p>-76,2077555422197</text:p>
          </table:table-cell>
          <table:table-cell table:style-name="ce1" table:formula="of:=[.G377]+h" office:value-type="float" office:value="3.75999999999996" calcext:value-type="float">
            <text:p>3,75999999999996</text:p>
          </table:table-cell>
          <table:table-cell table:style-name="ce1" table:formula="of:=[.H377]+ h*[.F378]" office:value-type="float" office:value="89.8345865234482" calcext:value-type="float">
            <text:p>89,83458652344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8]" office:value-type="float" office:value="3.75999999999996" calcext:value-type="float">
            <text:p>3,75999999999996</text:p>
          </table:table-cell>
          <table:table-cell table:style-name="ce1" table:formula="of:=[.H378]" office:value-type="float" office:value="89.8345865234482" calcext:value-type="float">
            <text:p>89,8345865234482</text:p>
          </table:table-cell>
          <table:table-cell table:style-name="ce1" table:formula="of:=-68 - ([.E379]^2/Ao)" office:value-type="float" office:value="-76.0702529358389" calcext:value-type="float">
            <text:p>-76,0702529358389</text:p>
          </table:table-cell>
          <table:table-cell table:style-name="ce1" table:formula="of:=[.G378]+h" office:value-type="float" office:value="3.76999999999996" calcext:value-type="float">
            <text:p>3,76999999999996</text:p>
          </table:table-cell>
          <table:table-cell table:style-name="ce1" table:formula="of:=[.H378]+ h*[.F379]" office:value-type="float" office:value="89.0738839940898" calcext:value-type="float">
            <text:p>89,07388399408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9]" office:value-type="float" office:value="3.76999999999996" calcext:value-type="float">
            <text:p>3,76999999999996</text:p>
          </table:table-cell>
          <table:table-cell table:style-name="ce1" table:formula="of:=[.H379]" office:value-type="float" office:value="89.0738839940898" calcext:value-type="float">
            <text:p>89,0738839940898</text:p>
          </table:table-cell>
          <table:table-cell table:style-name="ce1" table:formula="of:=-68 - ([.E380]^2/Ao)" office:value-type="float" office:value="-75.9341568097926" calcext:value-type="float">
            <text:p>-75,9341568097926</text:p>
          </table:table-cell>
          <table:table-cell table:style-name="ce1" table:formula="of:=[.G379]+h" office:value-type="float" office:value="3.77999999999996" calcext:value-type="float">
            <text:p>3,77999999999996</text:p>
          </table:table-cell>
          <table:table-cell table:style-name="ce1" table:formula="of:=[.H379]+ h*[.F380]" office:value-type="float" office:value="88.3145424259919" calcext:value-type="float">
            <text:p>88,31454242599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0]" office:value-type="float" office:value="3.77999999999996" calcext:value-type="float">
            <text:p>3,77999999999996</text:p>
          </table:table-cell>
          <table:table-cell table:style-name="ce1" table:formula="of:=[.H380]" office:value-type="float" office:value="88.3145424259919" calcext:value-type="float">
            <text:p>88,3145424259919</text:p>
          </table:table-cell>
          <table:table-cell table:style-name="ce1" table:formula="of:=-68 - ([.E381]^2/Ao)" office:value-type="float" office:value="-75.7994584039123" calcext:value-type="float">
            <text:p>-75,7994584039123</text:p>
          </table:table-cell>
          <table:table-cell table:style-name="ce1" table:formula="of:=[.G380]+h" office:value-type="float" office:value="3.78999999999996" calcext:value-type="float">
            <text:p>3,78999999999996</text:p>
          </table:table-cell>
          <table:table-cell table:style-name="ce1" table:formula="of:=[.H380]+ h*[.F381]" office:value-type="float" office:value="87.5565478419528" calcext:value-type="float">
            <text:p>87,55654784195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1]" office:value-type="float" office:value="3.78999999999996" calcext:value-type="float">
            <text:p>3,78999999999996</text:p>
          </table:table-cell>
          <table:table-cell table:style-name="ce1" table:formula="of:=[.H381]" office:value-type="float" office:value="87.5565478419528" calcext:value-type="float">
            <text:p>87,5565478419528</text:p>
          </table:table-cell>
          <table:table-cell table:style-name="ce1" table:formula="of:=-68 - ([.E382]^2/Ao)" office:value-type="float" office:value="-75.6661490700002" calcext:value-type="float">
            <text:p>-75,6661490700002</text:p>
          </table:table-cell>
          <table:table-cell table:style-name="ce1" table:formula="of:=[.G381]+h" office:value-type="float" office:value="3.79999999999996" calcext:value-type="float">
            <text:p>3,79999999999996</text:p>
          </table:table-cell>
          <table:table-cell table:style-name="ce1" table:formula="of:=[.H381]+ h*[.F382]" office:value-type="float" office:value="86.7998863512528" calcext:value-type="float">
            <text:p>86,79988635125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2]" office:value-type="float" office:value="3.79999999999996" calcext:value-type="float">
            <text:p>3,79999999999996</text:p>
          </table:table-cell>
          <table:table-cell table:style-name="ce1" table:formula="of:=[.H382]" office:value-type="float" office:value="86.7998863512528" calcext:value-type="float">
            <text:p>86,7998863512528</text:p>
          </table:table-cell>
          <table:table-cell table:style-name="ce1" table:formula="of:=-68 - ([.E383]^2/Ao)" office:value-type="float" office:value="-75.5342202705904" calcext:value-type="float">
            <text:p>-75,5342202705904</text:p>
          </table:table-cell>
          <table:table-cell table:style-name="ce1" table:formula="of:=[.G382]+h" office:value-type="float" office:value="3.80999999999996" calcext:value-type="float">
            <text:p>3,80999999999996</text:p>
          </table:table-cell>
          <table:table-cell table:style-name="ce1" table:formula="of:=[.H382]+ h*[.F383]" office:value-type="float" office:value="86.0445441485469" calcext:value-type="float">
            <text:p>86,04454414854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3]" office:value-type="float" office:value="3.80999999999996" calcext:value-type="float">
            <text:p>3,80999999999996</text:p>
          </table:table-cell>
          <table:table-cell table:style-name="ce1" table:formula="of:=[.H383]" office:value-type="float" office:value="86.0445441485469" calcext:value-type="float">
            <text:p>86,0445441485469</text:p>
          </table:table-cell>
          <table:table-cell table:style-name="ce1" table:formula="of:=-68 - ([.E384]^2/Ao)" office:value-type="float" office:value="-75.4036635777312" calcext:value-type="float">
            <text:p>-75,4036635777312</text:p>
          </table:table-cell>
          <table:table-cell table:style-name="ce1" table:formula="of:=[.G383]+h" office:value-type="float" office:value="3.81999999999996" calcext:value-type="float">
            <text:p>3,81999999999996</text:p>
          </table:table-cell>
          <table:table-cell table:style-name="ce1" table:formula="of:=[.H383]+ h*[.F384]" office:value-type="float" office:value="85.2905075127696" calcext:value-type="float">
            <text:p>85,29050751276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4]" office:value-type="float" office:value="3.81999999999996" calcext:value-type="float">
            <text:p>3,81999999999996</text:p>
          </table:table-cell>
          <table:table-cell table:style-name="ce1" table:formula="of:=[.H384]" office:value-type="float" office:value="85.2905075127696" calcext:value-type="float">
            <text:p>85,2905075127696</text:p>
          </table:table-cell>
          <table:table-cell table:style-name="ce1" table:formula="of:=-68 - ([.E385]^2/Ao)" office:value-type="float" office:value="-75.2744706717858" calcext:value-type="float">
            <text:p>-75,2744706717858</text:p>
          </table:table-cell>
          <table:table-cell table:style-name="ce1" table:formula="of:=[.G384]+h" office:value-type="float" office:value="3.82999999999996" calcext:value-type="float">
            <text:p>3,82999999999996</text:p>
          </table:table-cell>
          <table:table-cell table:style-name="ce1" table:formula="of:=[.H384]+ h*[.F385]" office:value-type="float" office:value="84.5377628060517" calcext:value-type="float">
            <text:p>84,53776280605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5]" office:value-type="float" office:value="3.82999999999996" calcext:value-type="float">
            <text:p>3,82999999999996</text:p>
          </table:table-cell>
          <table:table-cell table:style-name="ce1" table:formula="of:=[.H385]" office:value-type="float" office:value="84.5377628060517" calcext:value-type="float">
            <text:p>84,5377628060517</text:p>
          </table:table-cell>
          <table:table-cell table:style-name="ce1" table:formula="of:=-68 - ([.E386]^2/Ao)" office:value-type="float" office:value="-75.1466333402523" calcext:value-type="float">
            <text:p>-75,1466333402523</text:p>
          </table:table-cell>
          <table:table-cell table:style-name="ce1" table:formula="of:=[.G385]+h" office:value-type="float" office:value="3.83999999999996" calcext:value-type="float">
            <text:p>3,83999999999996</text:p>
          </table:table-cell>
          <table:table-cell table:style-name="ce1" table:formula="of:=[.H385]+ h*[.F386]" office:value-type="float" office:value="83.7862964726492" calcext:value-type="float">
            <text:p>83,78629647264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6]" office:value-type="float" office:value="3.83999999999996" calcext:value-type="float">
            <text:p>3,83999999999996</text:p>
          </table:table-cell>
          <table:table-cell table:style-name="ce1" table:formula="of:=[.H386]" office:value-type="float" office:value="83.7862964726492" calcext:value-type="float">
            <text:p>83,7862964726492</text:p>
          </table:table-cell>
          <table:table-cell table:style-name="ce1" table:formula="of:=-68 - ([.E387]^2/Ao)" office:value-type="float" office:value="-75.0201434766027" calcext:value-type="float">
            <text:p>-75,0201434766027</text:p>
          </table:table-cell>
          <table:table-cell table:style-name="ce1" table:formula="of:=[.G386]+h" office:value-type="float" office:value="3.84999999999996" calcext:value-type="float">
            <text:p>3,84999999999996</text:p>
          </table:table-cell>
          <table:table-cell table:style-name="ce1" table:formula="of:=[.H386]+ h*[.F387]" office:value-type="float" office:value="83.0360950378831" calcext:value-type="float">
            <text:p>83,03609503788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7]" office:value-type="float" office:value="3.84999999999996" calcext:value-type="float">
            <text:p>3,84999999999996</text:p>
          </table:table-cell>
          <table:table-cell table:style-name="ce1" table:formula="of:=[.H387]" office:value-type="float" office:value="83.0360950378831" calcext:value-type="float">
            <text:p>83,0360950378831</text:p>
          </table:table-cell>
          <table:table-cell table:style-name="ce1" table:formula="of:=-68 - ([.E388]^2/Ao)" office:value-type="float" office:value="-74.8949930791404" calcext:value-type="float">
            <text:p>-74,8949930791404</text:p>
          </table:table-cell>
          <table:table-cell table:style-name="ce1" table:formula="of:=[.G387]+h" office:value-type="float" office:value="3.85999999999996" calcext:value-type="float">
            <text:p>3,85999999999996</text:p>
          </table:table-cell>
          <table:table-cell table:style-name="ce1" table:formula="of:=[.H387]+ h*[.F388]" office:value-type="float" office:value="82.2871451070918" calcext:value-type="float">
            <text:p>82,28714510709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8]" office:value-type="float" office:value="3.85999999999996" calcext:value-type="float">
            <text:p>3,85999999999996</text:p>
          </table:table-cell>
          <table:table-cell table:style-name="ce1" table:formula="of:=[.H388]" office:value-type="float" office:value="82.2871451070918" calcext:value-type="float">
            <text:p>82,2871451070918</text:p>
          </table:table-cell>
          <table:table-cell table:style-name="ce1" table:formula="of:=-68 - ([.E389]^2/Ao)" office:value-type="float" office:value="-74.7711742498756" calcext:value-type="float">
            <text:p>-74,7711742498756</text:p>
          </table:table-cell>
          <table:table-cell table:style-name="ce1" table:formula="of:=[.G388]+h" office:value-type="float" office:value="3.86999999999996" calcext:value-type="float">
            <text:p>3,86999999999996</text:p>
          </table:table-cell>
          <table:table-cell table:style-name="ce1" table:formula="of:=[.H388]+ h*[.F389]" office:value-type="float" office:value="81.539433364593" calcext:value-type="float">
            <text:p>81,5394333645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9]" office:value-type="float" office:value="3.86999999999996" calcext:value-type="float">
            <text:p>3,86999999999996</text:p>
          </table:table-cell>
          <table:table-cell table:style-name="ce1" table:formula="of:=[.H389]" office:value-type="float" office:value="81.539433364593" calcext:value-type="float">
            <text:p>81,539433364593</text:p>
          </table:table-cell>
          <table:table-cell table:style-name="ce1" table:formula="of:=-68 - ([.E390]^2/Ao)" office:value-type="float" office:value="-74.6486791934189" calcext:value-type="float">
            <text:p>-74,6486791934189</text:p>
          </table:table-cell>
          <table:table-cell table:style-name="ce1" table:formula="of:=[.G389]+h" office:value-type="float" office:value="3.87999999999996" calcext:value-type="float">
            <text:p>3,87999999999996</text:p>
          </table:table-cell>
          <table:table-cell table:style-name="ce1" table:formula="of:=[.H389]+ h*[.F390]" office:value-type="float" office:value="80.7929465726588" calcext:value-type="float">
            <text:p>80,79294657265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0]" office:value-type="float" office:value="3.87999999999996" calcext:value-type="float">
            <text:p>3,87999999999996</text:p>
          </table:table-cell>
          <table:table-cell table:style-name="ce1" table:formula="of:=[.H390]" office:value-type="float" office:value="80.7929465726588" calcext:value-type="float">
            <text:p>80,7929465726588</text:p>
          </table:table-cell>
          <table:table-cell table:style-name="ce1" table:formula="of:=-68 - ([.E391]^2/Ao)" office:value-type="float" office:value="-74.5275002158925" calcext:value-type="float">
            <text:p>-74,5275002158925</text:p>
          </table:table-cell>
          <table:table-cell table:style-name="ce1" table:formula="of:=[.G390]+h" office:value-type="float" office:value="3.88999999999996" calcext:value-type="float">
            <text:p>3,88999999999996</text:p>
          </table:table-cell>
          <table:table-cell table:style-name="ce1" table:formula="of:=[.H390]+ h*[.F391]" office:value-type="float" office:value="80.0476715704999" calcext:value-type="float">
            <text:p>80,04767157049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1]" office:value-type="float" office:value="3.88999999999996" calcext:value-type="float">
            <text:p>3,88999999999996</text:p>
          </table:table-cell>
          <table:table-cell table:style-name="ce1" table:formula="of:=[.H391]" office:value-type="float" office:value="80.0476715704999" calcext:value-type="float">
            <text:p>80,0476715704999</text:p>
          </table:table-cell>
          <table:table-cell table:style-name="ce1" table:formula="of:=-68 - ([.E392]^2/Ao)" office:value-type="float" office:value="-74.4076297238586" calcext:value-type="float">
            <text:p>-74,4076297238586</text:p>
          </table:table-cell>
          <table:table-cell table:style-name="ce1" table:formula="of:=[.G391]+h" office:value-type="float" office:value="3.89999999999996" calcext:value-type="float">
            <text:p>3,89999999999996</text:p>
          </table:table-cell>
          <table:table-cell table:style-name="ce1" table:formula="of:=[.H391]+ h*[.F392]" office:value-type="float" office:value="79.3035952732613" calcext:value-type="float">
            <text:p>79,30359527326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2]" office:value-type="float" office:value="3.89999999999996" calcext:value-type="float">
            <text:p>3,89999999999996</text:p>
          </table:table-cell>
          <table:table-cell table:style-name="ce1" table:formula="of:=[.H392]" office:value-type="float" office:value="79.3035952732613" calcext:value-type="float">
            <text:p>79,3035952732613</text:p>
          </table:table-cell>
          <table:table-cell table:style-name="ce1" table:formula="of:=-68 - ([.E393]^2/Ao)" office:value-type="float" office:value="-74.2890602232652" calcext:value-type="float">
            <text:p>-74,2890602232652</text:p>
          </table:table-cell>
          <table:table-cell table:style-name="ce1" table:formula="of:=[.G392]+h" office:value-type="float" office:value="3.90999999999996" calcext:value-type="float">
            <text:p>3,90999999999996</text:p>
          </table:table-cell>
          <table:table-cell table:style-name="ce1" table:formula="of:=[.H392]+ h*[.F393]" office:value-type="float" office:value="78.5607046710287" calcext:value-type="float">
            <text:p>78,56070467102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3]" office:value-type="float" office:value="3.90999999999996" calcext:value-type="float">
            <text:p>3,90999999999996</text:p>
          </table:table-cell>
          <table:table-cell table:style-name="ce1" table:formula="of:=[.H393]" office:value-type="float" office:value="78.5607046710287" calcext:value-type="float">
            <text:p>78,5607046710287</text:p>
          </table:table-cell>
          <table:table-cell table:style-name="ce1" table:formula="of:=-68 - ([.E394]^2/Ao)" office:value-type="float" office:value="-74.1717843184086" calcext:value-type="float">
            <text:p>-74,1717843184086</text:p>
          </table:table-cell>
          <table:table-cell table:style-name="ce1" table:formula="of:=[.G393]+h" office:value-type="float" office:value="3.91999999999996" calcext:value-type="float">
            <text:p>3,91999999999996</text:p>
          </table:table-cell>
          <table:table-cell table:style-name="ce1" table:formula="of:=[.H393]+ h*[.F394]" office:value-type="float" office:value="77.8189868278446" calcext:value-type="float">
            <text:p>77,81898682784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4]" office:value-type="float" office:value="3.91999999999996" calcext:value-type="float">
            <text:p>3,91999999999996</text:p>
          </table:table-cell>
          <table:table-cell table:style-name="ce1" table:formula="of:=[.H394]" office:value-type="float" office:value="77.8189868278446" calcext:value-type="float">
            <text:p>77,8189868278446</text:p>
          </table:table-cell>
          <table:table-cell table:style-name="ce1" table:formula="of:=-68 - ([.E395]^2/Ao)" office:value-type="float" office:value="-74.0557947109122" calcext:value-type="float">
            <text:p>-74,0557947109122</text:p>
          </table:table-cell>
          <table:table-cell table:style-name="ce1" table:formula="of:=[.G394]+h" office:value-type="float" office:value="3.92999999999996" calcext:value-type="float">
            <text:p>3,92999999999996</text:p>
          </table:table-cell>
          <table:table-cell table:style-name="ce1" table:formula="of:=[.H394]+ h*[.F395]" office:value-type="float" office:value="77.0784288807354" calcext:value-type="float">
            <text:p>77,07842888073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5]" office:value-type="float" office:value="3.92999999999996" calcext:value-type="float">
            <text:p>3,92999999999996</text:p>
          </table:table-cell>
          <table:table-cell table:style-name="ce1" table:formula="of:=[.H395]" office:value-type="float" office:value="77.0784288807354" calcext:value-type="float">
            <text:p>77,0784288807354</text:p>
          </table:table-cell>
          <table:table-cell table:style-name="ce1" table:formula="of:=-68 - ([.E396]^2/Ao)" office:value-type="float" office:value="-73.9410841987226" calcext:value-type="float">
            <text:p>-73,9410841987226</text:p>
          </table:table-cell>
          <table:table-cell table:style-name="ce1" table:formula="of:=[.G395]+h" office:value-type="float" office:value="3.93999999999996" calcext:value-type="float">
            <text:p>3,93999999999996</text:p>
          </table:table-cell>
          <table:table-cell table:style-name="ce1" table:formula="of:=[.H395]+ h*[.F396]" office:value-type="float" office:value="76.3390180387482" calcext:value-type="float">
            <text:p>76,33901803874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6]" office:value-type="float" office:value="3.93999999999996" calcext:value-type="float">
            <text:p>3,93999999999996</text:p>
          </table:table-cell>
          <table:table-cell table:style-name="ce1" table:formula="of:=[.H396]" office:value-type="float" office:value="76.3390180387482" calcext:value-type="float">
            <text:p>76,3390180387482</text:p>
          </table:table-cell>
          <table:table-cell table:style-name="ce1" table:formula="of:=-68 - ([.E397]^2/Ao)" office:value-type="float" office:value="-73.8276456751203" calcext:value-type="float">
            <text:p>-73,8276456751203</text:p>
          </table:table-cell>
          <table:table-cell table:style-name="ce1" table:formula="of:=[.G396]+h" office:value-type="float" office:value="3.94999999999996" calcext:value-type="float">
            <text:p>3,94999999999996</text:p>
          </table:table-cell>
          <table:table-cell table:style-name="ce1" table:formula="of:=[.H396]+ h*[.F397]" office:value-type="float" office:value="75.600741581997" calcext:value-type="float">
            <text:p>75,6007415819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7]" office:value-type="float" office:value="3.94999999999996" calcext:value-type="float">
            <text:p>3,94999999999996</text:p>
          </table:table-cell>
          <table:table-cell table:style-name="ce1" table:formula="of:=[.H397]" office:value-type="float" office:value="75.600741581997" calcext:value-type="float">
            <text:p>75,600741581997</text:p>
          </table:table-cell>
          <table:table-cell table:style-name="ce1" table:formula="of:=-68 - ([.E398]^2/Ao)" office:value-type="float" office:value="-73.7154721277479" calcext:value-type="float">
            <text:p>-73,7154721277479</text:p>
          </table:table-cell>
          <table:table-cell table:style-name="ce1" table:formula="of:=[.G397]+h" office:value-type="float" office:value="3.95999999999996" calcext:value-type="float">
            <text:p>3,95999999999996</text:p>
          </table:table-cell>
          <table:table-cell table:style-name="ce1" table:formula="of:=[.H397]+ h*[.F398]" office:value-type="float" office:value="74.8635868607195" calcext:value-type="float">
            <text:p>74,86358686071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8]" office:value-type="float" office:value="3.95999999999996" calcext:value-type="float">
            <text:p>3,95999999999996</text:p>
          </table:table-cell>
          <table:table-cell table:style-name="ce1" table:formula="of:=[.H398]" office:value-type="float" office:value="74.8635868607195" calcext:value-type="float">
            <text:p>74,8635868607195</text:p>
          </table:table-cell>
          <table:table-cell table:style-name="ce1" table:formula="of:=-68 - ([.E399]^2/Ao)" office:value-type="float" office:value="-73.6045566376525" calcext:value-type="float">
            <text:p>-73,6045566376525</text:p>
          </table:table-cell>
          <table:table-cell table:style-name="ce1" table:formula="of:=[.G398]+h" office:value-type="float" office:value="3.96999999999996" calcext:value-type="float">
            <text:p>3,96999999999996</text:p>
          </table:table-cell>
          <table:table-cell table:style-name="ce1" table:formula="of:=[.H398]+ h*[.F399]" office:value-type="float" office:value="74.127541294343" calcext:value-type="float">
            <text:p>74,1275412943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9]" office:value-type="float" office:value="3.96999999999996" calcext:value-type="float">
            <text:p>3,96999999999996</text:p>
          </table:table-cell>
          <table:table-cell table:style-name="ce1" table:formula="of:=[.H399]" office:value-type="float" office:value="74.127541294343" calcext:value-type="float">
            <text:p>74,127541294343</text:p>
          </table:table-cell>
          <table:table-cell table:style-name="ce1" table:formula="of:=-68 - ([.E400]^2/Ao)" office:value-type="float" office:value="-73.4948923783445" calcext:value-type="float">
            <text:p>-73,4948923783445</text:p>
          </table:table-cell>
          <table:table-cell table:style-name="ce1" table:formula="of:=[.G399]+h" office:value-type="float" office:value="3.97999999999996" calcext:value-type="float">
            <text:p>3,97999999999996</text:p>
          </table:table-cell>
          <table:table-cell table:style-name="ce1" table:formula="of:=[.H399]+ h*[.F400]" office:value-type="float" office:value="73.3925923705596" calcext:value-type="float">
            <text:p>73,39259237055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0]" office:value-type="float" office:value="3.97999999999996" calcext:value-type="float">
            <text:p>3,97999999999996</text:p>
          </table:table-cell>
          <table:table-cell table:style-name="ce1" table:formula="of:=[.H400]" office:value-type="float" office:value="73.3925923705596" calcext:value-type="float">
            <text:p>73,3925923705596</text:p>
          </table:table-cell>
          <table:table-cell table:style-name="ce1" table:formula="of:=-68 - ([.E401]^2/Ao)" office:value-type="float" office:value="-73.3864726148711" calcext:value-type="float">
            <text:p>-73,3864726148711</text:p>
          </table:table-cell>
          <table:table-cell table:style-name="ce1" table:formula="of:=[.G400]+h" office:value-type="float" office:value="3.98999999999996" calcext:value-type="float">
            <text:p>3,98999999999996</text:p>
          </table:table-cell>
          <table:table-cell table:style-name="ce1" table:formula="of:=[.H400]+ h*[.F401]" office:value-type="float" office:value="72.6587276444109" calcext:value-type="float">
            <text:p>72,65872764441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1]" office:value-type="float" office:value="3.98999999999996" calcext:value-type="float">
            <text:p>3,98999999999996</text:p>
          </table:table-cell>
          <table:table-cell table:style-name="ce1" table:formula="of:=[.H401]" office:value-type="float" office:value="72.6587276444109" calcext:value-type="float">
            <text:p>72,6587276444109</text:p>
          </table:table-cell>
          <table:table-cell table:style-name="ce1" table:formula="of:=-68 - ([.E402]^2/Ao)" office:value-type="float" office:value="-73.2792907029047" calcext:value-type="float">
            <text:p>-73,2792907029047</text:p>
          </table:table-cell>
          <table:table-cell table:style-name="ce1" table:formula="of:=[.G401]+h" office:value-type="float" office:value="3.99999999999996" calcext:value-type="float">
            <text:p>3,99999999999996</text:p>
          </table:table-cell>
          <table:table-cell table:style-name="ce1" table:formula="of:=[.H401]+ h*[.F402]" office:value-type="float" office:value="71.9259347373818" calcext:value-type="float">
            <text:p>71,92593473738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2]" office:value-type="float" office:value="3.99999999999996" calcext:value-type="float">
            <text:p>3,99999999999996</text:p>
          </table:table-cell>
          <table:table-cell table:style-name="ce1" table:formula="of:=[.H402]" office:value-type="float" office:value="71.9259347373818" calcext:value-type="float">
            <text:p>71,9259347373818</text:p>
          </table:table-cell>
          <table:table-cell table:style-name="ce1" table:formula="of:=-68 - ([.E403]^2/Ao)" office:value-type="float" office:value="-73.1733400878461" calcext:value-type="float">
            <text:p>-73,1733400878461</text:p>
          </table:table-cell>
          <table:table-cell table:style-name="ce1" table:formula="of:=[.G402]+h" office:value-type="float" office:value="4.00999999999996" calcext:value-type="float">
            <text:p>4,00999999999996</text:p>
          </table:table-cell>
          <table:table-cell table:style-name="ce1" table:formula="of:=[.H402]+ h*[.F403]" office:value-type="float" office:value="71.1942013365033" calcext:value-type="float">
            <text:p>71,19420133650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3]" office:value-type="float" office:value="4.00999999999996" calcext:value-type="float">
            <text:p>4,00999999999996</text:p>
          </table:table-cell>
          <table:table-cell table:style-name="ce1" table:formula="of:=[.H403]" office:value-type="float" office:value="71.1942013365033" calcext:value-type="float">
            <text:p>71,1942013365033</text:p>
          </table:table-cell>
          <table:table-cell table:style-name="ce1" table:formula="of:=-68 - ([.E404]^2/Ao)" office:value-type="float" office:value="-73.0686143039426" calcext:value-type="float">
            <text:p>-73,0686143039426</text:p>
          </table:table-cell>
          <table:table-cell table:style-name="ce1" table:formula="of:=[.G403]+h" office:value-type="float" office:value="4.01999999999996" calcext:value-type="float">
            <text:p>4,01999999999996</text:p>
          </table:table-cell>
          <table:table-cell table:style-name="ce1" table:formula="of:=[.H403]+ h*[.F404]" office:value-type="float" office:value="70.4635151934639" calcext:value-type="float">
            <text:p>70,46351519346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4]" office:value-type="float" office:value="4.01999999999996" calcext:value-type="float">
            <text:p>4,01999999999996</text:p>
          </table:table-cell>
          <table:table-cell table:style-name="ce1" table:formula="of:=[.H404]" office:value-type="float" office:value="70.4635151934639" calcext:value-type="float">
            <text:p>70,4635151934639</text:p>
          </table:table-cell>
          <table:table-cell table:style-name="ce1" table:formula="of:=-68 - ([.E405]^2/Ao)" office:value-type="float" office:value="-72.9651069734195" calcext:value-type="float">
            <text:p>-72,9651069734195</text:p>
          </table:table-cell>
          <table:table-cell table:style-name="ce1" table:formula="of:=[.G404]+h" office:value-type="float" office:value="4.02999999999996" calcext:value-type="float">
            <text:p>4,02999999999996</text:p>
          </table:table-cell>
          <table:table-cell table:style-name="ce1" table:formula="of:=[.H404]+ h*[.F405]" office:value-type="float" office:value="69.7338641237297" calcext:value-type="float">
            <text:p>69,73386412372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5]" office:value-type="float" office:value="4.02999999999996" calcext:value-type="float">
            <text:p>4,02999999999996</text:p>
          </table:table-cell>
          <table:table-cell table:style-name="ce1" table:formula="of:=[.H405]" office:value-type="float" office:value="69.7338641237297" calcext:value-type="float">
            <text:p>69,7338641237297</text:p>
          </table:table-cell>
          <table:table-cell table:style-name="ce1" table:formula="of:=-68 - ([.E406]^2/Ao)" office:value-type="float" office:value="-72.8628118056268" calcext:value-type="float">
            <text:p>-72,8628118056268</text:p>
          </table:table-cell>
          <table:table-cell table:style-name="ce1" table:formula="of:=[.G405]+h" office:value-type="float" office:value="4.03999999999996" calcext:value-type="float">
            <text:p>4,03999999999996</text:p>
          </table:table-cell>
          <table:table-cell table:style-name="ce1" table:formula="of:=[.H405]+ h*[.F406]" office:value-type="float" office:value="69.0052360056735" calcext:value-type="float">
            <text:p>69,00523600567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6]" office:value-type="float" office:value="4.03999999999996" calcext:value-type="float">
            <text:p>4,03999999999996</text:p>
          </table:table-cell>
          <table:table-cell table:style-name="ce1" table:formula="of:=[.H406]" office:value-type="float" office:value="69.0052360056735" calcext:value-type="float">
            <text:p>69,0052360056735</text:p>
          </table:table-cell>
          <table:table-cell table:style-name="ce1" table:formula="of:=-68 - ([.E407]^2/Ao)" office:value-type="float" office:value="-72.7617225961987" calcext:value-type="float">
            <text:p>-72,7617225961987</text:p>
          </table:table-cell>
          <table:table-cell table:style-name="ce1" table:formula="of:=[.G406]+h" office:value-type="float" office:value="4.04999999999996" calcext:value-type="float">
            <text:p>4,04999999999996</text:p>
          </table:table-cell>
          <table:table-cell table:style-name="ce1" table:formula="of:=[.H406]+ h*[.F407]" office:value-type="float" office:value="68.2776187797115" calcext:value-type="float">
            <text:p>68,27761877971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7]" office:value-type="float" office:value="4.04999999999996" calcext:value-type="float">
            <text:p>4,04999999999996</text:p>
          </table:table-cell>
          <table:table-cell table:style-name="ce1" table:formula="of:=[.H407]" office:value-type="float" office:value="68.2776187797115" calcext:value-type="float">
            <text:p>68,2776187797115</text:p>
          </table:table-cell>
          <table:table-cell table:style-name="ce1" table:formula="of:=-68 - ([.E408]^2/Ao)" office:value-type="float" office:value="-72.6618332262276" calcext:value-type="float">
            <text:p>-72,6618332262276</text:p>
          </table:table-cell>
          <table:table-cell table:style-name="ce1" table:formula="of:=[.G407]+h" office:value-type="float" office:value="4.05999999999996" calcext:value-type="float">
            <text:p>4,05999999999996</text:p>
          </table:table-cell>
          <table:table-cell table:style-name="ce1" table:formula="of:=[.H407]+ h*[.F408]" office:value-type="float" office:value="67.5510004474492" calcext:value-type="float">
            <text:p>67,55100044744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8]" office:value-type="float" office:value="4.05999999999996" calcext:value-type="float">
            <text:p>4,05999999999996</text:p>
          </table:table-cell>
          <table:table-cell table:style-name="ce1" table:formula="of:=[.H408]" office:value-type="float" office:value="67.5510004474492" calcext:value-type="float">
            <text:p>67,5510004474492</text:p>
          </table:table-cell>
          <table:table-cell table:style-name="ce1" table:formula="of:=-68 - ([.E409]^2/Ao)" office:value-type="float" office:value="-72.5631376614513" calcext:value-type="float">
            <text:p>-72,5631376614513</text:p>
          </table:table-cell>
          <table:table-cell table:style-name="ce1" table:formula="of:=[.G408]+h" office:value-type="float" office:value="4.06999999999996" calcext:value-type="float">
            <text:p>4,06999999999996</text:p>
          </table:table-cell>
          <table:table-cell table:style-name="ce1" table:formula="of:=[.H408]+ h*[.F409]" office:value-type="float" office:value="66.8253690708347" calcext:value-type="float">
            <text:p>66,82536907083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9]" office:value-type="float" office:value="4.06999999999996" calcext:value-type="float">
            <text:p>4,06999999999996</text:p>
          </table:table-cell>
          <table:table-cell table:style-name="ce1" table:formula="of:=[.H409]" office:value-type="float" office:value="66.8253690708347" calcext:value-type="float">
            <text:p>66,8253690708347</text:p>
          </table:table-cell>
          <table:table-cell table:style-name="ce1" table:formula="of:=-68 - ([.E410]^2/Ao)" office:value-type="float" office:value="-72.4656299514533" calcext:value-type="float">
            <text:p>-72,4656299514533</text:p>
          </table:table-cell>
          <table:table-cell table:style-name="ce1" table:formula="of:=[.G409]+h" office:value-type="float" office:value="4.07999999999996" calcext:value-type="float">
            <text:p>4,07999999999996</text:p>
          </table:table-cell>
          <table:table-cell table:style-name="ce1" table:formula="of:=[.H409]+ h*[.F410]" office:value-type="float" office:value="66.1007127713202" calcext:value-type="float">
            <text:p>66,10071277132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0]" office:value-type="float" office:value="4.07999999999996" calcext:value-type="float">
            <text:p>4,07999999999996</text:p>
          </table:table-cell>
          <table:table-cell table:style-name="ce1" table:formula="of:=[.H410]" office:value-type="float" office:value="66.1007127713202" calcext:value-type="float">
            <text:p>66,1007127713202</text:p>
          </table:table-cell>
          <table:table-cell table:style-name="ce1" table:formula="of:=-68 - ([.E411]^2/Ao)" office:value-type="float" office:value="-72.3693042288766" calcext:value-type="float">
            <text:p>-72,3693042288766</text:p>
          </table:table-cell>
          <table:table-cell table:style-name="ce1" table:formula="of:=[.G410]+h" office:value-type="float" office:value="4.08999999999996" calcext:value-type="float">
            <text:p>4,08999999999996</text:p>
          </table:table-cell>
          <table:table-cell table:style-name="ce1" table:formula="of:=[.H410]+ h*[.F411]" office:value-type="float" office:value="65.3770197290314" calcext:value-type="float">
            <text:p>65,37701972903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1]" office:value-type="float" office:value="4.08999999999996" calcext:value-type="float">
            <text:p>4,08999999999996</text:p>
          </table:table-cell>
          <table:table-cell table:style-name="ce1" table:formula="of:=[.H411]" office:value-type="float" office:value="65.3770197290314" calcext:value-type="float">
            <text:p>65,3770197290314</text:p>
          </table:table-cell>
          <table:table-cell table:style-name="ce1" table:formula="of:=-68 - ([.E412]^2/Ao)" office:value-type="float" office:value="-72.2741547086502" calcext:value-type="float">
            <text:p>-72,2741547086502</text:p>
          </table:table-cell>
          <table:table-cell table:style-name="ce1" table:formula="of:=[.G411]+h" office:value-type="float" office:value="4.09999999999996" calcext:value-type="float">
            <text:p>4,09999999999996</text:p>
          </table:table-cell>
          <table:table-cell table:style-name="ce1" table:formula="of:=[.H411]+ h*[.F412]" office:value-type="float" office:value="64.6542781819449" calcext:value-type="float">
            <text:p>64,65427818194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2]" office:value-type="float" office:value="4.09999999999996" calcext:value-type="float">
            <text:p>4,09999999999996</text:p>
          </table:table-cell>
          <table:table-cell table:style-name="ce1" table:formula="of:=[.H412]" office:value-type="float" office:value="64.6542781819449" calcext:value-type="float">
            <text:p>64,6542781819449</text:p>
          </table:table-cell>
          <table:table-cell table:style-name="ce1" table:formula="of:=-68 - ([.E413]^2/Ao)" office:value-type="float" office:value="-72.1801756872283" calcext:value-type="float">
            <text:p>-72,1801756872283</text:p>
          </table:table-cell>
          <table:table-cell table:style-name="ce1" table:formula="of:=[.G412]+h" office:value-type="float" office:value="4.10999999999996" calcext:value-type="float">
            <text:p>4,10999999999996</text:p>
          </table:table-cell>
          <table:table-cell table:style-name="ce1" table:formula="of:=[.H412]+ h*[.F413]" office:value-type="float" office:value="63.9324764250726" calcext:value-type="float">
            <text:p>63,93247642507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3]" office:value-type="float" office:value="4.10999999999996" calcext:value-type="float">
            <text:p>4,10999999999996</text:p>
          </table:table-cell>
          <table:table-cell table:style-name="ce1" table:formula="of:=[.H413]" office:value-type="float" office:value="63.9324764250726" calcext:value-type="float">
            <text:p>63,9324764250726</text:p>
          </table:table-cell>
          <table:table-cell table:style-name="ce1" table:formula="of:=-68 - ([.E414]^2/Ao)" office:value-type="float" office:value="-72.0873615418425" calcext:value-type="float">
            <text:p>-72,0873615418425</text:p>
          </table:table-cell>
          <table:table-cell table:style-name="ce1" table:formula="of:=[.G413]+h" office:value-type="float" office:value="4.11999999999996" calcext:value-type="float">
            <text:p>4,11999999999996</text:p>
          </table:table-cell>
          <table:table-cell table:style-name="ce1" table:formula="of:=[.H413]+ h*[.F414]" office:value-type="float" office:value="63.2116028096542" calcext:value-type="float">
            <text:p>63,21160280965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4]" office:value-type="float" office:value="4.11999999999996" calcext:value-type="float">
            <text:p>4,11999999999996</text:p>
          </table:table-cell>
          <table:table-cell table:style-name="ce1" table:formula="of:=[.H414]" office:value-type="float" office:value="63.2116028096542" calcext:value-type="float">
            <text:p>63,2116028096542</text:p>
          </table:table-cell>
          <table:table-cell table:style-name="ce1" table:formula="of:=-68 - ([.E415]^2/Ao)" office:value-type="float" office:value="-71.9957067297655" calcext:value-type="float">
            <text:p>-71,9957067297655</text:p>
          </table:table-cell>
          <table:table-cell table:style-name="ce1" table:formula="of:=[.G414]+h" office:value-type="float" office:value="4.12999999999996" calcext:value-type="float">
            <text:p>4,12999999999996</text:p>
          </table:table-cell>
          <table:table-cell table:style-name="ce1" table:formula="of:=[.H414]+ h*[.F415]" office:value-type="float" office:value="62.4916457423565" calcext:value-type="float">
            <text:p>62,49164574235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5]" office:value-type="float" office:value="4.12999999999996" calcext:value-type="float">
            <text:p>4,12999999999996</text:p>
          </table:table-cell>
          <table:table-cell table:style-name="ce1" table:formula="of:=[.H415]" office:value-type="float" office:value="62.4916457423565" calcext:value-type="float">
            <text:p>62,4916457423565</text:p>
          </table:table-cell>
          <table:table-cell table:style-name="ce1" table:formula="of:=-68 - ([.E416]^2/Ao)" office:value-type="float" office:value="-71.9052057875882" calcext:value-type="float">
            <text:p>-71,9052057875882</text:p>
          </table:table-cell>
          <table:table-cell table:style-name="ce1" table:formula="of:=[.G415]+h" office:value-type="float" office:value="4.13999999999996" calcext:value-type="float">
            <text:p>4,13999999999996</text:p>
          </table:table-cell>
          <table:table-cell table:style-name="ce1" table:formula="of:=[.H415]+ h*[.F416]" office:value-type="float" office:value="61.7725936844806" calcext:value-type="float">
            <text:p>61,77259368448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6]" office:value-type="float" office:value="4.13999999999996" calcext:value-type="float">
            <text:p>4,13999999999996</text:p>
          </table:table-cell>
          <table:table-cell table:style-name="ce1" table:formula="of:=[.H416]" office:value-type="float" office:value="61.7725936844806" calcext:value-type="float">
            <text:p>61,7725936844806</text:p>
          </table:table-cell>
          <table:table-cell table:style-name="ce1" table:formula="of:=-68 - ([.E417]^2/Ao)" office:value-type="float" office:value="-71.8158533305079" calcext:value-type="float">
            <text:p>-71,8158533305079</text:p>
          </table:table-cell>
          <table:table-cell table:style-name="ce1" table:formula="of:=[.G416]+h" office:value-type="float" office:value="4.14999999999996" calcext:value-type="float">
            <text:p>4,14999999999996</text:p>
          </table:table-cell>
          <table:table-cell table:style-name="ce1" table:formula="of:=[.H416]+ h*[.F417]" office:value-type="float" office:value="61.0544351511756" calcext:value-type="float">
            <text:p>61,05443515117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7]" office:value-type="float" office:value="4.14999999999996" calcext:value-type="float">
            <text:p>4,14999999999996</text:p>
          </table:table-cell>
          <table:table-cell table:style-name="ce1" table:formula="of:=[.H417]" office:value-type="float" office:value="61.0544351511756" calcext:value-type="float">
            <text:p>61,0544351511756</text:p>
          </table:table-cell>
          <table:table-cell table:style-name="ce1" table:formula="of:=-68 - ([.E418]^2/Ao)" office:value-type="float" office:value="-71.7276440516291" calcext:value-type="float">
            <text:p>-71,7276440516291</text:p>
          </table:table-cell>
          <table:table-cell table:style-name="ce1" table:formula="of:=[.G417]+h" office:value-type="float" office:value="4.15999999999996" calcext:value-type="float">
            <text:p>4,15999999999996</text:p>
          </table:table-cell>
          <table:table-cell table:style-name="ce1" table:formula="of:=[.H417]+ h*[.F418]" office:value-type="float" office:value="60.3371587106593" calcext:value-type="float">
            <text:p>60,33715871065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8]" office:value-type="float" office:value="4.15999999999996" calcext:value-type="float">
            <text:p>4,15999999999996</text:p>
          </table:table-cell>
          <table:table-cell table:style-name="ce1" table:formula="of:=[.H418]" office:value-type="float" office:value="60.3371587106593" calcext:value-type="float">
            <text:p>60,3371587106593</text:p>
          </table:table-cell>
          <table:table-cell table:style-name="ce1" table:formula="of:=-68 - ([.E419]^2/Ao)" office:value-type="float" office:value="-71.6405727212753" calcext:value-type="float">
            <text:p>-71,6405727212753</text:p>
          </table:table-cell>
          <table:table-cell table:style-name="ce1" table:formula="of:=[.G418]+h" office:value-type="float" office:value="4.16999999999996" calcext:value-type="float">
            <text:p>4,16999999999996</text:p>
          </table:table-cell>
          <table:table-cell table:style-name="ce1" table:formula="of:=[.H418]+ h*[.F419]" office:value-type="float" office:value="59.6207529834465" calcext:value-type="float">
            <text:p>59,62075298344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9]" office:value-type="float" office:value="4.16999999999996" calcext:value-type="float">
            <text:p>4,16999999999996</text:p>
          </table:table-cell>
          <table:table-cell table:style-name="ce1" table:formula="of:=[.H419]" office:value-type="float" office:value="59.6207529834465" calcext:value-type="float">
            <text:p>59,6207529834465</text:p>
          </table:table-cell>
          <table:table-cell table:style-name="ce1" table:formula="of:=-68 - ([.E420]^2/Ao)" office:value-type="float" office:value="-71.5546341863131" calcext:value-type="float">
            <text:p>-71,5546341863131</text:p>
          </table:table-cell>
          <table:table-cell table:style-name="ce1" table:formula="of:=[.G419]+h" office:value-type="float" office:value="4.17999999999996" calcext:value-type="float">
            <text:p>4,17999999999996</text:p>
          </table:table-cell>
          <table:table-cell table:style-name="ce1" table:formula="of:=[.H419]+ h*[.F420]" office:value-type="float" office:value="58.9052066415834" calcext:value-type="float">
            <text:p>58,90520664158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0]" office:value-type="float" office:value="4.17999999999996" calcext:value-type="float">
            <text:p>4,17999999999996</text:p>
          </table:table-cell>
          <table:table-cell table:style-name="ce1" table:formula="of:=[.H420]" office:value-type="float" office:value="58.9052066415834" calcext:value-type="float">
            <text:p>58,9052066415834</text:p>
          </table:table-cell>
          <table:table-cell table:style-name="ce1" table:formula="of:=-68 - ([.E421]^2/Ao)" office:value-type="float" office:value="-71.4698233694876" calcext:value-type="float">
            <text:p>-71,4698233694876</text:p>
          </table:table-cell>
          <table:table-cell table:style-name="ce1" table:formula="of:=[.G420]+h" office:value-type="float" office:value="4.18999999999996" calcext:value-type="float">
            <text:p>4,18999999999996</text:p>
          </table:table-cell>
          <table:table-cell table:style-name="ce1" table:formula="of:=[.H420]+ h*[.F421]" office:value-type="float" office:value="58.1905084078885" calcext:value-type="float">
            <text:p>58,19050840788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1]" office:value-type="float" office:value="4.18999999999996" calcext:value-type="float">
            <text:p>4,18999999999996</text:p>
          </table:table-cell>
          <table:table-cell table:style-name="ce1" table:formula="of:=[.H421]" office:value-type="float" office:value="58.1905084078885" calcext:value-type="float">
            <text:p>58,1905084078885</text:p>
          </table:table-cell>
          <table:table-cell table:style-name="ce1" table:formula="of:=-68 - ([.E422]^2/Ao)" office:value-type="float" office:value="-71.3861352687685" calcext:value-type="float">
            <text:p>-71,3861352687685</text:p>
          </table:table-cell>
          <table:table-cell table:style-name="ce1" table:formula="of:=[.G421]+h" office:value-type="float" office:value="4.19999999999996" calcext:value-type="float">
            <text:p>4,19999999999996</text:p>
          </table:table-cell>
          <table:table-cell table:style-name="ce1" table:formula="of:=[.H421]+ h*[.F422]" office:value-type="float" office:value="57.4766470552008" calcext:value-type="float">
            <text:p>57,47664705520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2]" office:value-type="float" office:value="4.19999999999996" calcext:value-type="float">
            <text:p>4,19999999999996</text:p>
          </table:table-cell>
          <table:table-cell table:style-name="ce1" table:formula="of:=[.H422]" office:value-type="float" office:value="57.4766470552008" calcext:value-type="float">
            <text:p>57,4766470552008</text:p>
          </table:table-cell>
          <table:table-cell table:style-name="ce1" table:formula="of:=-68 - ([.E423]^2/Ao)" office:value-type="float" office:value="-71.3035649567081" calcext:value-type="float">
            <text:p>-71,3035649567081</text:p>
          </table:table-cell>
          <table:table-cell table:style-name="ce1" table:formula="of:=[.G422]+h" office:value-type="float" office:value="4.20999999999996" calcext:value-type="float">
            <text:p>4,20999999999996</text:p>
          </table:table-cell>
          <table:table-cell table:style-name="ce1" table:formula="of:=[.H422]+ h*[.F423]" office:value-type="float" office:value="56.7636114056337" calcext:value-type="float">
            <text:p>56,76361140563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3]" office:value-type="float" office:value="4.20999999999996" calcext:value-type="float">
            <text:p>4,20999999999996</text:p>
          </table:table-cell>
          <table:table-cell table:style-name="ce1" table:formula="of:=[.H423]" office:value-type="float" office:value="56.7636114056337" calcext:value-type="float">
            <text:p>56,7636114056337</text:p>
          </table:table-cell>
          <table:table-cell table:style-name="ce1" table:formula="of:=-68 - ([.E424]^2/Ao)" office:value-type="float" office:value="-71.2221075798098" calcext:value-type="float">
            <text:p>-71,2221075798098</text:p>
          </table:table-cell>
          <table:table-cell table:style-name="ce1" table:formula="of:=[.G423]+h" office:value-type="float" office:value="4.21999999999995" calcext:value-type="float">
            <text:p>4,21999999999995</text:p>
          </table:table-cell>
          <table:table-cell table:style-name="ce1" table:formula="of:=[.H423]+ h*[.F424]" office:value-type="float" office:value="56.0513903298356" calcext:value-type="float">
            <text:p>56,05139032983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4]" office:value-type="float" office:value="4.21999999999995" calcext:value-type="float">
            <text:p>4,21999999999995</text:p>
          </table:table-cell>
          <table:table-cell table:style-name="ce1" table:formula="of:=[.H424]" office:value-type="float" office:value="56.0513903298356" calcext:value-type="float">
            <text:p>56,0513903298356</text:p>
          </table:table-cell>
          <table:table-cell table:style-name="ce1" table:formula="of:=-68 - ([.E425]^2/Ao)" office:value-type="float" office:value="-71.1417583579076" calcext:value-type="float">
            <text:p>-71,1417583579076</text:p>
          </table:table-cell>
          <table:table-cell table:style-name="ce1" table:formula="of:=[.G424]+h" office:value-type="float" office:value="4.22999999999995" calcext:value-type="float">
            <text:p>4,22999999999995</text:p>
          </table:table-cell>
          <table:table-cell table:style-name="ce1" table:formula="of:=[.H424]+ h*[.F425]" office:value-type="float" office:value="55.3399727462566" calcext:value-type="float">
            <text:p>55,33997274625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5]" office:value-type="float" office:value="4.22999999999995" calcext:value-type="float">
            <text:p>4,22999999999995</text:p>
          </table:table-cell>
          <table:table-cell table:style-name="ce1" table:formula="of:=[.H425]" office:value-type="float" office:value="55.3399727462566" calcext:value-type="float">
            <text:p>55,3399727462566</text:p>
          </table:table-cell>
          <table:table-cell table:style-name="ce1" table:formula="of:=-68 - ([.E426]^2/Ao)" office:value-type="float" office:value="-71.0625125835564" calcext:value-type="float">
            <text:p>-71,0625125835564</text:p>
          </table:table-cell>
          <table:table-cell table:style-name="ce1" table:formula="of:=[.G425]+h" office:value-type="float" office:value="4.23999999999995" calcext:value-type="float">
            <text:p>4,23999999999995</text:p>
          </table:table-cell>
          <table:table-cell table:style-name="ce1" table:formula="of:=[.H425]+ h*[.F426]" office:value-type="float" office:value="54.629347620421" calcext:value-type="float">
            <text:p>54,6293476204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6]" office:value-type="float" office:value="4.23999999999995" calcext:value-type="float">
            <text:p>4,23999999999995</text:p>
          </table:table-cell>
          <table:table-cell table:style-name="ce1" table:formula="of:=[.H426]" office:value-type="float" office:value="54.629347620421" calcext:value-type="float">
            <text:p>54,629347620421</text:p>
          </table:table-cell>
          <table:table-cell table:style-name="ce1" table:formula="of:=-68 - ([.E427]^2/Ao)" office:value-type="float" office:value="-70.9843656214328" calcext:value-type="float">
            <text:p>-70,9843656214328</text:p>
          </table:table-cell>
          <table:table-cell table:style-name="ce1" table:formula="of:=[.G426]+h" office:value-type="float" office:value="4.24999999999995" calcext:value-type="float">
            <text:p>4,24999999999995</text:p>
          </table:table-cell>
          <table:table-cell table:style-name="ce1" table:formula="of:=[.H426]+ h*[.F427]" office:value-type="float" office:value="53.9195039642067" calcext:value-type="float">
            <text:p>53,91950396420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7]" office:value-type="float" office:value="4.24999999999995" calcext:value-type="float">
            <text:p>4,24999999999995</text:p>
          </table:table-cell>
          <table:table-cell table:style-name="ce1" table:formula="of:=[.H427]" office:value-type="float" office:value="53.9195039642067" calcext:value-type="float">
            <text:p>53,9195039642067</text:p>
          </table:table-cell>
          <table:table-cell table:style-name="ce1" table:formula="of:=-68 - ([.E428]^2/Ao)" office:value-type="float" office:value="-70.9073129077461" calcext:value-type="float">
            <text:p>-70,9073129077461</text:p>
          </table:table-cell>
          <table:table-cell table:style-name="ce1" table:formula="of:=[.G427]+h" office:value-type="float" office:value="4.25999999999995" calcext:value-type="float">
            <text:p>4,25999999999995</text:p>
          </table:table-cell>
          <table:table-cell table:style-name="ce1" table:formula="of:=[.H427]+ h*[.F428]" office:value-type="float" office:value="53.2104308351292" calcext:value-type="float">
            <text:p>53,21043083512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8]" office:value-type="float" office:value="4.25999999999995" calcext:value-type="float">
            <text:p>4,25999999999995</text:p>
          </table:table-cell>
          <table:table-cell table:style-name="ce1" table:formula="of:=[.H428]" office:value-type="float" office:value="53.2104308351292" calcext:value-type="float">
            <text:p>53,2104308351292</text:p>
          </table:table-cell>
          <table:table-cell table:style-name="ce1" table:formula="of:=-68 - ([.E429]^2/Ao)" office:value-type="float" office:value="-70.8313499496601" calcext:value-type="float">
            <text:p>-70,8313499496601</text:p>
          </table:table-cell>
          <table:table-cell table:style-name="ce1" table:formula="of:=[.G428]+h" office:value-type="float" office:value="4.26999999999995" calcext:value-type="float">
            <text:p>4,26999999999995</text:p>
          </table:table-cell>
          <table:table-cell table:style-name="ce1" table:formula="of:=[.H428]+ h*[.F429]" office:value-type="float" office:value="52.5021173356326" calcext:value-type="float">
            <text:p>52,50211733563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9]" office:value-type="float" office:value="4.26999999999995" calcext:value-type="float">
            <text:p>4,26999999999995</text:p>
          </table:table-cell>
          <table:table-cell table:style-name="ce1" table:formula="of:=[.H429]" office:value-type="float" office:value="52.5021173356326" calcext:value-type="float">
            <text:p>52,5021173356326</text:p>
          </table:table-cell>
          <table:table-cell table:style-name="ce1" table:formula="of:=-68 - ([.E430]^2/Ao)" office:value-type="float" office:value="-70.7564723247245" calcext:value-type="float">
            <text:p>-70,7564723247245</text:p>
          </table:table-cell>
          <table:table-cell table:style-name="ce1" table:formula="of:=[.G429]+h" office:value-type="float" office:value="4.27999999999995" calcext:value-type="float">
            <text:p>4,27999999999995</text:p>
          </table:table-cell>
          <table:table-cell table:style-name="ce1" table:formula="of:=[.H429]+ h*[.F430]" office:value-type="float" office:value="51.7945526123854" calcext:value-type="float">
            <text:p>51,79455261238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0]" office:value-type="float" office:value="4.27999999999995" calcext:value-type="float">
            <text:p>4,27999999999995</text:p>
          </table:table-cell>
          <table:table-cell table:style-name="ce1" table:formula="of:=[.H430]" office:value-type="float" office:value="51.7945526123854" calcext:value-type="float">
            <text:p>51,7945526123854</text:p>
          </table:table-cell>
          <table:table-cell table:style-name="ce1" table:formula="of:=-68 - ([.E431]^2/Ao)" office:value-type="float" office:value="-70.6826756803172" calcext:value-type="float">
            <text:p>-70,6826756803172</text:p>
          </table:table-cell>
          <table:table-cell table:style-name="ce1" table:formula="of:=[.G430]+h" office:value-type="float" office:value="4.28999999999995" calcext:value-type="float">
            <text:p>4,28999999999995</text:p>
          </table:table-cell>
          <table:table-cell table:style-name="ce1" table:formula="of:=[.H430]+ h*[.F431]" office:value-type="float" office:value="51.0877258555822" calcext:value-type="float">
            <text:p>51,08772585558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1]" office:value-type="float" office:value="4.28999999999995" calcext:value-type="float">
            <text:p>4,28999999999995</text:p>
          </table:table-cell>
          <table:table-cell table:style-name="ce1" table:formula="of:=[.H431]" office:value-type="float" office:value="51.0877258555822" calcext:value-type="float">
            <text:p>51,0877258555822</text:p>
          </table:table-cell>
          <table:table-cell table:style-name="ce1" table:formula="of:=-68 - ([.E432]^2/Ao)" office:value-type="float" office:value="-70.6099557330951" calcext:value-type="float">
            <text:p>-70,6099557330951</text:p>
          </table:table-cell>
          <table:table-cell table:style-name="ce1" table:formula="of:=[.G431]+h" office:value-type="float" office:value="4.29999999999995" calcext:value-type="float">
            <text:p>4,29999999999995</text:p>
          </table:table-cell>
          <table:table-cell table:style-name="ce1" table:formula="of:=[.H431]+ h*[.F432]" office:value-type="float" office:value="50.3816262982512" calcext:value-type="float">
            <text:p>50,38162629825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2]" office:value-type="float" office:value="4.29999999999995" calcext:value-type="float">
            <text:p>4,29999999999995</text:p>
          </table:table-cell>
          <table:table-cell table:style-name="ce1" table:formula="of:=[.H432]" office:value-type="float" office:value="50.3816262982512" calcext:value-type="float">
            <text:p>50,3816262982512</text:p>
          </table:table-cell>
          <table:table-cell table:style-name="ce1" table:formula="of:=-68 - ([.E433]^2/Ao)" office:value-type="float" office:value="-70.5383082684567" calcext:value-type="float">
            <text:p>-70,5383082684567</text:p>
          </table:table-cell>
          <table:table-cell table:style-name="ce1" table:formula="of:=[.G432]+h" office:value-type="float" office:value="4.30999999999995" calcext:value-type="float">
            <text:p>4,30999999999995</text:p>
          </table:table-cell>
          <table:table-cell table:style-name="ce1" table:formula="of:=[.H432]+ h*[.F433]" office:value-type="float" office:value="49.6762432155667" calcext:value-type="float">
            <text:p>49,67624321556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3]" office:value-type="float" office:value="4.30999999999995" calcext:value-type="float">
            <text:p>4,30999999999995</text:p>
          </table:table-cell>
          <table:table-cell table:style-name="ce1" table:formula="of:=[.H433]" office:value-type="float" office:value="49.6762432155667" calcext:value-type="float">
            <text:p>49,6762432155667</text:p>
          </table:table-cell>
          <table:table-cell table:style-name="ce1" table:formula="of:=-68 - ([.E434]^2/Ao)" office:value-type="float" office:value="-70.4677291400121" calcext:value-type="float">
            <text:p>-70,4677291400121</text:p>
          </table:table-cell>
          <table:table-cell table:style-name="ce1" table:formula="of:=[.G433]+h" office:value-type="float" office:value="4.31999999999995" calcext:value-type="float">
            <text:p>4,31999999999995</text:p>
          </table:table-cell>
          <table:table-cell table:style-name="ce1" table:formula="of:=[.H433]+ h*[.F434]" office:value-type="float" office:value="48.9715659241665" calcext:value-type="float">
            <text:p>48,97156592416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4]" office:value-type="float" office:value="4.31999999999995" calcext:value-type="float">
            <text:p>4,31999999999995</text:p>
          </table:table-cell>
          <table:table-cell table:style-name="ce1" table:formula="of:=[.H434]" office:value-type="float" office:value="48.9715659241665" calcext:value-type="float">
            <text:p>48,9715659241665</text:p>
          </table:table-cell>
          <table:table-cell table:style-name="ce1" table:formula="of:=-68 - ([.E435]^2/Ao)" office:value-type="float" office:value="-70.398214269065" calcext:value-type="float">
            <text:p>-70,398214269065</text:p>
          </table:table-cell>
          <table:table-cell table:style-name="ce1" table:formula="of:=[.G434]+h" office:value-type="float" office:value="4.32999999999995" calcext:value-type="float">
            <text:p>4,32999999999995</text:p>
          </table:table-cell>
          <table:table-cell table:style-name="ce1" table:formula="of:=[.H434]+ h*[.F435]" office:value-type="float" office:value="48.2675837814759" calcext:value-type="float">
            <text:p>48,26758378147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5]" office:value-type="float" office:value="4.32999999999995" calcext:value-type="float">
            <text:p>4,32999999999995</text:p>
          </table:table-cell>
          <table:table-cell table:style-name="ce1" table:formula="of:=[.H435]" office:value-type="float" office:value="48.2675837814759" calcext:value-type="float">
            <text:p>48,2675837814759</text:p>
          </table:table-cell>
          <table:table-cell table:style-name="ce1" table:formula="of:=-68 - ([.E436]^2/Ao)" office:value-type="float" office:value="-70.3297596441018" calcext:value-type="float">
            <text:p>-70,3297596441018</text:p>
          </table:table-cell>
          <table:table-cell table:style-name="ce1" table:formula="of:=[.G435]+h" office:value-type="float" office:value="4.33999999999995" calcext:value-type="float">
            <text:p>4,33999999999995</text:p>
          </table:table-cell>
          <table:table-cell table:style-name="ce1" table:formula="of:=[.H435]+ h*[.F436]" office:value-type="float" office:value="47.5642861850349" calcext:value-type="float">
            <text:p>47,56428618503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6]" office:value-type="float" office:value="4.33999999999995" calcext:value-type="float">
            <text:p>4,33999999999995</text:p>
          </table:table-cell>
          <table:table-cell table:style-name="ce1" table:formula="of:=[.H436]" office:value-type="float" office:value="47.5642861850349" calcext:value-type="float">
            <text:p>47,5642861850349</text:p>
          </table:table-cell>
          <table:table-cell table:style-name="ce1" table:formula="of:=-68 - ([.E437]^2/Ao)" office:value-type="float" office:value="-70.2623613202919" calcext:value-type="float">
            <text:p>-70,2623613202919</text:p>
          </table:table-cell>
          <table:table-cell table:style-name="ce1" table:formula="of:=[.G436]+h" office:value-type="float" office:value="4.34999999999995" calcext:value-type="float">
            <text:p>4,34999999999995</text:p>
          </table:table-cell>
          <table:table-cell table:style-name="ce1" table:formula="of:=[.H436]+ h*[.F437]" office:value-type="float" office:value="46.861662571832" calcext:value-type="float">
            <text:p>46,8616625718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7]" office:value-type="float" office:value="4.34999999999995" calcext:value-type="float">
            <text:p>4,34999999999995</text:p>
          </table:table-cell>
          <table:table-cell table:style-name="ce1" table:formula="of:=[.H437]" office:value-type="float" office:value="46.861662571832" calcext:value-type="float">
            <text:p>46,861662571832</text:p>
          </table:table-cell>
          <table:table-cell table:style-name="ce1" table:formula="of:=-68 - ([.E438]^2/Ao)" office:value-type="float" office:value="-70.1960154189962" calcext:value-type="float">
            <text:p>-70,1960154189962</text:p>
          </table:table-cell>
          <table:table-cell table:style-name="ce1" table:formula="of:=[.G437]+h" office:value-type="float" office:value="4.35999999999995" calcext:value-type="float">
            <text:p>4,35999999999995</text:p>
          </table:table-cell>
          <table:table-cell table:style-name="ce1" table:formula="of:=[.H437]+ h*[.F438]" office:value-type="float" office:value="46.159702417642" calcext:value-type="float">
            <text:p>46,1597024176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8]" office:value-type="float" office:value="4.35999999999995" calcext:value-type="float">
            <text:p>4,35999999999995</text:p>
          </table:table-cell>
          <table:table-cell table:style-name="ce1" table:formula="of:=[.H438]" office:value-type="float" office:value="46.159702417642" calcext:value-type="float">
            <text:p>46,159702417642</text:p>
          </table:table-cell>
          <table:table-cell table:style-name="ce1" table:formula="of:=-68 - ([.E439]^2/Ao)" office:value-type="float" office:value="-70.1307181272853" calcext:value-type="float">
            <text:p>-70,1307181272853</text:p>
          </table:table-cell>
          <table:table-cell table:style-name="ce1" table:formula="of:=[.G438]+h" office:value-type="float" office:value="4.36999999999995" calcext:value-type="float">
            <text:p>4,36999999999995</text:p>
          </table:table-cell>
          <table:table-cell table:style-name="ce1" table:formula="of:=[.H438]+ h*[.F439]" office:value-type="float" office:value="45.4583952363691" calcext:value-type="float">
            <text:p>45,45839523636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9]" office:value-type="float" office:value="4.36999999999995" calcext:value-type="float">
            <text:p>4,36999999999995</text:p>
          </table:table-cell>
          <table:table-cell table:style-name="ce1" table:formula="of:=[.H439]" office:value-type="float" office:value="45.4583952363691" calcext:value-type="float">
            <text:p>45,4583952363691</text:p>
          </table:table-cell>
          <table:table-cell table:style-name="ce1" table:formula="of:=-68 - ([.E440]^2/Ao)" office:value-type="float" office:value="-70.0664656974659" calcext:value-type="float">
            <text:p>-70,0664656974659</text:p>
          </table:table-cell>
          <table:table-cell table:style-name="ce1" table:formula="of:=[.G439]+h" office:value-type="float" office:value="4.37999999999995" calcext:value-type="float">
            <text:p>4,37999999999995</text:p>
          </table:table-cell>
          <table:table-cell table:style-name="ce1" table:formula="of:=[.H439]+ h*[.F440]" office:value-type="float" office:value="44.7577305793945" calcext:value-type="float">
            <text:p>44,75773057939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0]" office:value-type="float" office:value="4.37999999999995" calcext:value-type="float">
            <text:p>4,37999999999995</text:p>
          </table:table-cell>
          <table:table-cell table:style-name="ce1" table:formula="of:=[.H440]" office:value-type="float" office:value="44.7577305793945" calcext:value-type="float">
            <text:p>44,7577305793945</text:p>
          </table:table-cell>
          <table:table-cell table:style-name="ce1" table:formula="of:=-68 - ([.E441]^2/Ao)" office:value-type="float" office:value="-70.0032544466177" calcext:value-type="float">
            <text:p>-70,0032544466177</text:p>
          </table:table-cell>
          <table:table-cell table:style-name="ce1" table:formula="of:=[.G440]+h" office:value-type="float" office:value="4.38999999999995" calcext:value-type="float">
            <text:p>4,38999999999995</text:p>
          </table:table-cell>
          <table:table-cell table:style-name="ce1" table:formula="of:=[.H440]+ h*[.F441]" office:value-type="float" office:value="44.0576980349283" calcext:value-type="float">
            <text:p>44,05769803492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1]" office:value-type="float" office:value="4.38999999999995" calcext:value-type="float">
            <text:p>4,38999999999995</text:p>
          </table:table-cell>
          <table:table-cell table:style-name="ce1" table:formula="of:=[.H441]" office:value-type="float" office:value="44.0576980349283" calcext:value-type="float">
            <text:p>44,0576980349283</text:p>
          </table:table-cell>
          <table:table-cell table:style-name="ce1" table:formula="of:=-68 - ([.E442]^2/Ao)" office:value-type="float" office:value="-69.9410807561369" calcext:value-type="float">
            <text:p>-69,9410807561369</text:p>
          </table:table-cell>
          <table:table-cell table:style-name="ce1" table:formula="of:=[.G441]+h" office:value-type="float" office:value="4.39999999999995" calcext:value-type="float">
            <text:p>4,39999999999995</text:p>
          </table:table-cell>
          <table:table-cell table:style-name="ce1" table:formula="of:=[.H441]+ h*[.F442]" office:value-type="float" office:value="43.3582872273669" calcext:value-type="float">
            <text:p>43,35828722736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2]" office:value-type="float" office:value="4.39999999999995" calcext:value-type="float">
            <text:p>4,39999999999995</text:p>
          </table:table-cell>
          <table:table-cell table:style-name="ce1" table:formula="of:=[.H442]" office:value-type="float" office:value="43.3582872273669" calcext:value-type="float">
            <text:p>43,3582872273669</text:p>
          </table:table-cell>
          <table:table-cell table:style-name="ce1" table:formula="of:=-68 - ([.E443]^2/Ao)" office:value-type="float" office:value="-69.8799410712908" calcext:value-type="float">
            <text:p>-69,8799410712908</text:p>
          </table:table-cell>
          <table:table-cell table:style-name="ce1" table:formula="of:=[.G442]+h" office:value-type="float" office:value="4.40999999999995" calcext:value-type="float">
            <text:p>4,40999999999995</text:p>
          </table:table-cell>
          <table:table-cell table:style-name="ce1" table:formula="of:=[.H442]+ h*[.F443]" office:value-type="float" office:value="42.659487816654" calcext:value-type="float">
            <text:p>42,6594878166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3]" office:value-type="float" office:value="4.40999999999995" calcext:value-type="float">
            <text:p>4,40999999999995</text:p>
          </table:table-cell>
          <table:table-cell table:style-name="ce1" table:formula="of:=[.H443]" office:value-type="float" office:value="42.659487816654" calcext:value-type="float">
            <text:p>42,659487816654</text:p>
          </table:table-cell>
          <table:table-cell table:style-name="ce1" table:formula="of:=-68 - ([.E444]^2/Ao)" office:value-type="float" office:value="-69.8198319007793" calcext:value-type="float">
            <text:p>-69,8198319007793</text:p>
          </table:table-cell>
          <table:table-cell table:style-name="ce1" table:formula="of:=[.G443]+h" office:value-type="float" office:value="4.41999999999995" calcext:value-type="float">
            <text:p>4,41999999999995</text:p>
          </table:table-cell>
          <table:table-cell table:style-name="ce1" table:formula="of:=[.H443]+ h*[.F444]" office:value-type="float" office:value="41.9612894976462" calcext:value-type="float">
            <text:p>41,96128949764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4]" office:value-type="float" office:value="4.41999999999995" calcext:value-type="float">
            <text:p>4,41999999999995</text:p>
          </table:table-cell>
          <table:table-cell table:style-name="ce1" table:formula="of:=[.H444]" office:value-type="float" office:value="41.9612894976462" calcext:value-type="float">
            <text:p>41,9612894976462</text:p>
          </table:table-cell>
          <table:table-cell table:style-name="ce1" table:formula="of:=-68 - ([.E445]^2/Ao)" office:value-type="float" office:value="-69.7607498163053" calcext:value-type="float">
            <text:p>-69,7607498163053</text:p>
          </table:table-cell>
          <table:table-cell table:style-name="ce1" table:formula="of:=[.G444]+h" office:value-type="float" office:value="4.42999999999995" calcext:value-type="float">
            <text:p>4,42999999999995</text:p>
          </table:table-cell>
          <table:table-cell table:style-name="ce1" table:formula="of:=[.H444]+ h*[.F445]" office:value-type="float" office:value="41.2636819994832" calcext:value-type="float">
            <text:p>41,26368199948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5]" office:value-type="float" office:value="4.42999999999995" calcext:value-type="float">
            <text:p>4,42999999999995</text:p>
          </table:table-cell>
          <table:table-cell table:style-name="ce1" table:formula="of:=[.H445]" office:value-type="float" office:value="41.2636819994832" calcext:value-type="float">
            <text:p>41,2636819994832</text:p>
          </table:table-cell>
          <table:table-cell table:style-name="ce1" table:formula="of:=-68 - ([.E446]^2/Ao)" office:value-type="float" office:value="-69.7026914521545" calcext:value-type="float">
            <text:p>-69,7026914521545</text:p>
          </table:table-cell>
          <table:table-cell table:style-name="ce1" table:formula="of:=[.G445]+h" office:value-type="float" office:value="4.43999999999995" calcext:value-type="float">
            <text:p>4,43999999999995</text:p>
          </table:table-cell>
          <table:table-cell table:style-name="ce1" table:formula="of:=[.H445]+ h*[.F446]" office:value-type="float" office:value="40.5666550849616" calcext:value-type="float">
            <text:p>40,56665508496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6]" office:value-type="float" office:value="4.43999999999995" calcext:value-type="float">
            <text:p>4,43999999999995</text:p>
          </table:table-cell>
          <table:table-cell table:style-name="ce1" table:formula="of:=[.H446]" office:value-type="float" office:value="40.5666550849616" calcext:value-type="float">
            <text:p>40,5666550849616</text:p>
          </table:table-cell>
          <table:table-cell table:style-name="ce1" table:formula="of:=-68 - ([.E447]^2/Ao)" office:value-type="float" office:value="-69.6456535047823" calcext:value-type="float">
            <text:p>-69,6456535047823</text:p>
          </table:table-cell>
          <table:table-cell table:style-name="ce1" table:formula="of:=[.G446]+h" office:value-type="float" office:value="4.44999999999995" calcext:value-type="float">
            <text:p>4,44999999999995</text:p>
          </table:table-cell>
          <table:table-cell table:style-name="ce1" table:formula="of:=[.H446]+ h*[.F447]" office:value-type="float" office:value="39.8701985499138" calcext:value-type="float">
            <text:p>39,87019854991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7]" office:value-type="float" office:value="4.44999999999995" calcext:value-type="float">
            <text:p>4,44999999999995</text:p>
          </table:table-cell>
          <table:table-cell table:style-name="ce1" table:formula="of:=[.H447]" office:value-type="float" office:value="39.8701985499138" calcext:value-type="float">
            <text:p>39,8701985499138</text:p>
          </table:table-cell>
          <table:table-cell table:style-name="ce1" table:formula="of:=-68 - ([.E448]^2/Ao)" office:value-type="float" office:value="-69.5896327324096" calcext:value-type="float">
            <text:p>-69,5896327324096</text:p>
          </table:table-cell>
          <table:table-cell table:style-name="ce1" table:formula="of:=[.G447]+h" office:value-type="float" office:value="4.45999999999995" calcext:value-type="float">
            <text:p>4,45999999999995</text:p>
          </table:table-cell>
          <table:table-cell table:style-name="ce1" table:formula="of:=[.H447]+ h*[.F448]" office:value-type="float" office:value="39.1743022225897" calcext:value-type="float">
            <text:p>39,17430222258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8]" office:value-type="float" office:value="4.45999999999995" calcext:value-type="float">
            <text:p>4,45999999999995</text:p>
          </table:table-cell>
          <table:table-cell table:style-name="ce1" table:formula="of:=[.H448]" office:value-type="float" office:value="39.1743022225897" calcext:value-type="float">
            <text:p>39,1743022225897</text:p>
          </table:table-cell>
          <table:table-cell table:style-name="ce1" table:formula="of:=-68 - ([.E449]^2/Ao)" office:value-type="float" office:value="-69.5346259546268" calcext:value-type="float">
            <text:p>-69,5346259546268</text:p>
          </table:table-cell>
          <table:table-cell table:style-name="ce1" table:formula="of:=[.G448]+h" office:value-type="float" office:value="4.46999999999995" calcext:value-type="float">
            <text:p>4,46999999999995</text:p>
          </table:table-cell>
          <table:table-cell table:style-name="ce1" table:formula="of:=[.H448]+ h*[.F449]" office:value-type="float" office:value="38.4789559630435" calcext:value-type="float">
            <text:p>38,47895596304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9]" office:value-type="float" office:value="4.46999999999995" calcext:value-type="float">
            <text:p>4,46999999999995</text:p>
          </table:table-cell>
          <table:table-cell table:style-name="ce1" table:formula="of:=[.H449]" office:value-type="float" office:value="38.4789559630435" calcext:value-type="float">
            <text:p>38,4789559630435</text:p>
          </table:table-cell>
          <table:table-cell table:style-name="ce1" table:formula="of:=-68 - ([.E450]^2/Ao)" office:value-type="float" office:value="-69.4806300520058" calcext:value-type="float">
            <text:p>-69,4806300520058</text:p>
          </table:table-cell>
          <table:table-cell table:style-name="ce1" table:formula="of:=[.G449]+h" office:value-type="float" office:value="4.47999999999995" calcext:value-type="float">
            <text:p>4,47999999999995</text:p>
          </table:table-cell>
          <table:table-cell table:style-name="ce1" table:formula="of:=[.H449]+ h*[.F450]" office:value-type="float" office:value="37.7841496625234" calcext:value-type="float">
            <text:p>37,78414966252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0]" office:value-type="float" office:value="4.47999999999995" calcext:value-type="float">
            <text:p>4,47999999999995</text:p>
          </table:table-cell>
          <table:table-cell table:style-name="ce1" table:formula="of:=[.H450]" office:value-type="float" office:value="37.7841496625234" calcext:value-type="float">
            <text:p>37,7841496625234</text:p>
          </table:table-cell>
          <table:table-cell table:style-name="ce1" table:formula="of:=-68 - ([.E451]^2/Ao)" office:value-type="float" office:value="-69.42764196572" calcext:value-type="float">
            <text:p>-69,42764196572</text:p>
          </table:table-cell>
          <table:table-cell table:style-name="ce1" table:formula="of:=[.G450]+h" office:value-type="float" office:value="4.48999999999995" calcext:value-type="float">
            <text:p>4,48999999999995</text:p>
          </table:table-cell>
          <table:table-cell table:style-name="ce1" table:formula="of:=[.H450]+ h*[.F451]" office:value-type="float" office:value="37.0898732428662" calcext:value-type="float">
            <text:p>37,08987324286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1]" office:value-type="float" office:value="4.48999999999995" calcext:value-type="float">
            <text:p>4,48999999999995</text:p>
          </table:table-cell>
          <table:table-cell table:style-name="ce1" table:formula="of:=[.H451]" office:value-type="float" office:value="37.0898732428662" calcext:value-type="float">
            <text:p>37,0898732428662</text:p>
          </table:table-cell>
          <table:table-cell table:style-name="ce1" table:formula="of:=-68 - ([.E452]^2/Ao)" office:value-type="float" office:value="-69.3756586971719" calcext:value-type="float">
            <text:p>-69,3756586971719</text:p>
          </table:table-cell>
          <table:table-cell table:style-name="ce1" table:formula="of:=[.G451]+h" office:value-type="float" office:value="4.49999999999995" calcext:value-type="float">
            <text:p>4,49999999999995</text:p>
          </table:table-cell>
          <table:table-cell table:style-name="ce1" table:formula="of:=[.H451]+ h*[.F452]" office:value-type="float" office:value="36.3961166558945" calcext:value-type="float">
            <text:p>36,39611665589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2]" office:value-type="float" office:value="4.49999999999995" calcext:value-type="float">
            <text:p>4,49999999999995</text:p>
          </table:table-cell>
          <table:table-cell table:style-name="ce1" table:formula="of:=[.H452]" office:value-type="float" office:value="36.3961166558945" calcext:value-type="float">
            <text:p>36,3961166558945</text:p>
          </table:table-cell>
          <table:table-cell table:style-name="ce1" table:formula="of:=-68 - ([.E453]^2/Ao)" office:value-type="float" office:value="-69.3246773076295" calcext:value-type="float">
            <text:p>-69,3246773076295</text:p>
          </table:table-cell>
          <table:table-cell table:style-name="ce1" table:formula="of:=[.G452]+h" office:value-type="float" office:value="4.50999999999995" calcext:value-type="float">
            <text:p>4,50999999999995</text:p>
          </table:table-cell>
          <table:table-cell table:style-name="ce1" table:formula="of:=[.H452]+ h*[.F453]" office:value-type="float" office:value="35.7028698828182" calcext:value-type="float">
            <text:p>35,70286988281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3]" office:value-type="float" office:value="4.50999999999995" calcext:value-type="float">
            <text:p>4,50999999999995</text:p>
          </table:table-cell>
          <table:table-cell table:style-name="ce1" table:formula="of:=[.H453]" office:value-type="float" office:value="35.7028698828182" calcext:value-type="float">
            <text:p>35,7028698828182</text:p>
          </table:table-cell>
          <table:table-cell table:style-name="ce1" table:formula="of:=-68 - ([.E454]^2/Ao)" office:value-type="float" office:value="-69.2746949178694" calcext:value-type="float">
            <text:p>-69,2746949178694</text:p>
          </table:table-cell>
          <table:table-cell table:style-name="ce1" table:formula="of:=[.G453]+h" office:value-type="float" office:value="4.51999999999995" calcext:value-type="float">
            <text:p>4,51999999999995</text:p>
          </table:table-cell>
          <table:table-cell table:style-name="ce1" table:formula="of:=[.H453]+ h*[.F454]" office:value-type="float" office:value="35.0101229336395" calcext:value-type="float">
            <text:p>35,01012293363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4]" office:value-type="float" office:value="4.51999999999995" calcext:value-type="float">
            <text:p>4,51999999999995</text:p>
          </table:table-cell>
          <table:table-cell table:style-name="ce1" table:formula="of:=[.H454]" office:value-type="float" office:value="35.0101229336395" calcext:value-type="float">
            <text:p>35,0101229336395</text:p>
          </table:table-cell>
          <table:table-cell table:style-name="ce1" table:formula="of:=-68 - ([.E455]^2/Ao)" office:value-type="float" office:value="-69.2257087078286" calcext:value-type="float">
            <text:p>-69,2257087078286</text:p>
          </table:table-cell>
          <table:table-cell table:style-name="ce1" table:formula="of:=[.G454]+h" office:value-type="float" office:value="4.52999999999995" calcext:value-type="float">
            <text:p>4,52999999999995</text:p>
          </table:table-cell>
          <table:table-cell table:style-name="ce1" table:formula="of:=[.H454]+ h*[.F455]" office:value-type="float" office:value="34.3178658465612" calcext:value-type="float">
            <text:p>34,31786584656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5]" office:value-type="float" office:value="4.52999999999995" calcext:value-type="float">
            <text:p>4,52999999999995</text:p>
          </table:table-cell>
          <table:table-cell table:style-name="ce1" table:formula="of:=[.H455]" office:value-type="float" office:value="34.3178658465612" calcext:value-type="float">
            <text:p>34,3178658465612</text:p>
          </table:table-cell>
          <table:table-cell table:style-name="ce1" table:formula="of:=-68 - ([.E456]^2/Ao)" office:value-type="float" office:value="-69.1777159162626" calcext:value-type="float">
            <text:p>-69,1777159162626</text:p>
          </table:table-cell>
          <table:table-cell table:style-name="ce1" table:formula="of:=[.G455]+h" office:value-type="float" office:value="4.53999999999995" calcext:value-type="float">
            <text:p>4,53999999999995</text:p>
          </table:table-cell>
          <table:table-cell table:style-name="ce1" table:formula="of:=[.H455]+ h*[.F456]" office:value-type="float" office:value="33.6260886873986" calcext:value-type="float">
            <text:p>33,62608868739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6]" office:value-type="float" office:value="4.53999999999995" calcext:value-type="float">
            <text:p>4,53999999999995</text:p>
          </table:table-cell>
          <table:table-cell table:style-name="ce1" table:formula="of:=[.H456]" office:value-type="float" office:value="33.6260886873986" calcext:value-type="float">
            <text:p>33,6260886873986</text:p>
          </table:table-cell>
          <table:table-cell table:style-name="ce1" table:formula="of:=-68 - ([.E457]^2/Ao)" office:value-type="float" office:value="-69.1307138404128" calcext:value-type="float">
            <text:p>-69,1307138404128</text:p>
          </table:table-cell>
          <table:table-cell table:style-name="ce1" table:formula="of:=[.G456]+h" office:value-type="float" office:value="4.54999999999995" calcext:value-type="float">
            <text:p>4,54999999999995</text:p>
          </table:table-cell>
          <table:table-cell table:style-name="ce1" table:formula="of:=[.H456]+ h*[.F457]" office:value-type="float" office:value="32.9347815489945" calcext:value-type="float">
            <text:p>32,93478154899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7]" office:value-type="float" office:value="4.54999999999995" calcext:value-type="float">
            <text:p>4,54999999999995</text:p>
          </table:table-cell>
          <table:table-cell table:style-name="ce1" table:formula="of:=[.H457]" office:value-type="float" office:value="32.9347815489945" calcext:value-type="float">
            <text:p>32,9347815489945</text:p>
          </table:table-cell>
          <table:table-cell table:style-name="ce1" table:formula="of:=-68 - ([.E458]^2/Ao)" office:value-type="float" office:value="-69.08469983568" calcext:value-type="float">
            <text:p>-69,08469983568</text:p>
          </table:table-cell>
          <table:table-cell table:style-name="ce1" table:formula="of:=[.G457]+h" office:value-type="float" office:value="4.55999999999995" calcext:value-type="float">
            <text:p>4,55999999999995</text:p>
          </table:table-cell>
          <table:table-cell table:style-name="ce1" table:formula="of:=[.H457]+ h*[.F458]" office:value-type="float" office:value="32.2439345506377" calcext:value-type="float">
            <text:p>32,24393455063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8]" office:value-type="float" office:value="4.55999999999995" calcext:value-type="float">
            <text:p>4,55999999999995</text:p>
          </table:table-cell>
          <table:table-cell table:style-name="ce1" table:formula="of:=[.H458]" office:value-type="float" office:value="32.2439345506377" calcext:value-type="float">
            <text:p>32,2439345506377</text:p>
          </table:table-cell>
          <table:table-cell table:style-name="ce1" table:formula="of:=-68 - ([.E459]^2/Ao)" office:value-type="float" office:value="-69.0396713153058" calcext:value-type="float">
            <text:p>-69,0396713153058</text:p>
          </table:table-cell>
          <table:table-cell table:style-name="ce1" table:formula="of:=[.G458]+h" office:value-type="float" office:value="4.56999999999995" calcext:value-type="float">
            <text:p>4,56999999999995</text:p>
          </table:table-cell>
          <table:table-cell table:style-name="ce1" table:formula="of:=[.H458]+ h*[.F459]" office:value-type="float" office:value="31.5535378374846" calcext:value-type="float">
            <text:p>31,55353783748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9]" office:value-type="float" office:value="4.56999999999995" calcext:value-type="float">
            <text:p>4,56999999999995</text:p>
          </table:table-cell>
          <table:table-cell table:style-name="ce1" table:formula="of:=[.H459]" office:value-type="float" office:value="31.5535378374846" calcext:value-type="float">
            <text:p>31,5535378374846</text:p>
          </table:table-cell>
          <table:table-cell table:style-name="ce1" table:formula="of:=-68 - ([.E460]^2/Ao)" office:value-type="float" office:value="-68.9956257500616" calcext:value-type="float">
            <text:p>-68,9956257500616</text:p>
          </table:table-cell>
          <table:table-cell table:style-name="ce1" table:formula="of:=[.G459]+h" office:value-type="float" office:value="4.57999999999995" calcext:value-type="float">
            <text:p>4,57999999999995</text:p>
          </table:table-cell>
          <table:table-cell table:style-name="ce1" table:formula="of:=[.H459]+ h*[.F460]" office:value-type="float" office:value="30.863581579984" calcext:value-type="float">
            <text:p>30,8635815799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0]" office:value-type="float" office:value="4.57999999999995" calcext:value-type="float">
            <text:p>4,57999999999995</text:p>
          </table:table-cell>
          <table:table-cell table:style-name="ce1" table:formula="of:=[.H460]" office:value-type="float" office:value="30.863581579984" calcext:value-type="float">
            <text:p>30,863581579984</text:p>
          </table:table-cell>
          <table:table-cell table:style-name="ce1" table:formula="of:=-68 - ([.E461]^2/Ao)" office:value-type="float" office:value="-68.9525606679443" calcext:value-type="float">
            <text:p>-68,9525606679443</text:p>
          </table:table-cell>
          <table:table-cell table:style-name="ce1" table:formula="of:=[.G460]+h" office:value-type="float" office:value="4.58999999999995" calcext:value-type="float">
            <text:p>4,58999999999995</text:p>
          </table:table-cell>
          <table:table-cell table:style-name="ce1" table:formula="of:=[.H460]+ h*[.F461]" office:value-type="float" office:value="30.1740559733045" calcext:value-type="float">
            <text:p>30,17405597330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1]" office:value-type="float" office:value="4.58999999999995" calcext:value-type="float">
            <text:p>4,58999999999995</text:p>
          </table:table-cell>
          <table:table-cell table:style-name="ce1" table:formula="of:=[.H461]" office:value-type="float" office:value="30.1740559733045" calcext:value-type="float">
            <text:p>30,1740559733045</text:p>
          </table:table-cell>
          <table:table-cell table:style-name="ce1" table:formula="of:=-68 - ([.E462]^2/Ao)" office:value-type="float" office:value="-68.9104736538801" calcext:value-type="float">
            <text:p>-68,9104736538801</text:p>
          </table:table-cell>
          <table:table-cell table:style-name="ce1" table:formula="of:=[.G461]+h" office:value-type="float" office:value="4.59999999999995" calcext:value-type="float">
            <text:p>4,59999999999995</text:p>
          </table:table-cell>
          <table:table-cell table:style-name="ce1" table:formula="of:=[.H461]+ h*[.F462]" office:value-type="float" office:value="29.4849512367657" calcext:value-type="float">
            <text:p>29,48495123676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2]" office:value-type="float" office:value="4.59999999999995" calcext:value-type="float">
            <text:p>4,59999999999995</text:p>
          </table:table-cell>
          <table:table-cell table:style-name="ce1" table:formula="of:=[.H462]" office:value-type="float" office:value="29.4849512367657" calcext:value-type="float">
            <text:p>29,4849512367657</text:p>
          </table:table-cell>
          <table:table-cell table:style-name="ce1" table:formula="of:=-68 - ([.E463]^2/Ao)" office:value-type="float" office:value="-68.8693623494345" calcext:value-type="float">
            <text:p>-68,8693623494345</text:p>
          </table:table-cell>
          <table:table-cell table:style-name="ce1" table:formula="of:=[.G462]+h" office:value-type="float" office:value="4.60999999999995" calcext:value-type="float">
            <text:p>4,60999999999995</text:p>
          </table:table-cell>
          <table:table-cell table:style-name="ce1" table:formula="of:=[.H462]+ h*[.F463]" office:value-type="float" office:value="28.7962576132714" calcext:value-type="float">
            <text:p>28,79625761327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3]" office:value-type="float" office:value="4.60999999999995" calcext:value-type="float">
            <text:p>4,60999999999995</text:p>
          </table:table-cell>
          <table:table-cell table:style-name="ce1" table:formula="of:=[.H463]" office:value-type="float" office:value="28.7962576132714" calcext:value-type="float">
            <text:p>28,7962576132714</text:p>
          </table:table-cell>
          <table:table-cell table:style-name="ce1" table:formula="of:=-68 - ([.E464]^2/Ao)" office:value-type="float" office:value="-68.8292244525299" calcext:value-type="float">
            <text:p>-68,8292244525299</text:p>
          </table:table-cell>
          <table:table-cell table:style-name="ce1" table:formula="of:=[.G463]+h" office:value-type="float" office:value="4.61999999999995" calcext:value-type="float">
            <text:p>4,61999999999995</text:p>
          </table:table-cell>
          <table:table-cell table:style-name="ce1" table:formula="of:=[.H463]+ h*[.F464]" office:value-type="float" office:value="28.1079653687461" calcext:value-type="float">
            <text:p>28,10796536874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4]" office:value-type="float" office:value="4.61999999999995" calcext:value-type="float">
            <text:p>4,61999999999995</text:p>
          </table:table-cell>
          <table:table-cell table:style-name="ce1" table:formula="of:=[.H464]" office:value-type="float" office:value="28.1079653687461" calcext:value-type="float">
            <text:p>28,1079653687461</text:p>
          </table:table-cell>
          <table:table-cell table:style-name="ce1" table:formula="of:=-68 - ([.E465]^2/Ao)" office:value-type="float" office:value="-68.7900577171706" calcext:value-type="float">
            <text:p>-68,7900577171706</text:p>
          </table:table-cell>
          <table:table-cell table:style-name="ce1" table:formula="of:=[.G464]+h" office:value-type="float" office:value="4.62999999999995" calcext:value-type="float">
            <text:p>4,62999999999995</text:p>
          </table:table-cell>
          <table:table-cell table:style-name="ce1" table:formula="of:=[.H464]+ h*[.F465]" office:value-type="float" office:value="27.4200647915744" calcext:value-type="float">
            <text:p>27,42006479157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5]" office:value-type="float" office:value="4.62999999999995" calcext:value-type="float">
            <text:p>4,62999999999995</text:p>
          </table:table-cell>
          <table:table-cell table:style-name="ce1" table:formula="of:=[.H465]" office:value-type="float" office:value="27.4200647915744" calcext:value-type="float">
            <text:p>27,4200647915744</text:p>
          </table:table-cell>
          <table:table-cell table:style-name="ce1" table:formula="of:=-68 - ([.E466]^2/Ao)" office:value-type="float" office:value="-68.7518599531741" calcext:value-type="float">
            <text:p>-68,7518599531741</text:p>
          </table:table-cell>
          <table:table-cell table:style-name="ce1" table:formula="of:=[.G465]+h" office:value-type="float" office:value="4.63999999999995" calcext:value-type="float">
            <text:p>4,63999999999995</text:p>
          </table:table-cell>
          <table:table-cell table:style-name="ce1" table:formula="of:=[.H465]+ h*[.F466]" office:value-type="float" office:value="26.7325461920427" calcext:value-type="float">
            <text:p>26,73254619204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6]" office:value-type="float" office:value="4.63999999999995" calcext:value-type="float">
            <text:p>4,63999999999995</text:p>
          </table:table-cell>
          <table:table-cell table:style-name="ce1" table:formula="of:=[.H466]" office:value-type="float" office:value="26.7325461920427" calcext:value-type="float">
            <text:p>26,7325461920427</text:p>
          </table:table-cell>
          <table:table-cell table:style-name="ce1" table:formula="of:=-68 - ([.E467]^2/Ao)" office:value-type="float" office:value="-68.7146290259097" calcext:value-type="float">
            <text:p>-68,7146290259097</text:p>
          </table:table-cell>
          <table:table-cell table:style-name="ce1" table:formula="of:=[.G466]+h" office:value-type="float" office:value="4.64999999999995" calcext:value-type="float">
            <text:p>4,64999999999995</text:p>
          </table:table-cell>
          <table:table-cell table:style-name="ce1" table:formula="of:=[.H466]+ h*[.F467]" office:value-type="float" office:value="26.0453999017836" calcext:value-type="float">
            <text:p>26,04539990178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7]" office:value-type="float" office:value="4.64999999999995" calcext:value-type="float">
            <text:p>4,64999999999995</text:p>
          </table:table-cell>
          <table:table-cell table:style-name="ce1" table:formula="of:=[.H467]" office:value-type="float" office:value="26.0453999017836" calcext:value-type="float">
            <text:p>26,0453999017836</text:p>
          </table:table-cell>
          <table:table-cell table:style-name="ce1" table:formula="of:=-68 - ([.E468]^2/Ao)" office:value-type="float" office:value="-68.6783628560438" calcext:value-type="float">
            <text:p>-68,6783628560438</text:p>
          </table:table-cell>
          <table:table-cell table:style-name="ce1" table:formula="of:=[.G467]+h" office:value-type="float" office:value="4.65999999999995" calcext:value-type="float">
            <text:p>4,65999999999995</text:p>
          </table:table-cell>
          <table:table-cell table:style-name="ce1" table:formula="of:=[.H467]+ h*[.F468]" office:value-type="float" office:value="25.3586162732231" calcext:value-type="float">
            <text:p>25,35861627322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8]" office:value-type="float" office:value="4.65999999999995" calcext:value-type="float">
            <text:p>4,65999999999995</text:p>
          </table:table-cell>
          <table:table-cell table:style-name="ce1" table:formula="of:=[.H468]" office:value-type="float" office:value="25.3586162732231" calcext:value-type="float">
            <text:p>25,3586162732231</text:p>
          </table:table-cell>
          <table:table-cell table:style-name="ce1" table:formula="of:=-68 - ([.E469]^2/Ao)" office:value-type="float" office:value="-68.6430594192926" calcext:value-type="float">
            <text:p>-68,6430594192926</text:p>
          </table:table-cell>
          <table:table-cell table:style-name="ce1" table:formula="of:=[.G468]+h" office:value-type="float" office:value="4.66999999999995" calcext:value-type="float">
            <text:p>4,66999999999995</text:p>
          </table:table-cell>
          <table:table-cell table:style-name="ce1" table:formula="of:=[.H468]+ h*[.F469]" office:value-type="float" office:value="24.6721856790302" calcext:value-type="float">
            <text:p>24,67218567903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9]" office:value-type="float" office:value="4.66999999999995" calcext:value-type="float">
            <text:p>4,66999999999995</text:p>
          </table:table-cell>
          <table:table-cell table:style-name="ce1" table:formula="of:=[.H469]" office:value-type="float" office:value="24.6721856790302" calcext:value-type="float">
            <text:p>24,6721856790302</text:p>
          </table:table-cell>
          <table:table-cell table:style-name="ce1" table:formula="of:=-68 - ([.E470]^2/Ao)" office:value-type="float" office:value="-68.6087167461806" calcext:value-type="float">
            <text:p>-68,6087167461806</text:p>
          </table:table-cell>
          <table:table-cell table:style-name="ce1" table:formula="of:=[.G469]+h" office:value-type="float" office:value="4.67999999999995" calcext:value-type="float">
            <text:p>4,67999999999995</text:p>
          </table:table-cell>
          <table:table-cell table:style-name="ce1" table:formula="of:=[.H469]+ h*[.F470]" office:value-type="float" office:value="23.9860985115684" calcext:value-type="float">
            <text:p>23,98609851156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0]" office:value-type="float" office:value="4.67999999999995" calcext:value-type="float">
            <text:p>4,67999999999995</text:p>
          </table:table-cell>
          <table:table-cell table:style-name="ce1" table:formula="of:=[.H470]" office:value-type="float" office:value="23.9860985115684" calcext:value-type="float">
            <text:p>23,9860985115684</text:p>
          </table:table-cell>
          <table:table-cell table:style-name="ce1" table:formula="of:=-68 - ([.E471]^2/Ao)" office:value-type="float" office:value="-68.5753329218067" calcext:value-type="float">
            <text:p>-68,5753329218067</text:p>
          </table:table-cell>
          <table:table-cell table:style-name="ce1" table:formula="of:=[.G470]+h" office:value-type="float" office:value="4.68999999999994" calcext:value-type="float">
            <text:p>4,68999999999994</text:p>
          </table:table-cell>
          <table:table-cell table:style-name="ce1" table:formula="of:=[.H470]+ h*[.F471]" office:value-type="float" office:value="23.3003451823503" calcext:value-type="float">
            <text:p>23,30034518235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1]" office:value-type="float" office:value="4.68999999999994" calcext:value-type="float">
            <text:p>4,68999999999994</text:p>
          </table:table-cell>
          <table:table-cell table:style-name="ce1" table:formula="of:=[.H471]" office:value-type="float" office:value="23.3003451823503" calcext:value-type="float">
            <text:p>23,3003451823503</text:p>
          </table:table-cell>
          <table:table-cell table:style-name="ce1" table:formula="of:=-68 - ([.E472]^2/Ao)" office:value-type="float" office:value="-68.5429060856167" calcext:value-type="float">
            <text:p>-68,5429060856167</text:p>
          </table:table-cell>
          <table:table-cell table:style-name="ce1" table:formula="of:=[.G471]+h" office:value-type="float" office:value="4.69999999999994" calcext:value-type="float">
            <text:p>4,69999999999994</text:p>
          </table:table-cell>
          <table:table-cell table:style-name="ce1" table:formula="of:=[.H471]+ h*[.F472]" office:value-type="float" office:value="22.6149161214942" calcext:value-type="float">
            <text:p>22,61491612149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2]" office:value-type="float" office:value="4.69999999999994" calcext:value-type="float">
            <text:p>4,69999999999994</text:p>
          </table:table-cell>
          <table:table-cell table:style-name="ce1" table:formula="of:=[.H472]" office:value-type="float" office:value="22.6149161214942" calcext:value-type="float">
            <text:p>22,6149161214942</text:p>
          </table:table-cell>
          <table:table-cell table:style-name="ce1" table:formula="of:=-68 - ([.E473]^2/Ao)" office:value-type="float" office:value="-68.5114344311822" calcext:value-type="float">
            <text:p>-68,5114344311822</text:p>
          </table:table-cell>
          <table:table-cell table:style-name="ce1" table:formula="of:=[.G472]+h" office:value-type="float" office:value="4.70999999999994" calcext:value-type="float">
            <text:p>4,70999999999994</text:p>
          </table:table-cell>
          <table:table-cell table:style-name="ce1" table:formula="of:=[.H472]+ h*[.F473]" office:value-type="float" office:value="21.9298017771823" calcext:value-type="float">
            <text:p>21,92980177718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3]" office:value-type="float" office:value="4.70999999999994" calcext:value-type="float">
            <text:p>4,70999999999994</text:p>
          </table:table-cell>
          <table:table-cell table:style-name="ce1" table:formula="of:=[.H473]" office:value-type="float" office:value="21.9298017771823" calcext:value-type="float">
            <text:p>21,9298017771823</text:p>
          </table:table-cell>
          <table:table-cell table:style-name="ce1" table:formula="of:=-68 - ([.E474]^2/Ao)" office:value-type="float" office:value="-68.4809162059865" calcext:value-type="float">
            <text:p>-68,4809162059865</text:p>
          </table:table-cell>
          <table:table-cell table:style-name="ce1" table:formula="of:=[.G473]+h" office:value-type="float" office:value="4.71999999999994" calcext:value-type="float">
            <text:p>4,71999999999994</text:p>
          </table:table-cell>
          <table:table-cell table:style-name="ce1" table:formula="of:=[.H473]+ h*[.F474]" office:value-type="float" office:value="21.2449926151225" calcext:value-type="float">
            <text:p>21,24499261512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4]" office:value-type="float" office:value="4.71999999999994" calcext:value-type="float">
            <text:p>4,71999999999994</text:p>
          </table:table-cell>
          <table:table-cell table:style-name="ce1" table:formula="of:=[.H474]" office:value-type="float" office:value="21.2449926151225" calcext:value-type="float">
            <text:p>21,2449926151225</text:p>
          </table:table-cell>
          <table:table-cell table:style-name="ce1" table:formula="of:=-68 - ([.E475]^2/Ao)" office:value-type="float" office:value="-68.4513497112166" calcext:value-type="float">
            <text:p>-68,4513497112166</text:p>
          </table:table-cell>
          <table:table-cell table:style-name="ce1" table:formula="of:=[.G474]+h" office:value-type="float" office:value="4.72999999999994" calcext:value-type="float">
            <text:p>4,72999999999994</text:p>
          </table:table-cell>
          <table:table-cell table:style-name="ce1" table:formula="of:=[.H474]+ h*[.F475]" office:value-type="float" office:value="20.5604791180103" calcext:value-type="float">
            <text:p>20,56047911801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5]" office:value-type="float" office:value="4.72999999999994" calcext:value-type="float">
            <text:p>4,72999999999994</text:p>
          </table:table-cell>
          <table:table-cell table:style-name="ce1" table:formula="of:=[.H475]" office:value-type="float" office:value="20.5604791180103" calcext:value-type="float">
            <text:p>20,5604791180103</text:p>
          </table:table-cell>
          <table:table-cell table:style-name="ce1" table:formula="of:=-68 - ([.E476]^2/Ao)" office:value-type="float" office:value="-68.4227333015621" calcext:value-type="float">
            <text:p>-68,4227333015621</text:p>
          </table:table-cell>
          <table:table-cell table:style-name="ce1" table:formula="of:=[.G475]+h" office:value-type="float" office:value="4.73999999999994" calcext:value-type="float">
            <text:p>4,73999999999994</text:p>
          </table:table-cell>
          <table:table-cell table:style-name="ce1" table:formula="of:=[.H475]+ h*[.F476]" office:value-type="float" office:value="19.8762517849947" calcext:value-type="float">
            <text:p>19,87625178499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6]" office:value-type="float" office:value="4.73999999999994" calcext:value-type="float">
            <text:p>4,73999999999994</text:p>
          </table:table-cell>
          <table:table-cell table:style-name="ce1" table:formula="of:=[.H476]" office:value-type="float" office:value="19.8762517849947" calcext:value-type="float">
            <text:p>19,8762517849947</text:p>
          </table:table-cell>
          <table:table-cell table:style-name="ce1" table:formula="of:=-68 - ([.E477]^2/Ao)" office:value-type="float" office:value="-68.3950653850205" calcext:value-type="float">
            <text:p>-68,3950653850205</text:p>
          </table:table-cell>
          <table:table-cell table:style-name="ce1" table:formula="of:=[.G476]+h" office:value-type="float" office:value="4.74999999999994" calcext:value-type="float">
            <text:p>4,74999999999994</text:p>
          </table:table-cell>
          <table:table-cell table:style-name="ce1" table:formula="of:=[.H476]+ h*[.F477]" office:value-type="float" office:value="19.1923011311445" calcext:value-type="float">
            <text:p>19,19230113114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7]" office:value-type="float" office:value="4.74999999999994" calcext:value-type="float">
            <text:p>4,74999999999994</text:p>
          </table:table-cell>
          <table:table-cell table:style-name="ce1" table:formula="of:=[.H477]" office:value-type="float" office:value="19.1923011311445" calcext:value-type="float">
            <text:p>19,1923011311445</text:p>
          </table:table-cell>
          <table:table-cell table:style-name="ce1" table:formula="of:=-68 - ([.E478]^2/Ao)" office:value-type="float" office:value="-68.3683444227085" calcext:value-type="float">
            <text:p>-68,3683444227085</text:p>
          </table:table-cell>
          <table:table-cell table:style-name="ce1" table:formula="of:=[.G477]+h" office:value-type="float" office:value="4.75999999999994" calcext:value-type="float">
            <text:p>4,75999999999994</text:p>
          </table:table-cell>
          <table:table-cell table:style-name="ce1" table:formula="of:=[.H477]+ h*[.F478]" office:value-type="float" office:value="18.5086176869174" calcext:value-type="float">
            <text:p>18,50861768691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8]" office:value-type="float" office:value="4.75999999999994" calcext:value-type="float">
            <text:p>4,75999999999994</text:p>
          </table:table-cell>
          <table:table-cell table:style-name="ce1" table:formula="of:=[.H478]" office:value-type="float" office:value="18.5086176869174" calcext:value-type="float">
            <text:p>18,5086176869174</text:p>
          </table:table-cell>
          <table:table-cell table:style-name="ce1" table:formula="of:=-68 - ([.E479]^2/Ao)" office:value-type="float" office:value="-68.3425689286805" calcext:value-type="float">
            <text:p>-68,3425689286805</text:p>
          </table:table-cell>
          <table:table-cell table:style-name="ce1" table:formula="of:=[.G478]+h" office:value-type="float" office:value="4.76999999999994" calcext:value-type="float">
            <text:p>4,76999999999994</text:p>
          </table:table-cell>
          <table:table-cell table:style-name="ce1" table:formula="of:=[.H478]+ h*[.F479]" office:value-type="float" office:value="17.8251919976306" calcext:value-type="float">
            <text:p>17,82519199763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9]" office:value-type="float" office:value="4.76999999999994" calcext:value-type="float">
            <text:p>4,76999999999994</text:p>
          </table:table-cell>
          <table:table-cell table:style-name="ce1" table:formula="of:=[.H479]" office:value-type="float" office:value="17.8251919976306" calcext:value-type="float">
            <text:p>17,8251919976306</text:p>
          </table:table-cell>
          <table:table-cell table:style-name="ce1" table:formula="of:=-68 - ([.E480]^2/Ao)" office:value-type="float" office:value="-68.3177374697524" calcext:value-type="float">
            <text:p>-68,3177374697524</text:p>
          </table:table-cell>
          <table:table-cell table:style-name="ce1" table:formula="of:=[.G479]+h" office:value-type="float" office:value="4.77999999999994" calcext:value-type="float">
            <text:p>4,77999999999994</text:p>
          </table:table-cell>
          <table:table-cell table:style-name="ce1" table:formula="of:=[.H479]+ h*[.F480]" office:value-type="float" office:value="17.1420146229331" calcext:value-type="float">
            <text:p>17,14201462293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0]" office:value-type="float" office:value="4.77999999999994" calcext:value-type="float">
            <text:p>4,77999999999994</text:p>
          </table:table-cell>
          <table:table-cell table:style-name="ce1" table:formula="of:=[.H480]" office:value-type="float" office:value="17.1420146229331" calcext:value-type="float">
            <text:p>17,1420146229331</text:p>
          </table:table-cell>
          <table:table-cell table:style-name="ce1" table:formula="of:=-68 - ([.E481]^2/Ao)" office:value-type="float" office:value="-68.2938486653329" calcext:value-type="float">
            <text:p>-68,2938486653329</text:p>
          </table:table-cell>
          <table:table-cell table:style-name="ce1" table:formula="of:=[.G480]+h" office:value-type="float" office:value="4.78999999999994" calcext:value-type="float">
            <text:p>4,78999999999994</text:p>
          </table:table-cell>
          <table:table-cell table:style-name="ce1" table:formula="of:=[.H480]+ h*[.F481]" office:value-type="float" office:value="16.4590761362797" calcext:value-type="float">
            <text:p>16,45907613627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1]" office:value-type="float" office:value="4.78999999999994" calcext:value-type="float">
            <text:p>4,78999999999994</text:p>
          </table:table-cell>
          <table:table-cell table:style-name="ce1" table:formula="of:=[.H481]" office:value-type="float" office:value="16.4590761362797" calcext:value-type="float">
            <text:p>16,4590761362797</text:p>
          </table:table-cell>
          <table:table-cell table:style-name="ce1" table:formula="of:=-68 - ([.E482]^2/Ao)" office:value-type="float" office:value="-68.2709011872599" calcext:value-type="float">
            <text:p>-68,2709011872599</text:p>
          </table:table-cell>
          <table:table-cell table:style-name="ce1" table:formula="of:=[.G481]+h" office:value-type="float" office:value="4.79999999999994" calcext:value-type="float">
            <text:p>4,79999999999994</text:p>
          </table:table-cell>
          <table:table-cell table:style-name="ce1" table:formula="of:=[.H481]+ h*[.F482]" office:value-type="float" office:value="15.7763671244071" calcext:value-type="float">
            <text:p>15,77636712440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2]" office:value-type="float" office:value="4.79999999999994" calcext:value-type="float">
            <text:p>4,79999999999994</text:p>
          </table:table-cell>
          <table:table-cell table:style-name="ce1" table:formula="of:=[.H482]" office:value-type="float" office:value="15.7763671244071" calcext:value-type="float">
            <text:p>15,7763671244071</text:p>
          </table:table-cell>
          <table:table-cell table:style-name="ce1" table:formula="of:=-68 - ([.E483]^2/Ao)" office:value-type="float" office:value="-68.2488937596441" calcext:value-type="float">
            <text:p>-68,2488937596441</text:p>
          </table:table-cell>
          <table:table-cell table:style-name="ce1" table:formula="of:=[.G482]+h" office:value-type="float" office:value="4.80999999999994" calcext:value-type="float">
            <text:p>4,80999999999994</text:p>
          </table:table-cell>
          <table:table-cell table:style-name="ce1" table:formula="of:=[.H482]+ h*[.F483]" office:value-type="float" office:value="15.0938781868107" calcext:value-type="float">
            <text:p>15,09387818681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3]" office:value-type="float" office:value="4.80999999999994" calcext:value-type="float">
            <text:p>4,80999999999994</text:p>
          </table:table-cell>
          <table:table-cell table:style-name="ce1" table:formula="of:=[.H483]" office:value-type="float" office:value="15.0938781868107" calcext:value-type="float">
            <text:p>15,0938781868107</text:p>
          </table:table-cell>
          <table:table-cell table:style-name="ce1" table:formula="of:=-68 - ([.E484]^2/Ao)" office:value-type="float" office:value="-68.2278251587183" calcext:value-type="float">
            <text:p>-68,2278251587183</text:p>
          </table:table-cell>
          <table:table-cell table:style-name="ce1" table:formula="of:=[.G483]+h" office:value-type="float" office:value="4.81999999999994" calcext:value-type="float">
            <text:p>4,81999999999994</text:p>
          </table:table-cell>
          <table:table-cell table:style-name="ce1" table:formula="of:=[.H483]+ h*[.F484]" office:value-type="float" office:value="14.4115999352235" calcext:value-type="float">
            <text:p>14,41159993522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4]" office:value-type="float" office:value="4.81999999999994" calcext:value-type="float">
            <text:p>4,81999999999994</text:p>
          </table:table-cell>
          <table:table-cell table:style-name="ce1" table:formula="of:=[.H484]" office:value-type="float" office:value="14.4115999352235" calcext:value-type="float">
            <text:p>14,4115999352235</text:p>
          </table:table-cell>
          <table:table-cell table:style-name="ce1" table:formula="of:=-68 - ([.E485]^2/Ao)" office:value-type="float" office:value="-68.2076942126929" calcext:value-type="float">
            <text:p>-68,2076942126929</text:p>
          </table:table-cell>
          <table:table-cell table:style-name="ce1" table:formula="of:=[.G484]+h" office:value-type="float" office:value="4.82999999999994" calcext:value-type="float">
            <text:p>4,82999999999994</text:p>
          </table:table-cell>
          <table:table-cell table:style-name="ce1" table:formula="of:=[.H484]+ h*[.F485]" office:value-type="float" office:value="13.7295229930966" calcext:value-type="float">
            <text:p>13,72952299309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5]" office:value-type="float" office:value="4.82999999999994" calcext:value-type="float">
            <text:p>4,82999999999994</text:p>
          </table:table-cell>
          <table:table-cell table:style-name="ce1" table:formula="of:=[.H485]" office:value-type="float" office:value="13.7295229930966" calcext:value-type="float">
            <text:p>13,7295229930966</text:p>
          </table:table-cell>
          <table:table-cell table:style-name="ce1" table:formula="of:=-68 - ([.E486]^2/Ao)" office:value-type="float" office:value="-68.188499801618" calcext:value-type="float">
            <text:p>-68,188499801618</text:p>
          </table:table-cell>
          <table:table-cell table:style-name="ce1" table:formula="of:=[.G485]+h" office:value-type="float" office:value="4.83999999999994" calcext:value-type="float">
            <text:p>4,83999999999994</text:p>
          </table:table-cell>
          <table:table-cell table:style-name="ce1" table:formula="of:=[.H485]+ h*[.F486]" office:value-type="float" office:value="13.0476379950804" calcext:value-type="float">
            <text:p>13,04763799508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6]" office:value-type="float" office:value="4.83999999999994" calcext:value-type="float">
            <text:p>4,83999999999994</text:p>
          </table:table-cell>
          <table:table-cell table:style-name="ce1" table:formula="of:=[.H486]" office:value-type="float" office:value="13.0476379950804" calcext:value-type="float">
            <text:p>13,0476379950804</text:p>
          </table:table-cell>
          <table:table-cell table:style-name="ce1" table:formula="of:=-68 - ([.E487]^2/Ao)" office:value-type="float" office:value="-68.1702408572507" calcext:value-type="float">
            <text:p>-68,1702408572507</text:p>
          </table:table-cell>
          <table:table-cell table:style-name="ce1" table:formula="of:=[.G486]+h" office:value-type="float" office:value="4.84999999999994" calcext:value-type="float">
            <text:p>4,84999999999994</text:p>
          </table:table-cell>
          <table:table-cell table:style-name="ce1" table:formula="of:=[.H486]+ h*[.F487]" office:value-type="float" office:value="12.3659355865079" calcext:value-type="float">
            <text:p>12,36593558650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7]" office:value-type="float" office:value="4.84999999999994" calcext:value-type="float">
            <text:p>4,84999999999994</text:p>
          </table:table-cell>
          <table:table-cell table:style-name="ce1" table:formula="of:=[.H487]" office:value-type="float" office:value="12.3659355865079" calcext:value-type="float">
            <text:p>12,3659355865079</text:p>
          </table:table-cell>
          <table:table-cell table:style-name="ce1" table:formula="of:=-68 - ([.E488]^2/Ao)" office:value-type="float" office:value="-68.1529163629297" calcext:value-type="float">
            <text:p>-68,1529163629297</text:p>
          </table:table-cell>
          <table:table-cell table:style-name="ce1" table:formula="of:=[.G487]+h" office:value-type="float" office:value="4.85999999999994" calcext:value-type="float">
            <text:p>4,85999999999994</text:p>
          </table:table-cell>
          <table:table-cell table:style-name="ce1" table:formula="of:=[.H487]+ h*[.F488]" office:value-type="float" office:value="11.6844064228786" calcext:value-type="float">
            <text:p>11,68440642287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8]" office:value-type="float" office:value="4.85999999999994" calcext:value-type="float">
            <text:p>4,85999999999994</text:p>
          </table:table-cell>
          <table:table-cell table:style-name="ce1" table:formula="of:=[.H488]" office:value-type="float" office:value="11.6844064228786" calcext:value-type="float">
            <text:p>11,6844064228786</text:p>
          </table:table-cell>
          <table:table-cell table:style-name="ce1" table:formula="of:=-68 - ([.E489]^2/Ao)" office:value-type="float" office:value="-68.136525353455" calcext:value-type="float">
            <text:p>-68,136525353455</text:p>
          </table:table-cell>
          <table:table-cell table:style-name="ce1" table:formula="of:=[.G488]+h" office:value-type="float" office:value="4.86999999999994" calcext:value-type="float">
            <text:p>4,86999999999994</text:p>
          </table:table-cell>
          <table:table-cell table:style-name="ce1" table:formula="of:=[.H488]+ h*[.F489]" office:value-type="float" office:value="11.0030411693441" calcext:value-type="float">
            <text:p>11,00304116934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9]" office:value-type="float" office:value="4.86999999999994" calcext:value-type="float">
            <text:p>4,86999999999994</text:p>
          </table:table-cell>
          <table:table-cell table:style-name="ce1" table:formula="of:=[.H489]" office:value-type="float" office:value="11.0030411693441" calcext:value-type="float">
            <text:p>11,0030411693441</text:p>
          </table:table-cell>
          <table:table-cell table:style-name="ce1" table:formula="of:=-68 - ([.E490]^2/Ao)" office:value-type="float" office:value="-68.1210669149743" calcext:value-type="float">
            <text:p>-68,1210669149743</text:p>
          </table:table-cell>
          <table:table-cell table:style-name="ce1" table:formula="of:=[.G489]+h" office:value-type="float" office:value="4.87999999999994" calcext:value-type="float">
            <text:p>4,87999999999994</text:p>
          </table:table-cell>
          <table:table-cell table:style-name="ce1" table:formula="of:=[.H489]+ h*[.F490]" office:value-type="float" office:value="10.3218305001943" calcext:value-type="float">
            <text:p>10,32183050019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0]" office:value-type="float" office:value="4.87999999999994" calcext:value-type="float">
            <text:p>4,87999999999994</text:p>
          </table:table-cell>
          <table:table-cell table:style-name="ce1" table:formula="of:=[.H490]" office:value-type="float" office:value="10.3218305001943" calcext:value-type="float">
            <text:p>10,3218305001943</text:p>
          </table:table-cell>
          <table:table-cell table:style-name="ce1" table:formula="of:=-68 - ([.E491]^2/Ao)" office:value-type="float" office:value="-68.1065401848748" calcext:value-type="float">
            <text:p>-68,1065401848748</text:p>
          </table:table-cell>
          <table:table-cell table:style-name="ce1" table:formula="of:=[.G490]+h" office:value-type="float" office:value="4.88999999999994" calcext:value-type="float">
            <text:p>4,88999999999994</text:p>
          </table:table-cell>
          <table:table-cell table:style-name="ce1" table:formula="of:=[.H490]+ h*[.F491]" office:value-type="float" office:value="9.64076509834556" calcext:value-type="float">
            <text:p>9,640765098345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1]" office:value-type="float" office:value="4.88999999999994" calcext:value-type="float">
            <text:p>4,88999999999994</text:p>
          </table:table-cell>
          <table:table-cell table:style-name="ce1" table:formula="of:=[.H491]" office:value-type="float" office:value="9.64076509834556" calcext:value-type="float">
            <text:p>9,64076509834556</text:p>
          </table:table-cell>
          <table:table-cell table:style-name="ce1" table:formula="of:=-68 - ([.E492]^2/Ao)" office:value-type="float" office:value="-68.0929443516815" calcext:value-type="float">
            <text:p>-68,0929443516815</text:p>
          </table:table-cell>
          <table:table-cell table:style-name="ce1" table:formula="of:=[.G491]+h" office:value-type="float" office:value="4.89999999999994" calcext:value-type="float">
            <text:p>4,89999999999994</text:p>
          </table:table-cell>
          <table:table-cell table:style-name="ce1" table:formula="of:=[.H491]+ h*[.F492]" office:value-type="float" office:value="8.95983565482874" calcext:value-type="float">
            <text:p>8,959835654828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2]" office:value-type="float" office:value="4.89999999999994" calcext:value-type="float">
            <text:p>4,89999999999994</text:p>
          </table:table-cell>
          <table:table-cell table:style-name="ce1" table:formula="of:=[.H492]" office:value-type="float" office:value="8.95983565482874" calcext:value-type="float">
            <text:p>8,95983565482874</text:p>
          </table:table-cell>
          <table:table-cell table:style-name="ce1" table:formula="of:=-68 - ([.E493]^2/Ao)" office:value-type="float" office:value="-68.0802786549616" calcext:value-type="float">
            <text:p>-68,0802786549616</text:p>
          </table:table-cell>
          <table:table-cell table:style-name="ce1" table:formula="of:=[.G492]+h" office:value-type="float" office:value="4.90999999999994" calcext:value-type="float">
            <text:p>4,90999999999994</text:p>
          </table:table-cell>
          <table:table-cell table:style-name="ce1" table:formula="of:=[.H492]+ h*[.F493]" office:value-type="float" office:value="8.27903286827913" calcext:value-type="float">
            <text:p>8,279032868279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3]" office:value-type="float" office:value="4.90999999999994" calcext:value-type="float">
            <text:p>4,90999999999994</text:p>
          </table:table-cell>
          <table:table-cell table:style-name="ce1" table:formula="of:=[.H493]" office:value-type="float" office:value="8.27903286827913" calcext:value-type="float">
            <text:p>8,27903286827913</text:p>
          </table:table-cell>
          <table:table-cell table:style-name="ce1" table:formula="of:=-68 - ([.E494]^2/Ao)" office:value-type="float" office:value="-68.068542385234" calcext:value-type="float">
            <text:p>-68,068542385234</text:p>
          </table:table-cell>
          <table:table-cell table:style-name="ce1" table:formula="of:=[.G493]+h" office:value-type="float" office:value="4.91999999999994" calcext:value-type="float">
            <text:p>4,91999999999994</text:p>
          </table:table-cell>
          <table:table-cell table:style-name="ce1" table:formula="of:=[.H493]+ h*[.F494]" office:value-type="float" office:value="7.59834744442679" calcext:value-type="float">
            <text:p>7,598347444426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4]" office:value-type="float" office:value="4.91999999999994" calcext:value-type="float">
            <text:p>4,91999999999994</text:p>
          </table:table-cell>
          <table:table-cell table:style-name="ce1" table:formula="of:=[.H494]" office:value-type="float" office:value="7.59834744442679" calcext:value-type="float">
            <text:p>7,59834744442679</text:p>
          </table:table-cell>
          <table:table-cell table:style-name="ce1" table:formula="of:=-68 - ([.E495]^2/Ao)" office:value-type="float" office:value="-68.0577348838862" calcext:value-type="float">
            <text:p>-68,0577348838862</text:p>
          </table:table-cell>
          <table:table-cell table:style-name="ce1" table:formula="of:=[.G494]+h" office:value-type="float" office:value="4.92999999999994" calcext:value-type="float">
            <text:p>4,92999999999994</text:p>
          </table:table-cell>
          <table:table-cell table:style-name="ce1" table:formula="of:=[.H494]+ h*[.F495]" office:value-type="float" office:value="6.91777009558793" calcext:value-type="float">
            <text:p>6,917770095587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5]" office:value-type="float" office:value="4.92999999999994" calcext:value-type="float">
            <text:p>4,92999999999994</text:p>
          </table:table-cell>
          <table:table-cell table:style-name="ce1" table:formula="of:=[.H495]" office:value-type="float" office:value="6.91777009558793" calcext:value-type="float">
            <text:p>6,91777009558793</text:p>
          </table:table-cell>
          <table:table-cell table:style-name="ce1" table:formula="of:=-68 - ([.E496]^2/Ao)" office:value-type="float" office:value="-68.0478555430954" calcext:value-type="float">
            <text:p>-68,0478555430954</text:p>
          </table:table-cell>
          <table:table-cell table:style-name="ce1" table:formula="of:=[.G495]+h" office:value-type="float" office:value="4.93999999999994" calcext:value-type="float">
            <text:p>4,93999999999994</text:p>
          </table:table-cell>
          <table:table-cell table:style-name="ce1" table:formula="of:=[.H495]+ h*[.F496]" office:value-type="float" office:value="6.23729154015697" calcext:value-type="float">
            <text:p>6,237291540156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6]" office:value-type="float" office:value="4.93999999999994" calcext:value-type="float">
            <text:p>4,93999999999994</text:p>
          </table:table-cell>
          <table:table-cell table:style-name="ce1" table:formula="of:=[.H496]" office:value-type="float" office:value="6.23729154015697" calcext:value-type="float">
            <text:p>6,23729154015697</text:p>
          </table:table-cell>
          <table:table-cell table:style-name="ce1" table:formula="of:=-68 - ([.E497]^2/Ao)" office:value-type="float" office:value="-68.0389038057569" calcext:value-type="float">
            <text:p>-68,0389038057569</text:p>
          </table:table-cell>
          <table:table-cell table:style-name="ce1" table:formula="of:=[.G496]+h" office:value-type="float" office:value="4.94999999999994" calcext:value-type="float">
            <text:p>4,94999999999994</text:p>
          </table:table-cell>
          <table:table-cell table:style-name="ce1" table:formula="of:=[.H496]+ h*[.F497]" office:value-type="float" office:value="5.5569025020994" calcext:value-type="float">
            <text:p>5,55690250209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7]" office:value-type="float" office:value="4.94999999999994" calcext:value-type="float">
            <text:p>4,94999999999994</text:p>
          </table:table-cell>
          <table:table-cell table:style-name="ce1" table:formula="of:=[.H497]" office:value-type="float" office:value="5.5569025020994" calcext:value-type="float">
            <text:p>5,5569025020994</text:p>
          </table:table-cell>
          <table:table-cell table:style-name="ce1" table:formula="of:=-68 - ([.E498]^2/Ao)" office:value-type="float" office:value="-68.0308791654178" calcext:value-type="float">
            <text:p>-68,0308791654178</text:p>
          </table:table-cell>
          <table:table-cell table:style-name="ce1" table:formula="of:=[.G497]+h" office:value-type="float" office:value="4.95999999999994" calcext:value-type="float">
            <text:p>4,95999999999994</text:p>
          </table:table-cell>
          <table:table-cell table:style-name="ce1" table:formula="of:=[.H497]+ h*[.F498]" office:value-type="float" office:value="4.87659371044522" calcext:value-type="float">
            <text:p>4,876593710445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8]" office:value-type="float" office:value="4.95999999999994" calcext:value-type="float">
            <text:p>4,95999999999994</text:p>
          </table:table-cell>
          <table:table-cell table:style-name="ce1" table:formula="of:=[.H498]" office:value-type="float" office:value="4.87659371044522" calcext:value-type="float">
            <text:p>4,87659371044522</text:p>
          </table:table-cell>
          <table:table-cell table:style-name="ce1" table:formula="of:=-68 - ([.E499]^2/Ao)" office:value-type="float" office:value="-68.0237811662168" calcext:value-type="float">
            <text:p>-68,0237811662168</text:p>
          </table:table-cell>
          <table:table-cell table:style-name="ce1" table:formula="of:=[.G498]+h" office:value-type="float" office:value="4.96999999999994" calcext:value-type="float">
            <text:p>4,96999999999994</text:p>
          </table:table-cell>
          <table:table-cell table:style-name="ce1" table:formula="of:=[.H498]+ h*[.F499]" office:value-type="float" office:value="4.19635589878306" calcext:value-type="float">
            <text:p>4,196355898783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9]" office:value-type="float" office:value="4.96999999999994" calcext:value-type="float">
            <text:p>4,96999999999994</text:p>
          </table:table-cell>
          <table:table-cell table:style-name="ce1" table:formula="of:=[.H499]" office:value-type="float" office:value="4.19635589878306" calcext:value-type="float">
            <text:p>4,19635589878306</text:p>
          </table:table-cell>
          <table:table-cell table:style-name="ce1" table:formula="of:=-68 - ([.E500]^2/Ao)" office:value-type="float" office:value="-68.0176094028293" calcext:value-type="float">
            <text:p>-68,0176094028293</text:p>
          </table:table-cell>
          <table:table-cell table:style-name="ce1" table:formula="of:=[.G499]+h" office:value-type="float" office:value="4.97999999999994" calcext:value-type="float">
            <text:p>4,97999999999994</text:p>
          </table:table-cell>
          <table:table-cell table:style-name="ce1" table:formula="of:=[.H499]+ h*[.F500]" office:value-type="float" office:value="3.51617980475476" calcext:value-type="float">
            <text:p>3,516179804754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0]" office:value-type="float" office:value="4.97999999999994" calcext:value-type="float">
            <text:p>4,97999999999994</text:p>
          </table:table-cell>
          <table:table-cell table:style-name="ce1" table:formula="of:=[.H500]" office:value-type="float" office:value="3.51617980475476" calcext:value-type="float">
            <text:p>3,51617980475476</text:p>
          </table:table-cell>
          <table:table-cell table:style-name="ce1" table:formula="of:=-68 - ([.E501]^2/Ao)" office:value-type="float" office:value="-68.0123635204194" calcext:value-type="float">
            <text:p>-68,0123635204194</text:p>
          </table:table-cell>
          <table:table-cell table:style-name="ce1" table:formula="of:=[.G500]+h" office:value-type="float" office:value="4.98999999999994" calcext:value-type="float">
            <text:p>4,98999999999994</text:p>
          </table:table-cell>
          <table:table-cell table:style-name="ce1" table:formula="of:=[.H500]+ h*[.F501]" office:value-type="float" office:value="2.83605616955057" calcext:value-type="float">
            <text:p>2,836056169550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1]" office:value-type="float" office:value="4.98999999999994" calcext:value-type="float">
            <text:p>4,98999999999994</text:p>
          </table:table-cell>
          <table:table-cell table:style-name="ce1" table:formula="of:=[.H501]" office:value-type="float" office:value="2.83605616955057" calcext:value-type="float">
            <text:p>2,83605616955057</text:p>
          </table:table-cell>
          <table:table-cell table:style-name="ce1" table:formula="of:=-68 - ([.E502]^2/Ao)" office:value-type="float" office:value="-68.0080432145968" calcext:value-type="float">
            <text:p>-68,0080432145968</text:p>
          </table:table-cell>
          <table:table-cell table:style-name="ce1" table:formula="of:=[.G501]+h" office:value-type="float" office:value="4.99999999999994" calcext:value-type="float">
            <text:p>4,99999999999994</text:p>
          </table:table-cell>
          <table:table-cell table:style-name="ce1" table:formula="of:=[.H501]+ h*[.F502]" office:value-type="float" office:value="2.1559757374046" calcext:value-type="float">
            <text:p>2,15597573740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2]" office:value-type="float" office:value="4.99999999999994" calcext:value-type="float">
            <text:p>4,99999999999994</text:p>
          </table:table-cell>
          <table:table-cell table:style-name="ce1" table:formula="of:=[.H502]" office:value-type="float" office:value="2.1559757374046" calcext:value-type="float">
            <text:p>2,1559757374046</text:p>
          </table:table-cell>
          <table:table-cell table:style-name="ce1" table:formula="of:=-68 - ([.E503]^2/Ao)" office:value-type="float" office:value="-68.0046482313803" calcext:value-type="float">
            <text:p>-68,0046482313803</text:p>
          </table:table-cell>
          <table:table-cell table:style-name="ce1" table:formula="of:=[.G502]+h" office:value-type="float" office:value="5.00999999999994" calcext:value-type="float">
            <text:p>5,00999999999994</text:p>
          </table:table-cell>
          <table:table-cell table:style-name="ce1" table:formula="of:=[.H502]+ h*[.F503]" office:value-type="float" office:value="1.4759292550908" calcext:value-type="float">
            <text:p>1,47592925509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3]" office:value-type="float" office:value="5.00999999999994" calcext:value-type="float">
            <text:p>5,00999999999994</text:p>
          </table:table-cell>
          <table:table-cell table:style-name="ce1" table:formula="of:=[.H503]" office:value-type="float" office:value="1.4759292550908" calcext:value-type="float">
            <text:p>1,4759292550908</text:p>
          </table:table-cell>
          <table:table-cell table:style-name="ce1" table:formula="of:=-68 - ([.E504]^2/Ao)" office:value-type="float" office:value="-68.002178367166" calcext:value-type="float">
            <text:p>-68,002178367166</text:p>
          </table:table-cell>
          <table:table-cell table:style-name="ce1" table:formula="of:=[.G503]+h" office:value-type="float" office:value="5.01999999999994" calcext:value-type="float">
            <text:p>5,01999999999994</text:p>
          </table:table-cell>
          <table:table-cell table:style-name="ce1" table:formula="of:=[.H503]+ h*[.F504]" office:value-type="float" office:value="0.795907471419137" calcext:value-type="float">
            <text:p>0,7959074714191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4]" office:value-type="float" office:value="5.01999999999994" calcext:value-type="float">
            <text:p>5,01999999999994</text:p>
          </table:table-cell>
          <table:table-cell table:style-name="ce1" table:formula="of:=[.H504]" office:value-type="float" office:value="0.795907471419137" calcext:value-type="float">
            <text:p>0,795907471419137</text:p>
          </table:table-cell>
          <table:table-cell table:style-name="ce1" table:formula="of:=-68 - ([.E505]^2/Ao)" office:value-type="float" office:value="-68.0006334687031" calcext:value-type="float">
            <text:p>-68,0006334687031</text:p>
          </table:table-cell>
          <table:table-cell table:style-name="ce1" table:formula="of:=[.G504]+h" office:value-type="float" office:value="5.02999999999994" calcext:value-type="float">
            <text:p>5,02999999999994</text:p>
          </table:table-cell>
          <table:table-cell table:style-name="ce1" table:formula="of:=[.H504]+ h*[.F505]" office:value-type="float" office:value="0.115901136732107" calcext:value-type="float">
            <text:p>0,1159011367321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5]" office:value-type="float" office:value="5.02999999999994" calcext:value-type="float">
            <text:p>5,02999999999994</text:p>
          </table:table-cell>
          <table:table-cell table:style-name="ce1" table:formula="of:=[.H505]" office:value-type="float" office:value="0.115901136732107" calcext:value-type="float">
            <text:p>0,115901136732107</text:p>
          </table:table-cell>
          <table:table-cell table:style-name="ce1" table:formula="of:=-68 - ([.E506]^2/Ao)" office:value-type="float" office:value="-68.0000134330735" calcext:value-type="float">
            <text:p>-68,0000134330735</text:p>
          </table:table-cell>
          <table:table-cell table:style-name="ce1" table:formula="of:=[.G505]+h" office:value-type="float" office:value="5.03999999999994" calcext:value-type="float">
            <text:p>5,03999999999994</text:p>
          </table:table-cell>
          <table:table-cell table:style-name="ce1" table:formula="of:=[.H505]+ h*[.F506]" office:value-type="float" office:value="-0.564098997598628" calcext:value-type="float">
            <text:p>-0,5640989975986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6]" office:value-type="float" office:value="5.03999999999994" calcext:value-type="float">
            <text:p>5,03999999999994</text:p>
          </table:table-cell>
          <table:table-cell table:style-name="ce1" table:formula="of:=[.H506]" office:value-type="float" office:value="-0.564098997598628" calcext:value-type="float">
            <text:p>-0,564098997598628</text:p>
          </table:table-cell>
          <table:table-cell table:style-name="ce1" table:formula="of:=-68 - ([.E507]^2/Ao)" office:value-type="float" office:value="-68.0003182076791" calcext:value-type="float">
            <text:p>-68,0003182076791</text:p>
          </table:table-cell>
          <table:table-cell table:style-name="ce1" table:formula="of:=[.G506]+h" office:value-type="float" office:value="5.04999999999994" calcext:value-type="float">
            <text:p>5,04999999999994</text:p>
          </table:table-cell>
          <table:table-cell table:style-name="ce1" table:formula="of:=[.H506]+ h*[.F507]" office:value-type="float" office:value="-1.24410217967542" calcext:value-type="float">
            <text:p>-1,24410217967542</text:p>
          </table:table-cell>
          <table:table-cell table:number-columns-repeated="4"/>
        </table:table-row>
        <table:table-row table:style-name="ro2" table:number-rows-repeated="232">
          <table:table-cell table:number-columns-repeated="3"/>
          <table:table-cell table:style-name="ce1" table:number-columns-repeated="5"/>
          <table:table-cell table:number-columns-repeated="4"/>
        </table:table-row>
        <table:table-row table:style-name="ro2" table:number-rows-repeated="1047836">
          <table:table-cell table:number-columns-repeated="12"/>
        </table:table-row>
        <table:table-row table:style-name="ro2">
          <table:table-cell table:number-columns-repeated="12"/>
        </table:table-row>
        <table:named-expressions>
          <table:named-range table:name="Ao" table:base-cell-address="$'Ao = 1000'.$B$3" table:cell-range-address="$'Ao = 1000'.$B$3"/>
          <table:named-range table:name="h" table:base-cell-address="$'Ao = 1000'.$A$1" table:cell-range-address="$'Ao = 1000'.$B$1"/>
          <table:named-range table:name="to" table:base-cell-address="$'Ao = 1000'.$A$1" table:cell-range-address="$'Ao = 1000'.$B$2"/>
        </table:named-expressions>
      </table:table>
      <table:table table:name="Ao = 15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01" calcext:value-type="float">
            <text:p>0,01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A/dt</text:p>
          </table:table-cell>
          <table:table-cell table:style-name="ce3" office:value-type="string" calcext:value-type="string">
            <text:p>t(i+1)</text:p>
          </table:table-cell>
          <table:table-cell table:style-name="ce3" office:value-type="string" calcext:value-type="string">
            <text:p>A(i+1)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" table:formula="of:=to" office:value-type="float" office:value="0" calcext:value-type="float">
            <text:p>0</text:p>
          </table:table-cell>
          <table:table-cell table:style-name="ce1" table:formula="of:=Ao" office:value-type="float" office:value="1500" calcext:value-type="float">
            <text:p>1500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table:style-name="ce2" office:value-type="float" office:value="1500" calcext:value-type="float">
            <text:p>1500</text:p>
          </table:table-cell>
          <table:table-cell/>
          <table:table-cell table:style-name="ce1" table:formula="of:=[.G2]" office:value-type="float" office:value="0" calcext:value-type="float">
            <text:p>0</text:p>
          </table:table-cell>
          <table:table-cell table:style-name="ce1" table:formula="of:=[.H2]" office:value-type="float" office:value="1500" calcext:value-type="float">
            <text:p>1500</text:p>
          </table:table-cell>
          <table:table-cell table:style-name="ce1" table:formula="of:=- 68 - ([.E3]^2/Ao)" office:value-type="float" office:value="-1568" calcext:value-type="float">
            <text:p>-1568</text:p>
          </table:table-cell>
          <table:table-cell table:style-name="ce1" table:formula="of:=[.G2]+h" office:value-type="float" office:value="0.01" calcext:value-type="float">
            <text:p>0,01</text:p>
          </table:table-cell>
          <table:table-cell table:style-name="ce1" table:formula="of:=[.H2]+ h*[.F3]" office:value-type="float" office:value="1484.32" calcext:value-type="float">
            <text:p>1484,3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ce1" table:formula="of:=[.G3]" office:value-type="float" office:value="0.01" calcext:value-type="float">
            <text:p>0,01</text:p>
          </table:table-cell>
          <table:table-cell table:style-name="ce1" table:formula="of:=[.H3]" office:value-type="float" office:value="1484.32" calcext:value-type="float">
            <text:p>1484,32</text:p>
          </table:table-cell>
          <table:table-cell table:style-name="ce1" table:formula="of:=-68 - ([.E4]^2/Ao)" office:value-type="float" office:value="-1536.80390826667" calcext:value-type="float">
            <text:p>-1536,80390826667</text:p>
          </table:table-cell>
          <table:table-cell table:style-name="ce1" table:formula="of:=[.G3]+h" office:value-type="float" office:value="0.02" calcext:value-type="float">
            <text:p>0,02</text:p>
          </table:table-cell>
          <table:table-cell table:style-name="ce1" table:formula="of:=[.H3]+ h*[.F4]" office:value-type="float" office:value="1468.95196091733" calcext:value-type="float">
            <text:p>1468,95196091733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4]" office:value-type="float" office:value="0.02" calcext:value-type="float">
            <text:p>0,02</text:p>
          </table:table-cell>
          <table:table-cell table:style-name="ce1" table:formula="of:=[.H4]" office:value-type="float" office:value="1468.95196091733" calcext:value-type="float">
            <text:p>1468,95196091733</text:p>
          </table:table-cell>
          <table:table-cell table:style-name="ce1" table:formula="of:=-68 - ([.E5]^2/Ao)" office:value-type="float" office:value="-1506.54657565525" calcext:value-type="float">
            <text:p>-1506,54657565525</text:p>
          </table:table-cell>
          <table:table-cell table:style-name="ce1" table:formula="of:=[.G4]+h" office:value-type="float" office:value="0.03" calcext:value-type="float">
            <text:p>0,03</text:p>
          </table:table-cell>
          <table:table-cell table:style-name="ce1" table:formula="of:=[.H4]+ h*[.F5]" office:value-type="float" office:value="1453.88649516078" calcext:value-type="float">
            <text:p>1453,88649516078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5]" office:value-type="float" office:value="0.03" calcext:value-type="float">
            <text:p>0,03</text:p>
          </table:table-cell>
          <table:table-cell table:style-name="ce1" table:formula="of:=[.H5]" office:value-type="float" office:value="1453.88649516078" calcext:value-type="float">
            <text:p>1453,88649516078</text:p>
          </table:table-cell>
          <table:table-cell table:style-name="ce1" table:formula="of:=-68 - ([.E6]^2/Ao)" office:value-type="float" office:value="-1477.19062720727" calcext:value-type="float">
            <text:p>-1477,19062720727</text:p>
          </table:table-cell>
          <table:table-cell table:style-name="ce1" table:formula="of:=[.G5]+h" office:value-type="float" office:value="0.04" calcext:value-type="float">
            <text:p>0,04</text:p>
          </table:table-cell>
          <table:table-cell table:style-name="ce1" table:formula="of:=[.H5]+ h*[.F6]" office:value-type="float" office:value="1439.11458888871" calcext:value-type="float">
            <text:p>1439,11458888871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dA/dt = -68 – A² / Ao</text:p>
          </table:table-cell>
          <table:table-cell table:number-columns-repeated="2"/>
          <table:table-cell table:style-name="ce1" table:formula="of:=[.G6]" office:value-type="float" office:value="0.04" calcext:value-type="float">
            <text:p>0,04</text:p>
          </table:table-cell>
          <table:table-cell table:style-name="ce1" table:formula="of:=[.H6]" office:value-type="float" office:value="1439.11458888871" calcext:value-type="float">
            <text:p>1439,11458888871</text:p>
          </table:table-cell>
          <table:table-cell table:style-name="ce1" table:formula="of:=-68 - ([.E7]^2/Ao)" office:value-type="float" office:value="-1448.70053330154" calcext:value-type="float">
            <text:p>-1448,70053330154</text:p>
          </table:table-cell>
          <table:table-cell table:style-name="ce1" table:formula="of:=[.G6]+h" office:value-type="float" office:value="0.05" calcext:value-type="float">
            <text:p>0,05</text:p>
          </table:table-cell>
          <table:table-cell table:style-name="ce1" table:formula="of:=[.H6]+ h*[.F7]" office:value-type="float" office:value="1424.62758355569" calcext:value-type="float">
            <text:p>1424,62758355569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7]" office:value-type="float" office:value="0.05" calcext:value-type="float">
            <text:p>0,05</text:p>
          </table:table-cell>
          <table:table-cell table:style-name="ce1" table:formula="of:=[.H7]" office:value-type="float" office:value="1424.62758355569" calcext:value-type="float">
            <text:p>1424,62758355569</text:p>
          </table:table-cell>
          <table:table-cell table:style-name="ce1" table:formula="of:=-68 - ([.E8]^2/Ao)" office:value-type="float" office:value="-1421.04250121849" calcext:value-type="float">
            <text:p>-1421,04250121849</text:p>
          </table:table-cell>
          <table:table-cell table:style-name="ce1" table:formula="of:=[.G7]+h" office:value-type="float" office:value="0.06" calcext:value-type="float">
            <text:p>0,06</text:p>
          </table:table-cell>
          <table:table-cell table:style-name="ce1" table:formula="of:=[.H7]+ h*[.F8]" office:value-type="float" office:value="1410.41715854351" calcext:value-type="float">
            <text:p>1410,41715854351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8]" office:value-type="float" office:value="0.06" calcext:value-type="float">
            <text:p>0,06</text:p>
          </table:table-cell>
          <table:table-cell table:style-name="ce1" table:formula="of:=[.H8]" office:value-type="float" office:value="1410.41715854351" calcext:value-type="float">
            <text:p>1410,41715854351</text:p>
          </table:table-cell>
          <table:table-cell table:style-name="ce1" table:formula="of:=-68 - ([.E9]^2/Ao)" office:value-type="float" office:value="-1394.18437407596" calcext:value-type="float">
            <text:p>-1394,18437407596</text:p>
          </table:table-cell>
          <table:table-cell table:style-name="ce1" table:formula="of:=[.G8]+h" office:value-type="float" office:value="0.07" calcext:value-type="float">
            <text:p>0,07</text:p>
          </table:table-cell>
          <table:table-cell table:style-name="ce1" table:formula="of:=[.H8]+ h*[.F9]" office:value-type="float" office:value="1396.47531480275" calcext:value-type="float">
            <text:p>1396,47531480275</text:p>
          </table:table-cell>
          <table:table-cell/>
          <table:table-cell table:style-name="ce6"/>
          <table:table-cell/>
          <table:table-cell table:style-name="ce1"/>
        </table:table-row>
        <table:table-row table:style-name="ro2">
          <table:table-cell table:number-columns-repeated="3"/>
          <table:table-cell table:style-name="ce1" table:formula="of:=[.G9]" office:value-type="float" office:value="0.07" calcext:value-type="float">
            <text:p>0,07</text:p>
          </table:table-cell>
          <table:table-cell table:style-name="ce1" table:formula="of:=[.H9]" office:value-type="float" office:value="1396.47531480275" calcext:value-type="float">
            <text:p>1396,47531480275</text:p>
          </table:table-cell>
          <table:table-cell table:style-name="ce1" table:formula="of:=-68 - ([.E10]^2/Ao)" office:value-type="float" office:value="-1368.09553656896" calcext:value-type="float">
            <text:p>-1368,09553656896</text:p>
          </table:table-cell>
          <table:table-cell table:style-name="ce1" table:formula="of:=[.G9]+h" office:value-type="float" office:value="0.08" calcext:value-type="float">
            <text:p>0,08</text:p>
          </table:table-cell>
          <table:table-cell table:style-name="ce1" table:formula="of:=[.H9]+ h*[.F10]" office:value-type="float" office:value="1382.79435943706" calcext:value-type="float">
            <text:p>1382,79435943706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y(i+1) = Yi + h * Y`i</text:p>
          </table:table-cell>
          <table:table-cell table:number-columns-repeated="2"/>
          <table:table-cell table:style-name="ce1" table:formula="of:=[.G10]" office:value-type="float" office:value="0.08" calcext:value-type="float">
            <text:p>0,08</text:p>
          </table:table-cell>
          <table:table-cell table:style-name="ce1" table:formula="of:=[.H10]" office:value-type="float" office:value="1382.79435943706" calcext:value-type="float">
            <text:p>1382,79435943706</text:p>
          </table:table-cell>
          <table:table-cell table:style-name="ce1" table:formula="of:=-68 - ([.E11]^2/Ao)" office:value-type="float" office:value="-1342.74682699396" calcext:value-type="float">
            <text:p>-1342,74682699396</text:p>
          </table:table-cell>
          <table:table-cell table:style-name="ce1" table:formula="of:=[.G10]+h" office:value-type="float" office:value="0.09" calcext:value-type="float">
            <text:p>0,09</text:p>
          </table:table-cell>
          <table:table-cell table:style-name="ce1" table:formula="of:=[.H10]+ h*[.F11]" office:value-type="float" office:value="1369.36689116712" calcext:value-type="float">
            <text:p>1369,3668911671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1]" office:value-type="float" office:value="0.09" calcext:value-type="float">
            <text:p>0,09</text:p>
          </table:table-cell>
          <table:table-cell table:style-name="ce1" table:formula="of:=[.H11]" office:value-type="float" office:value="1369.36689116712" calcext:value-type="float">
            <text:p>1369,36689116712</text:p>
          </table:table-cell>
          <table:table-cell table:style-name="ce1" table:formula="of:=-68 - ([.E12]^2/Ao)" office:value-type="float" office:value="-1318.11045508313" calcext:value-type="float">
            <text:p>-1318,11045508313</text:p>
          </table:table-cell>
          <table:table-cell table:style-name="ce1" table:formula="of:=[.G11]+h" office:value-type="float" office:value="0.1" calcext:value-type="float">
            <text:p>0,1</text:p>
          </table:table-cell>
          <table:table-cell table:style-name="ce1" table:formula="of:=[.H11]+ h*[.F12]" office:value-type="float" office:value="1356.18578661629" calcext:value-type="float">
            <text:p>1356,18578661629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2]" office:value-type="float" office:value="0.1" calcext:value-type="float">
            <text:p>0,1</text:p>
          </table:table-cell>
          <table:table-cell table:style-name="ce1" table:formula="of:=[.H12]" office:value-type="float" office:value="1356.18578661629" calcext:value-type="float">
            <text:p>1356,18578661629</text:p>
          </table:table-cell>
          <table:table-cell table:style-name="ce1" table:formula="of:=-68 - ([.E13]^2/Ao)" office:value-type="float" office:value="-1294.15992521336" calcext:value-type="float">
            <text:p>-1294,15992521336</text:p>
          </table:table-cell>
          <table:table-cell table:style-name="ce1" table:formula="of:=[.G12]+h" office:value-type="float" office:value="0.11" calcext:value-type="float">
            <text:p>0,11</text:p>
          </table:table-cell>
          <table:table-cell table:style-name="ce1" table:formula="of:=[.H12]+ h*[.F13]" office:value-type="float" office:value="1343.24418736415" calcext:value-type="float">
            <text:p>1343,24418736415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3]" office:value-type="float" office:value="0.11" calcext:value-type="float">
            <text:p>0,11</text:p>
          </table:table-cell>
          <table:table-cell table:style-name="ce1" table:formula="of:=[.H13]" office:value-type="float" office:value="1343.24418736415" calcext:value-type="float">
            <text:p>1343,24418736415</text:p>
          </table:table-cell>
          <table:table-cell table:style-name="ce1" table:formula="of:=-68 - ([.E14]^2/Ao)" office:value-type="float" office:value="-1270.86996459172" calcext:value-type="float">
            <text:p>-1270,86996459172</text:p>
          </table:table-cell>
          <table:table-cell table:style-name="ce1" table:formula="of:=[.G13]+h" office:value-type="float" office:value="0.12" calcext:value-type="float">
            <text:p>0,12</text:p>
          </table:table-cell>
          <table:table-cell table:style-name="ce1" table:formula="of:=[.H13]+ h*[.F14]" office:value-type="float" office:value="1330.53548771824" calcext:value-type="float">
            <text:p>1330,535487718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]" office:value-type="float" office:value="0.12" calcext:value-type="float">
            <text:p>0,12</text:p>
          </table:table-cell>
          <table:table-cell table:style-name="ce1" table:formula="of:=[.H14]" office:value-type="float" office:value="1330.53548771824" calcext:value-type="float">
            <text:p>1330,53548771824</text:p>
          </table:table-cell>
          <table:table-cell table:style-name="ce1" table:formula="of:=-68 - ([.E15]^2/Ao)" office:value-type="float" office:value="-1248.21645605174" calcext:value-type="float">
            <text:p>-1248,21645605174</text:p>
          </table:table-cell>
          <table:table-cell table:style-name="ce1" table:formula="of:=[.G14]+h" office:value-type="float" office:value="0.13" calcext:value-type="float">
            <text:p>0,13</text:p>
          </table:table-cell>
          <table:table-cell table:style-name="ce1" table:formula="of:=[.H14]+ h*[.F15]" office:value-type="float" office:value="1318.05332315772" calcext:value-type="float">
            <text:p>1318,053323157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]" office:value-type="float" office:value="0.13" calcext:value-type="float">
            <text:p>0,13</text:p>
          </table:table-cell>
          <table:table-cell table:style-name="ce1" table:formula="of:=[.H15]" office:value-type="float" office:value="1318.05332315772" calcext:value-type="float">
            <text:p>1318,05332315772</text:p>
          </table:table-cell>
          <table:table-cell table:style-name="ce1" table:formula="of:=-68 - ([.E16]^2/Ao)" office:value-type="float" office:value="-1226.17637512474" calcext:value-type="float">
            <text:p>-1226,17637512474</text:p>
          </table:table-cell>
          <table:table-cell table:style-name="ce1" table:formula="of:=[.G15]+h" office:value-type="float" office:value="0.14" calcext:value-type="float">
            <text:p>0,14</text:p>
          </table:table-cell>
          <table:table-cell table:style-name="ce1" table:formula="of:=[.H15]+ h*[.F16]" office:value-type="float" office:value="1305.79155940647" calcext:value-type="float">
            <text:p>1305,791559406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]" office:value-type="float" office:value="0.14" calcext:value-type="float">
            <text:p>0,14</text:p>
          </table:table-cell>
          <table:table-cell table:style-name="ce1" table:formula="of:=[.H16]" office:value-type="float" office:value="1305.79155940647" calcext:value-type="float">
            <text:p>1305,79155940647</text:p>
          </table:table-cell>
          <table:table-cell table:style-name="ce1" table:formula="of:=-68 - ([.E17]^2/Ao)" office:value-type="float" office:value="-1204.72773107812" calcext:value-type="float">
            <text:p>-1204,72773107812</text:p>
          </table:table-cell>
          <table:table-cell table:style-name="ce1" table:formula="of:=[.G16]+h" office:value-type="float" office:value="0.15" calcext:value-type="float">
            <text:p>0,15</text:p>
          </table:table-cell>
          <table:table-cell table:style-name="ce1" table:formula="of:=[.H16]+ h*[.F17]" office:value-type="float" office:value="1293.74428209569" calcext:value-type="float">
            <text:p>1293,744282095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]" office:value-type="float" office:value="0.15" calcext:value-type="float">
            <text:p>0,15</text:p>
          </table:table-cell>
          <table:table-cell table:style-name="ce1" table:formula="of:=[.H17]" office:value-type="float" office:value="1293.74428209569" calcext:value-type="float">
            <text:p>1293,74428209569</text:p>
          </table:table-cell>
          <table:table-cell table:style-name="ce1" table:formula="of:=-68 - ([.E18]^2/Ao)" office:value-type="float" office:value="-1183.84951163686" calcext:value-type="float">
            <text:p>-1183,84951163686</text:p>
          </table:table-cell>
          <table:table-cell table:style-name="ce1" table:formula="of:=[.G17]+h" office:value-type="float" office:value="0.16" calcext:value-type="float">
            <text:p>0,16</text:p>
          </table:table-cell>
          <table:table-cell table:style-name="ce1" table:formula="of:=[.H17]+ h*[.F18]" office:value-type="float" office:value="1281.90578697932" calcext:value-type="float">
            <text:p>1281,905786979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]" office:value-type="float" office:value="0.16" calcext:value-type="float">
            <text:p>0,16</text:p>
          </table:table-cell>
          <table:table-cell table:style-name="ce1" table:formula="of:=[.H18]" office:value-type="float" office:value="1281.90578697932" calcext:value-type="float">
            <text:p>1281,90578697932</text:p>
          </table:table-cell>
          <table:table-cell table:style-name="ce1" table:formula="of:=-68 - ([.E19]^2/Ao)" office:value-type="float" office:value="-1163.52163112738" calcext:value-type="float">
            <text:p>-1163,52163112738</text:p>
          </table:table-cell>
          <table:table-cell table:style-name="ce1" table:formula="of:=[.G18]+h" office:value-type="float" office:value="0.17" calcext:value-type="float">
            <text:p>0,17</text:p>
          </table:table-cell>
          <table:table-cell table:style-name="ce1" table:formula="of:=[.H18]+ h*[.F19]" office:value-type="float" office:value="1270.27057066805" calcext:value-type="float">
            <text:p>1270,270570668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]" office:value-type="float" office:value="0.17" calcext:value-type="float">
            <text:p>0,17</text:p>
          </table:table-cell>
          <table:table-cell table:style-name="ce1" table:formula="of:=[.H19]" office:value-type="float" office:value="1270.27057066805" calcext:value-type="float">
            <text:p>1270,27057066805</text:p>
          </table:table-cell>
          <table:table-cell table:style-name="ce1" table:formula="of:=-68 - ([.E20]^2/Ao)" office:value-type="float" office:value="-1143.72488180355" calcext:value-type="float">
            <text:p>-1143,72488180355</text:p>
          </table:table-cell>
          <table:table-cell table:style-name="ce1" table:formula="of:=[.G19]+h" office:value-type="float" office:value="0.18" calcext:value-type="float">
            <text:p>0,18</text:p>
          </table:table-cell>
          <table:table-cell table:style-name="ce1" table:formula="of:=[.H19]+ h*[.F20]" office:value-type="float" office:value="1258.83332185001" calcext:value-type="float">
            <text:p>1258,833321850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]" office:value-type="float" office:value="0.18" calcext:value-type="float">
            <text:p>0,18</text:p>
          </table:table-cell>
          <table:table-cell table:style-name="ce1" table:formula="of:=[.H20]" office:value-type="float" office:value="1258.83332185001" calcext:value-type="float">
            <text:p>1258,83332185001</text:p>
          </table:table-cell>
          <table:table-cell table:style-name="ce1" table:formula="of:=-68 - ([.E21]^2/Ao)" office:value-type="float" office:value="-1124.44088813329" calcext:value-type="float">
            <text:p>-1124,44088813329</text:p>
          </table:table-cell>
          <table:table-cell table:style-name="ce1" table:formula="of:=[.G20]+h" office:value-type="float" office:value="0.19" calcext:value-type="float">
            <text:p>0,19</text:p>
          </table:table-cell>
          <table:table-cell table:style-name="ce1" table:formula="of:=[.H20]+ h*[.F21]" office:value-type="float" office:value="1247.58891296868" calcext:value-type="float">
            <text:p>1247,588912968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]" office:value-type="float" office:value="0.19" calcext:value-type="float">
            <text:p>0,19</text:p>
          </table:table-cell>
          <table:table-cell table:style-name="ce1" table:formula="of:=[.H21]" office:value-type="float" office:value="1247.58891296868" calcext:value-type="float">
            <text:p>1247,58891296868</text:p>
          </table:table-cell>
          <table:table-cell table:style-name="ce1" table:formula="of:=-68 - ([.E22]^2/Ao)" office:value-type="float" office:value="-1105.65206384158" calcext:value-type="float">
            <text:p>-1105,65206384158</text:p>
          </table:table-cell>
          <table:table-cell table:style-name="ce1" table:formula="of:=[.G21]+h" office:value-type="float" office:value="0.2" calcext:value-type="float">
            <text:p>0,2</text:p>
          </table:table-cell>
          <table:table-cell table:style-name="ce1" table:formula="of:=[.H21]+ h*[.F22]" office:value-type="float" office:value="1236.53239233026" calcext:value-type="float">
            <text:p>1236,532392330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]" office:value-type="float" office:value="0.2" calcext:value-type="float">
            <text:p>0,2</text:p>
          </table:table-cell>
          <table:table-cell table:style-name="ce1" table:formula="of:=[.H22]" office:value-type="float" office:value="1236.53239233026" calcext:value-type="float">
            <text:p>1236,53239233026</text:p>
          </table:table-cell>
          <table:table-cell table:style-name="ce1" table:formula="of:=-68 - ([.E23]^2/Ao)" office:value-type="float" office:value="-1087.34157152134" calcext:value-type="float">
            <text:p>-1087,34157152134</text:p>
          </table:table-cell>
          <table:table-cell table:style-name="ce1" table:formula="of:=[.G22]+h" office:value-type="float" office:value="0.21" calcext:value-type="float">
            <text:p>0,21</text:p>
          </table:table-cell>
          <table:table-cell table:style-name="ce1" table:formula="of:=[.H22]+ h*[.F23]" office:value-type="float" office:value="1225.65897661505" calcext:value-type="float">
            <text:p>1225,658976615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]" office:value-type="float" office:value="0.21" calcext:value-type="float">
            <text:p>0,21</text:p>
          </table:table-cell>
          <table:table-cell table:style-name="ce1" table:formula="of:=[.H23]" office:value-type="float" office:value="1225.65897661505" calcext:value-type="float">
            <text:p>1225,65897661505</text:p>
          </table:table-cell>
          <table:table-cell table:style-name="ce1" table:formula="of:=-68 - ([.E24]^2/Ao)" office:value-type="float" office:value="-1069.49328463804" calcext:value-type="float">
            <text:p>-1069,49328463804</text:p>
          </table:table-cell>
          <table:table-cell table:style-name="ce1" table:formula="of:=[.G23]+h" office:value-type="float" office:value="0.22" calcext:value-type="float">
            <text:p>0,22</text:p>
          </table:table-cell>
          <table:table-cell table:style-name="ce1" table:formula="of:=[.H23]+ h*[.F24]" office:value-type="float" office:value="1214.96404376867" calcext:value-type="float">
            <text:p>1214,964043768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]" office:value-type="float" office:value="0.22" calcext:value-type="float">
            <text:p>0,22</text:p>
          </table:table-cell>
          <table:table-cell table:style-name="ce1" table:formula="of:=[.H24]" office:value-type="float" office:value="1214.96404376867" calcext:value-type="float">
            <text:p>1214,96404376867</text:p>
          </table:table-cell>
          <table:table-cell table:style-name="ce1" table:formula="of:=-68 - ([.E25]^2/Ao)" office:value-type="float" office:value="-1052.09175176715" calcext:value-type="float">
            <text:p>-1052,09175176715</text:p>
          </table:table-cell>
          <table:table-cell table:style-name="ce1" table:formula="of:=[.G24]+h" office:value-type="float" office:value="0.23" calcext:value-type="float">
            <text:p>0,23</text:p>
          </table:table-cell>
          <table:table-cell table:style-name="ce1" table:formula="of:=[.H24]+ h*[.F25]" office:value-type="float" office:value="1204.443126251" calcext:value-type="float">
            <text:p>1204,4431262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]" office:value-type="float" office:value="0.23" calcext:value-type="float">
            <text:p>0,23</text:p>
          </table:table-cell>
          <table:table-cell table:style-name="ce1" table:formula="of:=[.H25]" office:value-type="float" office:value="1204.443126251" calcext:value-type="float">
            <text:p>1204,443126251</text:p>
          </table:table-cell>
          <table:table-cell table:style-name="ce1" table:formula="of:=-68 - ([.E26]^2/Ao)" office:value-type="float" office:value="-1035.12216291552" calcext:value-type="float">
            <text:p>-1035,12216291552</text:p>
          </table:table-cell>
          <table:table-cell table:style-name="ce1" table:formula="of:=[.G25]+h" office:value-type="float" office:value="0.24" calcext:value-type="float">
            <text:p>0,24</text:p>
          </table:table-cell>
          <table:table-cell table:style-name="ce1" table:formula="of:=[.H25]+ h*[.F26]" office:value-type="float" office:value="1194.09190462184" calcext:value-type="float">
            <text:p>1194,091904621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]" office:value-type="float" office:value="0.24" calcext:value-type="float">
            <text:p>0,24</text:p>
          </table:table-cell>
          <table:table-cell table:style-name="ce1" table:formula="of:=[.H26]" office:value-type="float" office:value="1194.09190462184" calcext:value-type="float">
            <text:p>1194,09190462184</text:p>
          </table:table-cell>
          <table:table-cell table:style-name="ce1" table:formula="of:=-68 - ([.E27]^2/Ao)" office:value-type="float" office:value="-1018.57031778895" calcext:value-type="float">
            <text:p>-1018,57031778895</text:p>
          </table:table-cell>
          <table:table-cell table:style-name="ce1" table:formula="of:=[.G26]+h" office:value-type="float" office:value="0.25" calcext:value-type="float">
            <text:p>0,25</text:p>
          </table:table-cell>
          <table:table-cell table:style-name="ce1" table:formula="of:=[.H26]+ h*[.F27]" office:value-type="float" office:value="1183.90620144395" calcext:value-type="float">
            <text:p>1183,906201443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]" office:value-type="float" office:value="0.25" calcext:value-type="float">
            <text:p>0,25</text:p>
          </table:table-cell>
          <table:table-cell table:style-name="ce1" table:formula="of:=[.H27]" office:value-type="float" office:value="1183.90620144395" calcext:value-type="float">
            <text:p>1183,90620144395</text:p>
          </table:table-cell>
          <table:table-cell table:style-name="ce1" table:formula="of:=-68 - ([.E28]^2/Ao)" office:value-type="float" office:value="-1002.4225958783" calcext:value-type="float">
            <text:p>-1002,4225958783</text:p>
          </table:table-cell>
          <table:table-cell table:style-name="ce1" table:formula="of:=[.G27]+h" office:value-type="float" office:value="0.26" calcext:value-type="float">
            <text:p>0,26</text:p>
          </table:table-cell>
          <table:table-cell table:style-name="ce1" table:formula="of:=[.H27]+ h*[.F28]" office:value-type="float" office:value="1173.88197548517" calcext:value-type="float">
            <text:p>1173,881975485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]" office:value-type="float" office:value="0.26" calcext:value-type="float">
            <text:p>0,26</text:p>
          </table:table-cell>
          <table:table-cell table:style-name="ce1" table:formula="of:=[.H28]" office:value-type="float" office:value="1173.88197548517" calcext:value-type="float">
            <text:p>1173,88197548517</text:p>
          </table:table-cell>
          <table:table-cell table:style-name="ce1" table:formula="of:=-68 - ([.E29]^2/Ao)" office:value-type="float" office:value="-986.665928245978" calcext:value-type="float">
            <text:p>-986,665928245978</text:p>
          </table:table-cell>
          <table:table-cell table:style-name="ce1" table:formula="of:=[.G28]+h" office:value-type="float" office:value="0.27" calcext:value-type="float">
            <text:p>0,27</text:p>
          </table:table-cell>
          <table:table-cell table:style-name="ce1" table:formula="of:=[.H28]+ h*[.F29]" office:value-type="float" office:value="1164.01531620271" calcext:value-type="float">
            <text:p>1164,015316202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]" office:value-type="float" office:value="0.27" calcext:value-type="float">
            <text:p>0,27</text:p>
          </table:table-cell>
          <table:table-cell table:style-name="ce1" table:formula="of:=[.H29]" office:value-type="float" office:value="1164.01531620271" calcext:value-type="float">
            <text:p>1164,01531620271</text:p>
          </table:table-cell>
          <table:table-cell table:style-name="ce1" table:formula="of:=-68 - ([.E30]^2/Ao)" office:value-type="float" office:value="-971.287770902998" calcext:value-type="float">
            <text:p>-971,287770902998</text:p>
          </table:table-cell>
          <table:table-cell table:style-name="ce1" table:formula="of:=[.G29]+h" office:value-type="float" office:value="0.28" calcext:value-type="float">
            <text:p>0,28</text:p>
          </table:table-cell>
          <table:table-cell table:style-name="ce1" table:formula="of:=[.H29]+ h*[.F30]" office:value-type="float" office:value="1154.30243849368" calcext:value-type="float">
            <text:p>1154,302438493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]" office:value-type="float" office:value="0.28" calcext:value-type="float">
            <text:p>0,28</text:p>
          </table:table-cell>
          <table:table-cell table:style-name="ce1" table:formula="of:=[.H30]" office:value-type="float" office:value="1154.30243849368" calcext:value-type="float">
            <text:p>1154,30243849368</text:p>
          </table:table-cell>
          <table:table-cell table:style-name="ce1" table:formula="of:=-68 - ([.E31]^2/Ao)" office:value-type="float" office:value="-956.276079674972" calcext:value-type="float">
            <text:p>-956,276079674972</text:p>
          </table:table-cell>
          <table:table-cell table:style-name="ce1" table:formula="of:=[.G30]+h" office:value-type="float" office:value="0.29" calcext:value-type="float">
            <text:p>0,29</text:p>
          </table:table-cell>
          <table:table-cell table:style-name="ce1" table:formula="of:=[.H30]+ h*[.F31]" office:value-type="float" office:value="1144.73967769693" calcext:value-type="float">
            <text:p>1144,739677696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]" office:value-type="float" office:value="0.29" calcext:value-type="float">
            <text:p>0,29</text:p>
          </table:table-cell>
          <table:table-cell table:style-name="ce1" table:formula="of:=[.H31]" office:value-type="float" office:value="1144.73967769693" calcext:value-type="float">
            <text:p>1144,73967769693</text:p>
          </table:table-cell>
          <table:table-cell table:style-name="ce1" table:formula="of:=-68 - ([.E32]^2/Ao)" office:value-type="float" office:value="-941.61928646245" calcext:value-type="float">
            <text:p>-941,61928646245</text:p>
          </table:table-cell>
          <table:table-cell table:style-name="ce1" table:formula="of:=[.G31]+h" office:value-type="float" office:value="0.3" calcext:value-type="float">
            <text:p>0,3</text:p>
          </table:table-cell>
          <table:table-cell table:style-name="ce1" table:formula="of:=[.H31]+ h*[.F32]" office:value-type="float" office:value="1135.32348483231" calcext:value-type="float">
            <text:p>1135,323484832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]" office:value-type="float" office:value="0.3" calcext:value-type="float">
            <text:p>0,3</text:p>
          </table:table-cell>
          <table:table-cell table:style-name="ce1" table:formula="of:=[.H32]" office:value-type="float" office:value="1135.32348483231" calcext:value-type="float">
            <text:p>1135,32348483231</text:p>
          </table:table-cell>
          <table:table-cell table:style-name="ce1" table:formula="of:=-68 - ([.E33]^2/Ao)" office:value-type="float" office:value="-927.306276807849" calcext:value-type="float">
            <text:p>-927,306276807849</text:p>
          </table:table-cell>
          <table:table-cell table:style-name="ce1" table:formula="of:=[.G32]+h" office:value-type="float" office:value="0.31" calcext:value-type="float">
            <text:p>0,31</text:p>
          </table:table-cell>
          <table:table-cell table:style-name="ce1" table:formula="of:=[.H32]+ h*[.F33]" office:value-type="float" office:value="1126.05042206423" calcext:value-type="float">
            <text:p>1126,050422064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]" office:value-type="float" office:value="0.31" calcext:value-type="float">
            <text:p>0,31</text:p>
          </table:table-cell>
          <table:table-cell table:style-name="ce1" table:formula="of:=[.H33]" office:value-type="float" office:value="1126.05042206423" calcext:value-type="float">
            <text:p>1126,05042206423</text:p>
          </table:table-cell>
          <table:table-cell table:style-name="ce1" table:formula="of:=-68 - ([.E34]^2/Ao)" office:value-type="float" office:value="-913.326368687352" calcext:value-type="float">
            <text:p>-913,326368687352</text:p>
          </table:table-cell>
          <table:table-cell table:style-name="ce1" table:formula="of:=[.G33]+h" office:value-type="float" office:value="0.32" calcext:value-type="float">
            <text:p>0,32</text:p>
          </table:table-cell>
          <table:table-cell table:style-name="ce1" table:formula="of:=[.H33]+ h*[.F34]" office:value-type="float" office:value="1116.91715837736" calcext:value-type="float">
            <text:p>1116,917158377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]" office:value-type="float" office:value="0.32" calcext:value-type="float">
            <text:p>0,32</text:p>
          </table:table-cell>
          <table:table-cell table:style-name="ce1" table:formula="of:=[.H34]" office:value-type="float" office:value="1116.91715837736" calcext:value-type="float">
            <text:p>1116,91715837736</text:p>
          </table:table-cell>
          <table:table-cell table:style-name="ce1" table:formula="of:=-68 - ([.E35]^2/Ao)" office:value-type="float" office:value="-899.66929245183" calcext:value-type="float">
            <text:p>-899,66929245183</text:p>
          </table:table-cell>
          <table:table-cell table:style-name="ce1" table:formula="of:=[.G34]+h" office:value-type="float" office:value="0.33" calcext:value-type="float">
            <text:p>0,33</text:p>
          </table:table-cell>
          <table:table-cell table:style-name="ce1" table:formula="of:=[.H34]+ h*[.F35]" office:value-type="float" office:value="1107.92046545284" calcext:value-type="float">
            <text:p>1107,920465452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]" office:value-type="float" office:value="0.33" calcext:value-type="float">
            <text:p>0,33</text:p>
          </table:table-cell>
          <table:table-cell table:style-name="ce1" table:formula="of:=[.H35]" office:value-type="float" office:value="1107.92046545284" calcext:value-type="float">
            <text:p>1107,92046545284</text:p>
          </table:table-cell>
          <table:table-cell table:style-name="ce1" table:formula="of:=-68 - ([.E36]^2/Ao)" office:value-type="float" office:value="-886.325171846154" calcext:value-type="float">
            <text:p>-886,325171846154</text:p>
          </table:table-cell>
          <table:table-cell table:style-name="ce1" table:formula="of:=[.G35]+h" office:value-type="float" office:value="0.34" calcext:value-type="float">
            <text:p>0,34</text:p>
          </table:table-cell>
          <table:table-cell table:style-name="ce1" table:formula="of:=[.H35]+ h*[.F36]" office:value-type="float" office:value="1099.05721373438" calcext:value-type="float">
            <text:p>1099,057213734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]" office:value-type="float" office:value="0.34" calcext:value-type="float">
            <text:p>0,34</text:p>
          </table:table-cell>
          <table:table-cell table:style-name="ce1" table:formula="of:=[.H36]" office:value-type="float" office:value="1099.05721373438" calcext:value-type="float">
            <text:p>1099,05721373438</text:p>
          </table:table-cell>
          <table:table-cell table:style-name="ce1" table:formula="of:=-68 - ([.E37]^2/Ao)" office:value-type="float" office:value="-873.284506041045" calcext:value-type="float">
            <text:p>-873,284506041045</text:p>
          </table:table-cell>
          <table:table-cell table:style-name="ce1" table:formula="of:=[.G36]+h" office:value-type="float" office:value="0.35" calcext:value-type="float">
            <text:p>0,35</text:p>
          </table:table-cell>
          <table:table-cell table:style-name="ce1" table:formula="of:=[.H36]+ h*[.F37]" office:value-type="float" office:value="1090.32436867396" calcext:value-type="float">
            <text:p>1090,324368673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]" office:value-type="float" office:value="0.35" calcext:value-type="float">
            <text:p>0,35</text:p>
          </table:table-cell>
          <table:table-cell table:style-name="ce1" table:formula="of:=[.H37]" office:value-type="float" office:value="1090.32436867396" calcext:value-type="float">
            <text:p>1090,32436867396</text:p>
          </table:table-cell>
          <table:table-cell table:style-name="ce1" table:formula="of:=-68 - ([.E38]^2/Ao)" office:value-type="float" office:value="-860.538152616187" calcext:value-type="float">
            <text:p>-860,538152616187</text:p>
          </table:table-cell>
          <table:table-cell table:style-name="ce1" table:formula="of:=[.G37]+h" office:value-type="float" office:value="0.36" calcext:value-type="float">
            <text:p>0,36</text:p>
          </table:table-cell>
          <table:table-cell table:style-name="ce1" table:formula="of:=[.H37]+ h*[.F38]" office:value-type="float" office:value="1081.7189871478" calcext:value-type="float">
            <text:p>1081,71898714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]" office:value-type="float" office:value="0.36" calcext:value-type="float">
            <text:p>0,36</text:p>
          </table:table-cell>
          <table:table-cell table:style-name="ce1" table:formula="of:=[.H38]" office:value-type="float" office:value="1081.7189871478" calcext:value-type="float">
            <text:p>1081,7189871478</text:p>
          </table:table-cell>
          <table:table-cell table:style-name="ce1" table:formula="of:=-68 - ([.E39]^2/Ao)" office:value-type="float" office:value="-848.077311437379" calcext:value-type="float">
            <text:p>-848,077311437379</text:p>
          </table:table-cell>
          <table:table-cell table:style-name="ce1" table:formula="of:=[.G38]+h" office:value-type="float" office:value="0.37" calcext:value-type="float">
            <text:p>0,37</text:p>
          </table:table-cell>
          <table:table-cell table:style-name="ce1" table:formula="of:=[.H38]+ h*[.F39]" office:value-type="float" office:value="1073.23821403343" calcext:value-type="float">
            <text:p>1073,238214033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]" office:value-type="float" office:value="0.37" calcext:value-type="float">
            <text:p>0,37</text:p>
          </table:table-cell>
          <table:table-cell table:style-name="ce1" table:formula="of:=[.H39]" office:value-type="float" office:value="1073.23821403343" calcext:value-type="float">
            <text:p>1073,23821403343</text:p>
          </table:table-cell>
          <table:table-cell table:style-name="ce1" table:formula="of:=-68 - ([.E40]^2/Ao)" office:value-type="float" office:value="-835.893509374443" calcext:value-type="float">
            <text:p>-835,893509374443</text:p>
          </table:table-cell>
          <table:table-cell table:style-name="ce1" table:formula="of:=[.G39]+h" office:value-type="float" office:value="0.38" calcext:value-type="float">
            <text:p>0,38</text:p>
          </table:table-cell>
          <table:table-cell table:style-name="ce1" table:formula="of:=[.H39]+ h*[.F40]" office:value-type="float" office:value="1064.87927893968" calcext:value-type="float">
            <text:p>1064,879278939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]" office:value-type="float" office:value="0.38" calcext:value-type="float">
            <text:p>0,38</text:p>
          </table:table-cell>
          <table:table-cell table:style-name="ce1" table:formula="of:=[.H40]" office:value-type="float" office:value="1064.87927893968" calcext:value-type="float">
            <text:p>1064,87927893968</text:p>
          </table:table-cell>
          <table:table-cell table:style-name="ce1" table:formula="of:=-68 - ([.E41]^2/Ao)" office:value-type="float" office:value="-823.978585810069" calcext:value-type="float">
            <text:p>-823,978585810069</text:p>
          </table:table-cell>
          <table:table-cell table:style-name="ce1" table:formula="of:=[.G40]+h" office:value-type="float" office:value="0.39" calcext:value-type="float">
            <text:p>0,39</text:p>
          </table:table-cell>
          <table:table-cell table:style-name="ce1" table:formula="of:=[.H40]+ h*[.F41]" office:value-type="float" office:value="1056.63949308158" calcext:value-type="float">
            <text:p>1056,639493081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]" office:value-type="float" office:value="0.39" calcext:value-type="float">
            <text:p>0,39</text:p>
          </table:table-cell>
          <table:table-cell table:style-name="ce1" table:formula="of:=[.H41]" office:value-type="float" office:value="1056.63949308158" calcext:value-type="float">
            <text:p>1056,63949308158</text:p>
          </table:table-cell>
          <table:table-cell table:style-name="ce1" table:formula="of:=-68 - ([.E42]^2/Ao)" office:value-type="float" office:value="-812.324678893138" calcext:value-type="float">
            <text:p>-812,324678893138</text:p>
          </table:table-cell>
          <table:table-cell table:style-name="ce1" table:formula="of:=[.G41]+h" office:value-type="float" office:value="0.4" calcext:value-type="float">
            <text:p>0,4</text:p>
          </table:table-cell>
          <table:table-cell table:style-name="ce1" table:formula="of:=[.H41]+ h*[.F42]" office:value-type="float" office:value="1048.51624629265" calcext:value-type="float">
            <text:p>1048,516246292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]" office:value-type="float" office:value="0.4" calcext:value-type="float">
            <text:p>0,4</text:p>
          </table:table-cell>
          <table:table-cell table:style-name="ce1" table:formula="of:=[.H42]" office:value-type="float" office:value="1048.51624629265" calcext:value-type="float">
            <text:p>1048,51624629265</text:p>
          </table:table-cell>
          <table:table-cell table:style-name="ce1" table:formula="of:=-68 - ([.E43]^2/Ao)" office:value-type="float" office:value="-800.92421249309" calcext:value-type="float">
            <text:p>-800,92421249309</text:p>
          </table:table-cell>
          <table:table-cell table:style-name="ce1" table:formula="of:=[.G42]+h" office:value-type="float" office:value="0.41" calcext:value-type="float">
            <text:p>0,41</text:p>
          </table:table-cell>
          <table:table-cell table:style-name="ce1" table:formula="of:=[.H42]+ h*[.F43]" office:value-type="float" office:value="1040.50700416772" calcext:value-type="float">
            <text:p>1040,507004167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]" office:value-type="float" office:value="0.41" calcext:value-type="float">
            <text:p>0,41</text:p>
          </table:table-cell>
          <table:table-cell table:style-name="ce1" table:formula="of:=[.H43]" office:value-type="float" office:value="1040.50700416772" calcext:value-type="float">
            <text:p>1040,50700416772</text:p>
          </table:table-cell>
          <table:table-cell table:style-name="ce1" table:formula="of:=-68 - ([.E44]^2/Ao)" office:value-type="float" office:value="-789.769883814725" calcext:value-type="float">
            <text:p>-789,769883814725</text:p>
          </table:table-cell>
          <table:table-cell table:style-name="ce1" table:formula="of:=[.G43]+h" office:value-type="float" office:value="0.42" calcext:value-type="float">
            <text:p>0,42</text:p>
          </table:table-cell>
          <table:table-cell table:style-name="ce1" table:formula="of:=[.H43]+ h*[.F44]" office:value-type="float" office:value="1032.60930532957" calcext:value-type="float">
            <text:p>1032,609305329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]" office:value-type="float" office:value="0.42" calcext:value-type="float">
            <text:p>0,42</text:p>
          </table:table-cell>
          <table:table-cell table:style-name="ce1" table:formula="of:=[.H44]" office:value-type="float" office:value="1032.60930532957" calcext:value-type="float">
            <text:p>1032,60930532957</text:p>
          </table:table-cell>
          <table:table-cell table:style-name="ce1" table:formula="of:=-68 - ([.E45]^2/Ao)" office:value-type="float" office:value="-778.854651635484" calcext:value-type="float">
            <text:p>-778,854651635484</text:p>
          </table:table-cell>
          <table:table-cell table:style-name="ce1" table:formula="of:=[.G44]+h" office:value-type="float" office:value="0.43" calcext:value-type="float">
            <text:p>0,43</text:p>
          </table:table-cell>
          <table:table-cell table:style-name="ce1" table:formula="of:=[.H44]+ h*[.F45]" office:value-type="float" office:value="1024.82075881322" calcext:value-type="float">
            <text:p>1024,820758813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]" office:value-type="float" office:value="0.43" calcext:value-type="float">
            <text:p>0,43</text:p>
          </table:table-cell>
          <table:table-cell table:style-name="ce1" table:formula="of:=[.H45]" office:value-type="float" office:value="1024.82075881322" calcext:value-type="float">
            <text:p>1024,82075881322</text:p>
          </table:table-cell>
          <table:table-cell table:style-name="ce1" table:formula="of:=-68 - ([.E46]^2/Ao)" office:value-type="float" office:value="-768.171725129669" calcext:value-type="float">
            <text:p>-768,171725129669</text:p>
          </table:table-cell>
          <table:table-cell table:style-name="ce1" table:formula="of:=[.G45]+h" office:value-type="float" office:value="0.44" calcext:value-type="float">
            <text:p>0,44</text:p>
          </table:table-cell>
          <table:table-cell table:style-name="ce1" table:formula="of:=[.H45]+ h*[.F46]" office:value-type="float" office:value="1017.13904156192" calcext:value-type="float">
            <text:p>1017,139041561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]" office:value-type="float" office:value="0.44" calcext:value-type="float">
            <text:p>0,44</text:p>
          </table:table-cell>
          <table:table-cell table:style-name="ce1" table:formula="of:=[.H46]" office:value-type="float" office:value="1017.13904156192" calcext:value-type="float">
            <text:p>1017,13904156192</text:p>
          </table:table-cell>
          <table:table-cell table:style-name="ce1" table:formula="of:=-68 - ([.E47]^2/Ao)" office:value-type="float" office:value="-757.714553246338" calcext:value-type="float">
            <text:p>-757,714553246338</text:p>
          </table:table-cell>
          <table:table-cell table:style-name="ce1" table:formula="of:=[.G46]+h" office:value-type="float" office:value="0.45" calcext:value-type="float">
            <text:p>0,45</text:p>
          </table:table-cell>
          <table:table-cell table:style-name="ce1" table:formula="of:=[.H46]+ h*[.F47]" office:value-type="float" office:value="1009.56189602946" calcext:value-type="float">
            <text:p>1009,561896029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]" office:value-type="float" office:value="0.45" calcext:value-type="float">
            <text:p>0,45</text:p>
          </table:table-cell>
          <table:table-cell table:style-name="ce1" table:formula="of:=[.H47]" office:value-type="float" office:value="1009.56189602946" calcext:value-type="float">
            <text:p>1009,56189602946</text:p>
          </table:table-cell>
          <table:table-cell table:style-name="ce1" table:formula="of:=-68 - ([.E48]^2/Ao)" office:value-type="float" office:value="-747.476814609731" calcext:value-type="float">
            <text:p>-747,476814609731</text:p>
          </table:table-cell>
          <table:table-cell table:style-name="ce1" table:formula="of:=[.G47]+h" office:value-type="float" office:value="0.46" calcext:value-type="float">
            <text:p>0,46</text:p>
          </table:table-cell>
          <table:table-cell table:style-name="ce1" table:formula="of:=[.H47]+ h*[.F48]" office:value-type="float" office:value="1002.08712788336" calcext:value-type="float">
            <text:p>1002,087127883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]" office:value-type="float" office:value="0.46" calcext:value-type="float">
            <text:p>0,46</text:p>
          </table:table-cell>
          <table:table-cell table:style-name="ce1" table:formula="of:=[.H48]" office:value-type="float" office:value="1002.08712788336" calcext:value-type="float">
            <text:p>1002,08712788336</text:p>
          </table:table-cell>
          <table:table-cell table:style-name="ce1" table:formula="of:=-68 - ([.E49]^2/Ao)" office:value-type="float" office:value="-737.452407913017" calcext:value-type="float">
            <text:p>-737,452407913017</text:p>
          </table:table-cell>
          <table:table-cell table:style-name="ce1" table:formula="of:=[.G48]+h" office:value-type="float" office:value="0.47" calcext:value-type="float">
            <text:p>0,47</text:p>
          </table:table-cell>
          <table:table-cell table:style-name="ce1" table:formula="of:=[.H48]+ h*[.F49]" office:value-type="float" office:value="994.712603804232" calcext:value-type="float">
            <text:p>994,7126038042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]" office:value-type="float" office:value="0.47" calcext:value-type="float">
            <text:p>0,47</text:p>
          </table:table-cell>
          <table:table-cell table:style-name="ce1" table:formula="of:=[.H49]" office:value-type="float" office:value="994.712603804232" calcext:value-type="float">
            <text:p>994,712603804232</text:p>
          </table:table-cell>
          <table:table-cell table:style-name="ce1" table:formula="of:=-68 - ([.E50]^2/Ao)" office:value-type="float" office:value="-727.635442777997" calcext:value-type="float">
            <text:p>-727,635442777997</text:p>
          </table:table-cell>
          <table:table-cell table:style-name="ce1" table:formula="of:=[.G49]+h" office:value-type="float" office:value="0.48" calcext:value-type="float">
            <text:p>0,48</text:p>
          </table:table-cell>
          <table:table-cell table:style-name="ce1" table:formula="of:=[.H49]+ h*[.F50]" office:value-type="float" office:value="987.436249376452" calcext:value-type="float">
            <text:p>987,4362493764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]" office:value-type="float" office:value="0.48" calcext:value-type="float">
            <text:p>0,48</text:p>
          </table:table-cell>
          <table:table-cell table:style-name="ce1" table:formula="of:=[.H50]" office:value-type="float" office:value="987.436249376452" calcext:value-type="float">
            <text:p>987,436249376452</text:p>
          </table:table-cell>
          <table:table-cell table:style-name="ce1" table:formula="of:=-68 - ([.E51]^2/Ao)" office:value-type="float" office:value="-718.02023105509" calcext:value-type="float">
            <text:p>-718,02023105509</text:p>
          </table:table-cell>
          <table:table-cell table:style-name="ce1" table:formula="of:=[.G50]+h" office:value-type="float" office:value="0.49" calcext:value-type="float">
            <text:p>0,49</text:p>
          </table:table-cell>
          <table:table-cell table:style-name="ce1" table:formula="of:=[.H50]+ h*[.F51]" office:value-type="float" office:value="980.256047065901" calcext:value-type="float">
            <text:p>980,2560470659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]" office:value-type="float" office:value="0.49" calcext:value-type="float">
            <text:p>0,49</text:p>
          </table:table-cell>
          <table:table-cell table:style-name="ce1" table:formula="of:=[.H51]" office:value-type="float" office:value="980.256047065901" calcext:value-type="float">
            <text:p>980,256047065901</text:p>
          </table:table-cell>
          <table:table-cell table:style-name="ce1" table:formula="of:=-68 - ([.E52]^2/Ao)" office:value-type="float" office:value="-708.601278539511" calcext:value-type="float">
            <text:p>-708,601278539511</text:p>
          </table:table-cell>
          <table:table-cell table:style-name="ce1" table:formula="of:=[.G51]+h" office:value-type="float" office:value="0.5" calcext:value-type="float">
            <text:p>0,5</text:p>
          </table:table-cell>
          <table:table-cell table:style-name="ce1" table:formula="of:=[.H51]+ h*[.F52]" office:value-type="float" office:value="973.170034280506" calcext:value-type="float">
            <text:p>973,1700342805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]" office:value-type="float" office:value="0.5" calcext:value-type="float">
            <text:p>0,5</text:p>
          </table:table-cell>
          <table:table-cell table:style-name="ce1" table:formula="of:=[.H52]" office:value-type="float" office:value="973.170034280506" calcext:value-type="float">
            <text:p>973,170034280506</text:p>
          </table:table-cell>
          <table:table-cell table:style-name="ce1" table:formula="of:=-68 - ([.E53]^2/Ao)" office:value-type="float" office:value="-699.373277081014" calcext:value-type="float">
            <text:p>-699,373277081014</text:p>
          </table:table-cell>
          <table:table-cell table:style-name="ce1" table:formula="of:=[.G52]+h" office:value-type="float" office:value="0.51" calcext:value-type="float">
            <text:p>0,51</text:p>
          </table:table-cell>
          <table:table-cell table:style-name="ce1" table:formula="of:=[.H52]+ h*[.F53]" office:value-type="float" office:value="966.176301509696" calcext:value-type="float">
            <text:p>966,1763015096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]" office:value-type="float" office:value="0.51" calcext:value-type="float">
            <text:p>0,51</text:p>
          </table:table-cell>
          <table:table-cell table:style-name="ce1" table:formula="of:=[.H53]" office:value-type="float" office:value="966.176301509696" calcext:value-type="float">
            <text:p>966,176301509696</text:p>
          </table:table-cell>
          <table:table-cell table:style-name="ce1" table:formula="of:=-68 - ([.E54]^2/Ao)" office:value-type="float" office:value="-690.33109706597" calcext:value-type="float">
            <text:p>-690,33109706597</text:p>
          </table:table-cell>
          <table:table-cell table:style-name="ce1" table:formula="of:=[.G53]+h" office:value-type="float" office:value="0.52" calcext:value-type="float">
            <text:p>0,52</text:p>
          </table:table-cell>
          <table:table-cell table:style-name="ce1" table:formula="of:=[.H53]+ h*[.F54]" office:value-type="float" office:value="959.272990539036" calcext:value-type="float">
            <text:p>959,2729905390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]" office:value-type="float" office:value="0.52" calcext:value-type="float">
            <text:p>0,52</text:p>
          </table:table-cell>
          <table:table-cell table:style-name="ce1" table:formula="of:=[.H54]" office:value-type="float" office:value="959.272990539036" calcext:value-type="float">
            <text:p>959,272990539036</text:p>
          </table:table-cell>
          <table:table-cell table:style-name="ce1" table:formula="of:=-68 - ([.E55]^2/Ao)" office:value-type="float" office:value="-681.469780251804" calcext:value-type="float">
            <text:p>-681,469780251804</text:p>
          </table:table-cell>
          <table:table-cell table:style-name="ce1" table:formula="of:=[.G54]+h" office:value-type="float" office:value="0.53" calcext:value-type="float">
            <text:p>0,53</text:p>
          </table:table-cell>
          <table:table-cell table:style-name="ce1" table:formula="of:=[.H54]+ h*[.F55]" office:value-type="float" office:value="952.458292736518" calcext:value-type="float">
            <text:p>952,4582927365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]" office:value-type="float" office:value="0.53" calcext:value-type="float">
            <text:p>0,53</text:p>
          </table:table-cell>
          <table:table-cell table:style-name="ce1" table:formula="of:=[.H55]" office:value-type="float" office:value="952.458292736518" calcext:value-type="float">
            <text:p>952,458292736518</text:p>
          </table:table-cell>
          <table:table-cell table:style-name="ce1" table:formula="of:=-68 - ([.E56]^2/Ao)" office:value-type="float" office:value="-672.784532935042" calcext:value-type="float">
            <text:p>-672,784532935042</text:p>
          </table:table-cell>
          <table:table-cell table:style-name="ce1" table:formula="of:=[.G55]+h" office:value-type="float" office:value="0.54" calcext:value-type="float">
            <text:p>0,54</text:p>
          </table:table-cell>
          <table:table-cell table:style-name="ce1" table:formula="of:=[.H55]+ h*[.F56]" office:value-type="float" office:value="945.730447407168" calcext:value-type="float">
            <text:p>945,7304474071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]" office:value-type="float" office:value="0.54" calcext:value-type="float">
            <text:p>0,54</text:p>
          </table:table-cell>
          <table:table-cell table:style-name="ce1" table:formula="of:=[.H56]" office:value-type="float" office:value="945.730447407168" calcext:value-type="float">
            <text:p>945,730447407168</text:p>
          </table:table-cell>
          <table:table-cell table:style-name="ce1" table:formula="of:=-68 - ([.E57]^2/Ao)" office:value-type="float" office:value="-664.270719435308" calcext:value-type="float">
            <text:p>-664,270719435308</text:p>
          </table:table-cell>
          <table:table-cell table:style-name="ce1" table:formula="of:=[.G56]+h" office:value-type="float" office:value="0.55" calcext:value-type="float">
            <text:p>0,55</text:p>
          </table:table-cell>
          <table:table-cell table:style-name="ce1" table:formula="of:=[.H56]+ h*[.F57]" office:value-type="float" office:value="939.087740212814" calcext:value-type="float">
            <text:p>939,0877402128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]" office:value-type="float" office:value="0.55" calcext:value-type="float">
            <text:p>0,55</text:p>
          </table:table-cell>
          <table:table-cell table:style-name="ce1" table:formula="of:=[.H57]" office:value-type="float" office:value="939.087740212814" calcext:value-type="float">
            <text:p>939,087740212814</text:p>
          </table:table-cell>
          <table:table-cell table:style-name="ce1" table:formula="of:=-68 - ([.E58]^2/Ao)" office:value-type="float" office:value="-655.923855878674" calcext:value-type="float">
            <text:p>-655,923855878674</text:p>
          </table:table-cell>
          <table:table-cell table:style-name="ce1" table:formula="of:=[.G57]+h" office:value-type="float" office:value="0.56" calcext:value-type="float">
            <text:p>0,56</text:p>
          </table:table-cell>
          <table:table-cell table:style-name="ce1" table:formula="of:=[.H57]+ h*[.F58]" office:value-type="float" office:value="932.528501654028" calcext:value-type="float">
            <text:p>932,5285016540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]" office:value-type="float" office:value="0.56" calcext:value-type="float">
            <text:p>0,56</text:p>
          </table:table-cell>
          <table:table-cell table:style-name="ce1" table:formula="of:=[.H58]" office:value-type="float" office:value="932.528501654028" calcext:value-type="float">
            <text:p>932,528501654028</text:p>
          </table:table-cell>
          <table:table-cell table:style-name="ce1" table:formula="of:=-68 - ([.E59]^2/Ao)" office:value-type="float" office:value="-647.739604264737" calcext:value-type="float">
            <text:p>-647,739604264737</text:p>
          </table:table-cell>
          <table:table-cell table:style-name="ce1" table:formula="of:=[.G58]+h" office:value-type="float" office:value="0.57" calcext:value-type="float">
            <text:p>0,57</text:p>
          </table:table-cell>
          <table:table-cell table:style-name="ce1" table:formula="of:=[.H58]+ h*[.F59]" office:value-type="float" office:value="926.05110561138" calcext:value-type="float">
            <text:p>926,051105611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]" office:value-type="float" office:value="0.57" calcext:value-type="float">
            <text:p>0,57</text:p>
          </table:table-cell>
          <table:table-cell table:style-name="ce1" table:formula="of:=[.H59]" office:value-type="float" office:value="926.05110561138" calcext:value-type="float">
            <text:p>926,05110561138</text:p>
          </table:table-cell>
          <table:table-cell table:style-name="ce1" table:formula="of:=-68 - ([.E60]^2/Ao)" office:value-type="float" office:value="-639.713766802707" calcext:value-type="float">
            <text:p>-639,713766802707</text:p>
          </table:table-cell>
          <table:table-cell table:style-name="ce1" table:formula="of:=[.G59]+h" office:value-type="float" office:value="0.58" calcext:value-type="float">
            <text:p>0,58</text:p>
          </table:table-cell>
          <table:table-cell table:style-name="ce1" table:formula="of:=[.H59]+ h*[.F60]" office:value-type="float" office:value="919.653967943353" calcext:value-type="float">
            <text:p>919,6539679433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]" office:value-type="float" office:value="0.58" calcext:value-type="float">
            <text:p>0,58</text:p>
          </table:table-cell>
          <table:table-cell table:style-name="ce1" table:formula="of:=[.H60]" office:value-type="float" office:value="919.653967943353" calcext:value-type="float">
            <text:p>919,653967943353</text:p>
          </table:table-cell>
          <table:table-cell table:style-name="ce1" table:formula="of:=-68 - ([.E61]^2/Ao)" office:value-type="float" office:value="-631.842280502636" calcext:value-type="float">
            <text:p>-631,842280502636</text:p>
          </table:table-cell>
          <table:table-cell table:style-name="ce1" table:formula="of:=[.G60]+h" office:value-type="float" office:value="0.59" calcext:value-type="float">
            <text:p>0,59</text:p>
          </table:table-cell>
          <table:table-cell table:style-name="ce1" table:formula="of:=[.H60]+ h*[.F61]" office:value-type="float" office:value="913.335545138327" calcext:value-type="float">
            <text:p>913,3355451383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]" office:value-type="float" office:value="0.59" calcext:value-type="float">
            <text:p>0,59</text:p>
          </table:table-cell>
          <table:table-cell table:style-name="ce1" table:formula="of:=[.H61]" office:value-type="float" office:value="913.335545138327" calcext:value-type="float">
            <text:p>913,335545138327</text:p>
          </table:table-cell>
          <table:table-cell table:style-name="ce1" table:formula="of:=-68 - ([.E62]^2/Ao)" office:value-type="float" office:value="-624.12121200875" calcext:value-type="float">
            <text:p>-624,12121200875</text:p>
          </table:table-cell>
          <table:table-cell table:style-name="ce1" table:formula="of:=[.G61]+h" office:value-type="float" office:value="0.6" calcext:value-type="float">
            <text:p>0,6</text:p>
          </table:table-cell>
          <table:table-cell table:style-name="ce1" table:formula="of:=[.H61]+ h*[.F62]" office:value-type="float" office:value="907.094333018239" calcext:value-type="float">
            <text:p>907,0943330182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]" office:value-type="float" office:value="0.6" calcext:value-type="float">
            <text:p>0,6</text:p>
          </table:table-cell>
          <table:table-cell table:style-name="ce1" table:formula="of:=[.H62]" office:value-type="float" office:value="907.094333018239" calcext:value-type="float">
            <text:p>907,094333018239</text:p>
          </table:table-cell>
          <table:table-cell table:style-name="ce1" table:formula="of:=-68 - ([.E63]^2/Ao)" office:value-type="float" office:value="-616.546752662536" calcext:value-type="float">
            <text:p>-616,546752662536</text:p>
          </table:table-cell>
          <table:table-cell table:style-name="ce1" table:formula="of:=[.G62]+h" office:value-type="float" office:value="0.61" calcext:value-type="float">
            <text:p>0,61</text:p>
          </table:table-cell>
          <table:table-cell table:style-name="ce1" table:formula="of:=[.H62]+ h*[.F63]" office:value-type="float" office:value="900.928865491614" calcext:value-type="float">
            <text:p>900,9288654916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]" office:value-type="float" office:value="0.61" calcext:value-type="float">
            <text:p>0,61</text:p>
          </table:table-cell>
          <table:table-cell table:style-name="ce1" table:formula="of:=[.H63]" office:value-type="float" office:value="900.928865491614" calcext:value-type="float">
            <text:p>900,928865491614</text:p>
          </table:table-cell>
          <table:table-cell table:style-name="ce1" table:formula="of:=-68 - ([.E64]^2/Ao)" office:value-type="float" office:value="-609.115213784005" calcext:value-type="float">
            <text:p>-609,115213784005</text:p>
          </table:table-cell>
          <table:table-cell table:style-name="ce1" table:formula="of:=[.G63]+h" office:value-type="float" office:value="0.62" calcext:value-type="float">
            <text:p>0,62</text:p>
          </table:table-cell>
          <table:table-cell table:style-name="ce1" table:formula="of:=[.H63]+ h*[.F64]" office:value-type="float" office:value="894.837713353774" calcext:value-type="float">
            <text:p>894,8377133537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]" office:value-type="float" office:value="0.62" calcext:value-type="float">
            <text:p>0,62</text:p>
          </table:table-cell>
          <table:table-cell table:style-name="ce1" table:formula="of:=[.H64]" office:value-type="float" office:value="894.837713353774" calcext:value-type="float">
            <text:p>894,837713353774</text:p>
          </table:table-cell>
          <table:table-cell table:style-name="ce1" table:formula="of:=-68 - ([.E65]^2/Ao)" office:value-type="float" office:value="-601.823022160141" calcext:value-type="float">
            <text:p>-601,823022160141</text:p>
          </table:table-cell>
          <table:table-cell table:style-name="ce1" table:formula="of:=[.G64]+h" office:value-type="float" office:value="0.63" calcext:value-type="float">
            <text:p>0,63</text:p>
          </table:table-cell>
          <table:table-cell table:style-name="ce1" table:formula="of:=[.H64]+ h*[.F65]" office:value-type="float" office:value="888.819483132173" calcext:value-type="float">
            <text:p>888,8194831321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]" office:value-type="float" office:value="0.63" calcext:value-type="float">
            <text:p>0,63</text:p>
          </table:table-cell>
          <table:table-cell table:style-name="ce1" table:formula="of:=[.H65]" office:value-type="float" office:value="888.819483132173" calcext:value-type="float">
            <text:p>888,819483132173</text:p>
          </table:table-cell>
          <table:table-cell table:style-name="ce1" table:formula="of:=-68 - ([.E66]^2/Ao)" office:value-type="float" office:value="-594.666715730228" calcext:value-type="float">
            <text:p>-594,666715730228</text:p>
          </table:table-cell>
          <table:table-cell table:style-name="ce1" table:formula="of:=[.G65]+h" office:value-type="float" office:value="0.64" calcext:value-type="float">
            <text:p>0,64</text:p>
          </table:table-cell>
          <table:table-cell table:style-name="ce1" table:formula="of:=[.H65]+ h*[.F66]" office:value-type="float" office:value="882.87281597487" calcext:value-type="float">
            <text:p>882,872815974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]" office:value-type="float" office:value="0.64" calcext:value-type="float">
            <text:p>0,64</text:p>
          </table:table-cell>
          <table:table-cell table:style-name="ce1" table:formula="of:=[.H66]" office:value-type="float" office:value="882.87281597487" calcext:value-type="float">
            <text:p>882,87281597487</text:p>
          </table:table-cell>
          <table:table-cell table:style-name="ce1" table:formula="of:=-68 - ([.E67]^2/Ao)" office:value-type="float" office:value="-587.642939458265" calcext:value-type="float">
            <text:p>-587,642939458265</text:p>
          </table:table-cell>
          <table:table-cell table:style-name="ce1" table:formula="of:=[.G66]+h" office:value-type="float" office:value="0.65" calcext:value-type="float">
            <text:p>0,65</text:p>
          </table:table-cell>
          <table:table-cell table:style-name="ce1" table:formula="of:=[.H66]+ h*[.F67]" office:value-type="float" office:value="876.996386580288" calcext:value-type="float">
            <text:p>876,9963865802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]" office:value-type="float" office:value="0.65" calcext:value-type="float">
            <text:p>0,65</text:p>
          </table:table-cell>
          <table:table-cell table:style-name="ce1" table:formula="of:=[.H67]" office:value-type="float" office:value="876.996386580288" calcext:value-type="float">
            <text:p>876,996386580288</text:p>
          </table:table-cell>
          <table:table-cell table:style-name="ce1" table:formula="of:=-68 - ([.E68]^2/Ao)" office:value-type="float" office:value="-580.748441383254" calcext:value-type="float">
            <text:p>-580,748441383254</text:p>
          </table:table-cell>
          <table:table-cell table:style-name="ce1" table:formula="of:=[.G67]+h" office:value-type="float" office:value="0.66" calcext:value-type="float">
            <text:p>0,66</text:p>
          </table:table-cell>
          <table:table-cell table:style-name="ce1" table:formula="of:=[.H67]+ h*[.F68]" office:value-type="float" office:value="871.188902166455" calcext:value-type="float">
            <text:p>871,1889021664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]" office:value-type="float" office:value="0.66" calcext:value-type="float">
            <text:p>0,66</text:p>
          </table:table-cell>
          <table:table-cell table:style-name="ce1" table:formula="of:=[.H68]" office:value-type="float" office:value="871.188902166455" calcext:value-type="float">
            <text:p>871,188902166455</text:p>
          </table:table-cell>
          <table:table-cell table:style-name="ce1" table:formula="of:=-68 - ([.E69]^2/Ao)" office:value-type="float" office:value="-573.980068838662" calcext:value-type="float">
            <text:p>-573,980068838662</text:p>
          </table:table-cell>
          <table:table-cell table:style-name="ce1" table:formula="of:=[.G68]+h" office:value-type="float" office:value="0.67" calcext:value-type="float">
            <text:p>0,67</text:p>
          </table:table-cell>
          <table:table-cell table:style-name="ce1" table:formula="of:=[.H68]+ h*[.F69]" office:value-type="float" office:value="865.449101478069" calcext:value-type="float">
            <text:p>865,4491014780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]" office:value-type="float" office:value="0.67" calcext:value-type="float">
            <text:p>0,67</text:p>
          </table:table-cell>
          <table:table-cell table:style-name="ce1" table:formula="of:=[.H69]" office:value-type="float" office:value="865.449101478069" calcext:value-type="float">
            <text:p>865,449101478069</text:p>
          </table:table-cell>
          <table:table-cell table:style-name="ce1" table:formula="of:=-68 - ([.E70]^2/Ao)" office:value-type="float" office:value="-567.334764832798" calcext:value-type="float">
            <text:p>-567,334764832798</text:p>
          </table:table-cell>
          <table:table-cell table:style-name="ce1" table:formula="of:=[.G69]+h" office:value-type="float" office:value="0.68" calcext:value-type="float">
            <text:p>0,68</text:p>
          </table:table-cell>
          <table:table-cell table:style-name="ce1" table:formula="of:=[.H69]+ h*[.F70]" office:value-type="float" office:value="859.775753829741" calcext:value-type="float">
            <text:p>859,7757538297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]" office:value-type="float" office:value="0.68" calcext:value-type="float">
            <text:p>0,68</text:p>
          </table:table-cell>
          <table:table-cell table:style-name="ce1" table:formula="of:=[.H70]" office:value-type="float" office:value="859.775753829741" calcext:value-type="float">
            <text:p>859,775753829741</text:p>
          </table:table-cell>
          <table:table-cell table:style-name="ce1" table:formula="of:=-68 - ([.E71]^2/Ao)" office:value-type="float" office:value="-560.809564582333" calcext:value-type="float">
            <text:p>-560,809564582333</text:p>
          </table:table-cell>
          <table:table-cell table:style-name="ce1" table:formula="of:=[.G70]+h" office:value-type="float" office:value="0.69" calcext:value-type="float">
            <text:p>0,69</text:p>
          </table:table-cell>
          <table:table-cell table:style-name="ce1" table:formula="of:=[.H70]+ h*[.F71]" office:value-type="float" office:value="854.167658183917" calcext:value-type="float">
            <text:p>854,1676581839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]" office:value-type="float" office:value="0.69" calcext:value-type="float">
            <text:p>0,69</text:p>
          </table:table-cell>
          <table:table-cell table:style-name="ce1" table:formula="of:=[.H71]" office:value-type="float" office:value="854.167658183917" calcext:value-type="float">
            <text:p>854,167658183917</text:p>
          </table:table-cell>
          <table:table-cell table:style-name="ce1" table:formula="of:=-68 - ([.E72]^2/Ao)" office:value-type="float" office:value="-554.401592191598" calcext:value-type="float">
            <text:p>-554,401592191598</text:p>
          </table:table-cell>
          <table:table-cell table:style-name="ce1" table:formula="of:=[.G71]+h" office:value-type="float" office:value="0.7" calcext:value-type="float">
            <text:p>0,7</text:p>
          </table:table-cell>
          <table:table-cell table:style-name="ce1" table:formula="of:=[.H71]+ h*[.F72]" office:value-type="float" office:value="848.623642262001" calcext:value-type="float">
            <text:p>848,6236422620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]" office:value-type="float" office:value="0.7" calcext:value-type="float">
            <text:p>0,7</text:p>
          </table:table-cell>
          <table:table-cell table:style-name="ce1" table:formula="of:=[.H72]" office:value-type="float" office:value="848.623642262001" calcext:value-type="float">
            <text:p>848,623642262001</text:p>
          </table:table-cell>
          <table:table-cell table:style-name="ce1" table:formula="of:=-68 - ([.E73]^2/Ao)" office:value-type="float" office:value="-548.108057470683" calcext:value-type="float">
            <text:p>-548,108057470683</text:p>
          </table:table-cell>
          <table:table-cell table:style-name="ce1" table:formula="of:=[.G72]+h" office:value-type="float" office:value="0.71" calcext:value-type="float">
            <text:p>0,71</text:p>
          </table:table-cell>
          <table:table-cell table:style-name="ce1" table:formula="of:=[.H72]+ h*[.F73]" office:value-type="float" office:value="843.142561687295" calcext:value-type="float">
            <text:p>843,1425616872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]" office:value-type="float" office:value="0.71" calcext:value-type="float">
            <text:p>0,71</text:p>
          </table:table-cell>
          <table:table-cell table:style-name="ce1" table:formula="of:=[.H73]" office:value-type="float" office:value="843.142561687295" calcext:value-type="float">
            <text:p>843,142561687295</text:p>
          </table:table-cell>
          <table:table-cell table:style-name="ce1" table:formula="of:=-68 - ([.E74]^2/Ao)" office:value-type="float" office:value="-541.926252885742" calcext:value-type="float">
            <text:p>-541,926252885742</text:p>
          </table:table-cell>
          <table:table-cell table:style-name="ce1" table:formula="of:=[.G73]+h" office:value-type="float" office:value="0.72" calcext:value-type="float">
            <text:p>0,72</text:p>
          </table:table-cell>
          <table:table-cell table:style-name="ce1" table:formula="of:=[.H73]+ h*[.F74]" office:value-type="float" office:value="837.723299158437" calcext:value-type="float">
            <text:p>837,7232991584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]" office:value-type="float" office:value="0.72" calcext:value-type="float">
            <text:p>0,72</text:p>
          </table:table-cell>
          <table:table-cell table:style-name="ce1" table:formula="of:=[.H74]" office:value-type="float" office:value="837.723299158437" calcext:value-type="float">
            <text:p>837,723299158437</text:p>
          </table:table-cell>
          <table:table-cell table:style-name="ce1" table:formula="of:=-68 - ([.E75]^2/Ao)" office:value-type="float" office:value="-535.853550635264" calcext:value-type="float">
            <text:p>-535,853550635264</text:p>
          </table:table-cell>
          <table:table-cell table:style-name="ce1" table:formula="of:=[.G74]+h" office:value-type="float" office:value="0.73" calcext:value-type="float">
            <text:p>0,73</text:p>
          </table:table-cell>
          <table:table-cell table:style-name="ce1" table:formula="of:=[.H74]+ h*[.F75]" office:value-type="float" office:value="832.364763652084" calcext:value-type="float">
            <text:p>832,3647636520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]" office:value-type="float" office:value="0.73" calcext:value-type="float">
            <text:p>0,73</text:p>
          </table:table-cell>
          <table:table-cell table:style-name="ce1" table:formula="of:=[.H75]" office:value-type="float" office:value="832.364763652084" calcext:value-type="float">
            <text:p>832,364763652084</text:p>
          </table:table-cell>
          <table:table-cell table:style-name="ce1" table:formula="of:=-68 - ([.E76]^2/Ao)" office:value-type="float" office:value="-529.887399846394" calcext:value-type="float">
            <text:p>-529,887399846394</text:p>
          </table:table-cell>
          <table:table-cell table:style-name="ce1" table:formula="of:=[.G75]+h" office:value-type="float" office:value="0.74" calcext:value-type="float">
            <text:p>0,74</text:p>
          </table:table-cell>
          <table:table-cell table:style-name="ce1" table:formula="of:=[.H75]+ h*[.F76]" office:value-type="float" office:value="827.065889653621" calcext:value-type="float">
            <text:p>827,0658896536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6]" office:value-type="float" office:value="0.74" calcext:value-type="float">
            <text:p>0,74</text:p>
          </table:table-cell>
          <table:table-cell table:style-name="ce1" table:formula="of:=[.H76]" office:value-type="float" office:value="827.065889653621" calcext:value-type="float">
            <text:p>827,065889653621</text:p>
          </table:table-cell>
          <table:table-cell table:style-name="ce1" table:formula="of:=-68 - ([.E77]^2/Ao)" office:value-type="float" office:value="-524.02532388569" calcext:value-type="float">
            <text:p>-524,02532388569</text:p>
          </table:table-cell>
          <table:table-cell table:style-name="ce1" table:formula="of:=[.G76]+h" office:value-type="float" office:value="0.75" calcext:value-type="float">
            <text:p>0,75</text:p>
          </table:table-cell>
          <table:table-cell table:style-name="ce1" table:formula="of:=[.H76]+ h*[.F77]" office:value-type="float" office:value="821.825636414764" calcext:value-type="float">
            <text:p>821,8256364147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7]" office:value-type="float" office:value="0.75" calcext:value-type="float">
            <text:p>0,75</text:p>
          </table:table-cell>
          <table:table-cell table:style-name="ce1" table:formula="of:=[.H77]" office:value-type="float" office:value="821.825636414764" calcext:value-type="float">
            <text:p>821,825636414764</text:p>
          </table:table-cell>
          <table:table-cell table:style-name="ce1" table:formula="of:=-68 - ([.E78]^2/Ao)" office:value-type="float" office:value="-518.264917779021" calcext:value-type="float">
            <text:p>-518,264917779021</text:p>
          </table:table-cell>
          <table:table-cell table:style-name="ce1" table:formula="of:=[.G77]+h" office:value-type="float" office:value="0.760000000000001" calcext:value-type="float">
            <text:p>0,760000000000001</text:p>
          </table:table-cell>
          <table:table-cell table:style-name="ce1" table:formula="of:=[.H77]+ h*[.F78]" office:value-type="float" office:value="816.642987236974" calcext:value-type="float">
            <text:p>816,6429872369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8]" office:value-type="float" office:value="0.760000000000001" calcext:value-type="float">
            <text:p>0,760000000000001</text:p>
          </table:table-cell>
          <table:table-cell table:style-name="ce1" table:formula="of:=[.H78]" office:value-type="float" office:value="816.642987236974" calcext:value-type="float">
            <text:p>816,642987236974</text:p>
          </table:table-cell>
          <table:table-cell table:style-name="ce1" table:formula="of:=-68 - ([.E79]^2/Ao)" office:value-type="float" office:value="-512.603845735552" calcext:value-type="float">
            <text:p>-512,603845735552</text:p>
          </table:table-cell>
          <table:table-cell table:style-name="ce1" table:formula="of:=[.G78]+h" office:value-type="float" office:value="0.770000000000001" calcext:value-type="float">
            <text:p>0,770000000000001</text:p>
          </table:table-cell>
          <table:table-cell table:style-name="ce1" table:formula="of:=[.H78]+ h*[.F79]" office:value-type="float" office:value="811.516948779618" calcext:value-type="float">
            <text:p>811,5169487796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9]" office:value-type="float" office:value="0.770000000000001" calcext:value-type="float">
            <text:p>0,770000000000001</text:p>
          </table:table-cell>
          <table:table-cell table:style-name="ce1" table:formula="of:=[.H79]" office:value-type="float" office:value="811.516948779618" calcext:value-type="float">
            <text:p>811,516948779618</text:p>
          </table:table-cell>
          <table:table-cell table:style-name="ce1" table:formula="of:=-68 - ([.E80]^2/Ao)" office:value-type="float" office:value="-507.039838771054" calcext:value-type="float">
            <text:p>-507,039838771054</text:p>
          </table:table-cell>
          <table:table-cell table:style-name="ce1" table:formula="of:=[.G79]+h" office:value-type="float" office:value="0.780000000000001" calcext:value-type="float">
            <text:p>0,780000000000001</text:p>
          </table:table-cell>
          <table:table-cell table:style-name="ce1" table:formula="of:=[.H79]+ h*[.F80]" office:value-type="float" office:value="806.446550391907" calcext:value-type="float">
            <text:p>806,4465503919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0]" office:value-type="float" office:value="0.780000000000001" calcext:value-type="float">
            <text:p>0,780000000000001</text:p>
          </table:table-cell>
          <table:table-cell table:style-name="ce1" table:formula="of:=[.H80]" office:value-type="float" office:value="806.446550391907" calcext:value-type="float">
            <text:p>806,446550391907</text:p>
          </table:table-cell>
          <table:table-cell table:style-name="ce1" table:formula="of:=-68 - ([.E81]^2/Ao)" office:value-type="float" office:value="-501.570692426005" calcext:value-type="float">
            <text:p>-501,570692426005</text:p>
          </table:table-cell>
          <table:table-cell table:style-name="ce1" table:formula="of:=[.G80]+h" office:value-type="float" office:value="0.790000000000001" calcext:value-type="float">
            <text:p>0,790000000000001</text:p>
          </table:table-cell>
          <table:table-cell table:style-name="ce1" table:formula="of:=[.H80]+ h*[.F81]" office:value-type="float" office:value="801.430843467647" calcext:value-type="float">
            <text:p>801,4308434676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1]" office:value-type="float" office:value="0.790000000000001" calcext:value-type="float">
            <text:p>0,790000000000001</text:p>
          </table:table-cell>
          <table:table-cell table:style-name="ce1" table:formula="of:=[.H81]" office:value-type="float" office:value="801.430843467647" calcext:value-type="float">
            <text:p>801,430843467647</text:p>
          </table:table-cell>
          <table:table-cell table:style-name="ce1" table:formula="of:=-68 - ([.E82]^2/Ao)" office:value-type="float" office:value="-496.194264574177" calcext:value-type="float">
            <text:p>-496,194264574177</text:p>
          </table:table-cell>
          <table:table-cell table:style-name="ce1" table:formula="of:=[.G81]+h" office:value-type="float" office:value="0.800000000000001" calcext:value-type="float">
            <text:p>0,800000000000001</text:p>
          </table:table-cell>
          <table:table-cell table:style-name="ce1" table:formula="of:=[.H81]+ h*[.F82]" office:value-type="float" office:value="796.468900821906" calcext:value-type="float">
            <text:p>796,4689008219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2]" office:value-type="float" office:value="0.800000000000001" calcext:value-type="float">
            <text:p>0,800000000000001</text:p>
          </table:table-cell>
          <table:table-cell table:style-name="ce1" table:formula="of:=[.H82]" office:value-type="float" office:value="796.468900821906" calcext:value-type="float">
            <text:p>796,468900821906</text:p>
          </table:table-cell>
          <table:table-cell table:style-name="ce1" table:formula="of:=-68 - ([.E83]^2/Ao)" office:value-type="float" office:value="-490.908473317636" calcext:value-type="float">
            <text:p>-490,908473317636</text:p>
          </table:table-cell>
          <table:table-cell table:style-name="ce1" table:formula="of:=[.G82]+h" office:value-type="float" office:value="0.810000000000001" calcext:value-type="float">
            <text:p>0,810000000000001</text:p>
          </table:table-cell>
          <table:table-cell table:style-name="ce1" table:formula="of:=[.H82]+ h*[.F83]" office:value-type="float" office:value="791.559816088729" calcext:value-type="float">
            <text:p>791,5598160887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3]" office:value-type="float" office:value="0.810000000000001" calcext:value-type="float">
            <text:p>0,810000000000001</text:p>
          </table:table-cell>
          <table:table-cell table:style-name="ce1" table:formula="of:=[.H83]" office:value-type="float" office:value="791.559816088729" calcext:value-type="float">
            <text:p>791,559816088729</text:p>
          </table:table-cell>
          <table:table-cell table:style-name="ce1" table:formula="of:=-68 - ([.E84]^2/Ao)" office:value-type="float" office:value="-485.711294964282" calcext:value-type="float">
            <text:p>-485,711294964282</text:p>
          </table:table-cell>
          <table:table-cell table:style-name="ce1" table:formula="of:=[.G83]+h" office:value-type="float" office:value="0.820000000000001" calcext:value-type="float">
            <text:p>0,820000000000001</text:p>
          </table:table-cell>
          <table:table-cell table:style-name="ce1" table:formula="of:=[.H83]+ h*[.F84]" office:value-type="float" office:value="786.702703139087" calcext:value-type="float">
            <text:p>786,7027031390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4]" office:value-type="float" office:value="0.820000000000001" calcext:value-type="float">
            <text:p>0,820000000000001</text:p>
          </table:table-cell>
          <table:table-cell table:style-name="ce1" table:formula="of:=[.H84]" office:value-type="float" office:value="786.702703139087" calcext:value-type="float">
            <text:p>786,702703139087</text:p>
          </table:table-cell>
          <table:table-cell table:style-name="ce1" table:formula="of:=-68 - ([.E85]^2/Ao)" office:value-type="float" office:value="-480.600762084231" calcext:value-type="float">
            <text:p>-480,600762084231</text:p>
          </table:table-cell>
          <table:table-cell table:style-name="ce1" table:formula="of:=[.G84]+h" office:value-type="float" office:value="0.830000000000001" calcext:value-type="float">
            <text:p>0,830000000000001</text:p>
          </table:table-cell>
          <table:table-cell table:style-name="ce1" table:formula="of:=[.H84]+ h*[.F85]" office:value-type="float" office:value="781.896695518244" calcext:value-type="float">
            <text:p>781,8966955182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5]" office:value-type="float" office:value="0.830000000000001" calcext:value-type="float">
            <text:p>0,830000000000001</text:p>
          </table:table-cell>
          <table:table-cell table:style-name="ce1" table:formula="of:=[.H85]" office:value-type="float" office:value="781.896695518244" calcext:value-type="float">
            <text:p>781,896695518244</text:p>
          </table:table-cell>
          <table:table-cell table:style-name="ce1" table:formula="of:=-68 - ([.E86]^2/Ao)" office:value-type="float" office:value="-475.574961641567" calcext:value-type="float">
            <text:p>-475,574961641567</text:p>
          </table:table-cell>
          <table:table-cell table:style-name="ce1" table:formula="of:=[.G85]+h" office:value-type="float" office:value="0.840000000000001" calcext:value-type="float">
            <text:p>0,840000000000001</text:p>
          </table:table-cell>
          <table:table-cell table:style-name="ce1" table:formula="of:=[.H85]+ h*[.F86]" office:value-type="float" office:value="777.140945901829" calcext:value-type="float">
            <text:p>777,1409459018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6]" office:value-type="float" office:value="0.840000000000001" calcext:value-type="float">
            <text:p>0,840000000000001</text:p>
          </table:table-cell>
          <table:table-cell table:style-name="ce1" table:formula="of:=[.H86]" office:value-type="float" office:value="777.140945901829" calcext:value-type="float">
            <text:p>777,140945901829</text:p>
          </table:table-cell>
          <table:table-cell table:style-name="ce1" table:formula="of:=-68 - ([.E87]^2/Ao)" office:value-type="float" office:value="-470.632033198126" calcext:value-type="float">
            <text:p>-470,632033198126</text:p>
          </table:table-cell>
          <table:table-cell table:style-name="ce1" table:formula="of:=[.G86]+h" office:value-type="float" office:value="0.850000000000001" calcext:value-type="float">
            <text:p>0,850000000000001</text:p>
          </table:table-cell>
          <table:table-cell table:style-name="ce1" table:formula="of:=[.H86]+ h*[.F87]" office:value-type="float" office:value="772.434625569847" calcext:value-type="float">
            <text:p>772,4346255698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7]" office:value-type="float" office:value="0.850000000000001" calcext:value-type="float">
            <text:p>0,850000000000001</text:p>
          </table:table-cell>
          <table:table-cell table:style-name="ce1" table:formula="of:=[.H87]" office:value-type="float" office:value="772.434625569847" calcext:value-type="float">
            <text:p>772,434625569847</text:p>
          </table:table-cell>
          <table:table-cell table:style-name="ce1" table:formula="of:=-68 - ([.E88]^2/Ao)" office:value-type="float" office:value="-465.770167186154" calcext:value-type="float">
            <text:p>-465,770167186154</text:p>
          </table:table-cell>
          <table:table-cell table:style-name="ce1" table:formula="of:=[.G87]+h" office:value-type="float" office:value="0.860000000000001" calcext:value-type="float">
            <text:p>0,860000000000001</text:p>
          </table:table-cell>
          <table:table-cell table:style-name="ce1" table:formula="of:=[.H87]+ h*[.F88]" office:value-type="float" office:value="767.776923897986" calcext:value-type="float">
            <text:p>767,7769238979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8]" office:value-type="float" office:value="0.860000000000001" calcext:value-type="float">
            <text:p>0,860000000000001</text:p>
          </table:table-cell>
          <table:table-cell table:style-name="ce1" table:formula="of:=[.H88]" office:value-type="float" office:value="767.776923897986" calcext:value-type="float">
            <text:p>767,776923897986</text:p>
          </table:table-cell>
          <table:table-cell table:style-name="ce1" table:formula="of:=-68 - ([.E89]^2/Ao)" office:value-type="float" office:value="-460.987603246836" calcext:value-type="float">
            <text:p>-460,987603246836</text:p>
          </table:table-cell>
          <table:table-cell table:style-name="ce1" table:formula="of:=[.G88]+h" office:value-type="float" office:value="0.870000000000001" calcext:value-type="float">
            <text:p>0,870000000000001</text:p>
          </table:table-cell>
          <table:table-cell table:style-name="ce1" table:formula="of:=[.H88]+ h*[.F89]" office:value-type="float" office:value="763.167047865518" calcext:value-type="float">
            <text:p>763,1670478655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9]" office:value-type="float" office:value="0.870000000000001" calcext:value-type="float">
            <text:p>0,870000000000001</text:p>
          </table:table-cell>
          <table:table-cell table:style-name="ce1" table:formula="of:=[.H89]" office:value-type="float" office:value="763.167047865518" calcext:value-type="float">
            <text:p>763,167047865518</text:p>
          </table:table-cell>
          <table:table-cell table:style-name="ce1" table:formula="of:=-68 - ([.E90]^2/Ao)" office:value-type="float" office:value="-456.282628631846" calcext:value-type="float">
            <text:p>-456,282628631846</text:p>
          </table:table-cell>
          <table:table-cell table:style-name="ce1" table:formula="of:=[.G89]+h" office:value-type="float" office:value="0.880000000000001" calcext:value-type="float">
            <text:p>0,880000000000001</text:p>
          </table:table-cell>
          <table:table-cell table:style-name="ce1" table:formula="of:=[.H89]+ h*[.F90]" office:value-type="float" office:value="758.604221579199" calcext:value-type="float">
            <text:p>758,6042215791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0]" office:value-type="float" office:value="0.880000000000001" calcext:value-type="float">
            <text:p>0,880000000000001</text:p>
          </table:table-cell>
          <table:table-cell table:style-name="ce1" table:formula="of:=[.H90]" office:value-type="float" office:value="758.604221579199" calcext:value-type="float">
            <text:p>758,604221579199</text:p>
          </table:table-cell>
          <table:table-cell table:style-name="ce1" table:formula="of:=-68 - ([.E91]^2/Ao)" office:value-type="float" office:value="-451.653576665188" calcext:value-type="float">
            <text:p>-451,653576665188</text:p>
          </table:table-cell>
          <table:table-cell table:style-name="ce1" table:formula="of:=[.G90]+h" office:value-type="float" office:value="0.890000000000001" calcext:value-type="float">
            <text:p>0,890000000000001</text:p>
          </table:table-cell>
          <table:table-cell table:style-name="ce1" table:formula="of:=[.H90]+ h*[.F91]" office:value-type="float" office:value="754.087685812547" calcext:value-type="float">
            <text:p>754,0876858125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1]" office:value-type="float" office:value="0.890000000000001" calcext:value-type="float">
            <text:p>0,890000000000001</text:p>
          </table:table-cell>
          <table:table-cell table:style-name="ce1" table:formula="of:=[.H91]" office:value-type="float" office:value="754.087685812547" calcext:value-type="float">
            <text:p>754,087685812547</text:p>
          </table:table-cell>
          <table:table-cell table:style-name="ce1" table:formula="of:=-68 - ([.E92]^2/Ao)" office:value-type="float" office:value="-447.098825262749" calcext:value-type="float">
            <text:p>-447,098825262749</text:p>
          </table:table-cell>
          <table:table-cell table:style-name="ce1" table:formula="of:=[.G91]+h" office:value-type="float" office:value="0.900000000000001" calcext:value-type="float">
            <text:p>0,900000000000001</text:p>
          </table:table-cell>
          <table:table-cell table:style-name="ce1" table:formula="of:=[.H91]+ h*[.F92]" office:value-type="float" office:value="749.61669755992" calcext:value-type="float">
            <text:p>749,616697559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2]" office:value-type="float" office:value="0.900000000000001" calcext:value-type="float">
            <text:p>0,900000000000001</text:p>
          </table:table-cell>
          <table:table-cell table:style-name="ce1" table:formula="of:=[.H92]" office:value-type="float" office:value="749.61669755992" calcext:value-type="float">
            <text:p>749,61669755992</text:p>
          </table:table-cell>
          <table:table-cell table:style-name="ce1" table:formula="of:=-68 - ([.E93]^2/Ao)" office:value-type="float" office:value="-442.616795507093" calcext:value-type="float">
            <text:p>-442,616795507093</text:p>
          </table:table-cell>
          <table:table-cell table:style-name="ce1" table:formula="of:=[.G92]+h" office:value-type="float" office:value="0.910000000000001" calcext:value-type="float">
            <text:p>0,910000000000001</text:p>
          </table:table-cell>
          <table:table-cell table:style-name="ce1" table:formula="of:=[.H92]+ h*[.F93]" office:value-type="float" office:value="745.190529604849" calcext:value-type="float">
            <text:p>745,1905296048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3]" office:value-type="float" office:value="0.910000000000001" calcext:value-type="float">
            <text:p>0,910000000000001</text:p>
          </table:table-cell>
          <table:table-cell table:style-name="ce1" table:formula="of:=[.H93]" office:value-type="float" office:value="745.190529604849" calcext:value-type="float">
            <text:p>745,190529604849</text:p>
          </table:table-cell>
          <table:table-cell table:style-name="ce1" table:formula="of:=-68 - ([.E94]^2/Ao)" office:value-type="float" office:value="-438.20595027517" calcext:value-type="float">
            <text:p>-438,20595027517</text:p>
          </table:table-cell>
          <table:table-cell table:style-name="ce1" table:formula="of:=[.G93]+h" office:value-type="float" office:value="0.920000000000001" calcext:value-type="float">
            <text:p>0,920000000000001</text:p>
          </table:table-cell>
          <table:table-cell table:style-name="ce1" table:formula="of:=[.H93]+ h*[.F94]" office:value-type="float" office:value="740.808470102097" calcext:value-type="float">
            <text:p>740,8084701020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4]" office:value-type="float" office:value="0.920000000000001" calcext:value-type="float">
            <text:p>0,920000000000001</text:p>
          </table:table-cell>
          <table:table-cell table:style-name="ce1" table:formula="of:=[.H94]" office:value-type="float" office:value="740.808470102097" calcext:value-type="float">
            <text:p>740,808470102097</text:p>
          </table:table-cell>
          <table:table-cell table:style-name="ce1" table:formula="of:=-68 - ([.E95]^2/Ao)" office:value-type="float" office:value="-433.864792916673" calcext:value-type="float">
            <text:p>-433,864792916673</text:p>
          </table:table-cell>
          <table:table-cell table:style-name="ce1" table:formula="of:=[.G94]+h" office:value-type="float" office:value="0.930000000000001" calcext:value-type="float">
            <text:p>0,930000000000001</text:p>
          </table:table-cell>
          <table:table-cell table:style-name="ce1" table:formula="of:=[.H94]+ h*[.F95]" office:value-type="float" office:value="736.46982217293" calcext:value-type="float">
            <text:p>736,469822172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5]" office:value-type="float" office:value="0.930000000000001" calcext:value-type="float">
            <text:p>0,930000000000001</text:p>
          </table:table-cell>
          <table:table-cell table:style-name="ce1" table:formula="of:=[.H95]" office:value-type="float" office:value="736.46982217293" calcext:value-type="float">
            <text:p>736,46982217293</text:p>
          </table:table-cell>
          <table:table-cell table:style-name="ce1" table:formula="of:=-68 - ([.E96]^2/Ao)" office:value-type="float" office:value="-429.591865980952" calcext:value-type="float">
            <text:p>-429,591865980952</text:p>
          </table:table-cell>
          <table:table-cell table:style-name="ce1" table:formula="of:=[.G95]+h" office:value-type="float" office:value="0.940000000000001" calcext:value-type="float">
            <text:p>0,940000000000001</text:p>
          </table:table-cell>
          <table:table-cell table:style-name="ce1" table:formula="of:=[.H95]+ h*[.F96]" office:value-type="float" office:value="732.173903513121" calcext:value-type="float">
            <text:p>732,1739035131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6]" office:value-type="float" office:value="0.940000000000001" calcext:value-type="float">
            <text:p>0,940000000000001</text:p>
          </table:table-cell>
          <table:table-cell table:style-name="ce1" table:formula="of:=[.H96]" office:value-type="float" office:value="732.173903513121" calcext:value-type="float">
            <text:p>732,173903513121</text:p>
          </table:table-cell>
          <table:table-cell table:style-name="ce1" table:formula="of:=-68 - ([.E97]^2/Ao)" office:value-type="float" office:value="-425.385749990427" calcext:value-type="float">
            <text:p>-425,385749990427</text:p>
          </table:table-cell>
          <table:table-cell table:style-name="ce1" table:formula="of:=[.G96]+h" office:value-type="float" office:value="0.950000000000001" calcext:value-type="float">
            <text:p>0,950000000000001</text:p>
          </table:table-cell>
          <table:table-cell table:style-name="ce1" table:formula="of:=[.H96]+ h*[.F97]" office:value-type="float" office:value="727.920046013217" calcext:value-type="float">
            <text:p>727,9200460132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7]" office:value-type="float" office:value="0.950000000000001" calcext:value-type="float">
            <text:p>0,950000000000001</text:p>
          </table:table-cell>
          <table:table-cell table:style-name="ce1" table:formula="of:=[.H97]" office:value-type="float" office:value="727.920046013217" calcext:value-type="float">
            <text:p>727,920046013217</text:p>
          </table:table-cell>
          <table:table-cell table:style-name="ce1" table:formula="of:=-68 - ([.E98]^2/Ao)" office:value-type="float" office:value="-421.245062258589" calcext:value-type="float">
            <text:p>-421,245062258589</text:p>
          </table:table-cell>
          <table:table-cell table:style-name="ce1" table:formula="of:=[.G97]+h" office:value-type="float" office:value="0.960000000000001" calcext:value-type="float">
            <text:p>0,960000000000001</text:p>
          </table:table-cell>
          <table:table-cell table:style-name="ce1" table:formula="of:=[.H97]+ h*[.F98]" office:value-type="float" office:value="723.707595390631" calcext:value-type="float">
            <text:p>723,7075953906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8]" office:value-type="float" office:value="0.960000000000001" calcext:value-type="float">
            <text:p>0,960000000000001</text:p>
          </table:table-cell>
          <table:table-cell table:style-name="ce1" table:formula="of:=[.H98]" office:value-type="float" office:value="723.707595390631" calcext:value-type="float">
            <text:p>723,707595390631</text:p>
          </table:table-cell>
          <table:table-cell table:style-name="ce1" table:formula="of:=-68 - ([.E99]^2/Ao)" office:value-type="float" office:value="-417.168455750726" calcext:value-type="float">
            <text:p>-417,168455750726</text:p>
          </table:table-cell>
          <table:table-cell table:style-name="ce1" table:formula="of:=[.G98]+h" office:value-type="float" office:value="0.970000000000001" calcext:value-type="float">
            <text:p>0,970000000000001</text:p>
          </table:table-cell>
          <table:table-cell table:style-name="ce1" table:formula="of:=[.H98]+ h*[.F99]" office:value-type="float" office:value="719.535910833124" calcext:value-type="float">
            <text:p>719,5359108331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9]" office:value-type="float" office:value="0.970000000000001" calcext:value-type="float">
            <text:p>0,970000000000001</text:p>
          </table:table-cell>
          <table:table-cell table:style-name="ce1" table:formula="of:=[.H99]" office:value-type="float" office:value="719.535910833124" calcext:value-type="float">
            <text:p>719,535910833124</text:p>
          </table:table-cell>
          <table:table-cell table:style-name="ce1" table:formula="of:=-68 - ([.E100]^2/Ao)" office:value-type="float" office:value="-413.154617985635" calcext:value-type="float">
            <text:p>-413,154617985635</text:p>
          </table:table-cell>
          <table:table-cell table:style-name="ce1" table:formula="of:=[.G99]+h" office:value-type="float" office:value="0.980000000000001" calcext:value-type="float">
            <text:p>0,980000000000001</text:p>
          </table:table-cell>
          <table:table-cell table:style-name="ce1" table:formula="of:=[.H99]+ h*[.F100]" office:value-type="float" office:value="715.404364653267" calcext:value-type="float">
            <text:p>715,4043646532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0]" office:value-type="float" office:value="0.980000000000001" calcext:value-type="float">
            <text:p>0,980000000000001</text:p>
          </table:table-cell>
          <table:table-cell table:style-name="ce1" table:formula="of:=[.H100]" office:value-type="float" office:value="715.404364653267" calcext:value-type="float">
            <text:p>715,404364653267</text:p>
          </table:table-cell>
          <table:table-cell table:style-name="ce1" table:formula="of:=-68 - ([.E101]^2/Ao)" office:value-type="float" office:value="-409.20226997663" calcext:value-type="float">
            <text:p>-409,20226997663</text:p>
          </table:table-cell>
          <table:table-cell table:style-name="ce1" table:formula="of:=[.G100]+h" office:value-type="float" office:value="0.990000000000001" calcext:value-type="float">
            <text:p>0,990000000000001</text:p>
          </table:table-cell>
          <table:table-cell table:style-name="ce1" table:formula="of:=[.H100]+ h*[.F101]" office:value-type="float" office:value="711.312341953501" calcext:value-type="float">
            <text:p>711,3123419535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1]" office:value-type="float" office:value="0.990000000000001" calcext:value-type="float">
            <text:p>0,990000000000001</text:p>
          </table:table-cell>
          <table:table-cell table:style-name="ce1" table:formula="of:=[.H101]" office:value-type="float" office:value="711.312341953501" calcext:value-type="float">
            <text:p>711,312341953501</text:p>
          </table:table-cell>
          <table:table-cell table:style-name="ce1" table:formula="of:=-68 - ([.E102]^2/Ao)" office:value-type="float" office:value="-405.310165210249" calcext:value-type="float">
            <text:p>-405,310165210249</text:p>
          </table:table-cell>
          <table:table-cell table:style-name="ce1" table:formula="of:=[.G101]+h" office:value-type="float" office:value="1" calcext:value-type="float">
            <text:p>1</text:p>
          </table:table-cell>
          <table:table-cell table:style-name="ce1" table:formula="of:=[.H101]+ h*[.F102]" office:value-type="float" office:value="707.259240301398" calcext:value-type="float">
            <text:p>707,2592403013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2]" office:value-type="float" office:value="1" calcext:value-type="float">
            <text:p>1</text:p>
          </table:table-cell>
          <table:table-cell table:style-name="ce1" table:formula="of:=[.H102]" office:value-type="float" office:value="707.259240301398" calcext:value-type="float">
            <text:p>707,259240301398</text:p>
          </table:table-cell>
          <table:table-cell table:style-name="ce1" table:formula="of:=-68 - ([.E103]^2/Ao)" office:value-type="float" office:value="-401.477088661141" calcext:value-type="float">
            <text:p>-401,477088661141</text:p>
          </table:table-cell>
          <table:table-cell table:style-name="ce1" table:formula="of:=[.G102]+h" office:value-type="float" office:value="1.01" calcext:value-type="float">
            <text:p>1,01</text:p>
          </table:table-cell>
          <table:table-cell table:style-name="ce1" table:formula="of:=[.H102]+ h*[.F103]" office:value-type="float" office:value="703.244469414787" calcext:value-type="float">
            <text:p>703,2444694147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3]" office:value-type="float" office:value="1.01" calcext:value-type="float">
            <text:p>1,01</text:p>
          </table:table-cell>
          <table:table-cell table:style-name="ce1" table:formula="of:=[.H103]" office:value-type="float" office:value="703.244469414787" calcext:value-type="float">
            <text:p>703,244469414787</text:p>
          </table:table-cell>
          <table:table-cell table:style-name="ce1" table:formula="of:=-68 - ([.E104]^2/Ao)" office:value-type="float" office:value="-397.701855841657" calcext:value-type="float">
            <text:p>-397,701855841657</text:p>
          </table:table-cell>
          <table:table-cell table:style-name="ce1" table:formula="of:=[.G103]+h" office:value-type="float" office:value="1.02" calcext:value-type="float">
            <text:p>1,02</text:p>
          </table:table-cell>
          <table:table-cell table:style-name="ce1" table:formula="of:=[.H103]+ h*[.F104]" office:value-type="float" office:value="699.26745085637" calcext:value-type="float">
            <text:p>699,267450856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4]" office:value-type="float" office:value="1.02" calcext:value-type="float">
            <text:p>1,02</text:p>
          </table:table-cell>
          <table:table-cell table:style-name="ce1" table:formula="of:=[.H104]" office:value-type="float" office:value="699.26745085637" calcext:value-type="float">
            <text:p>699,26745085637</text:p>
          </table:table-cell>
          <table:table-cell table:style-name="ce1" table:formula="of:=-68 - ([.E105]^2/Ao)" office:value-type="float" office:value="-393.983311884778" calcext:value-type="float">
            <text:p>-393,983311884778</text:p>
          </table:table-cell>
          <table:table-cell table:style-name="ce1" table:formula="of:=[.G104]+h" office:value-type="float" office:value="1.03" calcext:value-type="float">
            <text:p>1,03</text:p>
          </table:table-cell>
          <table:table-cell table:style-name="ce1" table:formula="of:=[.H104]+ h*[.F105]" office:value-type="float" office:value="695.327617737523" calcext:value-type="float">
            <text:p>695,3276177375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5]" office:value-type="float" office:value="1.03" calcext:value-type="float">
            <text:p>1,03</text:p>
          </table:table-cell>
          <table:table-cell table:style-name="ce1" table:formula="of:=[.H105]" office:value-type="float" office:value="695.327617737523" calcext:value-type="float">
            <text:p>695,327617737523</text:p>
          </table:table-cell>
          <table:table-cell table:style-name="ce1" table:formula="of:=-68 - ([.E106]^2/Ao)" office:value-type="float" office:value="-390.320330659026" calcext:value-type="float">
            <text:p>-390,320330659026</text:p>
          </table:table-cell>
          <table:table-cell table:style-name="ce1" table:formula="of:=[.G105]+h" office:value-type="float" office:value="1.04" calcext:value-type="float">
            <text:p>1,04</text:p>
          </table:table-cell>
          <table:table-cell table:style-name="ce1" table:formula="of:=[.H105]+ h*[.F106]" office:value-type="float" office:value="691.424414430932" calcext:value-type="float">
            <text:p>691,4244144309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6]" office:value-type="float" office:value="1.04" calcext:value-type="float">
            <text:p>1,04</text:p>
          </table:table-cell>
          <table:table-cell table:style-name="ce1" table:formula="of:=[.H106]" office:value-type="float" office:value="691.424414430932" calcext:value-type="float">
            <text:p>691,424414430932</text:p>
          </table:table-cell>
          <table:table-cell table:style-name="ce1" table:formula="of:=-68 - ([.E107]^2/Ao)" office:value-type="float" office:value="-386.711813914105" calcext:value-type="float">
            <text:p>-386,711813914105</text:p>
          </table:table-cell>
          <table:table-cell table:style-name="ce1" table:formula="of:=[.G106]+h" office:value-type="float" office:value="1.05" calcext:value-type="float">
            <text:p>1,05</text:p>
          </table:table-cell>
          <table:table-cell table:style-name="ce1" table:formula="of:=[.H106]+ h*[.F107]" office:value-type="float" office:value="687.557296291791" calcext:value-type="float">
            <text:p>687,5572962917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7]" office:value-type="float" office:value="1.05" calcext:value-type="float">
            <text:p>1,05</text:p>
          </table:table-cell>
          <table:table-cell table:style-name="ce1" table:formula="of:=[.H107]" office:value-type="float" office:value="687.557296291791" calcext:value-type="float">
            <text:p>687,557296291791</text:p>
          </table:table-cell>
          <table:table-cell table:style-name="ce1" table:formula="of:=-68 - ([.E108]^2/Ao)" office:value-type="float" office:value="-383.156690456052" calcext:value-type="float">
            <text:p>-383,156690456052</text:p>
          </table:table-cell>
          <table:table-cell table:style-name="ce1" table:formula="of:=[.G107]+h" office:value-type="float" office:value="1.06" calcext:value-type="float">
            <text:p>1,06</text:p>
          </table:table-cell>
          <table:table-cell table:style-name="ce1" table:formula="of:=[.H107]+ h*[.F108]" office:value-type="float" office:value="683.725729387231" calcext:value-type="float">
            <text:p>683,7257293872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8]" office:value-type="float" office:value="1.06" calcext:value-type="float">
            <text:p>1,06</text:p>
          </table:table-cell>
          <table:table-cell table:style-name="ce1" table:formula="of:=[.H108]" office:value-type="float" office:value="683.725729387231" calcext:value-type="float">
            <text:p>683,725729387231</text:p>
          </table:table-cell>
          <table:table-cell table:style-name="ce1" table:formula="of:=-68 - ([.E109]^2/Ao)" office:value-type="float" office:value="-379.653915350734" calcext:value-type="float">
            <text:p>-379,653915350734</text:p>
          </table:table-cell>
          <table:table-cell table:style-name="ce1" table:formula="of:=[.G108]+h" office:value-type="float" office:value="1.07" calcext:value-type="float">
            <text:p>1,07</text:p>
          </table:table-cell>
          <table:table-cell table:style-name="ce1" table:formula="of:=[.H108]+ h*[.F109]" office:value-type="float" office:value="679.929190233723" calcext:value-type="float">
            <text:p>679,9291902337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9]" office:value-type="float" office:value="1.07" calcext:value-type="float">
            <text:p>1,07</text:p>
          </table:table-cell>
          <table:table-cell table:style-name="ce1" table:formula="of:=[.H109]" office:value-type="float" office:value="679.929190233723" calcext:value-type="float">
            <text:p>679,929190233723</text:p>
          </table:table-cell>
          <table:table-cell table:style-name="ce1" table:formula="of:=-68 - ([.E110]^2/Ao)" office:value-type="float" office:value="-376.202469154591" calcext:value-type="float">
            <text:p>-376,202469154591</text:p>
          </table:table-cell>
          <table:table-cell table:style-name="ce1" table:formula="of:=[.G109]+h" office:value-type="float" office:value="1.08" calcext:value-type="float">
            <text:p>1,08</text:p>
          </table:table-cell>
          <table:table-cell table:style-name="ce1" table:formula="of:=[.H109]+ h*[.F110]" office:value-type="float" office:value="676.167165542178" calcext:value-type="float">
            <text:p>676,1671655421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0]" office:value-type="float" office:value="1.08" calcext:value-type="float">
            <text:p>1,08</text:p>
          </table:table-cell>
          <table:table-cell table:style-name="ce1" table:formula="of:=[.H110]" office:value-type="float" office:value="676.167165542178" calcext:value-type="float">
            <text:p>676,167165542178</text:p>
          </table:table-cell>
          <table:table-cell table:style-name="ce1" table:formula="of:=-68 - ([.E111]^2/Ao)" office:value-type="float" office:value="-372.801357171562" calcext:value-type="float">
            <text:p>-372,801357171562</text:p>
          </table:table-cell>
          <table:table-cell table:style-name="ce1" table:formula="of:=[.G110]+h" office:value-type="float" office:value="1.09" calcext:value-type="float">
            <text:p>1,09</text:p>
          </table:table-cell>
          <table:table-cell table:style-name="ce1" table:formula="of:=[.H110]+ h*[.F111]" office:value-type="float" office:value="672.439151970462" calcext:value-type="float">
            <text:p>672,4391519704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1]" office:value-type="float" office:value="1.09" calcext:value-type="float">
            <text:p>1,09</text:p>
          </table:table-cell>
          <table:table-cell table:style-name="ce1" table:formula="of:=[.H111]" office:value-type="float" office:value="672.439151970462" calcext:value-type="float">
            <text:p>672,439151970462</text:p>
          </table:table-cell>
          <table:table-cell table:style-name="ce1" table:formula="of:=-68 - ([.E112]^2/Ao)" office:value-type="float" office:value="-369.449608735169" calcext:value-type="float">
            <text:p>-369,449608735169</text:p>
          </table:table-cell>
          <table:table-cell table:style-name="ce1" table:formula="of:=[.G111]+h" office:value-type="float" office:value="1.1" calcext:value-type="float">
            <text:p>1,1</text:p>
          </table:table-cell>
          <table:table-cell table:style-name="ce1" table:formula="of:=[.H111]+ h*[.F112]" office:value-type="float" office:value="668.74465588311" calcext:value-type="float">
            <text:p>668,744655883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2]" office:value-type="float" office:value="1.1" calcext:value-type="float">
            <text:p>1,1</text:p>
          </table:table-cell>
          <table:table-cell table:style-name="ce1" table:formula="of:=[.H112]" office:value-type="float" office:value="668.74465588311" calcext:value-type="float">
            <text:p>668,74465588311</text:p>
          </table:table-cell>
          <table:table-cell table:style-name="ce1" table:formula="of:=-68 - ([.E113]^2/Ao)" office:value-type="float" office:value="-366.146276514813" calcext:value-type="float">
            <text:p>-366,146276514813</text:p>
          </table:table-cell>
          <table:table-cell table:style-name="ce1" table:formula="of:=[.G112]+h" office:value-type="float" office:value="1.11" calcext:value-type="float">
            <text:p>1,11</text:p>
          </table:table-cell>
          <table:table-cell table:style-name="ce1" table:formula="of:=[.H112]+ h*[.F113]" office:value-type="float" office:value="665.083193117962" calcext:value-type="float">
            <text:p>665,0831931179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3]" office:value-type="float" office:value="1.11" calcext:value-type="float">
            <text:p>1,11</text:p>
          </table:table-cell>
          <table:table-cell table:style-name="ce1" table:formula="of:=[.H113]" office:value-type="float" office:value="665.083193117962" calcext:value-type="float">
            <text:p>665,083193117962</text:p>
          </table:table-cell>
          <table:table-cell table:style-name="ce1" table:formula="of:=-68 - ([.E114]^2/Ao)" office:value-type="float" office:value="-362.890435845323" calcext:value-type="float">
            <text:p>-362,890435845323</text:p>
          </table:table-cell>
          <table:table-cell table:style-name="ce1" table:formula="of:=[.G113]+h" office:value-type="float" office:value="1.12" calcext:value-type="float">
            <text:p>1,12</text:p>
          </table:table-cell>
          <table:table-cell table:style-name="ce1" table:formula="of:=[.H113]+ h*[.F114]" office:value-type="float" office:value="661.454288759509" calcext:value-type="float">
            <text:p>661,4542887595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4]" office:value-type="float" office:value="1.12" calcext:value-type="float">
            <text:p>1,12</text:p>
          </table:table-cell>
          <table:table-cell table:style-name="ce1" table:formula="of:=[.H114]" office:value-type="float" office:value="661.454288759509" calcext:value-type="float">
            <text:p>661,454288759509</text:p>
          </table:table-cell>
          <table:table-cell table:style-name="ce1" table:formula="of:=-68 - ([.E115]^2/Ao)" office:value-type="float" office:value="-359.681184078898" calcext:value-type="float">
            <text:p>-359,681184078898</text:p>
          </table:table-cell>
          <table:table-cell table:style-name="ce1" table:formula="of:=[.G114]+h" office:value-type="float" office:value="1.13" calcext:value-type="float">
            <text:p>1,13</text:p>
          </table:table-cell>
          <table:table-cell table:style-name="ce1" table:formula="of:=[.H114]+ h*[.F115]" office:value-type="float" office:value="657.85747691872" calcext:value-type="float">
            <text:p>657,857476918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5]" office:value-type="float" office:value="1.13" calcext:value-type="float">
            <text:p>1,13</text:p>
          </table:table-cell>
          <table:table-cell table:style-name="ce1" table:formula="of:=[.H115]" office:value-type="float" office:value="657.85747691872" calcext:value-type="float">
            <text:p>657,85747691872</text:p>
          </table:table-cell>
          <table:table-cell table:style-name="ce1" table:formula="of:=-68 - ([.E116]^2/Ao)" office:value-type="float" office:value="-356.517639958576" calcext:value-type="float">
            <text:p>-356,517639958576</text:p>
          </table:table-cell>
          <table:table-cell table:style-name="ce1" table:formula="of:=[.G115]+h" office:value-type="float" office:value="1.14" calcext:value-type="float">
            <text:p>1,14</text:p>
          </table:table-cell>
          <table:table-cell table:style-name="ce1" table:formula="of:=[.H115]+ h*[.F116]" office:value-type="float" office:value="654.292300519134" calcext:value-type="float">
            <text:p>654,2923005191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6]" office:value-type="float" office:value="1.14" calcext:value-type="float">
            <text:p>1,14</text:p>
          </table:table-cell>
          <table:table-cell table:style-name="ce1" table:formula="of:=[.H116]" office:value-type="float" office:value="654.292300519134" calcext:value-type="float">
            <text:p>654,292300519134</text:p>
          </table:table-cell>
          <table:table-cell table:style-name="ce1" table:formula="of:=-68 - ([.E117]^2/Ao)" office:value-type="float" office:value="-353.398943012414" calcext:value-type="float">
            <text:p>-353,398943012414</text:p>
          </table:table-cell>
          <table:table-cell table:style-name="ce1" table:formula="of:=[.G116]+h" office:value-type="float" office:value="1.15" calcext:value-type="float">
            <text:p>1,15</text:p>
          </table:table-cell>
          <table:table-cell table:style-name="ce1" table:formula="of:=[.H116]+ h*[.F117]" office:value-type="float" office:value="650.75831108901" calcext:value-type="float">
            <text:p>650,758311089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7]" office:value-type="float" office:value="1.15" calcext:value-type="float">
            <text:p>1,15</text:p>
          </table:table-cell>
          <table:table-cell table:style-name="ce1" table:formula="of:=[.H117]" office:value-type="float" office:value="650.75831108901" calcext:value-type="float">
            <text:p>650,75831108901</text:p>
          </table:table-cell>
          <table:table-cell table:style-name="ce1" table:formula="of:=-68 - ([.E118]^2/Ao)" office:value-type="float" office:value="-350.324252967614" calcext:value-type="float">
            <text:p>-350,324252967614</text:p>
          </table:table-cell>
          <table:table-cell table:style-name="ce1" table:formula="of:=[.G117]+h" office:value-type="float" office:value="1.16" calcext:value-type="float">
            <text:p>1,16</text:p>
          </table:table-cell>
          <table:table-cell table:style-name="ce1" table:formula="of:=[.H117]+ h*[.F118]" office:value-type="float" office:value="647.255068559334" calcext:value-type="float">
            <text:p>647,2550685593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8]" office:value-type="float" office:value="1.16" calcext:value-type="float">
            <text:p>1,16</text:p>
          </table:table-cell>
          <table:table-cell table:style-name="ce1" table:formula="of:=[.H118]" office:value-type="float" office:value="647.255068559334" calcext:value-type="float">
            <text:p>647,255068559334</text:p>
          </table:table-cell>
          <table:table-cell table:style-name="ce1" table:formula="of:=-68 - ([.E119]^2/Ao)" office:value-type="float" office:value="-347.292749183832" calcext:value-type="float">
            <text:p>-347,292749183832</text:p>
          </table:table-cell>
          <table:table-cell table:style-name="ce1" table:formula="of:=[.G118]+h" office:value-type="float" office:value="1.17" calcext:value-type="float">
            <text:p>1,17</text:p>
          </table:table-cell>
          <table:table-cell table:style-name="ce1" table:formula="of:=[.H118]+ h*[.F119]" office:value-type="float" office:value="643.782141067495" calcext:value-type="float">
            <text:p>643,7821410674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9]" office:value-type="float" office:value="1.17" calcext:value-type="float">
            <text:p>1,17</text:p>
          </table:table-cell>
          <table:table-cell table:style-name="ce1" table:formula="of:=[.H119]" office:value-type="float" office:value="643.782141067495" calcext:value-type="float">
            <text:p>643,782141067495</text:p>
          </table:table-cell>
          <table:table-cell table:style-name="ce1" table:formula="of:=-68 - ([.E120]^2/Ao)" office:value-type="float" office:value="-344.303630104966" calcext:value-type="float">
            <text:p>-344,303630104966</text:p>
          </table:table-cell>
          <table:table-cell table:style-name="ce1" table:formula="of:=[.G119]+h" office:value-type="float" office:value="1.18" calcext:value-type="float">
            <text:p>1,18</text:p>
          </table:table-cell>
          <table:table-cell table:style-name="ce1" table:formula="of:=[.H119]+ h*[.F120]" office:value-type="float" office:value="640.339104766446" calcext:value-type="float">
            <text:p>640,3391047664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0]" office:value-type="float" office:value="1.18" calcext:value-type="float">
            <text:p>1,18</text:p>
          </table:table-cell>
          <table:table-cell table:style-name="ce1" table:formula="of:=[.H120]" office:value-type="float" office:value="640.339104766446" calcext:value-type="float">
            <text:p>640,339104766446</text:p>
          </table:table-cell>
          <table:table-cell table:style-name="ce1" table:formula="of:=-68 - ([.E121]^2/Ao)" office:value-type="float" office:value="-341.356112728729" calcext:value-type="float">
            <text:p>-341,356112728729</text:p>
          </table:table-cell>
          <table:table-cell table:style-name="ce1" table:formula="of:=[.G120]+h" office:value-type="float" office:value="1.19" calcext:value-type="float">
            <text:p>1,19</text:p>
          </table:table-cell>
          <table:table-cell table:style-name="ce1" table:formula="of:=[.H120]+ h*[.F121]" office:value-type="float" office:value="636.925543639159" calcext:value-type="float">
            <text:p>636,9255436391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1]" office:value-type="float" office:value="1.19" calcext:value-type="float">
            <text:p>1,19</text:p>
          </table:table-cell>
          <table:table-cell table:style-name="ce1" table:formula="of:=[.H121]" office:value-type="float" office:value="636.925543639159" calcext:value-type="float">
            <text:p>636,925543639159</text:p>
          </table:table-cell>
          <table:table-cell table:style-name="ce1" table:formula="of:=-68 - ([.E122]^2/Ao)" office:value-type="float" office:value="-338.449432093358" calcext:value-type="float">
            <text:p>-338,449432093358</text:p>
          </table:table-cell>
          <table:table-cell table:style-name="ce1" table:formula="of:=[.G121]+h" office:value-type="float" office:value="1.2" calcext:value-type="float">
            <text:p>1,2</text:p>
          </table:table-cell>
          <table:table-cell table:style-name="ce1" table:formula="of:=[.H121]+ h*[.F122]" office:value-type="float" office:value="633.541049318225" calcext:value-type="float">
            <text:p>633,5410493182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2]" office:value-type="float" office:value="1.2" calcext:value-type="float">
            <text:p>1,2</text:p>
          </table:table-cell>
          <table:table-cell table:style-name="ce1" table:formula="of:=[.H122]" office:value-type="float" office:value="633.541049318225" calcext:value-type="float">
            <text:p>633,541049318225</text:p>
          </table:table-cell>
          <table:table-cell table:style-name="ce1" table:formula="of:=-68 - ([.E123]^2/Ao)" office:value-type="float" office:value="-335.582840780825" calcext:value-type="float">
            <text:p>-335,582840780825</text:p>
          </table:table-cell>
          <table:table-cell table:style-name="ce1" table:formula="of:=[.G122]+h" office:value-type="float" office:value="1.21" calcext:value-type="float">
            <text:p>1,21</text:p>
          </table:table-cell>
          <table:table-cell table:style-name="ce1" table:formula="of:=[.H122]+ h*[.F123]" office:value-type="float" office:value="630.185220910417" calcext:value-type="float">
            <text:p>630,1852209104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3]" office:value-type="float" office:value="1.21" calcext:value-type="float">
            <text:p>1,21</text:p>
          </table:table-cell>
          <table:table-cell table:style-name="ce1" table:formula="of:=[.H123]" office:value-type="float" office:value="630.185220910417" calcext:value-type="float">
            <text:p>630,185220910417</text:p>
          </table:table-cell>
          <table:table-cell table:style-name="ce1" table:formula="of:=-68 - ([.E124]^2/Ao)" office:value-type="float" office:value="-332.75560843594" calcext:value-type="float">
            <text:p>-332,75560843594</text:p>
          </table:table-cell>
          <table:table-cell table:style-name="ce1" table:formula="of:=[.G123]+h" office:value-type="float" office:value="1.22" calcext:value-type="float">
            <text:p>1,22</text:p>
          </table:table-cell>
          <table:table-cell table:style-name="ce1" table:formula="of:=[.H123]+ h*[.F124]" office:value-type="float" office:value="626.857664826057" calcext:value-type="float">
            <text:p>626,8576648260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4]" office:value-type="float" office:value="1.22" calcext:value-type="float">
            <text:p>1,22</text:p>
          </table:table-cell>
          <table:table-cell table:style-name="ce1" table:formula="of:=[.H124]" office:value-type="float" office:value="626.857664826057" calcext:value-type="float">
            <text:p>626,857664826057</text:p>
          </table:table-cell>
          <table:table-cell table:style-name="ce1" table:formula="of:=-68 - ([.E125]^2/Ao)" office:value-type="float" office:value="-329.967021300785" calcext:value-type="float">
            <text:p>-329,967021300785</text:p>
          </table:table-cell>
          <table:table-cell table:style-name="ce1" table:formula="of:=[.G124]+h" office:value-type="float" office:value="1.23" calcext:value-type="float">
            <text:p>1,23</text:p>
          </table:table-cell>
          <table:table-cell table:style-name="ce1" table:formula="of:=[.H124]+ h*[.F125]" office:value-type="float" office:value="623.557994613049" calcext:value-type="float">
            <text:p>623,5579946130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5]" office:value-type="float" office:value="1.23" calcext:value-type="float">
            <text:p>1,23</text:p>
          </table:table-cell>
          <table:table-cell table:style-name="ce1" table:formula="of:=[.H125]" office:value-type="float" office:value="623.557994613049" calcext:value-type="float">
            <text:p>623,557994613049</text:p>
          </table:table-cell>
          <table:table-cell table:style-name="ce1" table:formula="of:=-68 - ([.E126]^2/Ao)" office:value-type="float" office:value="-327.216381763898" calcext:value-type="float">
            <text:p>-327,216381763898</text:p>
          </table:table-cell>
          <table:table-cell table:style-name="ce1" table:formula="of:=[.G125]+h" office:value-type="float" office:value="1.24" calcext:value-type="float">
            <text:p>1,24</text:p>
          </table:table-cell>
          <table:table-cell table:style-name="ce1" table:formula="of:=[.H125]+ h*[.F126]" office:value-type="float" office:value="620.28583079541" calcext:value-type="float">
            <text:p>620,285830795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6]" office:value-type="float" office:value="1.24" calcext:value-type="float">
            <text:p>1,24</text:p>
          </table:table-cell>
          <table:table-cell table:style-name="ce1" table:formula="of:=[.H126]" office:value-type="float" office:value="620.28583079541" calcext:value-type="float">
            <text:p>620,28583079541</text:p>
          </table:table-cell>
          <table:table-cell table:style-name="ce1" table:formula="of:=-68 - ([.E127]^2/Ao)" office:value-type="float" office:value="-324.503007923702" calcext:value-type="float">
            <text:p>-324,503007923702</text:p>
          </table:table-cell>
          <table:table-cell table:style-name="ce1" table:formula="of:=[.G126]+h" office:value-type="float" office:value="1.25" calcext:value-type="float">
            <text:p>1,25</text:p>
          </table:table-cell>
          <table:table-cell table:style-name="ce1" table:formula="of:=[.H126]+ h*[.F127]" office:value-type="float" office:value="617.040800716173" calcext:value-type="float">
            <text:p>617,0408007161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7]" office:value-type="float" office:value="1.25" calcext:value-type="float">
            <text:p>1,25</text:p>
          </table:table-cell>
          <table:table-cell table:style-name="ce1" table:formula="of:=[.H127]" office:value-type="float" office:value="617.040800716173" calcext:value-type="float">
            <text:p>617,040800716173</text:p>
          </table:table-cell>
          <table:table-cell table:style-name="ce1" table:formula="of:=-68 - ([.E128]^2/Ao)" office:value-type="float" office:value="-321.826233165637" calcext:value-type="float">
            <text:p>-321,826233165637</text:p>
          </table:table-cell>
          <table:table-cell table:style-name="ce1" table:formula="of:=[.G127]+h" office:value-type="float" office:value="1.26" calcext:value-type="float">
            <text:p>1,26</text:p>
          </table:table-cell>
          <table:table-cell table:style-name="ce1" table:formula="of:=[.H127]+ h*[.F128]" office:value-type="float" office:value="613.822538384517" calcext:value-type="float">
            <text:p>613,8225383845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8]" office:value-type="float" office:value="1.26" calcext:value-type="float">
            <text:p>1,26</text:p>
          </table:table-cell>
          <table:table-cell table:style-name="ce1" table:formula="of:=[.H128]" office:value-type="float" office:value="613.822538384517" calcext:value-type="float">
            <text:p>613,822538384517</text:p>
          </table:table-cell>
          <table:table-cell table:style-name="ce1" table:formula="of:=-68 - ([.E129]^2/Ao)" office:value-type="float" office:value="-319.185405752541" calcext:value-type="float">
            <text:p>-319,185405752541</text:p>
          </table:table-cell>
          <table:table-cell table:style-name="ce1" table:formula="of:=[.G128]+h" office:value-type="float" office:value="1.27" calcext:value-type="float">
            <text:p>1,27</text:p>
          </table:table-cell>
          <table:table-cell table:style-name="ce1" table:formula="of:=[.H128]+ h*[.F129]" office:value-type="float" office:value="610.630684326991" calcext:value-type="float">
            <text:p>610,6306843269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9]" office:value-type="float" office:value="1.27" calcext:value-type="float">
            <text:p>1,27</text:p>
          </table:table-cell>
          <table:table-cell table:style-name="ce1" table:formula="of:=[.H129]" office:value-type="float" office:value="610.630684326991" calcext:value-type="float">
            <text:p>610,630684326991</text:p>
          </table:table-cell>
          <table:table-cell table:style-name="ce1" table:formula="of:=-68 - ([.E130]^2/Ao)" office:value-type="float" office:value="-316.579888427767" calcext:value-type="float">
            <text:p>-316,579888427767</text:p>
          </table:table-cell>
          <table:table-cell table:style-name="ce1" table:formula="of:=[.G129]+h" office:value-type="float" office:value="1.28" calcext:value-type="float">
            <text:p>1,28</text:p>
          </table:table-cell>
          <table:table-cell table:style-name="ce1" table:formula="of:=[.H129]+ h*[.F130]" office:value-type="float" office:value="607.464885442714" calcext:value-type="float">
            <text:p>607,4648854427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0]" office:value-type="float" office:value="1.28" calcext:value-type="float">
            <text:p>1,28</text:p>
          </table:table-cell>
          <table:table-cell table:style-name="ce1" table:formula="of:=[.H130]" office:value-type="float" office:value="607.464885442714" calcext:value-type="float">
            <text:p>607,464885442714</text:p>
          </table:table-cell>
          <table:table-cell table:style-name="ce1" table:formula="of:=-68 - ([.E131]^2/Ao)" office:value-type="float" office:value="-314.00905803062" calcext:value-type="float">
            <text:p>-314,00905803062</text:p>
          </table:table-cell>
          <table:table-cell table:style-name="ce1" table:formula="of:=[.G130]+h" office:value-type="float" office:value="1.29" calcext:value-type="float">
            <text:p>1,29</text:p>
          </table:table-cell>
          <table:table-cell table:style-name="ce1" table:formula="of:=[.H130]+ h*[.F131]" office:value-type="float" office:value="604.324794862408" calcext:value-type="float">
            <text:p>604,3247948624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1]" office:value-type="float" office:value="1.29" calcext:value-type="float">
            <text:p>1,29</text:p>
          </table:table-cell>
          <table:table-cell table:style-name="ce1" table:formula="of:=[.H131]" office:value-type="float" office:value="604.324794862408" calcext:value-type="float">
            <text:p>604,324794862408</text:p>
          </table:table-cell>
          <table:table-cell table:style-name="ce1" table:formula="of:=-68 - ([.E132]^2/Ao)" office:value-type="float" office:value="-311.472305123661" calcext:value-type="float">
            <text:p>-311,472305123661</text:p>
          </table:table-cell>
          <table:table-cell table:style-name="ce1" table:formula="of:=[.G131]+h" office:value-type="float" office:value="1.3" calcext:value-type="float">
            <text:p>1,3</text:p>
          </table:table-cell>
          <table:table-cell table:style-name="ce1" table:formula="of:=[.H131]+ h*[.F132]" office:value-type="float" office:value="601.210071811171" calcext:value-type="float">
            <text:p>601,2100718111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2]" office:value-type="float" office:value="1.3" calcext:value-type="float">
            <text:p>1,3</text:p>
          </table:table-cell>
          <table:table-cell table:style-name="ce1" table:formula="of:=[.H132]" office:value-type="float" office:value="601.210071811171" calcext:value-type="float">
            <text:p>601,210071811171</text:p>
          </table:table-cell>
          <table:table-cell table:style-name="ce1" table:formula="of:=-68 - ([.E133]^2/Ao)" office:value-type="float" office:value="-308.969033631462" calcext:value-type="float">
            <text:p>-308,969033631462</text:p>
          </table:table-cell>
          <table:table-cell table:style-name="ce1" table:formula="of:=[.G132]+h" office:value-type="float" office:value="1.31" calcext:value-type="float">
            <text:p>1,31</text:p>
          </table:table-cell>
          <table:table-cell table:style-name="ce1" table:formula="of:=[.H132]+ h*[.F133]" office:value-type="float" office:value="598.120381474856" calcext:value-type="float">
            <text:p>598,1203814748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3]" office:value-type="float" office:value="1.31" calcext:value-type="float">
            <text:p>1,31</text:p>
          </table:table-cell>
          <table:table-cell table:style-name="ce1" table:formula="of:=[.H133]" office:value-type="float" office:value="598.120381474856" calcext:value-type="float">
            <text:p>598,120381474856</text:p>
          </table:table-cell>
          <table:table-cell table:style-name="ce1" table:formula="of:=-68 - ([.E134]^2/Ao)" office:value-type="float" office:value="-306.498660490418" calcext:value-type="float">
            <text:p>-306,498660490418</text:p>
          </table:table-cell>
          <table:table-cell table:style-name="ce1" table:formula="of:=[.G133]+h" office:value-type="float" office:value="1.32" calcext:value-type="float">
            <text:p>1,32</text:p>
          </table:table-cell>
          <table:table-cell table:style-name="ce1" table:formula="of:=[.H133]+ h*[.F134]" office:value-type="float" office:value="595.055394869952" calcext:value-type="float">
            <text:p>595,0553948699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4]" office:value-type="float" office:value="1.32" calcext:value-type="float">
            <text:p>1,32</text:p>
          </table:table-cell>
          <table:table-cell table:style-name="ce1" table:formula="of:=[.H134]" office:value-type="float" office:value="595.055394869952" calcext:value-type="float">
            <text:p>595,055394869952</text:p>
          </table:table-cell>
          <table:table-cell table:style-name="ce1" table:formula="of:=-68 - ([.E135]^2/Ao)" office:value-type="float" office:value="-304.060615309223" calcext:value-type="float">
            <text:p>-304,060615309223</text:p>
          </table:table-cell>
          <table:table-cell table:style-name="ce1" table:formula="of:=[.G134]+h" office:value-type="float" office:value="1.33" calcext:value-type="float">
            <text:p>1,33</text:p>
          </table:table-cell>
          <table:table-cell table:style-name="ce1" table:formula="of:=[.H134]+ h*[.F135]" office:value-type="float" office:value="592.01478871686" calcext:value-type="float">
            <text:p>592,014788716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5]" office:value-type="float" office:value="1.33" calcext:value-type="float">
            <text:p>1,33</text:p>
          </table:table-cell>
          <table:table-cell table:style-name="ce1" table:formula="of:=[.H135]" office:value-type="float" office:value="592.01478871686" calcext:value-type="float">
            <text:p>592,01478871686</text:p>
          </table:table-cell>
          <table:table-cell table:style-name="ce1" table:formula="of:=-68 - ([.E136]^2/Ao)" office:value-type="float" office:value="-301.654340039645" calcext:value-type="float">
            <text:p>-301,654340039645</text:p>
          </table:table-cell>
          <table:table-cell table:style-name="ce1" table:formula="of:=[.G135]+h" office:value-type="float" office:value="1.34" calcext:value-type="float">
            <text:p>1,34</text:p>
          </table:table-cell>
          <table:table-cell table:style-name="ce1" table:formula="of:=[.H135]+ h*[.F136]" office:value-type="float" office:value="588.998245316463" calcext:value-type="float">
            <text:p>588,9982453164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6]" office:value-type="float" office:value="1.34" calcext:value-type="float">
            <text:p>1,34</text:p>
          </table:table-cell>
          <table:table-cell table:style-name="ce1" table:formula="of:=[.H136]" office:value-type="float" office:value="588.998245316463" calcext:value-type="float">
            <text:p>588,998245316463</text:p>
          </table:table-cell>
          <table:table-cell table:style-name="ce1" table:formula="of:=-68 - ([.E137]^2/Ao)" office:value-type="float" office:value="-299.279288657248" calcext:value-type="float">
            <text:p>-299,279288657248</text:p>
          </table:table-cell>
          <table:table-cell table:style-name="ce1" table:formula="of:=[.G136]+h" office:value-type="float" office:value="1.35" calcext:value-type="float">
            <text:p>1,35</text:p>
          </table:table-cell>
          <table:table-cell table:style-name="ce1" table:formula="of:=[.H136]+ h*[.F137]" office:value-type="float" office:value="586.005452429891" calcext:value-type="float">
            <text:p>586,0054524298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7]" office:value-type="float" office:value="1.35" calcext:value-type="float">
            <text:p>1,35</text:p>
          </table:table-cell>
          <table:table-cell table:style-name="ce1" table:formula="of:=[.H137]" office:value-type="float" office:value="586.005452429891" calcext:value-type="float">
            <text:p>586,005452429891</text:p>
          </table:table-cell>
          <table:table-cell table:style-name="ce1" table:formula="of:=-68 - ([.E138]^2/Ao)" office:value-type="float" office:value="-296.934926851707" calcext:value-type="float">
            <text:p>-296,934926851707</text:p>
          </table:table-cell>
          <table:table-cell table:style-name="ce1" table:formula="of:=[.G137]+h" office:value-type="float" office:value="1.36" calcext:value-type="float">
            <text:p>1,36</text:p>
          </table:table-cell>
          <table:table-cell table:style-name="ce1" table:formula="of:=[.H137]+ h*[.F138]" office:value-type="float" office:value="583.036103161374" calcext:value-type="float">
            <text:p>583,0361031613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8]" office:value-type="float" office:value="1.36" calcext:value-type="float">
            <text:p>1,36</text:p>
          </table:table-cell>
          <table:table-cell table:style-name="ce1" table:formula="of:=[.H138]" office:value-type="float" office:value="583.036103161374" calcext:value-type="float">
            <text:p>583,036103161374</text:p>
          </table:table-cell>
          <table:table-cell table:style-name="ce1" table:formula="of:=-68 - ([.E139]^2/Ao)" office:value-type="float" office:value="-294.6207317264" calcext:value-type="float">
            <text:p>-294,6207317264</text:p>
          </table:table-cell>
          <table:table-cell table:style-name="ce1" table:formula="of:=[.G138]+h" office:value-type="float" office:value="1.37" calcext:value-type="float">
            <text:p>1,37</text:p>
          </table:table-cell>
          <table:table-cell table:style-name="ce1" table:formula="of:=[.H138]+ h*[.F139]" office:value-type="float" office:value="580.08989584411" calcext:value-type="float">
            <text:p>580,089895844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9]" office:value-type="float" office:value="1.37" calcext:value-type="float">
            <text:p>1,37</text:p>
          </table:table-cell>
          <table:table-cell table:style-name="ce1" table:formula="of:=[.H139]" office:value-type="float" office:value="580.08989584411" calcext:value-type="float">
            <text:p>580,08989584411</text:p>
          </table:table-cell>
          <table:table-cell table:style-name="ce1" table:formula="of:=-68 - ([.E140]^2/Ao)" office:value-type="float" office:value="-292.336191506953" calcext:value-type="float">
            <text:p>-292,336191506953</text:p>
          </table:table-cell>
          <table:table-cell table:style-name="ce1" table:formula="of:=[.G139]+h" office:value-type="float" office:value="1.38" calcext:value-type="float">
            <text:p>1,38</text:p>
          </table:table-cell>
          <table:table-cell table:style-name="ce1" table:formula="of:=[.H139]+ h*[.F140]" office:value-type="float" office:value="577.16653392904" calcext:value-type="float">
            <text:p>577,166533929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0]" office:value-type="float" office:value="1.38" calcext:value-type="float">
            <text:p>1,38</text:p>
          </table:table-cell>
          <table:table-cell table:style-name="ce1" table:formula="of:=[.H140]" office:value-type="float" office:value="577.16653392904" calcext:value-type="float">
            <text:p>577,16653392904</text:p>
          </table:table-cell>
          <table:table-cell table:style-name="ce1" table:formula="of:=-68 - ([.E141]^2/Ao)" office:value-type="float" office:value="-290.080805258441" calcext:value-type="float">
            <text:p>-290,080805258441</text:p>
          </table:table-cell>
          <table:table-cell table:style-name="ce1" table:formula="of:=[.G140]+h" office:value-type="float" office:value="1.39" calcext:value-type="float">
            <text:p>1,39</text:p>
          </table:table-cell>
          <table:table-cell table:style-name="ce1" table:formula="of:=[.H140]+ h*[.F141]" office:value-type="float" office:value="574.265725876456" calcext:value-type="float">
            <text:p>574,2657258764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1]" office:value-type="float" office:value="1.39" calcext:value-type="float">
            <text:p>1,39</text:p>
          </table:table-cell>
          <table:table-cell table:style-name="ce1" table:formula="of:=[.H141]" office:value-type="float" office:value="574.265725876456" calcext:value-type="float">
            <text:p>574,265725876456</text:p>
          </table:table-cell>
          <table:table-cell table:style-name="ce1" table:formula="of:=-68 - ([.E142]^2/Ao)" office:value-type="float" office:value="-287.854082610942" calcext:value-type="float">
            <text:p>-287,854082610942</text:p>
          </table:table-cell>
          <table:table-cell table:style-name="ce1" table:formula="of:=[.G141]+h" office:value-type="float" office:value="1.4" calcext:value-type="float">
            <text:p>1,4</text:p>
          </table:table-cell>
          <table:table-cell table:style-name="ce1" table:formula="of:=[.H141]+ h*[.F142]" office:value-type="float" office:value="571.387185050346" calcext:value-type="float">
            <text:p>571,3871850503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2]" office:value-type="float" office:value="1.4" calcext:value-type="float">
            <text:p>1,4</text:p>
          </table:table-cell>
          <table:table-cell table:style-name="ce1" table:formula="of:=[.H142]" office:value-type="float" office:value="571.387185050346" calcext:value-type="float">
            <text:p>571,387185050346</text:p>
          </table:table-cell>
          <table:table-cell table:style-name="ce1" table:formula="of:=-68 - ([.E143]^2/Ao)" office:value-type="float" office:value="-285.655543493173" calcext:value-type="float">
            <text:p>-285,655543493173</text:p>
          </table:table-cell>
          <table:table-cell table:style-name="ce1" table:formula="of:=[.G142]+h" office:value-type="float" office:value="1.41" calcext:value-type="float">
            <text:p>1,41</text:p>
          </table:table-cell>
          <table:table-cell table:style-name="ce1" table:formula="of:=[.H142]+ h*[.F143]" office:value-type="float" office:value="568.530629615415" calcext:value-type="float">
            <text:p>568,5306296154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3]" office:value-type="float" office:value="1.41" calcext:value-type="float">
            <text:p>1,41</text:p>
          </table:table-cell>
          <table:table-cell table:style-name="ce1" table:formula="of:=[.H143]" office:value-type="float" office:value="568.530629615415" calcext:value-type="float">
            <text:p>568,530629615415</text:p>
          </table:table-cell>
          <table:table-cell table:style-name="ce1" table:formula="of:=-68 - ([.E144]^2/Ao)" office:value-type="float" office:value="-283.484717873933" calcext:value-type="float">
            <text:p>-283,484717873933</text:p>
          </table:table-cell>
          <table:table-cell table:style-name="ce1" table:formula="of:=[.G143]+h" office:value-type="float" office:value="1.42" calcext:value-type="float">
            <text:p>1,42</text:p>
          </table:table-cell>
          <table:table-cell table:style-name="ce1" table:formula="of:=[.H143]+ h*[.F144]" office:value-type="float" office:value="565.695782436675" calcext:value-type="float">
            <text:p>565,6957824366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4]" office:value-type="float" office:value="1.42" calcext:value-type="float">
            <text:p>1,42</text:p>
          </table:table-cell>
          <table:table-cell table:style-name="ce1" table:formula="of:=[.H144]" office:value-type="float" office:value="565.695782436675" calcext:value-type="float">
            <text:p>565,695782436675</text:p>
          </table:table-cell>
          <table:table-cell table:style-name="ce1" table:formula="of:=-68 - ([.E145]^2/Ao)" office:value-type="float" office:value="-281.341145511095" calcext:value-type="float">
            <text:p>-281,341145511095</text:p>
          </table:table-cell>
          <table:table-cell table:style-name="ce1" table:formula="of:=[.G144]+h" office:value-type="float" office:value="1.43" calcext:value-type="float">
            <text:p>1,43</text:p>
          </table:table-cell>
          <table:table-cell table:style-name="ce1" table:formula="of:=[.H144]+ h*[.F145]" office:value-type="float" office:value="562.882370981565" calcext:value-type="float">
            <text:p>562,8823709815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5]" office:value-type="float" office:value="1.43" calcext:value-type="float">
            <text:p>1,43</text:p>
          </table:table-cell>
          <table:table-cell table:style-name="ce1" table:formula="of:=[.H145]" office:value-type="float" office:value="562.882370981565" calcext:value-type="float">
            <text:p>562,882370981565</text:p>
          </table:table-cell>
          <table:table-cell table:style-name="ce1" table:formula="of:=-68 - ([.E146]^2/Ao)" office:value-type="float" office:value="-279.224375707885" calcext:value-type="float">
            <text:p>-279,224375707885</text:p>
          </table:table-cell>
          <table:table-cell table:style-name="ce1" table:formula="of:=[.G145]+h" office:value-type="float" office:value="1.44" calcext:value-type="float">
            <text:p>1,44</text:p>
          </table:table-cell>
          <table:table-cell table:style-name="ce1" table:formula="of:=[.H145]+ h*[.F146]" office:value-type="float" office:value="560.090127224486" calcext:value-type="float">
            <text:p>560,0901272244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6]" office:value-type="float" office:value="1.44" calcext:value-type="float">
            <text:p>1,44</text:p>
          </table:table-cell>
          <table:table-cell table:style-name="ce1" table:formula="of:=[.H146]" office:value-type="float" office:value="560.090127224486" calcext:value-type="float">
            <text:p>560,090127224486</text:p>
          </table:table-cell>
          <table:table-cell table:style-name="ce1" table:formula="of:=-68 - ([.E147]^2/Ao)" office:value-type="float" office:value="-277.133967076227" calcext:value-type="float">
            <text:p>-277,133967076227</text:p>
          </table:table-cell>
          <table:table-cell table:style-name="ce1" table:formula="of:=[.G146]+h" office:value-type="float" office:value="1.45" calcext:value-type="float">
            <text:p>1,45</text:p>
          </table:table-cell>
          <table:table-cell table:style-name="ce1" table:formula="of:=[.H146]+ h*[.F147]" office:value-type="float" office:value="557.318787553723" calcext:value-type="float">
            <text:p>557,3187875537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7]" office:value-type="float" office:value="1.45" calcext:value-type="float">
            <text:p>1,45</text:p>
          </table:table-cell>
          <table:table-cell table:style-name="ce1" table:formula="of:=[.H147]" office:value-type="float" office:value="557.318787553723" calcext:value-type="float">
            <text:p>557,318787553723</text:p>
          </table:table-cell>
          <table:table-cell table:style-name="ce1" table:formula="of:=-68 - ([.E148]^2/Ao)" office:value-type="float" office:value="-275.069487306901" calcext:value-type="float">
            <text:p>-275,069487306901</text:p>
          </table:table-cell>
          <table:table-cell table:style-name="ce1" table:formula="of:=[.G147]+h" office:value-type="float" office:value="1.46" calcext:value-type="float">
            <text:p>1,46</text:p>
          </table:table-cell>
          <table:table-cell table:style-name="ce1" table:formula="of:=[.H147]+ h*[.F148]" office:value-type="float" office:value="554.568092680654" calcext:value-type="float">
            <text:p>554,5680926806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8]" office:value-type="float" office:value="1.46" calcext:value-type="float">
            <text:p>1,46</text:p>
          </table:table-cell>
          <table:table-cell table:style-name="ce1" table:formula="of:=[.H148]" office:value-type="float" office:value="554.568092680654" calcext:value-type="float">
            <text:p>554,568092680654</text:p>
          </table:table-cell>
          <table:table-cell table:style-name="ce1" table:formula="of:=-68 - ([.E149]^2/Ao)" office:value-type="float" office:value="-273.030512946306" calcext:value-type="float">
            <text:p>-273,030512946306</text:p>
          </table:table-cell>
          <table:table-cell table:style-name="ce1" table:formula="of:=[.G148]+h" office:value-type="float" office:value="1.47" calcext:value-type="float">
            <text:p>1,47</text:p>
          </table:table-cell>
          <table:table-cell table:style-name="ce1" table:formula="of:=[.H148]+ h*[.F149]" office:value-type="float" office:value="551.837787551191" calcext:value-type="float">
            <text:p>551,8377875511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9]" office:value-type="float" office:value="1.47" calcext:value-type="float">
            <text:p>1,47</text:p>
          </table:table-cell>
          <table:table-cell table:style-name="ce1" table:formula="of:=[.H149]" office:value-type="float" office:value="551.837787551191" calcext:value-type="float">
            <text:p>551,837787551191</text:p>
          </table:table-cell>
          <table:table-cell table:style-name="ce1" table:formula="of:=-68 - ([.E150]^2/Ao)" office:value-type="float" office:value="-271.016629179596" calcext:value-type="float">
            <text:p>-271,016629179596</text:p>
          </table:table-cell>
          <table:table-cell table:style-name="ce1" table:formula="of:=[.G149]+h" office:value-type="float" office:value="1.48" calcext:value-type="float">
            <text:p>1,48</text:p>
          </table:table-cell>
          <table:table-cell table:style-name="ce1" table:formula="of:=[.H149]+ h*[.F150]" office:value-type="float" office:value="549.127621259395" calcext:value-type="float">
            <text:p>549,1276212593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0]" office:value-type="float" office:value="1.48" calcext:value-type="float">
            <text:p>1,48</text:p>
          </table:table-cell>
          <table:table-cell table:style-name="ce1" table:formula="of:=[.H150]" office:value-type="float" office:value="549.127621259395" calcext:value-type="float">
            <text:p>549,127621259395</text:p>
          </table:table-cell>
          <table:table-cell table:style-name="ce1" table:formula="of:=-68 - ([.E151]^2/Ao)" office:value-type="float" office:value="-269.027429620001" calcext:value-type="float">
            <text:p>-269,027429620001</text:p>
          </table:table-cell>
          <table:table-cell table:style-name="ce1" table:formula="of:=[.G150]+h" office:value-type="float" office:value="1.49" calcext:value-type="float">
            <text:p>1,49</text:p>
          </table:table-cell>
          <table:table-cell table:style-name="ce1" table:formula="of:=[.H150]+ h*[.F151]" office:value-type="float" office:value="546.437346963195" calcext:value-type="float">
            <text:p>546,4373469631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1]" office:value-type="float" office:value="1.49" calcext:value-type="float">
            <text:p>1,49</text:p>
          </table:table-cell>
          <table:table-cell table:style-name="ce1" table:formula="of:=[.H151]" office:value-type="float" office:value="546.437346963195" calcext:value-type="float">
            <text:p>546,437346963195</text:p>
          </table:table-cell>
          <table:table-cell table:style-name="ce1" table:formula="of:=-68 - ([.E152]^2/Ao)" office:value-type="float" office:value="-267.062516104117" calcext:value-type="float">
            <text:p>-267,062516104117</text:p>
          </table:table-cell>
          <table:table-cell table:style-name="ce1" table:formula="of:=[.G151]+h" office:value-type="float" office:value="1.5" calcext:value-type="float">
            <text:p>1,5</text:p>
          </table:table-cell>
          <table:table-cell table:style-name="ce1" table:formula="of:=[.H151]+ h*[.F152]" office:value-type="float" office:value="543.766721802154" calcext:value-type="float">
            <text:p>543,7667218021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2]" office:value-type="float" office:value="1.5" calcext:value-type="float">
            <text:p>1,5</text:p>
          </table:table-cell>
          <table:table-cell table:style-name="ce1" table:formula="of:=[.H152]" office:value-type="float" office:value="543.766721802154" calcext:value-type="float">
            <text:p>543,766721802154</text:p>
          </table:table-cell>
          <table:table-cell table:style-name="ce1" table:formula="of:=-68 - ([.E153]^2/Ao)" office:value-type="float" office:value="-265.121498492974" calcext:value-type="float">
            <text:p>-265,121498492974</text:p>
          </table:table-cell>
          <table:table-cell table:style-name="ce1" table:formula="of:=[.G152]+h" office:value-type="float" office:value="1.51" calcext:value-type="float">
            <text:p>1,51</text:p>
          </table:table-cell>
          <table:table-cell table:style-name="ce1" table:formula="of:=[.H152]+ h*[.F153]" office:value-type="float" office:value="541.115506817224" calcext:value-type="float">
            <text:p>541,1155068172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3]" office:value-type="float" office:value="1.51" calcext:value-type="float">
            <text:p>1,51</text:p>
          </table:table-cell>
          <table:table-cell table:style-name="ce1" table:formula="of:=[.H153]" office:value-type="float" office:value="541.115506817224" calcext:value-type="float">
            <text:p>541,115506817224</text:p>
          </table:table-cell>
          <table:table-cell table:style-name="ce1" table:formula="of:=-68 - ([.E154]^2/Ao)" office:value-type="float" office:value="-263.203994478708" calcext:value-type="float">
            <text:p>-263,203994478708</text:p>
          </table:table-cell>
          <table:table-cell table:style-name="ce1" table:formula="of:=[.G153]+h" office:value-type="float" office:value="1.52" calcext:value-type="float">
            <text:p>1,52</text:p>
          </table:table-cell>
          <table:table-cell table:style-name="ce1" table:formula="of:=[.H153]+ h*[.F154]" office:value-type="float" office:value="538.483466872437" calcext:value-type="float">
            <text:p>538,4834668724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4]" office:value-type="float" office:value="1.52" calcext:value-type="float">
            <text:p>1,52</text:p>
          </table:table-cell>
          <table:table-cell table:style-name="ce1" table:formula="of:=[.H154]" office:value-type="float" office:value="538.483466872437" calcext:value-type="float">
            <text:p>538,483466872437</text:p>
          </table:table-cell>
          <table:table-cell table:style-name="ce1" table:formula="of:=-68 - ([.E155]^2/Ao)" office:value-type="float" office:value="-261.30962939664" calcext:value-type="float">
            <text:p>-261,30962939664</text:p>
          </table:table-cell>
          <table:table-cell table:style-name="ce1" table:formula="of:=[.G154]+h" office:value-type="float" office:value="1.53" calcext:value-type="float">
            <text:p>1,53</text:p>
          </table:table-cell>
          <table:table-cell table:style-name="ce1" table:formula="of:=[.H154]+ h*[.F155]" office:value-type="float" office:value="535.870370578471" calcext:value-type="float">
            <text:p>535,8703705784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5]" office:value-type="float" office:value="1.53" calcext:value-type="float">
            <text:p>1,53</text:p>
          </table:table-cell>
          <table:table-cell table:style-name="ce1" table:formula="of:=[.H155]" office:value-type="float" office:value="535.870370578471" calcext:value-type="float">
            <text:p>535,870370578471</text:p>
          </table:table-cell>
          <table:table-cell table:style-name="ce1" table:formula="of:=-68 - ([.E156]^2/Ao)" office:value-type="float" office:value="-259.438036042605" calcext:value-type="float">
            <text:p>-259,438036042605</text:p>
          </table:table-cell>
          <table:table-cell table:style-name="ce1" table:formula="of:=[.G155]+h" office:value-type="float" office:value="1.54" calcext:value-type="float">
            <text:p>1,54</text:p>
          </table:table-cell>
          <table:table-cell table:style-name="ce1" table:formula="of:=[.H155]+ h*[.F156]" office:value-type="float" office:value="533.275990218045" calcext:value-type="float">
            <text:p>533,2759902180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6]" office:value-type="float" office:value="1.54" calcext:value-type="float">
            <text:p>1,54</text:p>
          </table:table-cell>
          <table:table-cell table:style-name="ce1" table:formula="of:=[.H156]" office:value-type="float" office:value="533.275990218045" calcext:value-type="float">
            <text:p>533,275990218045</text:p>
          </table:table-cell>
          <table:table-cell table:style-name="ce1" table:formula="of:=-68 - ([.E157]^2/Ao)" office:value-type="float" office:value="-257.588854495358" calcext:value-type="float">
            <text:p>-257,588854495358</text:p>
          </table:table-cell>
          <table:table-cell table:style-name="ce1" table:formula="of:=[.G156]+h" office:value-type="float" office:value="1.55" calcext:value-type="float">
            <text:p>1,55</text:p>
          </table:table-cell>
          <table:table-cell table:style-name="ce1" table:formula="of:=[.H156]+ h*[.F157]" office:value-type="float" office:value="530.700101673091" calcext:value-type="float">
            <text:p>530,7001016730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7]" office:value-type="float" office:value="1.55" calcext:value-type="float">
            <text:p>1,55</text:p>
          </table:table-cell>
          <table:table-cell table:style-name="ce1" table:formula="of:=[.H157]" office:value-type="float" office:value="530.700101673091" calcext:value-type="float">
            <text:p>530,700101673091</text:p>
          </table:table-cell>
          <table:table-cell table:style-name="ce1" table:formula="of:=-68 - ([.E158]^2/Ao)" office:value-type="float" office:value="-255.761731943886" calcext:value-type="float">
            <text:p>-255,761731943886</text:p>
          </table:table-cell>
          <table:table-cell table:style-name="ce1" table:formula="of:=[.G157]+h" office:value-type="float" office:value="1.56" calcext:value-type="float">
            <text:p>1,56</text:p>
          </table:table-cell>
          <table:table-cell table:style-name="ce1" table:formula="of:=[.H157]+ h*[.F158]" office:value-type="float" office:value="528.142484353652" calcext:value-type="float">
            <text:p>528,1424843536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8]" office:value-type="float" office:value="1.56" calcext:value-type="float">
            <text:p>1,56</text:p>
          </table:table-cell>
          <table:table-cell table:style-name="ce1" table:formula="of:=[.H158]" office:value-type="float" office:value="528.142484353652" calcext:value-type="float">
            <text:p>528,142484353652</text:p>
          </table:table-cell>
          <table:table-cell table:style-name="ce1" table:formula="of:=-68 - ([.E159]^2/Ao)" office:value-type="float" office:value="-253.956322519499" calcext:value-type="float">
            <text:p>-253,956322519499</text:p>
          </table:table-cell>
          <table:table-cell table:style-name="ce1" table:formula="of:=[.G158]+h" office:value-type="float" office:value="1.57" calcext:value-type="float">
            <text:p>1,57</text:p>
          </table:table-cell>
          <table:table-cell table:style-name="ce1" table:formula="of:=[.H158]+ h*[.F159]" office:value-type="float" office:value="525.602921128457" calcext:value-type="float">
            <text:p>525,6029211284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9]" office:value-type="float" office:value="1.57" calcext:value-type="float">
            <text:p>1,57</text:p>
          </table:table-cell>
          <table:table-cell table:style-name="ce1" table:formula="of:=[.H159]" office:value-type="float" office:value="525.602921128457" calcext:value-type="float">
            <text:p>525,602921128457</text:p>
          </table:table-cell>
          <table:table-cell table:style-name="ce1" table:formula="of:=-68 - ([.E160]^2/Ao)" office:value-type="float" office:value="-252.172287132512" calcext:value-type="float">
            <text:p>-252,172287132512</text:p>
          </table:table-cell>
          <table:table-cell table:style-name="ce1" table:formula="of:=[.G159]+h" office:value-type="float" office:value="1.58" calcext:value-type="float">
            <text:p>1,58</text:p>
          </table:table-cell>
          <table:table-cell table:style-name="ce1" table:formula="of:=[.H159]+ h*[.F160]" office:value-type="float" office:value="523.081198257132" calcext:value-type="float">
            <text:p>523,0811982571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0]" office:value-type="float" office:value="1.58" calcext:value-type="float">
            <text:p>1,58</text:p>
          </table:table-cell>
          <table:table-cell table:style-name="ce1" table:formula="of:=[.H160]" office:value-type="float" office:value="523.081198257132" calcext:value-type="float">
            <text:p>523,081198257132</text:p>
          </table:table-cell>
          <table:table-cell table:style-name="ce1" table:formula="of:=-68 - ([.E161]^2/Ao)" office:value-type="float" office:value="-250.409293313412" calcext:value-type="float">
            <text:p>-250,409293313412</text:p>
          </table:table-cell>
          <table:table-cell table:style-name="ce1" table:formula="of:=[.G160]+h" office:value-type="float" office:value="1.59" calcext:value-type="float">
            <text:p>1,59</text:p>
          </table:table-cell>
          <table:table-cell table:style-name="ce1" table:formula="of:=[.H160]+ h*[.F161]" office:value-type="float" office:value="520.577105323998" calcext:value-type="float">
            <text:p>520,5771053239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1]" office:value-type="float" office:value="1.59" calcext:value-type="float">
            <text:p>1,59</text:p>
          </table:table-cell>
          <table:table-cell table:style-name="ce1" table:formula="of:=[.H161]" office:value-type="float" office:value="520.577105323998" calcext:value-type="float">
            <text:p>520,577105323998</text:p>
          </table:table-cell>
          <table:table-cell table:style-name="ce1" table:formula="of:=-68 - ([.E162]^2/Ao)" office:value-type="float" office:value="-248.667015058342" calcext:value-type="float">
            <text:p>-248,667015058342</text:p>
          </table:table-cell>
          <table:table-cell table:style-name="ce1" table:formula="of:=[.G161]+h" office:value-type="float" office:value="1.6" calcext:value-type="float">
            <text:p>1,6</text:p>
          </table:table-cell>
          <table:table-cell table:style-name="ce1" table:formula="of:=[.H161]+ h*[.F162]" office:value-type="float" office:value="518.090435173415" calcext:value-type="float">
            <text:p>518,0904351734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2]" office:value-type="float" office:value="1.6" calcext:value-type="float">
            <text:p>1,6</text:p>
          </table:table-cell>
          <table:table-cell table:style-name="ce1" table:formula="of:=[.H162]" office:value-type="float" office:value="518.090435173415" calcext:value-type="float">
            <text:p>518,090435173415</text:p>
          </table:table-cell>
          <table:table-cell table:style-name="ce1" table:formula="of:=-68 - ([.E163]^2/Ao)" office:value-type="float" office:value="-246.945132678786" calcext:value-type="float">
            <text:p>-246,945132678786</text:p>
          </table:table-cell>
          <table:table-cell table:style-name="ce1" table:formula="of:=[.G162]+h" office:value-type="float" office:value="1.61" calcext:value-type="float">
            <text:p>1,61</text:p>
          </table:table-cell>
          <table:table-cell table:style-name="ce1" table:formula="of:=[.H162]+ h*[.F163]" office:value-type="float" office:value="515.620983846627" calcext:value-type="float">
            <text:p>515,6209838466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3]" office:value-type="float" office:value="1.61" calcext:value-type="float">
            <text:p>1,61</text:p>
          </table:table-cell>
          <table:table-cell table:style-name="ce1" table:formula="of:=[.H163]" office:value-type="float" office:value="515.620983846627" calcext:value-type="float">
            <text:p>515,620983846627</text:p>
          </table:table-cell>
          <table:table-cell table:style-name="ce1" table:formula="of:=-68 - ([.E164]^2/Ao)" office:value-type="float" office:value="-245.243332655309" calcext:value-type="float">
            <text:p>-245,243332655309</text:p>
          </table:table-cell>
          <table:table-cell table:style-name="ce1" table:formula="of:=[.G163]+h" office:value-type="float" office:value="1.62" calcext:value-type="float">
            <text:p>1,62</text:p>
          </table:table-cell>
          <table:table-cell table:style-name="ce1" table:formula="of:=[.H163]+ h*[.F164]" office:value-type="float" office:value="513.168550520074" calcext:value-type="float">
            <text:p>513,1685505200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4]" office:value-type="float" office:value="1.62" calcext:value-type="float">
            <text:p>1,62</text:p>
          </table:table-cell>
          <table:table-cell table:style-name="ce1" table:formula="of:=[.H164]" office:value-type="float" office:value="513.168550520074" calcext:value-type="float">
            <text:p>513,168550520074</text:p>
          </table:table-cell>
          <table:table-cell table:style-name="ce1" table:formula="of:=-68 - ([.E165]^2/Ao)" office:value-type="float" office:value="-243.561307495249" calcext:value-type="float">
            <text:p>-243,561307495249</text:p>
          </table:table-cell>
          <table:table-cell table:style-name="ce1" table:formula="of:=[.G164]+h" office:value-type="float" office:value="1.63" calcext:value-type="float">
            <text:p>1,63</text:p>
          </table:table-cell>
          <table:table-cell table:style-name="ce1" table:formula="of:=[.H164]+ h*[.F165]" office:value-type="float" office:value="510.732937445121" calcext:value-type="float">
            <text:p>510,7329374451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5]" office:value-type="float" office:value="1.63" calcext:value-type="float">
            <text:p>1,63</text:p>
          </table:table-cell>
          <table:table-cell table:style-name="ce1" table:formula="of:=[.H165]" office:value-type="float" office:value="510.732937445121" calcext:value-type="float">
            <text:p>510,732937445121</text:p>
          </table:table-cell>
          <table:table-cell table:style-name="ce1" table:formula="of:=-68 - ([.E166]^2/Ao)" office:value-type="float" office:value="-241.898755594215" calcext:value-type="float">
            <text:p>-241,898755594215</text:p>
          </table:table-cell>
          <table:table-cell table:style-name="ce1" table:formula="of:=[.G165]+h" office:value-type="float" office:value="1.64" calcext:value-type="float">
            <text:p>1,64</text:p>
          </table:table-cell>
          <table:table-cell table:style-name="ce1" table:formula="of:=[.H165]+ h*[.F166]" office:value-type="float" office:value="508.313949889179" calcext:value-type="float">
            <text:p>508,3139498891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6]" office:value-type="float" office:value="1.64" calcext:value-type="float">
            <text:p>1,64</text:p>
          </table:table-cell>
          <table:table-cell table:style-name="ce1" table:formula="of:=[.H166]" office:value-type="float" office:value="508.313949889179" calcext:value-type="float">
            <text:p>508,313949889179</text:p>
          </table:table-cell>
          <table:table-cell table:style-name="ce1" table:formula="of:=-68 - ([.E167]^2/Ao)" office:value-type="float" office:value="-240.255381101293" calcext:value-type="float">
            <text:p>-240,255381101293</text:p>
          </table:table-cell>
          <table:table-cell table:style-name="ce1" table:formula="of:=[.G166]+h" office:value-type="float" office:value="1.65" calcext:value-type="float">
            <text:p>1,65</text:p>
          </table:table-cell>
          <table:table-cell table:style-name="ce1" table:formula="of:=[.H166]+ h*[.F167]" office:value-type="float" office:value="505.911396078166" calcext:value-type="float">
            <text:p>505,9113960781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7]" office:value-type="float" office:value="1.65" calcext:value-type="float">
            <text:p>1,65</text:p>
          </table:table-cell>
          <table:table-cell table:style-name="ce1" table:formula="of:=[.H167]" office:value-type="float" office:value="505.911396078166" calcext:value-type="float">
            <text:p>505,911396078166</text:p>
          </table:table-cell>
          <table:table-cell table:style-name="ce1" table:formula="of:=-68 - ([.E168]^2/Ao)" office:value-type="float" office:value="-238.63089378784" calcext:value-type="float">
            <text:p>-238,63089378784</text:p>
          </table:table-cell>
          <table:table-cell table:style-name="ce1" table:formula="of:=[.G167]+h" office:value-type="float" office:value="1.66" calcext:value-type="float">
            <text:p>1,66</text:p>
          </table:table-cell>
          <table:table-cell table:style-name="ce1" table:formula="of:=[.H167]+ h*[.F168]" office:value-type="float" office:value="503.525087140288" calcext:value-type="float">
            <text:p>503,5250871402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8]" office:value-type="float" office:value="1.66" calcext:value-type="float">
            <text:p>1,66</text:p>
          </table:table-cell>
          <table:table-cell table:style-name="ce1" table:formula="of:=[.H168]" office:value-type="float" office:value="503.525087140288" calcext:value-type="float">
            <text:p>503,525087140288</text:p>
          </table:table-cell>
          <table:table-cell table:style-name="ce1" table:formula="of:=-68 - ([.E169]^2/Ao)" office:value-type="float" office:value="-237.025008919756" calcext:value-type="float">
            <text:p>-237,025008919756</text:p>
          </table:table-cell>
          <table:table-cell table:style-name="ce1" table:formula="of:=[.G168]+h" office:value-type="float" office:value="1.67" calcext:value-type="float">
            <text:p>1,67</text:p>
          </table:table-cell>
          <table:table-cell table:style-name="ce1" table:formula="of:=[.H168]+ h*[.F169]" office:value-type="float" office:value="501.15483705109" calcext:value-type="float">
            <text:p>501,154837051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9]" office:value-type="float" office:value="1.67" calcext:value-type="float">
            <text:p>1,67</text:p>
          </table:table-cell>
          <table:table-cell table:style-name="ce1" table:formula="of:=[.H169]" office:value-type="float" office:value="501.15483705109" calcext:value-type="float">
            <text:p>501,15483705109</text:p>
          </table:table-cell>
          <table:table-cell table:style-name="ce1" table:formula="of:=-68 - ([.E170]^2/Ao)" office:value-type="float" office:value="-235.437447133137" calcext:value-type="float">
            <text:p>-235,437447133137</text:p>
          </table:table-cell>
          <table:table-cell table:style-name="ce1" table:formula="of:=[.G169]+h" office:value-type="float" office:value="1.68" calcext:value-type="float">
            <text:p>1,68</text:p>
          </table:table-cell>
          <table:table-cell table:style-name="ce1" table:formula="of:=[.H169]+ h*[.F170]" office:value-type="float" office:value="498.800462579759" calcext:value-type="float">
            <text:p>498,8004625797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0]" office:value-type="float" office:value="1.68" calcext:value-type="float">
            <text:p>1,68</text:p>
          </table:table-cell>
          <table:table-cell table:style-name="ce1" table:formula="of:=[.H170]" office:value-type="float" office:value="498.800462579759" calcext:value-type="float">
            <text:p>498,800462579759</text:p>
          </table:table-cell>
          <table:table-cell table:style-name="ce1" table:formula="of:=-68 - ([.E171]^2/Ao)" office:value-type="float" office:value="-233.867934313188" calcext:value-type="float">
            <text:p>-233,867934313188</text:p>
          </table:table-cell>
          <table:table-cell table:style-name="ce1" table:formula="of:=[.G170]+h" office:value-type="float" office:value="1.69" calcext:value-type="float">
            <text:p>1,69</text:p>
          </table:table-cell>
          <table:table-cell table:style-name="ce1" table:formula="of:=[.H170]+ h*[.F171]" office:value-type="float" office:value="496.461783236627" calcext:value-type="float">
            <text:p>496,4617832366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1]" office:value-type="float" office:value="1.69" calcext:value-type="float">
            <text:p>1,69</text:p>
          </table:table-cell>
          <table:table-cell table:style-name="ce1" table:formula="of:=[.H171]" office:value-type="float" office:value="496.461783236627" calcext:value-type="float">
            <text:p>496,461783236627</text:p>
          </table:table-cell>
          <table:table-cell table:style-name="ce1" table:formula="of:=-68 - ([.E172]^2/Ao)" office:value-type="float" office:value="-232.316201476328" calcext:value-type="float">
            <text:p>-232,316201476328</text:p>
          </table:table-cell>
          <table:table-cell table:style-name="ce1" table:formula="of:=[.G171]+h" office:value-type="float" office:value="1.7" calcext:value-type="float">
            <text:p>1,7</text:p>
          </table:table-cell>
          <table:table-cell table:style-name="ce1" table:formula="of:=[.H171]+ h*[.F172]" office:value-type="float" office:value="494.138621221864" calcext:value-type="float">
            <text:p>494,1386212218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2]" office:value-type="float" office:value="1.7" calcext:value-type="float">
            <text:p>1,7</text:p>
          </table:table-cell>
          <table:table-cell table:style-name="ce1" table:formula="of:=[.H172]" office:value-type="float" office:value="494.138621221864" calcext:value-type="float">
            <text:p>494,138621221864</text:p>
          </table:table-cell>
          <table:table-cell table:style-name="ce1" table:formula="of:=-68 - ([.E173]^2/Ao)" office:value-type="float" office:value="-230.781984655363" calcext:value-type="float">
            <text:p>-230,781984655363</text:p>
          </table:table-cell>
          <table:table-cell table:style-name="ce1" table:formula="of:=[.G172]+h" office:value-type="float" office:value="1.71" calcext:value-type="float">
            <text:p>1,71</text:p>
          </table:table-cell>
          <table:table-cell table:style-name="ce1" table:formula="of:=[.H172]+ h*[.F173]" office:value-type="float" office:value="491.83080137531" calcext:value-type="float">
            <text:p>491,830801375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3]" office:value-type="float" office:value="1.71" calcext:value-type="float">
            <text:p>1,71</text:p>
          </table:table-cell>
          <table:table-cell table:style-name="ce1" table:formula="of:=[.H173]" office:value-type="float" office:value="491.83080137531" calcext:value-type="float">
            <text:p>491,83080137531</text:p>
          </table:table-cell>
          <table:table-cell table:style-name="ce1" table:formula="of:=-68 - ([.E174]^2/Ao)" office:value-type="float" office:value="-229.265024787653" calcext:value-type="float">
            <text:p>-229,265024787653</text:p>
          </table:table-cell>
          <table:table-cell table:style-name="ce1" table:formula="of:=[.G173]+h" office:value-type="float" office:value="1.72" calcext:value-type="float">
            <text:p>1,72</text:p>
          </table:table-cell>
          <table:table-cell table:style-name="ce1" table:formula="of:=[.H173]+ h*[.F174]" office:value-type="float" office:value="489.538151127434" calcext:value-type="float">
            <text:p>489,5381511274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4]" office:value-type="float" office:value="1.72" calcext:value-type="float">
            <text:p>1,72</text:p>
          </table:table-cell>
          <table:table-cell table:style-name="ce1" table:formula="of:=[.H174]" office:value-type="float" office:value="489.538151127434" calcext:value-type="float">
            <text:p>489,538151127434</text:p>
          </table:table-cell>
          <table:table-cell table:style-name="ce1" table:formula="of:=-68 - ([.E175]^2/Ao)" office:value-type="float" office:value="-227.765067606177" calcext:value-type="float">
            <text:p>-227,765067606177</text:p>
          </table:table-cell>
          <table:table-cell table:style-name="ce1" table:formula="of:=[.G174]+h" office:value-type="float" office:value="1.73" calcext:value-type="float">
            <text:p>1,73</text:p>
          </table:table-cell>
          <table:table-cell table:style-name="ce1" table:formula="of:=[.H174]+ h*[.F175]" office:value-type="float" office:value="487.260500451372" calcext:value-type="float">
            <text:p>487,2605004513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5]" office:value-type="float" office:value="1.73" calcext:value-type="float">
            <text:p>1,73</text:p>
          </table:table-cell>
          <table:table-cell table:style-name="ce1" table:formula="of:=[.H175]" office:value-type="float" office:value="487.260500451372" calcext:value-type="float">
            <text:p>487,260500451372</text:p>
          </table:table-cell>
          <table:table-cell table:style-name="ce1" table:formula="of:=-68 - ([.E176]^2/Ao)" office:value-type="float" office:value="-226.281863533414" calcext:value-type="float">
            <text:p>-226,281863533414</text:p>
          </table:table-cell>
          <table:table-cell table:style-name="ce1" table:formula="of:=[.G175]+h" office:value-type="float" office:value="1.74" calcext:value-type="float">
            <text:p>1,74</text:p>
          </table:table-cell>
          <table:table-cell table:style-name="ce1" table:formula="of:=[.H175]+ h*[.F176]" office:value-type="float" office:value="484.997681816038" calcext:value-type="float">
            <text:p>484,9976818160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6]" office:value-type="float" office:value="1.74" calcext:value-type="float">
            <text:p>1,74</text:p>
          </table:table-cell>
          <table:table-cell table:style-name="ce1" table:formula="of:=[.H176]" office:value-type="float" office:value="484.997681816038" calcext:value-type="float">
            <text:p>484,997681816038</text:p>
          </table:table-cell>
          <table:table-cell table:style-name="ce1" table:formula="of:=-68 - ([.E177]^2/Ao)" office:value-type="float" office:value="-224.815167577954" calcext:value-type="float">
            <text:p>-224,815167577954</text:p>
          </table:table-cell>
          <table:table-cell table:style-name="ce1" table:formula="of:=[.G176]+h" office:value-type="float" office:value="1.75" calcext:value-type="float">
            <text:p>1,75</text:p>
          </table:table-cell>
          <table:table-cell table:style-name="ce1" table:formula="of:=[.H176]+ h*[.F177]" office:value-type="float" office:value="482.749530140258" calcext:value-type="float">
            <text:p>482,7495301402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7]" office:value-type="float" office:value="1.75" calcext:value-type="float">
            <text:p>1,75</text:p>
          </table:table-cell>
          <table:table-cell table:style-name="ce1" table:formula="of:=[.H177]" office:value-type="float" office:value="482.749530140258" calcext:value-type="float">
            <text:p>482,749530140258</text:p>
          </table:table-cell>
          <table:table-cell table:style-name="ce1" table:formula="of:=-68 - ([.E178]^2/Ao)" office:value-type="float" office:value="-223.36473923376" calcext:value-type="float">
            <text:p>-223,36473923376</text:p>
          </table:table-cell>
          <table:table-cell table:style-name="ce1" table:formula="of:=[.G177]+h" office:value-type="float" office:value="1.76" calcext:value-type="float">
            <text:p>1,76</text:p>
          </table:table-cell>
          <table:table-cell table:style-name="ce1" table:formula="of:=[.H177]+ h*[.F178]" office:value-type="float" office:value="480.515882747921" calcext:value-type="float">
            <text:p>480,5158827479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8]" office:value-type="float" office:value="1.76" calcext:value-type="float">
            <text:p>1,76</text:p>
          </table:table-cell>
          <table:table-cell table:style-name="ce1" table:formula="of:=[.H178]" office:value-type="float" office:value="480.515882747921" calcext:value-type="float">
            <text:p>480,515882747921</text:p>
          </table:table-cell>
          <table:table-cell table:style-name="ce1" table:formula="of:=-68 - ([.E179]^2/Ao)" office:value-type="float" office:value="-221.930342382009" calcext:value-type="float">
            <text:p>-221,930342382009</text:p>
          </table:table-cell>
          <table:table-cell table:style-name="ce1" table:formula="of:=[.G178]+h" office:value-type="float" office:value="1.77" calcext:value-type="float">
            <text:p>1,77</text:p>
          </table:table-cell>
          <table:table-cell table:style-name="ce1" table:formula="of:=[.H178]+ h*[.F179]" office:value-type="float" office:value="478.296579324101" calcext:value-type="float">
            <text:p>478,2965793241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9]" office:value-type="float" office:value="1.77" calcext:value-type="float">
            <text:p>1,77</text:p>
          </table:table-cell>
          <table:table-cell table:style-name="ce1" table:formula="of:=[.H179]" office:value-type="float" office:value="478.296579324101" calcext:value-type="float">
            <text:p>478,296579324101</text:p>
          </table:table-cell>
          <table:table-cell table:style-name="ce1" table:formula="of:=-68 - ([.E180]^2/Ao)" office:value-type="float" office:value="-220.511745195424" calcext:value-type="float">
            <text:p>-220,511745195424</text:p>
          </table:table-cell>
          <table:table-cell table:style-name="ce1" table:formula="of:=[.G179]+h" office:value-type="float" office:value="1.78" calcext:value-type="float">
            <text:p>1,78</text:p>
          </table:table-cell>
          <table:table-cell table:style-name="ce1" table:formula="of:=[.H179]+ h*[.F180]" office:value-type="float" office:value="476.091461872146" calcext:value-type="float">
            <text:p>476,0914618721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0]" office:value-type="float" office:value="1.78" calcext:value-type="float">
            <text:p>1,78</text:p>
          </table:table-cell>
          <table:table-cell table:style-name="ce1" table:formula="of:=[.H180]" office:value-type="float" office:value="476.091461872146" calcext:value-type="float">
            <text:p>476,091461872146</text:p>
          </table:table-cell>
          <table:table-cell table:style-name="ce1" table:formula="of:=-68 - ([.E181]^2/Ao)" office:value-type="float" office:value="-219.108720045038" calcext:value-type="float">
            <text:p>-219,108720045038</text:p>
          </table:table-cell>
          <table:table-cell table:style-name="ce1" table:formula="of:=[.G180]+h" office:value-type="float" office:value="1.79" calcext:value-type="float">
            <text:p>1,79</text:p>
          </table:table-cell>
          <table:table-cell table:style-name="ce1" table:formula="of:=[.H180]+ h*[.F181]" office:value-type="float" office:value="473.900374671696" calcext:value-type="float">
            <text:p>473,9003746716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1]" office:value-type="float" office:value="1.79" calcext:value-type="float">
            <text:p>1,79</text:p>
          </table:table-cell>
          <table:table-cell table:style-name="ce1" table:formula="of:=[.H181]" office:value-type="float" office:value="473.900374671696" calcext:value-type="float">
            <text:p>473,900374671696</text:p>
          </table:table-cell>
          <table:table-cell table:style-name="ce1" table:formula="of:=-68 - ([.E182]^2/Ao)" office:value-type="float" office:value="-217.721043409316" calcext:value-type="float">
            <text:p>-217,721043409316</text:p>
          </table:table-cell>
          <table:table-cell table:style-name="ce1" table:formula="of:=[.G181]+h" office:value-type="float" office:value="1.8" calcext:value-type="float">
            <text:p>1,8</text:p>
          </table:table-cell>
          <table:table-cell table:style-name="ce1" table:formula="of:=[.H181]+ h*[.F182]" office:value-type="float" office:value="471.723164237603" calcext:value-type="float">
            <text:p>471,7231642376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2]" office:value-type="float" office:value="1.8" calcext:value-type="float">
            <text:p>1,8</text:p>
          </table:table-cell>
          <table:table-cell table:style-name="ce1" table:formula="of:=[.H182]" office:value-type="float" office:value="471.723164237603" calcext:value-type="float">
            <text:p>471,723164237603</text:p>
          </table:table-cell>
          <table:table-cell table:style-name="ce1" table:formula="of:=-68 - ([.E183]^2/Ao)" office:value-type="float" office:value="-216.348495785558" calcext:value-type="float">
            <text:p>-216,348495785558</text:p>
          </table:table-cell>
          <table:table-cell table:style-name="ce1" table:formula="of:=[.G182]+h" office:value-type="float" office:value="1.81" calcext:value-type="float">
            <text:p>1,81</text:p>
          </table:table-cell>
          <table:table-cell table:style-name="ce1" table:formula="of:=[.H182]+ h*[.F183]" office:value-type="float" office:value="469.559679279747" calcext:value-type="float">
            <text:p>469,5596792797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3]" office:value-type="float" office:value="1.81" calcext:value-type="float">
            <text:p>1,81</text:p>
          </table:table-cell>
          <table:table-cell table:style-name="ce1" table:formula="of:=[.H183]" office:value-type="float" office:value="469.559679279747" calcext:value-type="float">
            <text:p>469,559679279747</text:p>
          </table:table-cell>
          <table:table-cell table:style-name="ce1" table:formula="of:=-68 - ([.E184]^2/Ao)" office:value-type="float" office:value="-214.990861603533" calcext:value-type="float">
            <text:p>-214,990861603533</text:p>
          </table:table-cell>
          <table:table-cell table:style-name="ce1" table:formula="of:=[.G183]+h" office:value-type="float" office:value="1.82" calcext:value-type="float">
            <text:p>1,82</text:p>
          </table:table-cell>
          <table:table-cell table:style-name="ce1" table:formula="of:=[.H183]+ h*[.F184]" office:value-type="float" office:value="467.409770663712" calcext:value-type="float">
            <text:p>467,4097706637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4]" office:value-type="float" office:value="1.82" calcext:value-type="float">
            <text:p>1,82</text:p>
          </table:table-cell>
          <table:table-cell table:style-name="ce1" table:formula="of:=[.H184]" office:value-type="float" office:value="467.409770663712" calcext:value-type="float">
            <text:p>467,409770663712</text:p>
          </table:table-cell>
          <table:table-cell table:style-name="ce1" table:formula="of:=-68 - ([.E185]^2/Ao)" office:value-type="float" office:value="-213.647929141269" calcext:value-type="float">
            <text:p>-213,647929141269</text:p>
          </table:table-cell>
          <table:table-cell table:style-name="ce1" table:formula="of:=[.G184]+h" office:value-type="float" office:value="1.83" calcext:value-type="float">
            <text:p>1,83</text:p>
          </table:table-cell>
          <table:table-cell table:style-name="ce1" table:formula="of:=[.H184]+ h*[.F185]" office:value-type="float" office:value="465.273291372299" calcext:value-type="float">
            <text:p>465,2732913722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5]" office:value-type="float" office:value="1.83" calcext:value-type="float">
            <text:p>1,83</text:p>
          </table:table-cell>
          <table:table-cell table:style-name="ce1" table:formula="of:=[.H185]" office:value-type="float" office:value="465.273291372299" calcext:value-type="float">
            <text:p>465,273291372299</text:p>
          </table:table-cell>
          <table:table-cell table:style-name="ce1" table:formula="of:=-68 - ([.E186]^2/Ao)" office:value-type="float" office:value="-212.319490442942" calcext:value-type="float">
            <text:p>-212,319490442942</text:p>
          </table:table-cell>
          <table:table-cell table:style-name="ce1" table:formula="of:=[.G185]+h" office:value-type="float" office:value="1.84" calcext:value-type="float">
            <text:p>1,84</text:p>
          </table:table-cell>
          <table:table-cell table:style-name="ce1" table:formula="of:=[.H185]+ h*[.F186]" office:value-type="float" office:value="463.15009646787" calcext:value-type="float">
            <text:p>463,150096467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6]" office:value-type="float" office:value="1.84" calcext:value-type="float">
            <text:p>1,84</text:p>
          </table:table-cell>
          <table:table-cell table:style-name="ce1" table:formula="of:=[.H186]" office:value-type="float" office:value="463.15009646787" calcext:value-type="float">
            <text:p>463,15009646787</text:p>
          </table:table-cell>
          <table:table-cell table:style-name="ce1" table:formula="of:=-68 - ([.E187]^2/Ao)" office:value-type="float" office:value="-211.005341238798" calcext:value-type="float">
            <text:p>-211,005341238798</text:p>
          </table:table-cell>
          <table:table-cell table:style-name="ce1" table:formula="of:=[.G186]+h" office:value-type="float" office:value="1.85" calcext:value-type="float">
            <text:p>1,85</text:p>
          </table:table-cell>
          <table:table-cell table:style-name="ce1" table:formula="of:=[.H186]+ h*[.F187]" office:value-type="float" office:value="461.040043055482" calcext:value-type="float">
            <text:p>461,0400430554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7]" office:value-type="float" office:value="1.85" calcext:value-type="float">
            <text:p>1,85</text:p>
          </table:table-cell>
          <table:table-cell table:style-name="ce1" table:formula="of:=[.H187]" office:value-type="float" office:value="461.040043055482" calcext:value-type="float">
            <text:p>461,040043055482</text:p>
          </table:table-cell>
          <table:table-cell table:style-name="ce1" table:formula="of:=-68 - ([.E188]^2/Ao)" office:value-type="float" office:value="-209.705280867067" calcext:value-type="float">
            <text:p>-209,705280867067</text:p>
          </table:table-cell>
          <table:table-cell table:style-name="ce1" table:formula="of:=[.G187]+h" office:value-type="float" office:value="1.86" calcext:value-type="float">
            <text:p>1,86</text:p>
          </table:table-cell>
          <table:table-cell table:style-name="ce1" table:formula="of:=[.H187]+ h*[.F188]" office:value-type="float" office:value="458.942990246811" calcext:value-type="float">
            <text:p>458,9429902468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8]" office:value-type="float" office:value="1.86" calcext:value-type="float">
            <text:p>1,86</text:p>
          </table:table-cell>
          <table:table-cell table:style-name="ce1" table:formula="of:=[.H188]" office:value-type="float" office:value="458.942990246811" calcext:value-type="float">
            <text:p>458,942990246811</text:p>
          </table:table-cell>
          <table:table-cell table:style-name="ce1" table:formula="of:=-68 - ([.E189]^2/Ao)" office:value-type="float" office:value="-208.41911219779" calcext:value-type="float">
            <text:p>-208,41911219779</text:p>
          </table:table-cell>
          <table:table-cell table:style-name="ce1" table:formula="of:=[.G188]+h" office:value-type="float" office:value="1.87" calcext:value-type="float">
            <text:p>1,87</text:p>
          </table:table-cell>
          <table:table-cell table:style-name="ce1" table:formula="of:=[.H188]+ h*[.F189]" office:value-type="float" office:value="456.858799124833" calcext:value-type="float">
            <text:p>456,8587991248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9]" office:value-type="float" office:value="1.87" calcext:value-type="float">
            <text:p>1,87</text:p>
          </table:table-cell>
          <table:table-cell table:style-name="ce1" table:formula="of:=[.H189]" office:value-type="float" office:value="456.858799124833" calcext:value-type="float">
            <text:p>456,858799124833</text:p>
          </table:table-cell>
          <table:table-cell table:style-name="ce1" table:formula="of:=-68 - ([.E190]^2/Ao)" office:value-type="float" office:value="-207.146641558523" calcext:value-type="float">
            <text:p>-207,146641558523</text:p>
          </table:table-cell>
          <table:table-cell table:style-name="ce1" table:formula="of:=[.G189]+h" office:value-type="float" office:value="1.88" calcext:value-type="float">
            <text:p>1,88</text:p>
          </table:table-cell>
          <table:table-cell table:style-name="ce1" table:formula="of:=[.H189]+ h*[.F190]" office:value-type="float" office:value="454.787332709248" calcext:value-type="float">
            <text:p>454,7873327092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0]" office:value-type="float" office:value="1.88" calcext:value-type="float">
            <text:p>1,88</text:p>
          </table:table-cell>
          <table:table-cell table:style-name="ce1" table:formula="of:=[.H190]" office:value-type="float" office:value="454.787332709248" calcext:value-type="float">
            <text:p>454,787332709248</text:p>
          </table:table-cell>
          <table:table-cell table:style-name="ce1" table:formula="of:=-68 - ([.E191]^2/Ao)" office:value-type="float" office:value="-205.887678661861" calcext:value-type="float">
            <text:p>-205,887678661861</text:p>
          </table:table-cell>
          <table:table-cell table:style-name="ce1" table:formula="of:=[.G190]+h" office:value-type="float" office:value="1.89" calcext:value-type="float">
            <text:p>1,89</text:p>
          </table:table-cell>
          <table:table-cell table:style-name="ce1" table:formula="of:=[.H190]+ h*[.F191]" office:value-type="float" office:value="452.728455922629" calcext:value-type="float">
            <text:p>452,7284559226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1]" office:value-type="float" office:value="1.89" calcext:value-type="float">
            <text:p>1,89</text:p>
          </table:table-cell>
          <table:table-cell table:style-name="ce1" table:formula="of:=[.H191]" office:value-type="float" office:value="452.728455922629" calcext:value-type="float">
            <text:p>452,728455922629</text:p>
          </table:table-cell>
          <table:table-cell table:style-name="ce1" table:formula="of:=-68 - ([.E192]^2/Ao)" office:value-type="float" office:value="-204.642036534725" calcext:value-type="float">
            <text:p>-204,642036534725</text:p>
          </table:table-cell>
          <table:table-cell table:style-name="ce1" table:formula="of:=[.G191]+h" office:value-type="float" office:value="1.9" calcext:value-type="float">
            <text:p>1,9</text:p>
          </table:table-cell>
          <table:table-cell table:style-name="ce1" table:formula="of:=[.H191]+ h*[.F192]" office:value-type="float" office:value="450.682035557282" calcext:value-type="float">
            <text:p>450,6820355572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2]" office:value-type="float" office:value="1.9" calcext:value-type="float">
            <text:p>1,9</text:p>
          </table:table-cell>
          <table:table-cell table:style-name="ce1" table:formula="of:=[.H192]" office:value-type="float" office:value="450.682035557282" calcext:value-type="float">
            <text:p>450,682035557282</text:p>
          </table:table-cell>
          <table:table-cell table:style-name="ce1" table:formula="of:=-68 - ([.E193]^2/Ao)" office:value-type="float" office:value="-203.40953144937" calcext:value-type="float">
            <text:p>-203,40953144937</text:p>
          </table:table-cell>
          <table:table-cell table:style-name="ce1" table:formula="of:=[.G192]+h" office:value-type="float" office:value="1.91" calcext:value-type="float">
            <text:p>1,91</text:p>
          </table:table-cell>
          <table:table-cell table:style-name="ce1" table:formula="of:=[.H192]+ h*[.F193]" office:value-type="float" office:value="448.647940242788" calcext:value-type="float">
            <text:p>448,6479402427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3]" office:value-type="float" office:value="1.91" calcext:value-type="float">
            <text:p>1,91</text:p>
          </table:table-cell>
          <table:table-cell table:style-name="ce1" table:formula="of:=[.H193]" office:value-type="float" office:value="448.647940242788" calcext:value-type="float">
            <text:p>448,647940242788</text:p>
          </table:table-cell>
          <table:table-cell table:style-name="ce1" table:formula="of:=-68 - ([.E194]^2/Ao)" office:value-type="float" office:value="-202.189982856064" calcext:value-type="float">
            <text:p>-202,189982856064</text:p>
          </table:table-cell>
          <table:table-cell table:style-name="ce1" table:formula="of:=[.G193]+h" office:value-type="float" office:value="1.92" calcext:value-type="float">
            <text:p>1,92</text:p>
          </table:table-cell>
          <table:table-cell table:style-name="ce1" table:formula="of:=[.H193]+ h*[.F194]" office:value-type="float" office:value="446.626040414228" calcext:value-type="float">
            <text:p>446,6260404142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4]" office:value-type="float" office:value="1.92" calcext:value-type="float">
            <text:p>1,92</text:p>
          </table:table-cell>
          <table:table-cell table:style-name="ce1" table:formula="of:=[.H194]" office:value-type="float" office:value="446.626040414228" calcext:value-type="float">
            <text:p>446,626040414228</text:p>
          </table:table-cell>
          <table:table-cell table:style-name="ce1" table:formula="of:=-68 - ([.E195]^2/Ao)" office:value-type="float" office:value="-200.983213317394" calcext:value-type="float">
            <text:p>-200,983213317394</text:p>
          </table:table-cell>
          <table:table-cell table:style-name="ce1" table:formula="of:=[.G194]+h" office:value-type="float" office:value="1.93" calcext:value-type="float">
            <text:p>1,93</text:p>
          </table:table-cell>
          <table:table-cell table:style-name="ce1" table:formula="of:=[.H194]+ h*[.F195]" office:value-type="float" office:value="444.616208281054" calcext:value-type="float">
            <text:p>444,6162082810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5]" office:value-type="float" office:value="1.93" calcext:value-type="float">
            <text:p>1,93</text:p>
          </table:table-cell>
          <table:table-cell table:style-name="ce1" table:formula="of:=[.H195]" office:value-type="float" office:value="444.616208281054" calcext:value-type="float">
            <text:p>444,616208281054</text:p>
          </table:table-cell>
          <table:table-cell table:style-name="ce1" table:formula="of:=-68 - ([.E196]^2/Ao)" office:value-type="float" office:value="-199.789048444148" calcext:value-type="float">
            <text:p>-199,789048444148</text:p>
          </table:table-cell>
          <table:table-cell table:style-name="ce1" table:formula="of:=[.G195]+h" office:value-type="float" office:value="1.94" calcext:value-type="float">
            <text:p>1,94</text:p>
          </table:table-cell>
          <table:table-cell table:style-name="ce1" table:formula="of:=[.H195]+ h*[.F196]" office:value-type="float" office:value="442.618317796612" calcext:value-type="float">
            <text:p>442,6183177966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6]" office:value-type="float" office:value="1.94" calcext:value-type="float">
            <text:p>1,94</text:p>
          </table:table-cell>
          <table:table-cell table:style-name="ce1" table:formula="of:=[.H196]" office:value-type="float" office:value="442.618317796612" calcext:value-type="float">
            <text:p>442,618317796612</text:p>
          </table:table-cell>
          <table:table-cell table:style-name="ce1" table:formula="of:=-68 - ([.E197]^2/Ao)" office:value-type="float" office:value="-198.607316832735" calcext:value-type="float">
            <text:p>-198,607316832735</text:p>
          </table:table-cell>
          <table:table-cell table:style-name="ce1" table:formula="of:=[.G196]+h" office:value-type="float" office:value="1.95" calcext:value-type="float">
            <text:p>1,95</text:p>
          </table:table-cell>
          <table:table-cell table:style-name="ce1" table:formula="of:=[.H196]+ h*[.F197]" office:value-type="float" office:value="440.632244628285" calcext:value-type="float">
            <text:p>440,6322446282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7]" office:value-type="float" office:value="1.95" calcext:value-type="float">
            <text:p>1,95</text:p>
          </table:table-cell>
          <table:table-cell table:style-name="ce1" table:formula="of:=[.H197]" office:value-type="float" office:value="440.632244628285" calcext:value-type="float">
            <text:p>440,632244628285</text:p>
          </table:table-cell>
          <table:table-cell table:style-name="ce1" table:formula="of:=-68 - ([.E198]^2/Ao)" office:value-type="float" office:value="-197.437850004107" calcext:value-type="float">
            <text:p>-197,437850004107</text:p>
          </table:table-cell>
          <table:table-cell table:style-name="ce1" table:formula="of:=[.G197]+h" office:value-type="float" office:value="1.96" calcext:value-type="float">
            <text:p>1,96</text:p>
          </table:table-cell>
          <table:table-cell table:style-name="ce1" table:formula="of:=[.H197]+ h*[.F198]" office:value-type="float" office:value="438.657866128244" calcext:value-type="float">
            <text:p>438,6578661282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8]" office:value-type="float" office:value="1.96" calcext:value-type="float">
            <text:p>1,96</text:p>
          </table:table-cell>
          <table:table-cell table:style-name="ce1" table:formula="of:=[.H198]" office:value-type="float" office:value="438.657866128244" calcext:value-type="float">
            <text:p>438,657866128244</text:p>
          </table:table-cell>
          <table:table-cell table:style-name="ce1" table:formula="of:=-68 - ([.E199]^2/Ao)" office:value-type="float" office:value="-196.280482344123" calcext:value-type="float">
            <text:p>-196,280482344123</text:p>
          </table:table-cell>
          <table:table-cell table:style-name="ce1" table:formula="of:=[.G198]+h" office:value-type="float" office:value="1.97" calcext:value-type="float">
            <text:p>1,97</text:p>
          </table:table-cell>
          <table:table-cell table:style-name="ce1" table:formula="of:=[.H198]+ h*[.F199]" office:value-type="float" office:value="436.695061304803" calcext:value-type="float">
            <text:p>436,6950613048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9]" office:value-type="float" office:value="1.97" calcext:value-type="float">
            <text:p>1,97</text:p>
          </table:table-cell>
          <table:table-cell table:style-name="ce1" table:formula="of:=[.H199]" office:value-type="float" office:value="436.695061304803" calcext:value-type="float">
            <text:p>436,695061304803</text:p>
          </table:table-cell>
          <table:table-cell table:style-name="ce1" table:formula="of:=-68 - ([.E200]^2/Ao)" office:value-type="float" office:value="-195.135051045337" calcext:value-type="float">
            <text:p>-195,135051045337</text:p>
          </table:table-cell>
          <table:table-cell table:style-name="ce1" table:formula="of:=[.G199]+h" office:value-type="float" office:value="1.98" calcext:value-type="float">
            <text:p>1,98</text:p>
          </table:table-cell>
          <table:table-cell table:style-name="ce1" table:formula="of:=[.H199]+ h*[.F200]" office:value-type="float" office:value="434.743710794349" calcext:value-type="float">
            <text:p>434,7437107943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0]" office:value-type="float" office:value="1.98" calcext:value-type="float">
            <text:p>1,98</text:p>
          </table:table-cell>
          <table:table-cell table:style-name="ce1" table:formula="of:=[.H200]" office:value-type="float" office:value="434.743710794349" calcext:value-type="float">
            <text:p>434,743710794349</text:p>
          </table:table-cell>
          <table:table-cell table:style-name="ce1" table:formula="of:=-68 - ([.E201]^2/Ao)" office:value-type="float" office:value="-194.001396050161" calcext:value-type="float">
            <text:p>-194,001396050161</text:p>
          </table:table-cell>
          <table:table-cell table:style-name="ce1" table:formula="of:=[.G200]+h" office:value-type="float" office:value="1.99" calcext:value-type="float">
            <text:p>1,99</text:p>
          </table:table-cell>
          <table:table-cell table:style-name="ce1" table:formula="of:=[.H200]+ h*[.F201]" office:value-type="float" office:value="432.803696833848" calcext:value-type="float">
            <text:p>432,8036968338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1]" office:value-type="float" office:value="1.99" calcext:value-type="float">
            <text:p>1,99</text:p>
          </table:table-cell>
          <table:table-cell table:style-name="ce1" table:formula="of:=[.H201]" office:value-type="float" office:value="432.803696833848" calcext:value-type="float">
            <text:p>432,803696833848</text:p>
          </table:table-cell>
          <table:table-cell table:style-name="ce1" table:formula="of:=-68 - ([.E202]^2/Ao)" office:value-type="float" office:value="-192.879359995363" calcext:value-type="float">
            <text:p>-192,879359995363</text:p>
          </table:table-cell>
          <table:table-cell table:style-name="ce1" table:formula="of:=[.G201]+h" office:value-type="float" office:value="2" calcext:value-type="float">
            <text:p>2</text:p>
          </table:table-cell>
          <table:table-cell table:style-name="ce1" table:formula="of:=[.H201]+ h*[.F202]" office:value-type="float" office:value="430.874903233894" calcext:value-type="float">
            <text:p>430,8749032338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2]" office:value-type="float" office:value="2" calcext:value-type="float">
            <text:p>2</text:p>
          </table:table-cell>
          <table:table-cell table:style-name="ce1" table:formula="of:=[.H202]" office:value-type="float" office:value="430.874903233894" calcext:value-type="float">
            <text:p>430,874903233894</text:p>
          </table:table-cell>
          <table:table-cell table:style-name="ce1" table:formula="of:=-68 - ([.E203]^2/Ao)" office:value-type="float" office:value="-191.768788157878" calcext:value-type="float">
            <text:p>-191,768788157878</text:p>
          </table:table-cell>
          <table:table-cell table:style-name="ce1" table:formula="of:=[.G202]+h" office:value-type="float" office:value="2.01" calcext:value-type="float">
            <text:p>2,01</text:p>
          </table:table-cell>
          <table:table-cell table:style-name="ce1" table:formula="of:=[.H202]+ h*[.F203]" office:value-type="float" office:value="428.957215352315" calcext:value-type="float">
            <text:p>428,9572153523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3]" office:value-type="float" office:value="2.01" calcext:value-type="float">
            <text:p>2,01</text:p>
          </table:table-cell>
          <table:table-cell table:style-name="ce1" table:formula="of:=[.H203]" office:value-type="float" office:value="428.957215352315" calcext:value-type="float">
            <text:p>428,957215352315</text:p>
          </table:table-cell>
          <table:table-cell table:style-name="ce1" table:formula="of:=-68 - ([.E204]^2/Ao)" office:value-type="float" office:value="-190.669528401875" calcext:value-type="float">
            <text:p>-190,669528401875</text:p>
          </table:table-cell>
          <table:table-cell table:style-name="ce1" table:formula="of:=[.G203]+h" office:value-type="float" office:value="2.02" calcext:value-type="float">
            <text:p>2,02</text:p>
          </table:table-cell>
          <table:table-cell table:style-name="ce1" table:formula="of:=[.H203]+ h*[.F204]" office:value-type="float" office:value="427.050520068296" calcext:value-type="float">
            <text:p>427,0505200682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4]" office:value-type="float" office:value="2.02" calcext:value-type="float">
            <text:p>2,02</text:p>
          </table:table-cell>
          <table:table-cell table:style-name="ce1" table:formula="of:=[.H204]" office:value-type="float" office:value="427.050520068296" calcext:value-type="float">
            <text:p>427,050520068296</text:p>
          </table:table-cell>
          <table:table-cell table:style-name="ce1" table:formula="of:=-68 - ([.E205]^2/Ao)" office:value-type="float" office:value="-189.581431127068" calcext:value-type="float">
            <text:p>-189,581431127068</text:p>
          </table:table-cell>
          <table:table-cell table:style-name="ce1" table:formula="of:=[.G204]+h" office:value-type="float" office:value="2.03" calcext:value-type="float">
            <text:p>2,03</text:p>
          </table:table-cell>
          <table:table-cell table:style-name="ce1" table:formula="of:=[.H204]+ h*[.F205]" office:value-type="float" office:value="425.154705757026" calcext:value-type="float">
            <text:p>425,1547057570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5]" office:value-type="float" office:value="2.03" calcext:value-type="float">
            <text:p>2,03</text:p>
          </table:table-cell>
          <table:table-cell table:style-name="ce1" table:formula="of:=[.H205]" office:value-type="float" office:value="425.154705757026" calcext:value-type="float">
            <text:p>425,154705757026</text:p>
          </table:table-cell>
          <table:table-cell table:style-name="ce1" table:formula="of:=-68 - ([.E206]^2/Ao)" office:value-type="float" office:value="-188.504349218229" calcext:value-type="float">
            <text:p>-188,504349218229</text:p>
          </table:table-cell>
          <table:table-cell table:style-name="ce1" table:formula="of:=[.G205]+h" office:value-type="float" office:value="2.04" calcext:value-type="float">
            <text:p>2,04</text:p>
          </table:table-cell>
          <table:table-cell table:style-name="ce1" table:formula="of:=[.H205]+ h*[.F206]" office:value-type="float" office:value="423.269662264844" calcext:value-type="float">
            <text:p>423,2696622648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6]" office:value-type="float" office:value="2.04" calcext:value-type="float">
            <text:p>2,04</text:p>
          </table:table-cell>
          <table:table-cell table:style-name="ce1" table:formula="of:=[.H206]" office:value-type="float" office:value="423.269662264844" calcext:value-type="float">
            <text:p>423,269662264844</text:p>
          </table:table-cell>
          <table:table-cell table:style-name="ce1" table:formula="of:=-68 - ([.E207]^2/Ao)" office:value-type="float" office:value="-187.438137995863" calcext:value-type="float">
            <text:p>-187,438137995863</text:p>
          </table:table-cell>
          <table:table-cell table:style-name="ce1" table:formula="of:=[.G206]+h" office:value-type="float" office:value="2.05" calcext:value-type="float">
            <text:p>2,05</text:p>
          </table:table-cell>
          <table:table-cell table:style-name="ce1" table:formula="of:=[.H206]+ h*[.F207]" office:value-type="float" office:value="421.395280884885" calcext:value-type="float">
            <text:p>421,3952808848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7]" office:value-type="float" office:value="2.05" calcext:value-type="float">
            <text:p>2,05</text:p>
          </table:table-cell>
          <table:table-cell table:style-name="ce1" table:formula="of:=[.H207]" office:value-type="float" office:value="421.395280884885" calcext:value-type="float">
            <text:p>421,395280884885</text:p>
          </table:table-cell>
          <table:table-cell table:style-name="ce1" table:formula="of:=-68 - ([.E208]^2/Ao)" office:value-type="float" office:value="-186.382655168034" calcext:value-type="float">
            <text:p>-186,382655168034</text:p>
          </table:table-cell>
          <table:table-cell table:style-name="ce1" table:formula="of:=[.G207]+h" office:value-type="float" office:value="2.06" calcext:value-type="float">
            <text:p>2,06</text:p>
          </table:table-cell>
          <table:table-cell table:style-name="ce1" table:formula="of:=[.H207]+ h*[.F208]" office:value-type="float" office:value="419.531454333205" calcext:value-type="float">
            <text:p>419,5314543332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8]" office:value-type="float" office:value="2.06" calcext:value-type="float">
            <text:p>2,06</text:p>
          </table:table-cell>
          <table:table-cell table:style-name="ce1" table:formula="of:=[.H208]" office:value-type="float" office:value="419.531454333205" calcext:value-type="float">
            <text:p>419,531454333205</text:p>
          </table:table-cell>
          <table:table-cell table:style-name="ce1" table:formula="of:=-68 - ([.E209]^2/Ao)" office:value-type="float" office:value="-185.337760783289" calcext:value-type="float">
            <text:p>-185,337760783289</text:p>
          </table:table-cell>
          <table:table-cell table:style-name="ce1" table:formula="of:=[.G208]+h" office:value-type="float" office:value="2.07" calcext:value-type="float">
            <text:p>2,07</text:p>
          </table:table-cell>
          <table:table-cell table:style-name="ce1" table:formula="of:=[.H208]+ h*[.F209]" office:value-type="float" office:value="417.678076725372" calcext:value-type="float">
            <text:p>417,6780767253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9]" office:value-type="float" office:value="2.07" calcext:value-type="float">
            <text:p>2,07</text:p>
          </table:table-cell>
          <table:table-cell table:style-name="ce1" table:formula="of:=[.H209]" office:value-type="float" office:value="417.678076725372" calcext:value-type="float">
            <text:p>417,678076725372</text:p>
          </table:table-cell>
          <table:table-cell table:style-name="ce1" table:formula="of:=-68 - ([.E210]^2/Ao)" office:value-type="float" office:value="-184.30331718467" calcext:value-type="float">
            <text:p>-184,30331718467</text:p>
          </table:table-cell>
          <table:table-cell table:style-name="ce1" table:formula="of:=[.G209]+h" office:value-type="float" office:value="2.08" calcext:value-type="float">
            <text:p>2,08</text:p>
          </table:table-cell>
          <table:table-cell table:style-name="ce1" table:formula="of:=[.H209]+ h*[.F210]" office:value-type="float" office:value="415.835043553525" calcext:value-type="float">
            <text:p>415,8350435535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0]" office:value-type="float" office:value="2.08" calcext:value-type="float">
            <text:p>2,08</text:p>
          </table:table-cell>
          <table:table-cell table:style-name="ce1" table:formula="of:=[.H210]" office:value-type="float" office:value="415.835043553525" calcext:value-type="float">
            <text:p>415,835043553525</text:p>
          </table:table-cell>
          <table:table-cell table:style-name="ce1" table:formula="of:=-68 - ([.E211]^2/Ao)" office:value-type="float" office:value="-183.279188964775" calcext:value-type="float">
            <text:p>-183,279188964775</text:p>
          </table:table-cell>
          <table:table-cell table:style-name="ce1" table:formula="of:=[.G210]+h" office:value-type="float" office:value="2.09" calcext:value-type="float">
            <text:p>2,09</text:p>
          </table:table-cell>
          <table:table-cell table:style-name="ce1" table:formula="of:=[.H210]+ h*[.F211]" office:value-type="float" office:value="414.002251663877" calcext:value-type="float">
            <text:p>414,0022516638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1]" office:value-type="float" office:value="2.09" calcext:value-type="float">
            <text:p>2,09</text:p>
          </table:table-cell>
          <table:table-cell table:style-name="ce1" table:formula="of:=[.H211]" office:value-type="float" office:value="414.002251663877" calcext:value-type="float">
            <text:p>414,002251663877</text:p>
          </table:table-cell>
          <table:table-cell table:style-name="ce1" table:formula="of:=-68 - ([.E212]^2/Ao)" office:value-type="float" office:value="-182.26524292184" calcext:value-type="float">
            <text:p>-182,26524292184</text:p>
          </table:table-cell>
          <table:table-cell table:style-name="ce1" table:formula="of:=[.G211]+h" office:value-type="float" office:value="2.1" calcext:value-type="float">
            <text:p>2,1</text:p>
          </table:table-cell>
          <table:table-cell table:style-name="ce1" table:formula="of:=[.H211]+ h*[.F212]" office:value-type="float" office:value="412.179599234659" calcext:value-type="float">
            <text:p>412,1795992346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2]" office:value-type="float" office:value="2.1" calcext:value-type="float">
            <text:p>2,1</text:p>
          </table:table-cell>
          <table:table-cell table:style-name="ce1" table:formula="of:=[.H212]" office:value-type="float" office:value="412.179599234659" calcext:value-type="float">
            <text:p>412,179599234659</text:p>
          </table:table-cell>
          <table:table-cell table:style-name="ce1" table:formula="of:=-68 - ([.E213]^2/Ao)" office:value-type="float" office:value="-181.261348016829" calcext:value-type="float">
            <text:p>-181,261348016829</text:p>
          </table:table-cell>
          <table:table-cell table:style-name="ce1" table:formula="of:=[.G212]+h" office:value-type="float" office:value="2.11" calcext:value-type="float">
            <text:p>2,11</text:p>
          </table:table-cell>
          <table:table-cell table:style-name="ce1" table:formula="of:=[.H212]+ h*[.F213]" office:value-type="float" office:value="410.366985754491" calcext:value-type="float">
            <text:p>410,3669857544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3]" office:value-type="float" office:value="2.11" calcext:value-type="float">
            <text:p>2,11</text:p>
          </table:table-cell>
          <table:table-cell table:style-name="ce1" table:formula="of:=[.H213]" office:value-type="float" office:value="410.366985754491" calcext:value-type="float">
            <text:p>410,366985754491</text:p>
          </table:table-cell>
          <table:table-cell table:style-name="ce1" table:formula="of:=-68 - ([.E214]^2/Ao)" office:value-type="float" office:value="-180.267375331484" calcext:value-type="float">
            <text:p>-180,267375331484</text:p>
          </table:table-cell>
          <table:table-cell table:style-name="ce1" table:formula="of:=[.G213]+h" office:value-type="float" office:value="2.12" calcext:value-type="float">
            <text:p>2,12</text:p>
          </table:table-cell>
          <table:table-cell table:style-name="ce1" table:formula="of:=[.H213]+ h*[.F214]" office:value-type="float" office:value="408.564312001176" calcext:value-type="float">
            <text:p>408,5643120011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4]" office:value-type="float" office:value="2.12" calcext:value-type="float">
            <text:p>2,12</text:p>
          </table:table-cell>
          <table:table-cell table:style-name="ce1" table:formula="of:=[.H214]" office:value-type="float" office:value="408.564312001176" calcext:value-type="float">
            <text:p>408,564312001176</text:p>
          </table:table-cell>
          <table:table-cell table:style-name="ce1" table:formula="of:=-68 - ([.E215]^2/Ao)" office:value-type="float" office:value="-179.283198027329" calcext:value-type="float">
            <text:p>-179,283198027329</text:p>
          </table:table-cell>
          <table:table-cell table:style-name="ce1" table:formula="of:=[.G214]+h" office:value-type="float" office:value="2.13" calcext:value-type="float">
            <text:p>2,13</text:p>
          </table:table-cell>
          <table:table-cell table:style-name="ce1" table:formula="of:=[.H214]+ h*[.F215]" office:value-type="float" office:value="406.771480020902" calcext:value-type="float">
            <text:p>406,7714800209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5]" office:value-type="float" office:value="2.13" calcext:value-type="float">
            <text:p>2,13</text:p>
          </table:table-cell>
          <table:table-cell table:style-name="ce1" table:formula="of:=[.H215]" office:value-type="float" office:value="406.771480020902" calcext:value-type="float">
            <text:p>406,771480020902</text:p>
          </table:table-cell>
          <table:table-cell table:style-name="ce1" table:formula="of:=-68 - ([.E216]^2/Ao)" office:value-type="float" office:value="-178.308691305597" calcext:value-type="float">
            <text:p>-178,308691305597</text:p>
          </table:table-cell>
          <table:table-cell table:style-name="ce1" table:formula="of:=[.G215]+h" office:value-type="float" office:value="2.14" calcext:value-type="float">
            <text:p>2,14</text:p>
          </table:table-cell>
          <table:table-cell table:style-name="ce1" table:formula="of:=[.H215]+ h*[.F216]" office:value-type="float" office:value="404.988393107846" calcext:value-type="float">
            <text:p>404,9883931078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6]" office:value-type="float" office:value="2.14" calcext:value-type="float">
            <text:p>2,14</text:p>
          </table:table-cell>
          <table:table-cell table:style-name="ce1" table:formula="of:=[.H216]" office:value-type="float" office:value="404.988393107846" calcext:value-type="float">
            <text:p>404,988393107846</text:p>
          </table:table-cell>
          <table:table-cell table:style-name="ce1" table:formula="of:=-68 - ([.E217]^2/Ao)" office:value-type="float" office:value="-177.34373236805" calcext:value-type="float">
            <text:p>-177,34373236805</text:p>
          </table:table-cell>
          <table:table-cell table:style-name="ce1" table:formula="of:=[.G216]+h" office:value-type="float" office:value="2.15" calcext:value-type="float">
            <text:p>2,15</text:p>
          </table:table-cell>
          <table:table-cell table:style-name="ce1" table:formula="of:=[.H216]+ h*[.F217]" office:value-type="float" office:value="403.214955784166" calcext:value-type="float">
            <text:p>403,2149557841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7]" office:value-type="float" office:value="2.15" calcext:value-type="float">
            <text:p>2,15</text:p>
          </table:table-cell>
          <table:table-cell table:style-name="ce1" table:formula="of:=[.H217]" office:value-type="float" office:value="403.214955784166" calcext:value-type="float">
            <text:p>403,214955784166</text:p>
          </table:table-cell>
          <table:table-cell table:style-name="ce1" table:formula="of:=-68 - ([.E218]^2/Ao)" office:value-type="float" office:value="-176.388200378685" calcext:value-type="float">
            <text:p>-176,388200378685</text:p>
          </table:table-cell>
          <table:table-cell table:style-name="ce1" table:formula="of:=[.G217]+h" office:value-type="float" office:value="2.16" calcext:value-type="float">
            <text:p>2,16</text:p>
          </table:table-cell>
          <table:table-cell table:style-name="ce1" table:formula="of:=[.H217]+ h*[.F218]" office:value-type="float" office:value="401.451073780379" calcext:value-type="float">
            <text:p>401,4510737803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8]" office:value-type="float" office:value="2.16" calcext:value-type="float">
            <text:p>2,16</text:p>
          </table:table-cell>
          <table:table-cell table:style-name="ce1" table:formula="of:=[.H218]" office:value-type="float" office:value="401.451073780379" calcext:value-type="float">
            <text:p>401,451073780379</text:p>
          </table:table-cell>
          <table:table-cell table:style-name="ce1" table:formula="of:=-68 - ([.E219]^2/Ao)" office:value-type="float" office:value="-175.44197642628" calcext:value-type="float">
            <text:p>-175,44197642628</text:p>
          </table:table-cell>
          <table:table-cell table:style-name="ce1" table:formula="of:=[.G218]+h" office:value-type="float" office:value="2.17" calcext:value-type="float">
            <text:p>2,17</text:p>
          </table:table-cell>
          <table:table-cell table:style-name="ce1" table:formula="of:=[.H218]+ h*[.F219]" office:value-type="float" office:value="399.696654016116" calcext:value-type="float">
            <text:p>399,6966540161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9]" office:value-type="float" office:value="2.17" calcext:value-type="float">
            <text:p>2,17</text:p>
          </table:table-cell>
          <table:table-cell table:style-name="ce1" table:formula="of:=[.H219]" office:value-type="float" office:value="399.696654016116" calcext:value-type="float">
            <text:p>399,696654016116</text:p>
          </table:table-cell>
          <table:table-cell table:style-name="ce1" table:formula="of:=-68 - ([.E220]^2/Ao)" office:value-type="float" office:value="-174.504943487786" calcext:value-type="float">
            <text:p>-174,504943487786</text:p>
          </table:table-cell>
          <table:table-cell table:style-name="ce1" table:formula="of:=[.G219]+h" office:value-type="float" office:value="2.18" calcext:value-type="float">
            <text:p>2,18</text:p>
          </table:table-cell>
          <table:table-cell table:style-name="ce1" table:formula="of:=[.H219]+ h*[.F220]" office:value-type="float" office:value="397.951604581238" calcext:value-type="float">
            <text:p>397,9516045812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0]" office:value-type="float" office:value="2.18" calcext:value-type="float">
            <text:p>2,18</text:p>
          </table:table-cell>
          <table:table-cell table:style-name="ce1" table:formula="of:=[.H220]" office:value-type="float" office:value="397.951604581238" calcext:value-type="float">
            <text:p>397,951604581238</text:p>
          </table:table-cell>
          <table:table-cell table:style-name="ce1" table:formula="of:=-68 - ([.E221]^2/Ao)" office:value-type="float" office:value="-173.576986392522" calcext:value-type="float">
            <text:p>-173,576986392522</text:p>
          </table:table-cell>
          <table:table-cell table:style-name="ce1" table:formula="of:=[.G220]+h" office:value-type="float" office:value="2.19" calcext:value-type="float">
            <text:p>2,19</text:p>
          </table:table-cell>
          <table:table-cell table:style-name="ce1" table:formula="of:=[.H220]+ h*[.F221]" office:value-type="float" office:value="396.215834717313" calcext:value-type="float">
            <text:p>396,2158347173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1]" office:value-type="float" office:value="2.19" calcext:value-type="float">
            <text:p>2,19</text:p>
          </table:table-cell>
          <table:table-cell table:style-name="ce1" table:formula="of:=[.H221]" office:value-type="float" office:value="396.215834717313" calcext:value-type="float">
            <text:p>396,215834717313</text:p>
          </table:table-cell>
          <table:table-cell table:style-name="ce1" table:formula="of:=-68 - ([.E222]^2/Ao)" office:value-type="float" office:value="-172.657991787158" calcext:value-type="float">
            <text:p>-172,657991787158</text:p>
          </table:table-cell>
          <table:table-cell table:style-name="ce1" table:formula="of:=[.G221]+h" office:value-type="float" office:value="2.2" calcext:value-type="float">
            <text:p>2,2</text:p>
          </table:table-cell>
          <table:table-cell table:style-name="ce1" table:formula="of:=[.H221]+ h*[.F222]" office:value-type="float" office:value="394.489254799442" calcext:value-type="float">
            <text:p>394,4892547994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2]" office:value-type="float" office:value="2.2" calcext:value-type="float">
            <text:p>2,2</text:p>
          </table:table-cell>
          <table:table-cell table:style-name="ce1" table:formula="of:=[.H222]" office:value-type="float" office:value="394.489254799442" calcext:value-type="float">
            <text:p>394,489254799442</text:p>
          </table:table-cell>
          <table:table-cell table:style-name="ce1" table:formula="of:=-68 - ([.E223]^2/Ao)" office:value-type="float" office:value="-171.747848101479" calcext:value-type="float">
            <text:p>-171,747848101479</text:p>
          </table:table-cell>
          <table:table-cell table:style-name="ce1" table:formula="of:=[.G222]+h" office:value-type="float" office:value="2.21" calcext:value-type="float">
            <text:p>2,21</text:p>
          </table:table-cell>
          <table:table-cell table:style-name="ce1" table:formula="of:=[.H222]+ h*[.F223]" office:value-type="float" office:value="392.771776318427" calcext:value-type="float">
            <text:p>392,7717763184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3]" office:value-type="float" office:value="2.21" calcext:value-type="float">
            <text:p>2,21</text:p>
          </table:table-cell>
          <table:table-cell table:style-name="ce1" table:formula="of:=[.H223]" office:value-type="float" office:value="392.771776318427" calcext:value-type="float">
            <text:p>392,771776318427</text:p>
          </table:table-cell>
          <table:table-cell table:style-name="ce1" table:formula="of:=-68 - ([.E224]^2/Ao)" office:value-type="float" office:value="-170.846445514888" calcext:value-type="float">
            <text:p>-170,846445514888</text:p>
          </table:table-cell>
          <table:table-cell table:style-name="ce1" table:formula="of:=[.G223]+h" office:value-type="float" office:value="2.22" calcext:value-type="float">
            <text:p>2,22</text:p>
          </table:table-cell>
          <table:table-cell table:style-name="ce1" table:formula="of:=[.H223]+ h*[.F224]" office:value-type="float" office:value="391.063311863278" calcext:value-type="float">
            <text:p>391,0633118632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4]" office:value-type="float" office:value="2.22" calcext:value-type="float">
            <text:p>2,22</text:p>
          </table:table-cell>
          <table:table-cell table:style-name="ce1" table:formula="of:=[.H224]" office:value-type="float" office:value="391.063311863278" calcext:value-type="float">
            <text:p>391,063311863278</text:p>
          </table:table-cell>
          <table:table-cell table:style-name="ce1" table:formula="of:=-68 - ([.E225]^2/Ao)" office:value-type="float" office:value="-169.95367592365" calcext:value-type="float">
            <text:p>-169,95367592365</text:p>
          </table:table-cell>
          <table:table-cell table:style-name="ce1" table:formula="of:=[.G224]+h" office:value-type="float" office:value="2.23" calcext:value-type="float">
            <text:p>2,23</text:p>
          </table:table-cell>
          <table:table-cell table:style-name="ce1" table:formula="of:=[.H224]+ h*[.F225]" office:value-type="float" office:value="389.363775104042" calcext:value-type="float">
            <text:p>389,3637751040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5]" office:value-type="float" office:value="2.23" calcext:value-type="float">
            <text:p>2,23</text:p>
          </table:table-cell>
          <table:table-cell table:style-name="ce1" table:formula="of:=[.H225]" office:value-type="float" office:value="389.363775104042" calcext:value-type="float">
            <text:p>389,363775104042</text:p>
          </table:table-cell>
          <table:table-cell table:style-name="ce1" table:formula="of:=-68 - ([.E226]^2/Ao)" office:value-type="float" office:value="-169.069432908847" calcext:value-type="float">
            <text:p>-169,069432908847</text:p>
          </table:table-cell>
          <table:table-cell table:style-name="ce1" table:formula="of:=[.G225]+h" office:value-type="float" office:value="2.24" calcext:value-type="float">
            <text:p>2,24</text:p>
          </table:table-cell>
          <table:table-cell table:style-name="ce1" table:formula="of:=[.H225]+ h*[.F226]" office:value-type="float" office:value="387.673080774953" calcext:value-type="float">
            <text:p>387,673080774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6]" office:value-type="float" office:value="2.24" calcext:value-type="float">
            <text:p>2,24</text:p>
          </table:table-cell>
          <table:table-cell table:style-name="ce1" table:formula="of:=[.H226]" office:value-type="float" office:value="387.673080774953" calcext:value-type="float">
            <text:p>387,673080774953</text:p>
          </table:table-cell>
          <table:table-cell table:style-name="ce1" table:formula="of:=-68 - ([.E227]^2/Ao)" office:value-type="float" office:value="-168.193611705029" calcext:value-type="float">
            <text:p>-168,193611705029</text:p>
          </table:table-cell>
          <table:table-cell table:style-name="ce1" table:formula="of:=[.G226]+h" office:value-type="float" office:value="2.25" calcext:value-type="float">
            <text:p>2,25</text:p>
          </table:table-cell>
          <table:table-cell table:style-name="ce1" table:formula="of:=[.H226]+ h*[.F227]" office:value-type="float" office:value="385.991144657903" calcext:value-type="float">
            <text:p>385,9911446579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7]" office:value-type="float" office:value="2.25" calcext:value-type="float">
            <text:p>2,25</text:p>
          </table:table-cell>
          <table:table-cell table:style-name="ce1" table:formula="of:=[.H227]" office:value-type="float" office:value="385.991144657903" calcext:value-type="float">
            <text:p>385,991144657903</text:p>
          </table:table-cell>
          <table:table-cell table:style-name="ce1" table:formula="of:=-68 - ([.E228]^2/Ao)" office:value-type="float" office:value="-167.326109169545" calcext:value-type="float">
            <text:p>-167,326109169545</text:p>
          </table:table-cell>
          <table:table-cell table:style-name="ce1" table:formula="of:=[.G227]+h" office:value-type="float" office:value="2.26" calcext:value-type="float">
            <text:p>2,26</text:p>
          </table:table-cell>
          <table:table-cell table:style-name="ce1" table:formula="of:=[.H227]+ h*[.F228]" office:value-type="float" office:value="384.317883566207" calcext:value-type="float">
            <text:p>384,3178835662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8]" office:value-type="float" office:value="2.26" calcext:value-type="float">
            <text:p>2,26</text:p>
          </table:table-cell>
          <table:table-cell table:style-name="ce1" table:formula="of:=[.H228]" office:value-type="float" office:value="384.317883566207" calcext:value-type="float">
            <text:p>384,317883566207</text:p>
          </table:table-cell>
          <table:table-cell table:style-name="ce1" table:formula="of:=-68 - ([.E229]^2/Ao)" office:value-type="float" office:value="-166.466823752539" calcext:value-type="float">
            <text:p>-166,466823752539</text:p>
          </table:table-cell>
          <table:table-cell table:style-name="ce1" table:formula="of:=[.G228]+h" office:value-type="float" office:value="2.27" calcext:value-type="float">
            <text:p>2,27</text:p>
          </table:table-cell>
          <table:table-cell table:style-name="ce1" table:formula="of:=[.H228]+ h*[.F229]" office:value-type="float" office:value="382.653215328682" calcext:value-type="float">
            <text:p>382,6532153286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9]" office:value-type="float" office:value="2.27" calcext:value-type="float">
            <text:p>2,27</text:p>
          </table:table-cell>
          <table:table-cell table:style-name="ce1" table:formula="of:=[.H229]" office:value-type="float" office:value="382.653215328682" calcext:value-type="float">
            <text:p>382,653215328682</text:p>
          </table:table-cell>
          <table:table-cell table:style-name="ce1" table:formula="of:=-68 - ([.E230]^2/Ao)" office:value-type="float" office:value="-165.615655467586" calcext:value-type="float">
            <text:p>-165,615655467586</text:p>
          </table:table-cell>
          <table:table-cell table:style-name="ce1" table:formula="of:=[.G229]+h" office:value-type="float" office:value="2.28" calcext:value-type="float">
            <text:p>2,28</text:p>
          </table:table-cell>
          <table:table-cell table:style-name="ce1" table:formula="of:=[.H229]+ h*[.F230]" office:value-type="float" office:value="380.997058774006" calcext:value-type="float">
            <text:p>380,9970587740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0]" office:value-type="float" office:value="2.28" calcext:value-type="float">
            <text:p>2,28</text:p>
          </table:table-cell>
          <table:table-cell table:style-name="ce1" table:formula="of:=[.H230]" office:value-type="float" office:value="380.997058774006" calcext:value-type="float">
            <text:p>380,997058774006</text:p>
          </table:table-cell>
          <table:table-cell table:style-name="ce1" table:formula="of:=-68 - ([.E231]^2/Ao)" office:value-type="float" office:value="-164.772505862962" calcext:value-type="float">
            <text:p>-164,772505862962</text:p>
          </table:table-cell>
          <table:table-cell table:style-name="ce1" table:formula="of:=[.G230]+h" office:value-type="float" office:value="2.29" calcext:value-type="float">
            <text:p>2,29</text:p>
          </table:table-cell>
          <table:table-cell table:style-name="ce1" table:formula="of:=[.H230]+ h*[.F231]" office:value-type="float" office:value="379.349333715376" calcext:value-type="float">
            <text:p>379,3493337153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1]" office:value-type="float" office:value="2.29" calcext:value-type="float">
            <text:p>2,29</text:p>
          </table:table-cell>
          <table:table-cell table:style-name="ce1" table:formula="of:=[.H231]" office:value-type="float" office:value="379.349333715376" calcext:value-type="float">
            <text:p>379,349333715376</text:p>
          </table:table-cell>
          <table:table-cell table:style-name="ce1" table:formula="of:=-68 - ([.E232]^2/Ao)" office:value-type="float" office:value="-163.937277993533" calcext:value-type="float">
            <text:p>-163,937277993533</text:p>
          </table:table-cell>
          <table:table-cell table:style-name="ce1" table:formula="of:=[.G231]+h" office:value-type="float" office:value="2.3" calcext:value-type="float">
            <text:p>2,3</text:p>
          </table:table-cell>
          <table:table-cell table:style-name="ce1" table:formula="of:=[.H231]+ h*[.F232]" office:value-type="float" office:value="377.709960935441" calcext:value-type="float">
            <text:p>377,7099609354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2]" office:value-type="float" office:value="2.3" calcext:value-type="float">
            <text:p>2,3</text:p>
          </table:table-cell>
          <table:table-cell table:style-name="ce1" table:formula="of:=[.H232]" office:value-type="float" office:value="377.709960935441" calcext:value-type="float">
            <text:p>377,709960935441</text:p>
          </table:table-cell>
          <table:table-cell table:style-name="ce1" table:formula="of:=-68 - ([.E233]^2/Ao)" office:value-type="float" office:value="-163.109876393235" calcext:value-type="float">
            <text:p>-163,109876393235</text:p>
          </table:table-cell>
          <table:table-cell table:style-name="ce1" table:formula="of:=[.G232]+h" office:value-type="float" office:value="2.30999999999999" calcext:value-type="float">
            <text:p>2,30999999999999</text:p>
          </table:table-cell>
          <table:table-cell table:style-name="ce1" table:formula="of:=[.H232]+ h*[.F233]" office:value-type="float" office:value="376.078862171509" calcext:value-type="float">
            <text:p>376,0788621715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3]" office:value-type="float" office:value="2.30999999999999" calcext:value-type="float">
            <text:p>2,30999999999999</text:p>
          </table:table-cell>
          <table:table-cell table:style-name="ce1" table:formula="of:=[.H233]" office:value-type="float" office:value="376.078862171509" calcext:value-type="float">
            <text:p>376,078862171509</text:p>
          </table:table-cell>
          <table:table-cell table:style-name="ce1" table:formula="of:=-68 - ([.E234]^2/Ao)" office:value-type="float" office:value="-162.290207048144" calcext:value-type="float">
            <text:p>-162,290207048144</text:p>
          </table:table-cell>
          <table:table-cell table:style-name="ce1" table:formula="of:=[.G233]+h" office:value-type="float" office:value="2.31999999999999" calcext:value-type="float">
            <text:p>2,31999999999999</text:p>
          </table:table-cell>
          <table:table-cell table:style-name="ce1" table:formula="of:=[.H233]+ h*[.F234]" office:value-type="float" office:value="374.455960101027" calcext:value-type="float">
            <text:p>374,4559601010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4]" office:value-type="float" office:value="2.31999999999999" calcext:value-type="float">
            <text:p>2,31999999999999</text:p>
          </table:table-cell>
          <table:table-cell table:style-name="ce1" table:formula="of:=[.H234]" office:value-type="float" office:value="374.455960101027" calcext:value-type="float">
            <text:p>374,455960101027</text:p>
          </table:table-cell>
          <table:table-cell table:style-name="ce1" table:formula="of:=-68 - ([.E235]^2/Ao)" office:value-type="float" office:value="-161.478177370121" calcext:value-type="float">
            <text:p>-161,478177370121</text:p>
          </table:table-cell>
          <table:table-cell table:style-name="ce1" table:formula="of:=[.G234]+h" office:value-type="float" office:value="2.32999999999999" calcext:value-type="float">
            <text:p>2,32999999999999</text:p>
          </table:table-cell>
          <table:table-cell table:style-name="ce1" table:formula="of:=[.H234]+ h*[.F235]" office:value-type="float" office:value="372.841178327326" calcext:value-type="float">
            <text:p>372,8411783273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5]" office:value-type="float" office:value="2.32999999999999" calcext:value-type="float">
            <text:p>2,32999999999999</text:p>
          </table:table-cell>
          <table:table-cell table:style-name="ce1" table:formula="of:=[.H235]" office:value-type="float" office:value="372.841178327326" calcext:value-type="float">
            <text:p>372,841178327326</text:p>
          </table:table-cell>
          <table:table-cell table:style-name="ce1" table:formula="of:=-68 - ([.E236]^2/Ao)" office:value-type="float" office:value="-160.673696171006" calcext:value-type="float">
            <text:p>-160,673696171006</text:p>
          </table:table-cell>
          <table:table-cell table:style-name="ce1" table:formula="of:=[.G235]+h" office:value-type="float" office:value="2.33999999999999" calcext:value-type="float">
            <text:p>2,33999999999999</text:p>
          </table:table-cell>
          <table:table-cell table:style-name="ce1" table:formula="of:=[.H235]+ h*[.F236]" office:value-type="float" office:value="371.234441365616" calcext:value-type="float">
            <text:p>371,2344413656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6]" office:value-type="float" office:value="2.33999999999999" calcext:value-type="float">
            <text:p>2,33999999999999</text:p>
          </table:table-cell>
          <table:table-cell table:style-name="ce1" table:formula="of:=[.H236]" office:value-type="float" office:value="371.234441365616" calcext:value-type="float">
            <text:p>371,234441365616</text:p>
          </table:table-cell>
          <table:table-cell table:style-name="ce1" table:formula="of:=-68 - ([.E237]^2/Ao)" office:value-type="float" office:value="-159.876673637361" calcext:value-type="float">
            <text:p>-159,876673637361</text:p>
          </table:table-cell>
          <table:table-cell table:style-name="ce1" table:formula="of:=[.G236]+h" office:value-type="float" office:value="2.34999999999999" calcext:value-type="float">
            <text:p>2,34999999999999</text:p>
          </table:table-cell>
          <table:table-cell table:style-name="ce1" table:formula="of:=[.H236]+ h*[.F237]" office:value-type="float" office:value="369.635674629242" calcext:value-type="float">
            <text:p>369,6356746292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7]" office:value-type="float" office:value="2.34999999999999" calcext:value-type="float">
            <text:p>2,34999999999999</text:p>
          </table:table-cell>
          <table:table-cell table:style-name="ce1" table:formula="of:=[.H237]" office:value-type="float" office:value="369.635674629242" calcext:value-type="float">
            <text:p>369,635674629242</text:p>
          </table:table-cell>
          <table:table-cell table:style-name="ce1" table:formula="of:=-68 - ([.E238]^2/Ao)" office:value-type="float" office:value="-159.087021305743" calcext:value-type="float">
            <text:p>-159,087021305743</text:p>
          </table:table-cell>
          <table:table-cell table:style-name="ce1" table:formula="of:=[.G237]+h" office:value-type="float" office:value="2.35999999999999" calcext:value-type="float">
            <text:p>2,35999999999999</text:p>
          </table:table-cell>
          <table:table-cell table:style-name="ce1" table:formula="of:=[.H237]+ h*[.F238]" office:value-type="float" office:value="368.044804416185" calcext:value-type="float">
            <text:p>368,0448044161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8]" office:value-type="float" office:value="2.35999999999999" calcext:value-type="float">
            <text:p>2,35999999999999</text:p>
          </table:table-cell>
          <table:table-cell table:style-name="ce1" table:formula="of:=[.H238]" office:value-type="float" office:value="368.044804416185" calcext:value-type="float">
            <text:p>368,044804416185</text:p>
          </table:table-cell>
          <table:table-cell table:style-name="ce1" table:formula="of:=-68 - ([.E239]^2/Ao)" office:value-type="float" office:value="-158.304652038499" calcext:value-type="float">
            <text:p>-158,304652038499</text:p>
          </table:table-cell>
          <table:table-cell table:style-name="ce1" table:formula="of:=[.G238]+h" office:value-type="float" office:value="2.36999999999999" calcext:value-type="float">
            <text:p>2,36999999999999</text:p>
          </table:table-cell>
          <table:table-cell table:style-name="ce1" table:formula="of:=[.H238]+ h*[.F239]" office:value-type="float" office:value="366.4617578958" calcext:value-type="float">
            <text:p>366,46175789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9]" office:value-type="float" office:value="2.36999999999999" calcext:value-type="float">
            <text:p>2,36999999999999</text:p>
          </table:table-cell>
          <table:table-cell table:style-name="ce1" table:formula="of:=[.H239]" office:value-type="float" office:value="366.4617578958" calcext:value-type="float">
            <text:p>366,4617578958</text:p>
          </table:table-cell>
          <table:table-cell table:style-name="ce1" table:formula="of:=-68 - ([.E240]^2/Ao)" office:value-type="float" office:value="-157.529480000053" calcext:value-type="float">
            <text:p>-157,529480000053</text:p>
          </table:table-cell>
          <table:table-cell table:style-name="ce1" table:formula="of:=[.G239]+h" office:value-type="float" office:value="2.37999999999999" calcext:value-type="float">
            <text:p>2,37999999999999</text:p>
          </table:table-cell>
          <table:table-cell table:style-name="ce1" table:formula="of:=[.H239]+ h*[.F240]" office:value-type="float" office:value="364.8864630958" calcext:value-type="float">
            <text:p>364,88646309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0]" office:value-type="float" office:value="2.37999999999999" calcext:value-type="float">
            <text:p>2,37999999999999</text:p>
          </table:table-cell>
          <table:table-cell table:style-name="ce1" table:formula="of:=[.H240]" office:value-type="float" office:value="364.8864630958" calcext:value-type="float">
            <text:p>364,8864630958</text:p>
          </table:table-cell>
          <table:table-cell table:style-name="ce1" table:formula="of:=-68 - ([.E241]^2/Ao)" office:value-type="float" office:value="-156.761420633708" calcext:value-type="float">
            <text:p>-156,761420633708</text:p>
          </table:table-cell>
          <table:table-cell table:style-name="ce1" table:formula="of:=[.G240]+h" office:value-type="float" office:value="2.38999999999999" calcext:value-type="float">
            <text:p>2,38999999999999</text:p>
          </table:table-cell>
          <table:table-cell table:style-name="ce1" table:formula="of:=[.H240]+ h*[.F241]" office:value-type="float" office:value="363.318848889462" calcext:value-type="float">
            <text:p>363,3188488894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1]" office:value-type="float" office:value="2.38999999999999" calcext:value-type="float">
            <text:p>2,38999999999999</text:p>
          </table:table-cell>
          <table:table-cell table:style-name="ce1" table:formula="of:=[.H241]" office:value-type="float" office:value="363.318848889462" calcext:value-type="float">
            <text:p>363,318848889462</text:p>
          </table:table-cell>
          <table:table-cell table:style-name="ce1" table:formula="of:=-68 - ([.E242]^2/Ao)" office:value-type="float" office:value="-156.000390638909" calcext:value-type="float">
            <text:p>-156,000390638909</text:p>
          </table:table-cell>
          <table:table-cell table:style-name="ce1" table:formula="of:=[.G241]+h" office:value-type="float" office:value="2.39999999999999" calcext:value-type="float">
            <text:p>2,39999999999999</text:p>
          </table:table-cell>
          <table:table-cell table:style-name="ce1" table:formula="of:=[.H241]+ h*[.F242]" office:value-type="float" office:value="361.758844983073" calcext:value-type="float">
            <text:p>361,7588449830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2]" office:value-type="float" office:value="2.39999999999999" calcext:value-type="float">
            <text:p>2,39999999999999</text:p>
          </table:table-cell>
          <table:table-cell table:style-name="ce1" table:formula="of:=[.H242]" office:value-type="float" office:value="361.758844983073" calcext:value-type="float">
            <text:p>361,758844983073</text:p>
          </table:table-cell>
          <table:table-cell table:style-name="ce1" table:formula="of:=-68 - ([.E243]^2/Ao)" office:value-type="float" office:value="-155.246307948992" calcext:value-type="float">
            <text:p>-155,246307948992</text:p>
          </table:table-cell>
          <table:table-cell table:style-name="ce1" table:formula="of:=[.G242]+h" office:value-type="float" office:value="2.40999999999999" calcext:value-type="float">
            <text:p>2,40999999999999</text:p>
          </table:table-cell>
          <table:table-cell table:style-name="ce1" table:formula="of:=[.H242]+ h*[.F243]" office:value-type="float" office:value="360.206381903583" calcext:value-type="float">
            <text:p>360,2063819035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3]" office:value-type="float" office:value="2.40999999999999" calcext:value-type="float">
            <text:p>2,40999999999999</text:p>
          </table:table-cell>
          <table:table-cell table:style-name="ce1" table:formula="of:=[.H243]" office:value-type="float" office:value="360.206381903583" calcext:value-type="float">
            <text:p>360,206381903583</text:p>
          </table:table-cell>
          <table:table-cell table:style-name="ce1" table:formula="of:=-68 - ([.E244]^2/Ao)" office:value-type="float" office:value="-154.49909170938" calcext:value-type="float">
            <text:p>-154,49909170938</text:p>
          </table:table-cell>
          <table:table-cell table:style-name="ce1" table:formula="of:=[.G243]+h" office:value-type="float" office:value="2.41999999999999" calcext:value-type="float">
            <text:p>2,41999999999999</text:p>
          </table:table-cell>
          <table:table-cell table:style-name="ce1" table:formula="of:=[.H243]+ h*[.F244]" office:value-type="float" office:value="358.66139098649" calcext:value-type="float">
            <text:p>358,661390986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4]" office:value-type="float" office:value="2.41999999999999" calcext:value-type="float">
            <text:p>2,41999999999999</text:p>
          </table:table-cell>
          <table:table-cell table:style-name="ce1" table:formula="of:=[.H244]" office:value-type="float" office:value="358.66139098649" calcext:value-type="float">
            <text:p>358,66139098649</text:p>
          </table:table-cell>
          <table:table-cell table:style-name="ce1" table:formula="of:=-68 - ([.E245]^2/Ao)" office:value-type="float" office:value="-153.758662256242" calcext:value-type="float">
            <text:p>-153,758662256242</text:p>
          </table:table-cell>
          <table:table-cell table:style-name="ce1" table:formula="of:=[.G244]+h" office:value-type="float" office:value="2.42999999999999" calcext:value-type="float">
            <text:p>2,42999999999999</text:p>
          </table:table-cell>
          <table:table-cell table:style-name="ce1" table:formula="of:=[.H244]+ h*[.F245]" office:value-type="float" office:value="357.123804363927" calcext:value-type="float">
            <text:p>357,1238043639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5]" office:value-type="float" office:value="2.42999999999999" calcext:value-type="float">
            <text:p>2,42999999999999</text:p>
          </table:table-cell>
          <table:table-cell table:style-name="ce1" table:formula="of:=[.H245]" office:value-type="float" office:value="357.123804363927" calcext:value-type="float">
            <text:p>357,123804363927</text:p>
          </table:table-cell>
          <table:table-cell table:style-name="ce1" table:formula="of:=-68 - ([.E246]^2/Ao)" office:value-type="float" office:value="-153.024941095576" calcext:value-type="float">
            <text:p>-153,024941095576</text:p>
          </table:table-cell>
          <table:table-cell table:style-name="ce1" table:formula="of:=[.G245]+h" office:value-type="float" office:value="2.43999999999999" calcext:value-type="float">
            <text:p>2,43999999999999</text:p>
          </table:table-cell>
          <table:table-cell table:style-name="ce1" table:formula="of:=[.H245]+ h*[.F246]" office:value-type="float" office:value="355.593554952971" calcext:value-type="float">
            <text:p>355,5935549529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6]" office:value-type="float" office:value="2.43999999999999" calcext:value-type="float">
            <text:p>2,43999999999999</text:p>
          </table:table-cell>
          <table:table-cell table:style-name="ce1" table:formula="of:=[.H246]" office:value-type="float" office:value="355.593554952971" calcext:value-type="float">
            <text:p>355,593554952971</text:p>
          </table:table-cell>
          <table:table-cell table:style-name="ce1" table:formula="of:=-68 - ([.E247]^2/Ao)" office:value-type="float" office:value="-152.297850882728" calcext:value-type="float">
            <text:p>-152,297850882728</text:p>
          </table:table-cell>
          <table:table-cell table:style-name="ce1" table:formula="of:=[.G246]+h" office:value-type="float" office:value="2.44999999999999" calcext:value-type="float">
            <text:p>2,44999999999999</text:p>
          </table:table-cell>
          <table:table-cell table:style-name="ce1" table:formula="of:=[.H246]+ h*[.F247]" office:value-type="float" office:value="354.070576444144" calcext:value-type="float">
            <text:p>354,0705764441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7]" office:value-type="float" office:value="2.44999999999999" calcext:value-type="float">
            <text:p>2,44999999999999</text:p>
          </table:table-cell>
          <table:table-cell table:style-name="ce1" table:formula="of:=[.H247]" office:value-type="float" office:value="354.070576444144" calcext:value-type="float">
            <text:p>354,070576444144</text:p>
          </table:table-cell>
          <table:table-cell table:style-name="ce1" table:formula="of:=-68 - ([.E248]^2/Ao)" office:value-type="float" office:value="-151.577315402326" calcext:value-type="float">
            <text:p>-151,577315402326</text:p>
          </table:table-cell>
          <table:table-cell table:style-name="ce1" table:formula="of:=[.G247]+h" office:value-type="float" office:value="2.45999999999999" calcext:value-type="float">
            <text:p>2,45999999999999</text:p>
          </table:table-cell>
          <table:table-cell table:style-name="ce1" table:formula="of:=[.H247]+ h*[.F248]" office:value-type="float" office:value="352.554803290121" calcext:value-type="float">
            <text:p>352,5548032901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8]" office:value-type="float" office:value="2.45999999999999" calcext:value-type="float">
            <text:p>2,45999999999999</text:p>
          </table:table-cell>
          <table:table-cell table:style-name="ce1" table:formula="of:=[.H248]" office:value-type="float" office:value="352.554803290121" calcext:value-type="float">
            <text:p>352,554803290121</text:p>
          </table:table-cell>
          <table:table-cell table:style-name="ce1" table:formula="of:=-68 - ([.E249]^2/Ao)" office:value-type="float" office:value="-150.863259548624" calcext:value-type="float">
            <text:p>-150,863259548624</text:p>
          </table:table-cell>
          <table:table-cell table:style-name="ce1" table:formula="of:=[.G248]+h" office:value-type="float" office:value="2.46999999999999" calcext:value-type="float">
            <text:p>2,46999999999999</text:p>
          </table:table-cell>
          <table:table-cell table:style-name="ce1" table:formula="of:=[.H248]+ h*[.F249]" office:value-type="float" office:value="351.046170694635" calcext:value-type="float">
            <text:p>351,0461706946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9]" office:value-type="float" office:value="2.46999999999999" calcext:value-type="float">
            <text:p>2,46999999999999</text:p>
          </table:table-cell>
          <table:table-cell table:style-name="ce1" table:formula="of:=[.H249]" office:value-type="float" office:value="351.046170694635" calcext:value-type="float">
            <text:p>351,046170694635</text:p>
          </table:table-cell>
          <table:table-cell table:style-name="ce1" table:formula="of:=-68 - ([.E250]^2/Ao)" office:value-type="float" office:value="-150.155609306244" calcext:value-type="float">
            <text:p>-150,155609306244</text:p>
          </table:table-cell>
          <table:table-cell table:style-name="ce1" table:formula="of:=[.G249]+h" office:value-type="float" office:value="2.47999999999999" calcext:value-type="float">
            <text:p>2,47999999999999</text:p>
          </table:table-cell>
          <table:table-cell table:style-name="ce1" table:formula="of:=[.H249]+ h*[.F250]" office:value-type="float" office:value="349.544614601572" calcext:value-type="float">
            <text:p>349,5446146015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0]" office:value-type="float" office:value="2.47999999999999" calcext:value-type="float">
            <text:p>2,47999999999999</text:p>
          </table:table-cell>
          <table:table-cell table:style-name="ce1" table:formula="of:=[.H250]" office:value-type="float" office:value="349.544614601572" calcext:value-type="float">
            <text:p>349,544614601572</text:p>
          </table:table-cell>
          <table:table-cell table:style-name="ce1" table:formula="of:=-68 - ([.E251]^2/Ao)" office:value-type="float" office:value="-149.454291731308" calcext:value-type="float">
            <text:p>-149,454291731308</text:p>
          </table:table-cell>
          <table:table-cell table:style-name="ce1" table:formula="of:=[.G250]+h" office:value-type="float" office:value="2.48999999999999" calcext:value-type="float">
            <text:p>2,48999999999999</text:p>
          </table:table-cell>
          <table:table-cell table:style-name="ce1" table:formula="of:=[.H250]+ h*[.F251]" office:value-type="float" office:value="348.050071684259" calcext:value-type="float">
            <text:p>348,0500716842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1]" office:value-type="float" office:value="2.48999999999999" calcext:value-type="float">
            <text:p>2,48999999999999</text:p>
          </table:table-cell>
          <table:table-cell table:style-name="ce1" table:formula="of:=[.H251]" office:value-type="float" office:value="348.050071684259" calcext:value-type="float">
            <text:p>348,050071684259</text:p>
          </table:table-cell>
          <table:table-cell table:style-name="ce1" table:formula="of:=-68 - ([.E252]^2/Ao)" office:value-type="float" office:value="-148.759234932945" calcext:value-type="float">
            <text:p>-148,759234932945</text:p>
          </table:table-cell>
          <table:table-cell table:style-name="ce1" table:formula="of:=[.G251]+h" office:value-type="float" office:value="2.49999999999999" calcext:value-type="float">
            <text:p>2,49999999999999</text:p>
          </table:table-cell>
          <table:table-cell table:style-name="ce1" table:formula="of:=[.H251]+ h*[.F252]" office:value-type="float" office:value="346.56247933493" calcext:value-type="float">
            <text:p>346,562479334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2]" office:value-type="float" office:value="2.49999999999999" calcext:value-type="float">
            <text:p>2,49999999999999</text:p>
          </table:table-cell>
          <table:table-cell table:style-name="ce1" table:formula="of:=[.H252]" office:value-type="float" office:value="346.56247933493" calcext:value-type="float">
            <text:p>346,56247933493</text:p>
          </table:table-cell>
          <table:table-cell table:style-name="ce1" table:formula="of:=-68 - ([.E253]^2/Ao)" office:value-type="float" office:value="-148.070368055182" calcext:value-type="float">
            <text:p>-148,070368055182</text:p>
          </table:table-cell>
          <table:table-cell table:style-name="ce1" table:formula="of:=[.G252]+h" office:value-type="float" office:value="2.50999999999999" calcext:value-type="float">
            <text:p>2,50999999999999</text:p>
          </table:table-cell>
          <table:table-cell table:style-name="ce1" table:formula="of:=[.H252]+ h*[.F253]" office:value-type="float" office:value="345.081775654378" calcext:value-type="float">
            <text:p>345,0817756543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3]" office:value-type="float" office:value="2.50999999999999" calcext:value-type="float">
            <text:p>2,50999999999999</text:p>
          </table:table-cell>
          <table:table-cell table:style-name="ce1" table:formula="of:=[.H253]" office:value-type="float" office:value="345.081775654378" calcext:value-type="float">
            <text:p>345,081775654378</text:p>
          </table:table-cell>
          <table:table-cell table:style-name="ce1" table:formula="of:=-68 - ([.E254]^2/Ao)" office:value-type="float" office:value="-147.387621259186" calcext:value-type="float">
            <text:p>-147,387621259186</text:p>
          </table:table-cell>
          <table:table-cell table:style-name="ce1" table:formula="of:=[.G253]+h" office:value-type="float" office:value="2.51999999999999" calcext:value-type="float">
            <text:p>2,51999999999999</text:p>
          </table:table-cell>
          <table:table-cell table:style-name="ce1" table:formula="of:=[.H253]+ h*[.F254]" office:value-type="float" office:value="343.607899441786" calcext:value-type="float">
            <text:p>343,6078994417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4]" office:value-type="float" office:value="2.51999999999999" calcext:value-type="float">
            <text:p>2,51999999999999</text:p>
          </table:table-cell>
          <table:table-cell table:style-name="ce1" table:formula="of:=[.H254]" office:value-type="float" office:value="343.607899441786" calcext:value-type="float">
            <text:p>343,607899441786</text:p>
          </table:table-cell>
          <table:table-cell table:style-name="ce1" table:formula="of:=-68 - ([.E255]^2/Ao)" office:value-type="float" office:value="-146.710925705864" calcext:value-type="float">
            <text:p>-146,710925705864</text:p>
          </table:table-cell>
          <table:table-cell table:style-name="ce1" table:formula="of:=[.G254]+h" office:value-type="float" office:value="2.52999999999999" calcext:value-type="float">
            <text:p>2,52999999999999</text:p>
          </table:table-cell>
          <table:table-cell table:style-name="ce1" table:formula="of:=[.H254]+ h*[.F255]" office:value-type="float" office:value="342.140790184727" calcext:value-type="float">
            <text:p>342,1407901847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5]" office:value-type="float" office:value="2.52999999999999" calcext:value-type="float">
            <text:p>2,52999999999999</text:p>
          </table:table-cell>
          <table:table-cell table:style-name="ce1" table:formula="of:=[.H255]" office:value-type="float" office:value="342.140790184727" calcext:value-type="float">
            <text:p>342,140790184727</text:p>
          </table:table-cell>
          <table:table-cell table:style-name="ce1" table:formula="of:=-68 - ([.E256]^2/Ao)" office:value-type="float" office:value="-146.04021353882" calcext:value-type="float">
            <text:p>-146,04021353882</text:p>
          </table:table-cell>
          <table:table-cell table:style-name="ce1" table:formula="of:=[.G255]+h" office:value-type="float" office:value="2.53999999999999" calcext:value-type="float">
            <text:p>2,53999999999999</text:p>
          </table:table-cell>
          <table:table-cell table:style-name="ce1" table:formula="of:=[.H255]+ h*[.F256]" office:value-type="float" office:value="340.680388049339" calcext:value-type="float">
            <text:p>340,6803880493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6]" office:value-type="float" office:value="2.53999999999999" calcext:value-type="float">
            <text:p>2,53999999999999</text:p>
          </table:table-cell>
          <table:table-cell table:style-name="ce1" table:formula="of:=[.H256]" office:value-type="float" office:value="340.680388049339" calcext:value-type="float">
            <text:p>340,680388049339</text:p>
          </table:table-cell>
          <table:table-cell table:style-name="ce1" table:formula="of:=-68 - ([.E257]^2/Ao)" office:value-type="float" office:value="-145.375417867632" calcext:value-type="float">
            <text:p>-145,375417867632</text:p>
          </table:table-cell>
          <table:table-cell table:style-name="ce1" table:formula="of:=[.G256]+h" office:value-type="float" office:value="2.54999999999999" calcext:value-type="float">
            <text:p>2,54999999999999</text:p>
          </table:table-cell>
          <table:table-cell table:style-name="ce1" table:formula="of:=[.H256]+ h*[.F257]" office:value-type="float" office:value="339.226633870663" calcext:value-type="float">
            <text:p>339,2266338706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7]" office:value-type="float" office:value="2.54999999999999" calcext:value-type="float">
            <text:p>2,54999999999999</text:p>
          </table:table-cell>
          <table:table-cell table:style-name="ce1" table:formula="of:=[.H257]" office:value-type="float" office:value="339.226633870663" calcext:value-type="float">
            <text:p>339,226633870663</text:p>
          </table:table-cell>
          <table:table-cell table:style-name="ce1" table:formula="of:=-68 - ([.E258]^2/Ao)" office:value-type="float" office:value="-144.71647275148" calcext:value-type="float">
            <text:p>-144,71647275148</text:p>
          </table:table-cell>
          <table:table-cell table:style-name="ce1" table:formula="of:=[.G257]+h" office:value-type="float" office:value="2.55999999999999" calcext:value-type="float">
            <text:p>2,55999999999999</text:p>
          </table:table-cell>
          <table:table-cell table:style-name="ce1" table:formula="of:=[.H257]+ h*[.F258]" office:value-type="float" office:value="337.779469143148" calcext:value-type="float">
            <text:p>337,7794691431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8]" office:value-type="float" office:value="2.55999999999999" calcext:value-type="float">
            <text:p>2,55999999999999</text:p>
          </table:table-cell>
          <table:table-cell table:style-name="ce1" table:formula="of:=[.H258]" office:value-type="float" office:value="337.779469143148" calcext:value-type="float">
            <text:p>337,779469143148</text:p>
          </table:table-cell>
          <table:table-cell table:style-name="ce1" table:formula="of:=-68 - ([.E259]^2/Ao)" office:value-type="float" office:value="-144.063313183085" calcext:value-type="float">
            <text:p>-144,063313183085</text:p>
          </table:table-cell>
          <table:table-cell table:style-name="ce1" table:formula="of:=[.G258]+h" office:value-type="float" office:value="2.56999999999999" calcext:value-type="float">
            <text:p>2,56999999999999</text:p>
          </table:table-cell>
          <table:table-cell table:style-name="ce1" table:formula="of:=[.H258]+ h*[.F259]" office:value-type="float" office:value="336.338836011317" calcext:value-type="float">
            <text:p>336,3388360113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9]" office:value-type="float" office:value="2.56999999999999" calcext:value-type="float">
            <text:p>2,56999999999999</text:p>
          </table:table-cell>
          <table:table-cell table:style-name="ce1" table:formula="of:=[.H259]" office:value-type="float" office:value="336.338836011317" calcext:value-type="float">
            <text:p>336,338836011317</text:p>
          </table:table-cell>
          <table:table-cell table:style-name="ce1" table:formula="of:=-68 - ([.E260]^2/Ao)" office:value-type="float" office:value="-143.415875072965" calcext:value-type="float">
            <text:p>-143,415875072965</text:p>
          </table:table-cell>
          <table:table-cell table:style-name="ce1" table:formula="of:=[.G259]+h" office:value-type="float" office:value="2.57999999999999" calcext:value-type="float">
            <text:p>2,57999999999999</text:p>
          </table:table-cell>
          <table:table-cell table:style-name="ce1" table:formula="of:=[.H259]+ h*[.F260]" office:value-type="float" office:value="334.904677260588" calcext:value-type="float">
            <text:p>334,9046772605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0]" office:value-type="float" office:value="2.57999999999999" calcext:value-type="float">
            <text:p>2,57999999999999</text:p>
          </table:table-cell>
          <table:table-cell table:style-name="ce1" table:formula="of:=[.H260]" office:value-type="float" office:value="334.904677260588" calcext:value-type="float">
            <text:p>334,904677260588</text:p>
          </table:table-cell>
          <table:table-cell table:style-name="ce1" table:formula="of:=-68 - ([.E261]^2/Ao)" office:value-type="float" office:value="-142.774095234012" calcext:value-type="float">
            <text:p>-142,774095234012</text:p>
          </table:table-cell>
          <table:table-cell table:style-name="ce1" table:formula="of:=[.G260]+h" office:value-type="float" office:value="2.58999999999999" calcext:value-type="float">
            <text:p>2,58999999999999</text:p>
          </table:table-cell>
          <table:table-cell table:style-name="ce1" table:formula="of:=[.H260]+ h*[.F261]" office:value-type="float" office:value="333.476936308247" calcext:value-type="float">
            <text:p>333,4769363082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1]" office:value-type="float" office:value="2.58999999999999" calcext:value-type="float">
            <text:p>2,58999999999999</text:p>
          </table:table-cell>
          <table:table-cell table:style-name="ce1" table:formula="of:=[.H261]" office:value-type="float" office:value="333.476936308247" calcext:value-type="float">
            <text:p>333,476936308247</text:p>
          </table:table-cell>
          <table:table-cell table:style-name="ce1" table:formula="of:=-68 - ([.E262]^2/Ao)" office:value-type="float" office:value="-142.137911366357" calcext:value-type="float">
            <text:p>-142,137911366357</text:p>
          </table:table-cell>
          <table:table-cell table:style-name="ce1" table:formula="of:=[.G261]+h" office:value-type="float" office:value="2.59999999999999" calcext:value-type="float">
            <text:p>2,59999999999999</text:p>
          </table:table-cell>
          <table:table-cell table:style-name="ce1" table:formula="of:=[.H261]+ h*[.F262]" office:value-type="float" office:value="332.055557194584" calcext:value-type="float">
            <text:p>332,0555571945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2]" office:value-type="float" office:value="2.59999999999999" calcext:value-type="float">
            <text:p>2,59999999999999</text:p>
          </table:table-cell>
          <table:table-cell table:style-name="ce1" table:formula="of:=[.H262]" office:value-type="float" office:value="332.055557194584" calcext:value-type="float">
            <text:p>332,055557194584</text:p>
          </table:table-cell>
          <table:table-cell table:style-name="ce1" table:formula="of:=-68 - ([.E263]^2/Ao)" office:value-type="float" office:value="-141.507262042537" calcext:value-type="float">
            <text:p>-141,507262042537</text:p>
          </table:table-cell>
          <table:table-cell table:style-name="ce1" table:formula="of:=[.G262]+h" office:value-type="float" office:value="2.60999999999999" calcext:value-type="float">
            <text:p>2,60999999999999</text:p>
          </table:table-cell>
          <table:table-cell table:style-name="ce1" table:formula="of:=[.H262]+ h*[.F263]" office:value-type="float" office:value="330.640484574158" calcext:value-type="float">
            <text:p>330,6404845741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3]" office:value-type="float" office:value="2.60999999999999" calcext:value-type="float">
            <text:p>2,60999999999999</text:p>
          </table:table-cell>
          <table:table-cell table:style-name="ce1" table:formula="of:=[.H263]" office:value-type="float" office:value="330.640484574158" calcext:value-type="float">
            <text:p>330,640484574158</text:p>
          </table:table-cell>
          <table:table-cell table:style-name="ce1" table:formula="of:=-68 - ([.E264]^2/Ao)" office:value-type="float" office:value="-140.882086692956" calcext:value-type="float">
            <text:p>-140,882086692956</text:p>
          </table:table-cell>
          <table:table-cell table:style-name="ce1" table:formula="of:=[.G263]+h" office:value-type="float" office:value="2.61999999999999" calcext:value-type="float">
            <text:p>2,61999999999999</text:p>
          </table:table-cell>
          <table:table-cell table:style-name="ce1" table:formula="of:=[.H263]+ h*[.F264]" office:value-type="float" office:value="329.231663707229" calcext:value-type="float">
            <text:p>329,2316637072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4]" office:value-type="float" office:value="2.61999999999999" calcext:value-type="float">
            <text:p>2,61999999999999</text:p>
          </table:table-cell>
          <table:table-cell table:style-name="ce1" table:formula="of:=[.H264]" office:value-type="float" office:value="329.231663707229" calcext:value-type="float">
            <text:p>329,231663707229</text:p>
          </table:table-cell>
          <table:table-cell table:style-name="ce1" table:formula="of:=-68 - ([.E265]^2/Ao)" office:value-type="float" office:value="-140.26232559162" calcext:value-type="float">
            <text:p>-140,26232559162</text:p>
          </table:table-cell>
          <table:table-cell table:style-name="ce1" table:formula="of:=[.G264]+h" office:value-type="float" office:value="2.62999999999999" calcext:value-type="float">
            <text:p>2,62999999999999</text:p>
          </table:table-cell>
          <table:table-cell table:style-name="ce1" table:formula="of:=[.H264]+ h*[.F265]" office:value-type="float" office:value="327.829040451313" calcext:value-type="float">
            <text:p>327,8290404513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5]" office:value-type="float" office:value="2.62999999999999" calcext:value-type="float">
            <text:p>2,62999999999999</text:p>
          </table:table-cell>
          <table:table-cell table:style-name="ce1" table:formula="of:=[.H265]" office:value-type="float" office:value="327.829040451313" calcext:value-type="float">
            <text:p>327,829040451313</text:p>
          </table:table-cell>
          <table:table-cell table:style-name="ce1" table:formula="of:=-68 - ([.E266]^2/Ao)" office:value-type="float" office:value="-139.647919842152" calcext:value-type="float">
            <text:p>-139,647919842152</text:p>
          </table:table-cell>
          <table:table-cell table:style-name="ce1" table:formula="of:=[.G265]+h" office:value-type="float" office:value="2.63999999999999" calcext:value-type="float">
            <text:p>2,63999999999999</text:p>
          </table:table-cell>
          <table:table-cell table:style-name="ce1" table:formula="of:=[.H265]+ h*[.F266]" office:value-type="float" office:value="326.432561252891" calcext:value-type="float">
            <text:p>326,4325612528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6]" office:value-type="float" office:value="2.63999999999999" calcext:value-type="float">
            <text:p>2,63999999999999</text:p>
          </table:table-cell>
          <table:table-cell table:style-name="ce1" table:formula="of:=[.H266]" office:value-type="float" office:value="326.432561252891" calcext:value-type="float">
            <text:p>326,432561252891</text:p>
          </table:table-cell>
          <table:table-cell table:style-name="ce1" table:formula="of:=-68 - ([.E267]^2/Ao)" office:value-type="float" office:value="-139.038811364082" calcext:value-type="float">
            <text:p>-139,038811364082</text:p>
          </table:table-cell>
          <table:table-cell table:style-name="ce1" table:formula="of:=[.G266]+h" office:value-type="float" office:value="2.64999999999999" calcext:value-type="float">
            <text:p>2,64999999999999</text:p>
          </table:table-cell>
          <table:table-cell table:style-name="ce1" table:formula="of:=[.H266]+ h*[.F267]" office:value-type="float" office:value="325.04217313925" calcext:value-type="float">
            <text:p>325,042173139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7]" office:value-type="float" office:value="2.64999999999999" calcext:value-type="float">
            <text:p>2,64999999999999</text:p>
          </table:table-cell>
          <table:table-cell table:style-name="ce1" table:formula="of:=[.H267]" office:value-type="float" office:value="325.04217313925" calcext:value-type="float">
            <text:p>325,04217313925</text:p>
          </table:table-cell>
          <table:table-cell table:style-name="ce1" table:formula="of:=-68 - ([.E268]^2/Ao)" office:value-type="float" office:value="-138.434942879391" calcext:value-type="float">
            <text:p>-138,434942879391</text:p>
          </table:table-cell>
          <table:table-cell table:style-name="ce1" table:formula="of:=[.G267]+h" office:value-type="float" office:value="2.65999999999999" calcext:value-type="float">
            <text:p>2,65999999999999</text:p>
          </table:table-cell>
          <table:table-cell table:style-name="ce1" table:formula="of:=[.H267]+ h*[.F268]" office:value-type="float" office:value="323.657823710457" calcext:value-type="float">
            <text:p>323,6578237104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8]" office:value-type="float" office:value="2.65999999999999" calcext:value-type="float">
            <text:p>2,65999999999999</text:p>
          </table:table-cell>
          <table:table-cell table:style-name="ce1" table:formula="of:=[.H268]" office:value-type="float" office:value="323.657823710457" calcext:value-type="float">
            <text:p>323,657823710457</text:p>
          </table:table-cell>
          <table:table-cell table:style-name="ce1" table:formula="of:=-68 - ([.E269]^2/Ao)" office:value-type="float" office:value="-137.836257899326" calcext:value-type="float">
            <text:p>-137,836257899326</text:p>
          </table:table-cell>
          <table:table-cell table:style-name="ce1" table:formula="of:=[.G268]+h" office:value-type="float" office:value="2.66999999999999" calcext:value-type="float">
            <text:p>2,66999999999999</text:p>
          </table:table-cell>
          <table:table-cell table:style-name="ce1" table:formula="of:=[.H268]+ h*[.F269]" office:value-type="float" office:value="322.279461131463" calcext:value-type="float">
            <text:p>322,2794611314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9]" office:value-type="float" office:value="2.66999999999999" calcext:value-type="float">
            <text:p>2,66999999999999</text:p>
          </table:table-cell>
          <table:table-cell table:style-name="ce1" table:formula="of:=[.H269]" office:value-type="float" office:value="322.279461131463" calcext:value-type="float">
            <text:p>322,279461131463</text:p>
          </table:table-cell>
          <table:table-cell table:style-name="ce1" table:formula="of:=-68 - ([.E270]^2/Ao)" office:value-type="float" office:value="-137.242700711458" calcext:value-type="float">
            <text:p>-137,242700711458</text:p>
          </table:table-cell>
          <table:table-cell table:style-name="ce1" table:formula="of:=[.G269]+h" office:value-type="float" office:value="2.67999999999999" calcext:value-type="float">
            <text:p>2,67999999999999</text:p>
          </table:table-cell>
          <table:table-cell table:style-name="ce1" table:formula="of:=[.H269]+ h*[.F270]" office:value-type="float" office:value="320.907034124349" calcext:value-type="float">
            <text:p>320,9070341243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0]" office:value-type="float" office:value="2.67999999999999" calcext:value-type="float">
            <text:p>2,67999999999999</text:p>
          </table:table-cell>
          <table:table-cell table:style-name="ce1" table:formula="of:=[.H270]" office:value-type="float" office:value="320.907034124349" calcext:value-type="float">
            <text:p>320,907034124349</text:p>
          </table:table-cell>
          <table:table-cell table:style-name="ce1" table:formula="of:=-68 - ([.E271]^2/Ao)" office:value-type="float" office:value="-136.654216366991" calcext:value-type="float">
            <text:p>-136,654216366991</text:p>
          </table:table-cell>
          <table:table-cell table:style-name="ce1" table:formula="of:=[.G270]+h" office:value-type="float" office:value="2.68999999999999" calcext:value-type="float">
            <text:p>2,68999999999999</text:p>
          </table:table-cell>
          <table:table-cell table:style-name="ce1" table:formula="of:=[.H270]+ h*[.F271]" office:value-type="float" office:value="319.540491960679" calcext:value-type="float">
            <text:p>319,5404919606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1]" office:value-type="float" office:value="2.68999999999999" calcext:value-type="float">
            <text:p>2,68999999999999</text:p>
          </table:table-cell>
          <table:table-cell table:style-name="ce1" table:formula="of:=[.H271]" office:value-type="float" office:value="319.540491960679" calcext:value-type="float">
            <text:p>319,540491960679</text:p>
          </table:table-cell>
          <table:table-cell table:style-name="ce1" table:formula="of:=-68 - ([.E272]^2/Ao)" office:value-type="float" office:value="-136.070750668315" calcext:value-type="float">
            <text:p>-136,070750668315</text:p>
          </table:table-cell>
          <table:table-cell table:style-name="ce1" table:formula="of:=[.G271]+h" office:value-type="float" office:value="2.69999999999999" calcext:value-type="float">
            <text:p>2,69999999999999</text:p>
          </table:table-cell>
          <table:table-cell table:style-name="ce1" table:formula="of:=[.H271]+ h*[.F272]" office:value-type="float" office:value="318.179784453996" calcext:value-type="float">
            <text:p>318,1797844539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2]" office:value-type="float" office:value="2.69999999999999" calcext:value-type="float">
            <text:p>2,69999999999999</text:p>
          </table:table-cell>
          <table:table-cell table:style-name="ce1" table:formula="of:=[.H272]" office:value-type="float" office:value="318.179784453996" calcext:value-type="float">
            <text:p>318,179784453996</text:p>
          </table:table-cell>
          <table:table-cell table:style-name="ce1" table:formula="of:=-68 - ([.E273]^2/Ao)" office:value-type="float" office:value="-135.492250156794" calcext:value-type="float">
            <text:p>-135,492250156794</text:p>
          </table:table-cell>
          <table:table-cell table:style-name="ce1" table:formula="of:=[.G272]+h" office:value-type="float" office:value="2.70999999999999" calcext:value-type="float">
            <text:p>2,70999999999999</text:p>
          </table:table-cell>
          <table:table-cell table:style-name="ce1" table:formula="of:=[.H272]+ h*[.F273]" office:value-type="float" office:value="316.824861952428" calcext:value-type="float">
            <text:p>316,8248619524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3]" office:value-type="float" office:value="2.70999999999999" calcext:value-type="float">
            <text:p>2,70999999999999</text:p>
          </table:table-cell>
          <table:table-cell table:style-name="ce1" table:formula="of:=[.H273]" office:value-type="float" office:value="316.824861952428" calcext:value-type="float">
            <text:p>316,824861952428</text:p>
          </table:table-cell>
          <table:table-cell table:style-name="ce1" table:formula="of:=-68 - ([.E274]^2/Ao)" office:value-type="float" office:value="-134.918662100783" calcext:value-type="float">
            <text:p>-134,918662100783</text:p>
          </table:table-cell>
          <table:table-cell table:style-name="ce1" table:formula="of:=[.G273]+h" office:value-type="float" office:value="2.71999999999999" calcext:value-type="float">
            <text:p>2,71999999999999</text:p>
          </table:table-cell>
          <table:table-cell table:style-name="ce1" table:formula="of:=[.H273]+ h*[.F274]" office:value-type="float" office:value="315.47567533142" calcext:value-type="float">
            <text:p>315,475675331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4]" office:value-type="float" office:value="2.71999999999999" calcext:value-type="float">
            <text:p>2,71999999999999</text:p>
          </table:table-cell>
          <table:table-cell table:style-name="ce1" table:formula="of:=[.H274]" office:value-type="float" office:value="315.47567533142" calcext:value-type="float">
            <text:p>315,47567533142</text:p>
          </table:table-cell>
          <table:table-cell table:style-name="ce1" table:formula="of:=-68 - ([.E275]^2/Ao)" office:value-type="float" office:value="-134.349934483877" calcext:value-type="float">
            <text:p>-134,349934483877</text:p>
          </table:table-cell>
          <table:table-cell table:style-name="ce1" table:formula="of:=[.G274]+h" office:value-type="float" office:value="2.72999999999999" calcext:value-type="float">
            <text:p>2,72999999999999</text:p>
          </table:table-cell>
          <table:table-cell table:style-name="ce1" table:formula="of:=[.H274]+ h*[.F275]" office:value-type="float" office:value="314.132175986581" calcext:value-type="float">
            <text:p>314,1321759865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5]" office:value-type="float" office:value="2.72999999999999" calcext:value-type="float">
            <text:p>2,72999999999999</text:p>
          </table:table-cell>
          <table:table-cell table:style-name="ce1" table:formula="of:=[.H275]" office:value-type="float" office:value="314.132175986581" calcext:value-type="float">
            <text:p>314,132175986581</text:p>
          </table:table-cell>
          <table:table-cell table:style-name="ce1" table:formula="of:=-68 - ([.E276]^2/Ao)" office:value-type="float" office:value="-133.786015993376" calcext:value-type="float">
            <text:p>-133,786015993376</text:p>
          </table:table-cell>
          <table:table-cell table:style-name="ce1" table:formula="of:=[.G275]+h" office:value-type="float" office:value="2.73999999999999" calcext:value-type="float">
            <text:p>2,73999999999999</text:p>
          </table:table-cell>
          <table:table-cell table:style-name="ce1" table:formula="of:=[.H275]+ h*[.F276]" office:value-type="float" office:value="312.794315826647" calcext:value-type="float">
            <text:p>312,7943158266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6]" office:value-type="float" office:value="2.73999999999999" calcext:value-type="float">
            <text:p>2,73999999999999</text:p>
          </table:table-cell>
          <table:table-cell table:style-name="ce1" table:formula="of:=[.H276]" office:value-type="float" office:value="312.794315826647" calcext:value-type="float">
            <text:p>312,794315826647</text:p>
          </table:table-cell>
          <table:table-cell table:style-name="ce1" table:formula="of:=-68 - ([.E277]^2/Ao)" office:value-type="float" office:value="-133.226856008974" calcext:value-type="float">
            <text:p>-133,226856008974</text:p>
          </table:table-cell>
          <table:table-cell table:style-name="ce1" table:formula="of:=[.G276]+h" office:value-type="float" office:value="2.74999999999999" calcext:value-type="float">
            <text:p>2,74999999999999</text:p>
          </table:table-cell>
          <table:table-cell table:style-name="ce1" table:formula="of:=[.H276]+ h*[.F277]" office:value-type="float" office:value="311.462047266558" calcext:value-type="float">
            <text:p>311,4620472665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7]" office:value-type="float" office:value="2.74999999999999" calcext:value-type="float">
            <text:p>2,74999999999999</text:p>
          </table:table-cell>
          <table:table-cell table:style-name="ce1" table:formula="of:=[.H277]" office:value-type="float" office:value="311.462047266558" calcext:value-type="float">
            <text:p>311,462047266558</text:p>
          </table:table-cell>
          <table:table-cell table:style-name="ce1" table:formula="of:=-68 - ([.E278]^2/Ao)" office:value-type="float" office:value="-132.67240459165" calcext:value-type="float">
            <text:p>-132,67240459165</text:p>
          </table:table-cell>
          <table:table-cell table:style-name="ce1" table:formula="of:=[.G277]+h" office:value-type="float" office:value="2.75999999999999" calcext:value-type="float">
            <text:p>2,75999999999999</text:p>
          </table:table-cell>
          <table:table-cell table:style-name="ce1" table:formula="of:=[.H277]+ h*[.F278]" office:value-type="float" office:value="310.135323220641" calcext:value-type="float">
            <text:p>310,1353232206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8]" office:value-type="float" office:value="2.75999999999999" calcext:value-type="float">
            <text:p>2,75999999999999</text:p>
          </table:table-cell>
          <table:table-cell table:style-name="ce1" table:formula="of:=[.H278]" office:value-type="float" office:value="310.135323220641" calcext:value-type="float">
            <text:p>310,135323220641</text:p>
          </table:table-cell>
          <table:table-cell table:style-name="ce1" table:formula="of:=-68 - ([.E279]^2/Ao)" office:value-type="float" office:value="-132.122612472781" calcext:value-type="float">
            <text:p>-132,122612472781</text:p>
          </table:table-cell>
          <table:table-cell table:style-name="ce1" table:formula="of:=[.G278]+h" office:value-type="float" office:value="2.76999999999999" calcext:value-type="float">
            <text:p>2,76999999999999</text:p>
          </table:table-cell>
          <table:table-cell table:style-name="ce1" table:formula="of:=[.H278]+ h*[.F279]" office:value-type="float" office:value="308.814097095913" calcext:value-type="float">
            <text:p>308,8140970959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9]" office:value-type="float" office:value="2.76999999999999" calcext:value-type="float">
            <text:p>2,76999999999999</text:p>
          </table:table-cell>
          <table:table-cell table:style-name="ce1" table:formula="of:=[.H279]" office:value-type="float" office:value="308.814097095913" calcext:value-type="float">
            <text:p>308,814097095913</text:p>
          </table:table-cell>
          <table:table-cell table:style-name="ce1" table:formula="of:=-68 - ([.E280]^2/Ao)" office:value-type="float" office:value="-131.577431043443" calcext:value-type="float">
            <text:p>-131,577431043443</text:p>
          </table:table-cell>
          <table:table-cell table:style-name="ce1" table:formula="of:=[.G279]+h" office:value-type="float" office:value="2.77999999999998" calcext:value-type="float">
            <text:p>2,77999999999998</text:p>
          </table:table-cell>
          <table:table-cell table:style-name="ce1" table:formula="of:=[.H279]+ h*[.F280]" office:value-type="float" office:value="307.498322785479" calcext:value-type="float">
            <text:p>307,4983227854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0]" office:value-type="float" office:value="2.77999999999998" calcext:value-type="float">
            <text:p>2,77999999999998</text:p>
          </table:table-cell>
          <table:table-cell table:style-name="ce1" table:formula="of:=[.H280]" office:value-type="float" office:value="307.498322785479" calcext:value-type="float">
            <text:p>307,498322785479</text:p>
          </table:table-cell>
          <table:table-cell table:style-name="ce1" table:formula="of:=-68 - ([.E281]^2/Ao)" office:value-type="float" office:value="-131.036812343922" calcext:value-type="float">
            <text:p>-131,036812343922</text:p>
          </table:table-cell>
          <table:table-cell table:style-name="ce1" table:formula="of:=[.G280]+h" office:value-type="float" office:value="2.78999999999998" calcext:value-type="float">
            <text:p>2,78999999999998</text:p>
          </table:table-cell>
          <table:table-cell table:style-name="ce1" table:formula="of:=[.H280]+ h*[.F281]" office:value-type="float" office:value="306.18795466204" calcext:value-type="float">
            <text:p>306,187954662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1]" office:value-type="float" office:value="2.78999999999998" calcext:value-type="float">
            <text:p>2,78999999999998</text:p>
          </table:table-cell>
          <table:table-cell table:style-name="ce1" table:formula="of:=[.H281]" office:value-type="float" office:value="306.18795466204" calcext:value-type="float">
            <text:p>306,18795466204</text:p>
          </table:table-cell>
          <table:table-cell table:style-name="ce1" table:formula="of:=-68 - ([.E282]^2/Ao)" office:value-type="float" office:value="-130.500709053415" calcext:value-type="float">
            <text:p>-130,500709053415</text:p>
          </table:table-cell>
          <table:table-cell table:style-name="ce1" table:formula="of:=[.G281]+h" office:value-type="float" office:value="2.79999999999998" calcext:value-type="float">
            <text:p>2,79999999999998</text:p>
          </table:table-cell>
          <table:table-cell table:style-name="ce1" table:formula="of:=[.H281]+ h*[.F282]" office:value-type="float" office:value="304.882947571505" calcext:value-type="float">
            <text:p>304,8829475715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2]" office:value-type="float" office:value="2.79999999999998" calcext:value-type="float">
            <text:p>2,79999999999998</text:p>
          </table:table-cell>
          <table:table-cell table:style-name="ce1" table:formula="of:=[.H282]" office:value-type="float" office:value="304.882947571505" calcext:value-type="float">
            <text:p>304,882947571505</text:p>
          </table:table-cell>
          <table:table-cell table:style-name="ce1" table:formula="of:=-68 - ([.E283]^2/Ao)" office:value-type="float" office:value="-129.969074479926" calcext:value-type="float">
            <text:p>-129,969074479926</text:p>
          </table:table-cell>
          <table:table-cell table:style-name="ce1" table:formula="of:=[.G282]+h" office:value-type="float" office:value="2.80999999999998" calcext:value-type="float">
            <text:p>2,80999999999998</text:p>
          </table:table-cell>
          <table:table-cell table:style-name="ce1" table:formula="of:=[.H282]+ h*[.F283]" office:value-type="float" office:value="303.583256826706" calcext:value-type="float">
            <text:p>303,5832568267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3]" office:value-type="float" office:value="2.80999999999998" calcext:value-type="float">
            <text:p>2,80999999999998</text:p>
          </table:table-cell>
          <table:table-cell table:style-name="ce1" table:formula="of:=[.H283]" office:value-type="float" office:value="303.583256826706" calcext:value-type="float">
            <text:p>303,583256826706</text:p>
          </table:table-cell>
          <table:table-cell table:style-name="ce1" table:formula="of:=-68 - ([.E284]^2/Ao)" office:value-type="float" office:value="-129.44186255034" calcext:value-type="float">
            <text:p>-129,44186255034</text:p>
          </table:table-cell>
          <table:table-cell table:style-name="ce1" table:formula="of:=[.G283]+h" office:value-type="float" office:value="2.81999999999998" calcext:value-type="float">
            <text:p>2,81999999999998</text:p>
          </table:table-cell>
          <table:table-cell table:style-name="ce1" table:formula="of:=[.H283]+ h*[.F284]" office:value-type="float" office:value="302.288838201203" calcext:value-type="float">
            <text:p>302,2888382012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4]" office:value-type="float" office:value="2.81999999999998" calcext:value-type="float">
            <text:p>2,81999999999998</text:p>
          </table:table-cell>
          <table:table-cell table:style-name="ce1" table:formula="of:=[.H284]" office:value-type="float" office:value="302.288838201203" calcext:value-type="float">
            <text:p>302,288838201203</text:p>
          </table:table-cell>
          <table:table-cell table:style-name="ce1" table:formula="of:=-68 - ([.E285]^2/Ao)" office:value-type="float" office:value="-128.919027800689" calcext:value-type="float">
            <text:p>-128,919027800689</text:p>
          </table:table-cell>
          <table:table-cell table:style-name="ce1" table:formula="of:=[.G284]+h" office:value-type="float" office:value="2.82999999999998" calcext:value-type="float">
            <text:p>2,82999999999998</text:p>
          </table:table-cell>
          <table:table-cell table:style-name="ce1" table:formula="of:=[.H284]+ h*[.F285]" office:value-type="float" office:value="300.999647923196" calcext:value-type="float">
            <text:p>300,9996479231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5]" office:value-type="float" office:value="2.82999999999998" calcext:value-type="float">
            <text:p>2,82999999999998</text:p>
          </table:table-cell>
          <table:table-cell table:style-name="ce1" table:formula="of:=[.H285]" office:value-type="float" office:value="300.999647923196" calcext:value-type="float">
            <text:p>300,999647923196</text:p>
          </table:table-cell>
          <table:table-cell table:style-name="ce1" table:formula="of:=-68 - ([.E286]^2/Ao)" office:value-type="float" office:value="-128.400525366592" calcext:value-type="float">
            <text:p>-128,400525366592</text:p>
          </table:table-cell>
          <table:table-cell table:style-name="ce1" table:formula="of:=[.G285]+h" office:value-type="float" office:value="2.83999999999998" calcext:value-type="float">
            <text:p>2,83999999999998</text:p>
          </table:table-cell>
          <table:table-cell table:style-name="ce1" table:formula="of:=[.H285]+ h*[.F286]" office:value-type="float" office:value="299.71564266953" calcext:value-type="float">
            <text:p>299,71564266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6]" office:value-type="float" office:value="2.83999999999998" calcext:value-type="float">
            <text:p>2,83999999999998</text:p>
          </table:table-cell>
          <table:table-cell table:style-name="ce1" table:formula="of:=[.H286]" office:value-type="float" office:value="299.71564266953" calcext:value-type="float">
            <text:p>299,71564266953</text:p>
          </table:table-cell>
          <table:table-cell table:style-name="ce1" table:formula="of:=-68 - ([.E287]^2/Ao)" office:value-type="float" office:value="-127.886310973873" calcext:value-type="float">
            <text:p>-127,886310973873</text:p>
          </table:table-cell>
          <table:table-cell table:style-name="ce1" table:formula="of:=[.G286]+h" office:value-type="float" office:value="2.84999999999998" calcext:value-type="float">
            <text:p>2,84999999999998</text:p>
          </table:table-cell>
          <table:table-cell table:style-name="ce1" table:formula="of:=[.H286]+ h*[.F287]" office:value-type="float" office:value="298.436779559791" calcext:value-type="float">
            <text:p>298,4367795597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7]" office:value-type="float" office:value="2.84999999999998" calcext:value-type="float">
            <text:p>2,84999999999998</text:p>
          </table:table-cell>
          <table:table-cell table:style-name="ce1" table:formula="of:=[.H287]" office:value-type="float" office:value="298.436779559791" calcext:value-type="float">
            <text:p>298,436779559791</text:p>
          </table:table-cell>
          <table:table-cell table:style-name="ce1" table:formula="of:=-68 - ([.E288]^2/Ao)" office:value-type="float" office:value="-127.376340929346" calcext:value-type="float">
            <text:p>-127,376340929346</text:p>
          </table:table-cell>
          <table:table-cell table:style-name="ce1" table:formula="of:=[.G287]+h" office:value-type="float" office:value="2.85999999999998" calcext:value-type="float">
            <text:p>2,85999999999998</text:p>
          </table:table-cell>
          <table:table-cell table:style-name="ce1" table:formula="of:=[.H287]+ h*[.F288]" office:value-type="float" office:value="297.163016150498" calcext:value-type="float">
            <text:p>297,1630161504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8]" office:value-type="float" office:value="2.85999999999998" calcext:value-type="float">
            <text:p>2,85999999999998</text:p>
          </table:table-cell>
          <table:table-cell table:style-name="ce1" table:formula="of:=[.H288]" office:value-type="float" office:value="297.163016150498" calcext:value-type="float">
            <text:p>297,163016150498</text:p>
          </table:table-cell>
          <table:table-cell table:style-name="ce1" table:formula="of:=-68 - ([.E289]^2/Ao)" office:value-type="float" office:value="-126.870572111774" calcext:value-type="float">
            <text:p>-126,870572111774</text:p>
          </table:table-cell>
          <table:table-cell table:style-name="ce1" table:formula="of:=[.G288]+h" office:value-type="float" office:value="2.86999999999998" calcext:value-type="float">
            <text:p>2,86999999999998</text:p>
          </table:table-cell>
          <table:table-cell table:style-name="ce1" table:formula="of:=[.H288]+ h*[.F289]" office:value-type="float" office:value="295.89431042938" calcext:value-type="float">
            <text:p>295,894310429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9]" office:value-type="float" office:value="2.86999999999998" calcext:value-type="float">
            <text:p>2,86999999999998</text:p>
          </table:table-cell>
          <table:table-cell table:style-name="ce1" table:formula="of:=[.H289]" office:value-type="float" office:value="295.89431042938" calcext:value-type="float">
            <text:p>295,89431042938</text:p>
          </table:table-cell>
          <table:table-cell table:style-name="ce1" table:formula="of:=-68 - ([.E290]^2/Ao)" office:value-type="float" office:value="-126.368961962986" calcext:value-type="float">
            <text:p>-126,368961962986</text:p>
          </table:table-cell>
          <table:table-cell table:style-name="ce1" table:formula="of:=[.G289]+h" office:value-type="float" office:value="2.87999999999998" calcext:value-type="float">
            <text:p>2,87999999999998</text:p>
          </table:table-cell>
          <table:table-cell table:style-name="ce1" table:formula="of:=[.H289]+ h*[.F290]" office:value-type="float" office:value="294.63062080975" calcext:value-type="float">
            <text:p>294,630620809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0]" office:value-type="float" office:value="2.87999999999998" calcext:value-type="float">
            <text:p>2,87999999999998</text:p>
          </table:table-cell>
          <table:table-cell table:style-name="ce1" table:formula="of:=[.H290]" office:value-type="float" office:value="294.63062080975" calcext:value-type="float">
            <text:p>294,63062080975</text:p>
          </table:table-cell>
          <table:table-cell table:style-name="ce1" table:formula="of:=-68 - ([.E291]^2/Ao)" office:value-type="float" office:value="-125.871468479159" calcext:value-type="float">
            <text:p>-125,871468479159</text:p>
          </table:table-cell>
          <table:table-cell table:style-name="ce1" table:formula="of:=[.G290]+h" office:value-type="float" office:value="2.88999999999998" calcext:value-type="float">
            <text:p>2,88999999999998</text:p>
          </table:table-cell>
          <table:table-cell table:style-name="ce1" table:formula="of:=[.H290]+ h*[.F291]" office:value-type="float" office:value="293.371906124959" calcext:value-type="float">
            <text:p>293,3719061249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1]" office:value-type="float" office:value="2.88999999999998" calcext:value-type="float">
            <text:p>2,88999999999998</text:p>
          </table:table-cell>
          <table:table-cell table:style-name="ce1" table:formula="of:=[.H291]" office:value-type="float" office:value="293.371906124959" calcext:value-type="float">
            <text:p>293,371906124959</text:p>
          </table:table-cell>
          <table:table-cell table:style-name="ce1" table:formula="of:=-68 - ([.E292]^2/Ao)" office:value-type="float" office:value="-125.378050202261" calcext:value-type="float">
            <text:p>-125,378050202261</text:p>
          </table:table-cell>
          <table:table-cell table:style-name="ce1" table:formula="of:=[.G291]+h" office:value-type="float" office:value="2.89999999999998" calcext:value-type="float">
            <text:p>2,89999999999998</text:p>
          </table:table-cell>
          <table:table-cell table:style-name="ce1" table:formula="of:=[.H291]+ h*[.F292]" office:value-type="float" office:value="292.118125622936" calcext:value-type="float">
            <text:p>292,1181256229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2]" office:value-type="float" office:value="2.89999999999998" calcext:value-type="float">
            <text:p>2,89999999999998</text:p>
          </table:table-cell>
          <table:table-cell table:style-name="ce1" table:formula="of:=[.H292]" office:value-type="float" office:value="292.118125622936" calcext:value-type="float">
            <text:p>292,118125622936</text:p>
          </table:table-cell>
          <table:table-cell table:style-name="ce1" table:formula="of:=-68 - ([.E293]^2/Ao)" office:value-type="float" office:value="-124.888666211638" calcext:value-type="float">
            <text:p>-124,888666211638</text:p>
          </table:table-cell>
          <table:table-cell table:style-name="ce1" table:formula="of:=[.G292]+h" office:value-type="float" office:value="2.90999999999998" calcext:value-type="float">
            <text:p>2,90999999999998</text:p>
          </table:table-cell>
          <table:table-cell table:style-name="ce1" table:formula="of:=[.H292]+ h*[.F293]" office:value-type="float" office:value="290.86923896082" calcext:value-type="float">
            <text:p>290,869238960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3]" office:value-type="float" office:value="2.90999999999998" calcext:value-type="float">
            <text:p>2,90999999999998</text:p>
          </table:table-cell>
          <table:table-cell table:style-name="ce1" table:formula="of:=[.H293]" office:value-type="float" office:value="290.86923896082" calcext:value-type="float">
            <text:p>290,86923896082</text:p>
          </table:table-cell>
          <table:table-cell table:style-name="ce1" table:formula="of:=-68 - ([.E294]^2/Ao)" office:value-type="float" office:value="-124.403276115764" calcext:value-type="float">
            <text:p>-124,403276115764</text:p>
          </table:table-cell>
          <table:table-cell table:style-name="ce1" table:formula="of:=[.G293]+h" office:value-type="float" office:value="2.91999999999998" calcext:value-type="float">
            <text:p>2,91999999999998</text:p>
          </table:table-cell>
          <table:table-cell table:style-name="ce1" table:formula="of:=[.H293]+ h*[.F294]" office:value-type="float" office:value="289.625206199662" calcext:value-type="float">
            <text:p>289,6252061996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4]" office:value-type="float" office:value="2.91999999999998" calcext:value-type="float">
            <text:p>2,91999999999998</text:p>
          </table:table-cell>
          <table:table-cell table:style-name="ce1" table:formula="of:=[.H294]" office:value-type="float" office:value="289.625206199662" calcext:value-type="float">
            <text:p>289,625206199662</text:p>
          </table:table-cell>
          <table:table-cell table:style-name="ce1" table:formula="of:=-68 - ([.E295]^2/Ao)" office:value-type="float" office:value="-123.921840044131" calcext:value-type="float">
            <text:p>-123,921840044131</text:p>
          </table:table-cell>
          <table:table-cell table:style-name="ce1" table:formula="of:=[.G294]+h" office:value-type="float" office:value="2.92999999999998" calcext:value-type="float">
            <text:p>2,92999999999998</text:p>
          </table:table-cell>
          <table:table-cell table:style-name="ce1" table:formula="of:=[.H294]+ h*[.F295]" office:value-type="float" office:value="288.385987799221" calcext:value-type="float">
            <text:p>288,3859877992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5]" office:value-type="float" office:value="2.92999999999998" calcext:value-type="float">
            <text:p>2,92999999999998</text:p>
          </table:table-cell>
          <table:table-cell table:style-name="ce1" table:formula="of:=[.H295]" office:value-type="float" office:value="288.385987799221" calcext:value-type="float">
            <text:p>288,385987799221</text:p>
          </table:table-cell>
          <table:table-cell table:style-name="ce1" table:formula="of:=-68 - ([.E296]^2/Ao)" office:value-type="float" office:value="-123.444318639288" calcext:value-type="float">
            <text:p>-123,444318639288</text:p>
          </table:table-cell>
          <table:table-cell table:style-name="ce1" table:formula="of:=[.G295]+h" office:value-type="float" office:value="2.93999999999998" calcext:value-type="float">
            <text:p>2,93999999999998</text:p>
          </table:table-cell>
          <table:table-cell table:style-name="ce1" table:formula="of:=[.H295]+ h*[.F296]" office:value-type="float" office:value="287.151544612828" calcext:value-type="float">
            <text:p>287,1515446128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6]" office:value-type="float" office:value="2.93999999999998" calcext:value-type="float">
            <text:p>2,93999999999998</text:p>
          </table:table-cell>
          <table:table-cell table:style-name="ce1" table:formula="of:=[.H296]" office:value-type="float" office:value="287.151544612828" calcext:value-type="float">
            <text:p>287,151544612828</text:p>
          </table:table-cell>
          <table:table-cell table:style-name="ce1" table:formula="of:=-68 - ([.E297]^2/Ao)" office:value-type="float" office:value="-122.970673049022" calcext:value-type="float">
            <text:p>-122,970673049022</text:p>
          </table:table-cell>
          <table:table-cell table:style-name="ce1" table:formula="of:=[.G296]+h" office:value-type="float" office:value="2.94999999999998" calcext:value-type="float">
            <text:p>2,94999999999998</text:p>
          </table:table-cell>
          <table:table-cell table:style-name="ce1" table:formula="of:=[.H296]+ h*[.F297]" office:value-type="float" office:value="285.921837882338" calcext:value-type="float">
            <text:p>285,9218378823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7]" office:value-type="float" office:value="2.94999999999998" calcext:value-type="float">
            <text:p>2,94999999999998</text:p>
          </table:table-cell>
          <table:table-cell table:style-name="ce1" table:formula="of:=[.H297]" office:value-type="float" office:value="285.921837882338" calcext:value-type="float">
            <text:p>285,921837882338</text:p>
          </table:table-cell>
          <table:table-cell table:style-name="ce1" table:formula="of:=-68 - ([.E298]^2/Ao)" office:value-type="float" office:value="-122.500864918676" calcext:value-type="float">
            <text:p>-122,500864918676</text:p>
          </table:table-cell>
          <table:table-cell table:style-name="ce1" table:formula="of:=[.G297]+h" office:value-type="float" office:value="2.95999999999998" calcext:value-type="float">
            <text:p>2,95999999999998</text:p>
          </table:table-cell>
          <table:table-cell table:style-name="ce1" table:formula="of:=[.H297]+ h*[.F298]" office:value-type="float" office:value="284.696829233151" calcext:value-type="float">
            <text:p>284,6968292331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8]" office:value-type="float" office:value="2.95999999999998" calcext:value-type="float">
            <text:p>2,95999999999998</text:p>
          </table:table-cell>
          <table:table-cell table:style-name="ce1" table:formula="of:=[.H298]" office:value-type="float" office:value="284.696829233151" calcext:value-type="float">
            <text:p>284,696829233151</text:p>
          </table:table-cell>
          <table:table-cell table:style-name="ce1" table:formula="of:=-68 - ([.E299]^2/Ao)" office:value-type="float" office:value="-122.034856383607" calcext:value-type="float">
            <text:p>-122,034856383607</text:p>
          </table:table-cell>
          <table:table-cell table:style-name="ce1" table:formula="of:=[.G298]+h" office:value-type="float" office:value="2.96999999999998" calcext:value-type="float">
            <text:p>2,96999999999998</text:p>
          </table:table-cell>
          <table:table-cell table:style-name="ce1" table:formula="of:=[.H298]+ h*[.F299]" office:value-type="float" office:value="283.476480669315" calcext:value-type="float">
            <text:p>283,4764806693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9]" office:value-type="float" office:value="2.96999999999998" calcext:value-type="float">
            <text:p>2,96999999999998</text:p>
          </table:table-cell>
          <table:table-cell table:style-name="ce1" table:formula="of:=[.H299]" office:value-type="float" office:value="283.476480669315" calcext:value-type="float">
            <text:p>283,476480669315</text:p>
          </table:table-cell>
          <table:table-cell table:style-name="ce1" table:formula="of:=-68 - ([.E300]^2/Ao)" office:value-type="float" office:value="-121.572610061774" calcext:value-type="float">
            <text:p>-121,572610061774</text:p>
          </table:table-cell>
          <table:table-cell table:style-name="ce1" table:formula="of:=[.G299]+h" office:value-type="float" office:value="2.97999999999998" calcext:value-type="float">
            <text:p>2,97999999999998</text:p>
          </table:table-cell>
          <table:table-cell table:style-name="ce1" table:formula="of:=[.H299]+ h*[.F300]" office:value-type="float" office:value="282.260754568697" calcext:value-type="float">
            <text:p>282,2607545686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0]" office:value-type="float" office:value="2.97999999999998" calcext:value-type="float">
            <text:p>2,97999999999998</text:p>
          </table:table-cell>
          <table:table-cell table:style-name="ce1" table:formula="of:=[.H300]" office:value-type="float" office:value="282.260754568697" calcext:value-type="float">
            <text:p>282,260754568697</text:p>
          </table:table-cell>
          <table:table-cell table:style-name="ce1" table:formula="of:=-68 - ([.E301]^2/Ao)" office:value-type="float" office:value="-121.11408904646" calcext:value-type="float">
            <text:p>-121,11408904646</text:p>
          </table:table-cell>
          <table:table-cell table:style-name="ce1" table:formula="of:=[.G300]+h" office:value-type="float" office:value="2.98999999999998" calcext:value-type="float">
            <text:p>2,98999999999998</text:p>
          </table:table-cell>
          <table:table-cell table:style-name="ce1" table:formula="of:=[.H300]+ h*[.F301]" office:value-type="float" office:value="281.049613678232" calcext:value-type="float">
            <text:p>281,0496136782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1]" office:value-type="float" office:value="2.98999999999998" calcext:value-type="float">
            <text:p>2,98999999999998</text:p>
          </table:table-cell>
          <table:table-cell table:style-name="ce1" table:formula="of:=[.H301]" office:value-type="float" office:value="281.049613678232" calcext:value-type="float">
            <text:p>281,049613678232</text:p>
          </table:table-cell>
          <table:table-cell table:style-name="ce1" table:formula="of:=-68 - ([.E302]^2/Ao)" office:value-type="float" office:value="-120.659256899122" calcext:value-type="float">
            <text:p>-120,659256899122</text:p>
          </table:table-cell>
          <table:table-cell table:style-name="ce1" table:formula="of:=[.G301]+h" office:value-type="float" office:value="2.99999999999998" calcext:value-type="float">
            <text:p>2,99999999999998</text:p>
          </table:table-cell>
          <table:table-cell table:style-name="ce1" table:formula="of:=[.H301]+ h*[.F302]" office:value-type="float" office:value="279.843021109241" calcext:value-type="float">
            <text:p>279,8430211092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2]" office:value-type="float" office:value="2.99999999999998" calcext:value-type="float">
            <text:p>2,99999999999998</text:p>
          </table:table-cell>
          <table:table-cell table:style-name="ce1" table:formula="of:=[.H302]" office:value-type="float" office:value="279.843021109241" calcext:value-type="float">
            <text:p>279,843021109241</text:p>
          </table:table-cell>
          <table:table-cell table:style-name="ce1" table:formula="of:=-68 - ([.E303]^2/Ao)" office:value-type="float" office:value="-120.208077642365" calcext:value-type="float">
            <text:p>-120,208077642365</text:p>
          </table:table-cell>
          <table:table-cell table:style-name="ce1" table:formula="of:=[.G302]+h" office:value-type="float" office:value="3.00999999999998" calcext:value-type="float">
            <text:p>3,00999999999998</text:p>
          </table:table-cell>
          <table:table-cell table:style-name="ce1" table:formula="of:=[.H302]+ h*[.F303]" office:value-type="float" office:value="278.640940332818" calcext:value-type="float">
            <text:p>278,6409403328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3]" office:value-type="float" office:value="3.00999999999998" calcext:value-type="float">
            <text:p>3,00999999999998</text:p>
          </table:table-cell>
          <table:table-cell table:style-name="ce1" table:formula="of:=[.H303]" office:value-type="float" office:value="278.640940332818" calcext:value-type="float">
            <text:p>278,640940332818</text:p>
          </table:table-cell>
          <table:table-cell table:style-name="ce1" table:formula="of:=-68 - ([.E304]^2/Ao)" office:value-type="float" office:value="-119.760515753038" calcext:value-type="float">
            <text:p>-119,760515753038</text:p>
          </table:table-cell>
          <table:table-cell table:style-name="ce1" table:formula="of:=[.G303]+h" office:value-type="float" office:value="3.01999999999998" calcext:value-type="float">
            <text:p>3,01999999999998</text:p>
          </table:table-cell>
          <table:table-cell table:style-name="ce1" table:formula="of:=[.H303]+ h*[.F304]" office:value-type="float" office:value="277.443335175287" calcext:value-type="float">
            <text:p>277,4433351752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4]" office:value-type="float" office:value="3.01999999999998" calcext:value-type="float">
            <text:p>3,01999999999998</text:p>
          </table:table-cell>
          <table:table-cell table:style-name="ce1" table:formula="of:=[.H304]" office:value-type="float" office:value="277.443335175287" calcext:value-type="float">
            <text:p>277,443335175287</text:p>
          </table:table-cell>
          <table:table-cell table:style-name="ce1" table:formula="of:=-68 - ([.E305]^2/Ao)" office:value-type="float" office:value="-119.316536155458" calcext:value-type="float">
            <text:p>-119,316536155458</text:p>
          </table:table-cell>
          <table:table-cell table:style-name="ce1" table:formula="of:=[.G304]+h" office:value-type="float" office:value="3.02999999999998" calcext:value-type="float">
            <text:p>3,02999999999998</text:p>
          </table:table-cell>
          <table:table-cell table:style-name="ce1" table:formula="of:=[.H304]+ h*[.F305]" office:value-type="float" office:value="276.250169813733" calcext:value-type="float">
            <text:p>276,2501698137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5]" office:value-type="float" office:value="3.02999999999998" calcext:value-type="float">
            <text:p>3,02999999999998</text:p>
          </table:table-cell>
          <table:table-cell table:style-name="ce1" table:formula="of:=[.H305]" office:value-type="float" office:value="276.250169813733" calcext:value-type="float">
            <text:p>276,250169813733</text:p>
          </table:table-cell>
          <table:table-cell table:style-name="ce1" table:formula="of:=-68 - ([.E306]^2/Ao)" office:value-type="float" office:value="-118.876104214744" calcext:value-type="float">
            <text:p>-118,876104214744</text:p>
          </table:table-cell>
          <table:table-cell table:style-name="ce1" table:formula="of:=[.G305]+h" office:value-type="float" office:value="3.03999999999998" calcext:value-type="float">
            <text:p>3,03999999999998</text:p>
          </table:table-cell>
          <table:table-cell table:style-name="ce1" table:formula="of:=[.H305]+ h*[.F306]" office:value-type="float" office:value="275.061408771585" calcext:value-type="float">
            <text:p>275,0614087715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6]" office:value-type="float" office:value="3.03999999999998" calcext:value-type="float">
            <text:p>3,03999999999998</text:p>
          </table:table-cell>
          <table:table-cell table:style-name="ce1" table:formula="of:=[.H306]" office:value-type="float" office:value="275.061408771585" calcext:value-type="float">
            <text:p>275,061408771585</text:p>
          </table:table-cell>
          <table:table-cell table:style-name="ce1" table:formula="of:=-68 - ([.E307]^2/Ao)" office:value-type="float" office:value="-118.439185730273" calcext:value-type="float">
            <text:p>-118,439185730273</text:p>
          </table:table-cell>
          <table:table-cell table:style-name="ce1" table:formula="of:=[.G306]+h" office:value-type="float" office:value="3.04999999999998" calcext:value-type="float">
            <text:p>3,04999999999998</text:p>
          </table:table-cell>
          <table:table-cell table:style-name="ce1" table:formula="of:=[.H306]+ h*[.F307]" office:value-type="float" office:value="273.877016914282" calcext:value-type="float">
            <text:p>273,8770169142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7]" office:value-type="float" office:value="3.04999999999998" calcext:value-type="float">
            <text:p>3,04999999999998</text:p>
          </table:table-cell>
          <table:table-cell table:style-name="ce1" table:formula="of:=[.H307]" office:value-type="float" office:value="273.877016914282" calcext:value-type="float">
            <text:p>273,877016914282</text:p>
          </table:table-cell>
          <table:table-cell table:style-name="ce1" table:formula="of:=-68 - ([.E308]^2/Ao)" office:value-type="float" office:value="-118.005746929244" calcext:value-type="float">
            <text:p>-118,005746929244</text:p>
          </table:table-cell>
          <table:table-cell table:style-name="ce1" table:formula="of:=[.G307]+h" office:value-type="float" office:value="3.05999999999998" calcext:value-type="float">
            <text:p>3,05999999999998</text:p>
          </table:table-cell>
          <table:table-cell table:style-name="ce1" table:formula="of:=[.H307]+ h*[.F308]" office:value-type="float" office:value="272.69695944499" calcext:value-type="float">
            <text:p>272,696959444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8]" office:value-type="float" office:value="3.05999999999998" calcext:value-type="float">
            <text:p>3,05999999999998</text:p>
          </table:table-cell>
          <table:table-cell table:style-name="ce1" table:formula="of:=[.H308]" office:value-type="float" office:value="272.69695944499" calcext:value-type="float">
            <text:p>272,69695944499</text:p>
          </table:table-cell>
          <table:table-cell table:style-name="ce1" table:formula="of:=-68 - ([.E309]^2/Ao)" office:value-type="float" office:value="-117.575754460362" calcext:value-type="float">
            <text:p>-117,575754460362</text:p>
          </table:table-cell>
          <table:table-cell table:style-name="ce1" table:formula="of:=[.G308]+h" office:value-type="float" office:value="3.06999999999998" calcext:value-type="float">
            <text:p>3,06999999999998</text:p>
          </table:table-cell>
          <table:table-cell table:style-name="ce1" table:formula="of:=[.H308]+ h*[.F309]" office:value-type="float" office:value="271.521201900386" calcext:value-type="float">
            <text:p>271,5212019003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9]" office:value-type="float" office:value="3.06999999999998" calcext:value-type="float">
            <text:p>3,06999999999998</text:p>
          </table:table-cell>
          <table:table-cell table:style-name="ce1" table:formula="of:=[.H309]" office:value-type="float" office:value="271.521201900386" calcext:value-type="float">
            <text:p>271,521201900386</text:p>
          </table:table-cell>
          <table:table-cell table:style-name="ce1" table:formula="of:=-68 - ([.E310]^2/Ao)" office:value-type="float" office:value="-117.14917538762" calcext:value-type="float">
            <text:p>-117,14917538762</text:p>
          </table:table-cell>
          <table:table-cell table:style-name="ce1" table:formula="of:=[.G309]+h" office:value-type="float" office:value="3.07999999999998" calcext:value-type="float">
            <text:p>3,07999999999998</text:p>
          </table:table-cell>
          <table:table-cell table:style-name="ce1" table:formula="of:=[.H309]+ h*[.F310]" office:value-type="float" office:value="270.34971014651" calcext:value-type="float">
            <text:p>270,349710146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0]" office:value-type="float" office:value="3.07999999999998" calcext:value-type="float">
            <text:p>3,07999999999998</text:p>
          </table:table-cell>
          <table:table-cell table:style-name="ce1" table:formula="of:=[.H310]" office:value-type="float" office:value="270.34971014651" calcext:value-type="float">
            <text:p>270,34971014651</text:p>
          </table:table-cell>
          <table:table-cell table:style-name="ce1" table:formula="of:=-68 - ([.E311]^2/Ao)" office:value-type="float" office:value="-116.725977184201" calcext:value-type="float">
            <text:p>-116,725977184201</text:p>
          </table:table-cell>
          <table:table-cell table:style-name="ce1" table:formula="of:=[.G310]+h" office:value-type="float" office:value="3.08999999999998" calcext:value-type="float">
            <text:p>3,08999999999998</text:p>
          </table:table-cell>
          <table:table-cell table:style-name="ce1" table:formula="of:=[.H310]+ h*[.F311]" office:value-type="float" office:value="269.182450374668" calcext:value-type="float">
            <text:p>269,1824503746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1]" office:value-type="float" office:value="3.08999999999998" calcext:value-type="float">
            <text:p>3,08999999999998</text:p>
          </table:table-cell>
          <table:table-cell table:style-name="ce1" table:formula="of:=[.H311]" office:value-type="float" office:value="269.182450374668" calcext:value-type="float">
            <text:p>269,182450374668</text:p>
          </table:table-cell>
          <table:table-cell table:style-name="ce1" table:formula="of:=-68 - ([.E312]^2/Ao)" office:value-type="float" office:value="-116.306127726474" calcext:value-type="float">
            <text:p>-116,306127726474</text:p>
          </table:table-cell>
          <table:table-cell table:style-name="ce1" table:formula="of:=[.G311]+h" office:value-type="float" office:value="3.09999999999998" calcext:value-type="float">
            <text:p>3,09999999999998</text:p>
          </table:table-cell>
          <table:table-cell table:style-name="ce1" table:formula="of:=[.H311]+ h*[.F312]" office:value-type="float" office:value="268.019389097403" calcext:value-type="float">
            <text:p>268,0193890974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2]" office:value-type="float" office:value="3.09999999999998" calcext:value-type="float">
            <text:p>3,09999999999998</text:p>
          </table:table-cell>
          <table:table-cell table:style-name="ce1" table:formula="of:=[.H312]" office:value-type="float" office:value="268.019389097403" calcext:value-type="float">
            <text:p>268,019389097403</text:p>
          </table:table-cell>
          <table:table-cell table:style-name="ce1" table:formula="of:=-68 - ([.E313]^2/Ao)" office:value-type="float" office:value="-115.889595288097" calcext:value-type="float">
            <text:p>-115,889595288097</text:p>
          </table:table-cell>
          <table:table-cell table:style-name="ce1" table:formula="of:=[.G312]+h" office:value-type="float" office:value="3.10999999999998" calcext:value-type="float">
            <text:p>3,10999999999998</text:p>
          </table:table-cell>
          <table:table-cell table:style-name="ce1" table:formula="of:=[.H312]+ h*[.F313]" office:value-type="float" office:value="266.860493144523" calcext:value-type="float">
            <text:p>266,8604931445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3]" office:value-type="float" office:value="3.10999999999998" calcext:value-type="float">
            <text:p>3,10999999999998</text:p>
          </table:table-cell>
          <table:table-cell table:style-name="ce1" table:formula="of:=[.H313]" office:value-type="float" office:value="266.860493144523" calcext:value-type="float">
            <text:p>266,860493144523</text:p>
          </table:table-cell>
          <table:table-cell table:style-name="ce1" table:formula="of:=-68 - ([.E314]^2/Ao)" office:value-type="float" office:value="-115.476348534225" calcext:value-type="float">
            <text:p>-115,476348534225</text:p>
          </table:table-cell>
          <table:table-cell table:style-name="ce1" table:formula="of:=[.G313]+h" office:value-type="float" office:value="3.11999999999998" calcext:value-type="float">
            <text:p>3,11999999999998</text:p>
          </table:table-cell>
          <table:table-cell table:style-name="ce1" table:formula="of:=[.H313]+ h*[.F314]" office:value-type="float" office:value="265.70572965918" calcext:value-type="float">
            <text:p>265,705729659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4]" office:value-type="float" office:value="3.11999999999998" calcext:value-type="float">
            <text:p>3,11999999999998</text:p>
          </table:table-cell>
          <table:table-cell table:style-name="ce1" table:formula="of:=[.H314]" office:value-type="float" office:value="265.70572965918" calcext:value-type="float">
            <text:p>265,70572965918</text:p>
          </table:table-cell>
          <table:table-cell table:style-name="ce1" table:formula="of:=-68 - ([.E315]^2/Ao)" office:value-type="float" office:value="-115.066356515812" calcext:value-type="float">
            <text:p>-115,066356515812</text:p>
          </table:table-cell>
          <table:table-cell table:style-name="ce1" table:formula="of:=[.G314]+h" office:value-type="float" office:value="3.12999999999998" calcext:value-type="float">
            <text:p>3,12999999999998</text:p>
          </table:table-cell>
          <table:table-cell table:style-name="ce1" table:formula="of:=[.H314]+ h*[.F315]" office:value-type="float" office:value="264.555066094022" calcext:value-type="float">
            <text:p>264,5550660940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5]" office:value-type="float" office:value="3.12999999999998" calcext:value-type="float">
            <text:p>3,12999999999998</text:p>
          </table:table-cell>
          <table:table-cell table:style-name="ce1" table:formula="of:=[.H315]" office:value-type="float" office:value="264.555066094022" calcext:value-type="float">
            <text:p>264,555066094022</text:p>
          </table:table-cell>
          <table:table-cell table:style-name="ce1" table:formula="of:=-68 - ([.E316]^2/Ao)" office:value-type="float" office:value="-114.659588664008" calcext:value-type="float">
            <text:p>-114,659588664008</text:p>
          </table:table-cell>
          <table:table-cell table:style-name="ce1" table:formula="of:=[.G315]+h" office:value-type="float" office:value="3.13999999999998" calcext:value-type="float">
            <text:p>3,13999999999998</text:p>
          </table:table-cell>
          <table:table-cell table:style-name="ce1" table:formula="of:=[.H315]+ h*[.F316]" office:value-type="float" office:value="263.408470207382" calcext:value-type="float">
            <text:p>263,4084702073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6]" office:value-type="float" office:value="3.13999999999998" calcext:value-type="float">
            <text:p>3,13999999999998</text:p>
          </table:table-cell>
          <table:table-cell table:style-name="ce1" table:formula="of:=[.H316]" office:value-type="float" office:value="263.408470207382" calcext:value-type="float">
            <text:p>263,408470207382</text:p>
          </table:table-cell>
          <table:table-cell table:style-name="ce1" table:formula="of:=-68 - ([.E317]^2/Ao)" office:value-type="float" office:value="-114.256014784662" calcext:value-type="float">
            <text:p>-114,256014784662</text:p>
          </table:table-cell>
          <table:table-cell table:style-name="ce1" table:formula="of:=[.G316]+h" office:value-type="float" office:value="3.14999999999998" calcext:value-type="float">
            <text:p>3,14999999999998</text:p>
          </table:table-cell>
          <table:table-cell table:style-name="ce1" table:formula="of:=[.H316]+ h*[.F317]" office:value-type="float" office:value="262.265910059535" calcext:value-type="float">
            <text:p>262,2659100595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7]" office:value-type="float" office:value="3.14999999999998" calcext:value-type="float">
            <text:p>3,14999999999998</text:p>
          </table:table-cell>
          <table:table-cell table:style-name="ce1" table:formula="of:=[.H317]" office:value-type="float" office:value="262.265910059535" calcext:value-type="float">
            <text:p>262,265910059535</text:p>
          </table:table-cell>
          <table:table-cell table:style-name="ce1" table:formula="of:=-68 - ([.E318]^2/Ao)" office:value-type="float" office:value="-113.855605052904" calcext:value-type="float">
            <text:p>-113,855605052904</text:p>
          </table:table-cell>
          <table:table-cell table:style-name="ce1" table:formula="of:=[.G317]+h" office:value-type="float" office:value="3.15999999999998" calcext:value-type="float">
            <text:p>3,15999999999998</text:p>
          </table:table-cell>
          <table:table-cell table:style-name="ce1" table:formula="of:=[.H317]+ h*[.F318]" office:value-type="float" office:value="261.127354009006" calcext:value-type="float">
            <text:p>261,1273540090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8]" office:value-type="float" office:value="3.15999999999998" calcext:value-type="float">
            <text:p>3,15999999999998</text:p>
          </table:table-cell>
          <table:table-cell table:style-name="ce1" table:formula="of:=[.H318]" office:value-type="float" office:value="261.127354009006" calcext:value-type="float">
            <text:p>261,127354009006</text:p>
          </table:table-cell>
          <table:table-cell table:style-name="ce1" table:formula="of:=-68 - ([.E319]^2/Ao)" office:value-type="float" office:value="-113.45833000783" calcext:value-type="float">
            <text:p>-113,45833000783</text:p>
          </table:table-cell>
          <table:table-cell table:style-name="ce1" table:formula="of:=[.G318]+h" office:value-type="float" office:value="3.16999999999998" calcext:value-type="float">
            <text:p>3,16999999999998</text:p>
          </table:table-cell>
          <table:table-cell table:style-name="ce1" table:formula="of:=[.H318]+ h*[.F319]" office:value-type="float" office:value="259.992770708928" calcext:value-type="float">
            <text:p>259,9927707089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9]" office:value-type="float" office:value="3.16999999999998" calcext:value-type="float">
            <text:p>3,16999999999998</text:p>
          </table:table-cell>
          <table:table-cell table:style-name="ce1" table:formula="of:=[.H319]" office:value-type="float" office:value="259.992770708928" calcext:value-type="float">
            <text:p>259,992770708928</text:p>
          </table:table-cell>
          <table:table-cell table:style-name="ce1" table:formula="of:=-68 - ([.E320]^2/Ao)" office:value-type="float" office:value="-113.06416054727" calcext:value-type="float">
            <text:p>-113,06416054727</text:p>
          </table:table-cell>
          <table:table-cell table:style-name="ce1" table:formula="of:=[.G319]+h" office:value-type="float" office:value="3.17999999999998" calcext:value-type="float">
            <text:p>3,17999999999998</text:p>
          </table:table-cell>
          <table:table-cell table:style-name="ce1" table:formula="of:=[.H319]+ h*[.F320]" office:value-type="float" office:value="258.862129103455" calcext:value-type="float">
            <text:p>258,8621291034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0]" office:value-type="float" office:value="3.17999999999998" calcext:value-type="float">
            <text:p>3,17999999999998</text:p>
          </table:table-cell>
          <table:table-cell table:style-name="ce1" table:formula="of:=[.H320]" office:value-type="float" office:value="258.862129103455" calcext:value-type="float">
            <text:p>258,862129103455</text:p>
          </table:table-cell>
          <table:table-cell table:style-name="ce1" table:formula="of:=-68 - ([.E321]^2/Ao)" office:value-type="float" office:value="-112.673067922649" calcext:value-type="float">
            <text:p>-112,673067922649</text:p>
          </table:table-cell>
          <table:table-cell table:style-name="ce1" table:formula="of:=[.G320]+h" office:value-type="float" office:value="3.18999999999998" calcext:value-type="float">
            <text:p>3,18999999999998</text:p>
          </table:table-cell>
          <table:table-cell table:style-name="ce1" table:formula="of:=[.H320]+ h*[.F321]" office:value-type="float" office:value="257.735398424229" calcext:value-type="float">
            <text:p>257,7353984242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1]" office:value-type="float" office:value="3.18999999999998" calcext:value-type="float">
            <text:p>3,18999999999998</text:p>
          </table:table-cell>
          <table:table-cell table:style-name="ce1" table:formula="of:=[.H321]" office:value-type="float" office:value="257.735398424229" calcext:value-type="float">
            <text:p>257,735398424229</text:p>
          </table:table-cell>
          <table:table-cell table:style-name="ce1" table:formula="of:=-68 - ([.E322]^2/Ao)" office:value-type="float" office:value="-112.285023733931" calcext:value-type="float">
            <text:p>-112,285023733931</text:p>
          </table:table-cell>
          <table:table-cell table:style-name="ce1" table:formula="of:=[.G321]+h" office:value-type="float" office:value="3.19999999999998" calcext:value-type="float">
            <text:p>3,19999999999998</text:p>
          </table:table-cell>
          <table:table-cell table:style-name="ce1" table:formula="of:=[.H321]+ h*[.F322]" office:value-type="float" office:value="256.61254818689" calcext:value-type="float">
            <text:p>256,612548186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2]" office:value-type="float" office:value="3.19999999999998" calcext:value-type="float">
            <text:p>3,19999999999998</text:p>
          </table:table-cell>
          <table:table-cell table:style-name="ce1" table:formula="of:=[.H322]" office:value-type="float" office:value="256.61254818689" calcext:value-type="float">
            <text:p>256,61254818689</text:p>
          </table:table-cell>
          <table:table-cell table:style-name="ce1" table:formula="of:=-68 - ([.E323]^2/Ao)" office:value-type="float" office:value="-111.899999924646" calcext:value-type="float">
            <text:p>-111,899999924646</text:p>
          </table:table-cell>
          <table:table-cell table:style-name="ce1" table:formula="of:=[.G322]+h" office:value-type="float" office:value="3.20999999999998" calcext:value-type="float">
            <text:p>3,20999999999998</text:p>
          </table:table-cell>
          <table:table-cell table:style-name="ce1" table:formula="of:=[.H322]+ h*[.F323]" office:value-type="float" office:value="255.493548187643" calcext:value-type="float">
            <text:p>255,4935481876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3]" office:value-type="float" office:value="3.20999999999998" calcext:value-type="float">
            <text:p>3,20999999999998</text:p>
          </table:table-cell>
          <table:table-cell table:style-name="ce1" table:formula="of:=[.H323]" office:value-type="float" office:value="255.493548187643" calcext:value-type="float">
            <text:p>255,493548187643</text:p>
          </table:table-cell>
          <table:table-cell table:style-name="ce1" table:formula="of:=-68 - ([.E324]^2/Ao)" office:value-type="float" office:value="-111.517968777008" calcext:value-type="float">
            <text:p>-111,517968777008</text:p>
          </table:table-cell>
          <table:table-cell table:style-name="ce1" table:formula="of:=[.G323]+h" office:value-type="float" office:value="3.21999999999998" calcext:value-type="float">
            <text:p>3,21999999999998</text:p>
          </table:table-cell>
          <table:table-cell table:style-name="ce1" table:formula="of:=[.H323]+ h*[.F324]" office:value-type="float" office:value="254.378368499873" calcext:value-type="float">
            <text:p>254,3783684998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4]" office:value-type="float" office:value="3.21999999999998" calcext:value-type="float">
            <text:p>3,21999999999998</text:p>
          </table:table-cell>
          <table:table-cell table:style-name="ce1" table:formula="of:=[.H324]" office:value-type="float" office:value="254.378368499873" calcext:value-type="float">
            <text:p>254,378368499873</text:p>
          </table:table-cell>
          <table:table-cell table:style-name="ce1" table:formula="of:=-68 - ([.E325]^2/Ao)" office:value-type="float" office:value="-111.138902907105" calcext:value-type="float">
            <text:p>-111,138902907105</text:p>
          </table:table-cell>
          <table:table-cell table:style-name="ce1" table:formula="of:=[.G324]+h" office:value-type="float" office:value="3.22999999999998" calcext:value-type="float">
            <text:p>3,22999999999998</text:p>
          </table:table-cell>
          <table:table-cell table:style-name="ce1" table:formula="of:=[.H324]+ h*[.F325]" office:value-type="float" office:value="253.266979470802" calcext:value-type="float">
            <text:p>253,2669794708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5]" office:value-type="float" office:value="3.22999999999998" calcext:value-type="float">
            <text:p>3,22999999999998</text:p>
          </table:table-cell>
          <table:table-cell table:style-name="ce1" table:formula="of:=[.H325]" office:value-type="float" office:value="253.266979470802" calcext:value-type="float">
            <text:p>253,266979470802</text:p>
          </table:table-cell>
          <table:table-cell table:style-name="ce1" table:formula="of:=-68 - ([.E326]^2/Ao)" office:value-type="float" office:value="-110.762775260176" calcext:value-type="float">
            <text:p>-110,762775260176</text:p>
          </table:table-cell>
          <table:table-cell table:style-name="ce1" table:formula="of:=[.G325]+h" office:value-type="float" office:value="3.23999999999998" calcext:value-type="float">
            <text:p>3,23999999999998</text:p>
          </table:table-cell>
          <table:table-cell table:style-name="ce1" table:formula="of:=[.H325]+ h*[.F326]" office:value-type="float" office:value="252.1593517182" calcext:value-type="float">
            <text:p>252,15935171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6]" office:value-type="float" office:value="3.23999999999998" calcext:value-type="float">
            <text:p>3,23999999999998</text:p>
          </table:table-cell>
          <table:table-cell table:style-name="ce1" table:formula="of:=[.H326]" office:value-type="float" office:value="252.1593517182" calcext:value-type="float">
            <text:p>252,1593517182</text:p>
          </table:table-cell>
          <table:table-cell table:style-name="ce1" table:formula="of:=-68 - ([.E327]^2/Ao)" office:value-type="float" office:value="-110.389559105962" calcext:value-type="float">
            <text:p>-110,389559105962</text:p>
          </table:table-cell>
          <table:table-cell table:style-name="ce1" table:formula="of:=[.G326]+h" office:value-type="float" office:value="3.24999999999997" calcext:value-type="float">
            <text:p>3,24999999999997</text:p>
          </table:table-cell>
          <table:table-cell table:style-name="ce1" table:formula="of:=[.H326]+ h*[.F327]" office:value-type="float" office:value="251.055456127141" calcext:value-type="float">
            <text:p>251,0554561271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7]" office:value-type="float" office:value="3.24999999999997" calcext:value-type="float">
            <text:p>3,24999999999997</text:p>
          </table:table-cell>
          <table:table-cell table:style-name="ce1" table:formula="of:=[.H327]" office:value-type="float" office:value="251.055456127141" calcext:value-type="float">
            <text:p>251,055456127141</text:p>
          </table:table-cell>
          <table:table-cell table:style-name="ce1" table:formula="of:=-68 - ([.E328]^2/Ao)" office:value-type="float" office:value="-110.019228034138" calcext:value-type="float">
            <text:p>-110,019228034138</text:p>
          </table:table-cell>
          <table:table-cell table:style-name="ce1" table:formula="of:=[.G327]+h" office:value-type="float" office:value="3.25999999999997" calcext:value-type="float">
            <text:p>3,25999999999997</text:p>
          </table:table-cell>
          <table:table-cell table:style-name="ce1" table:formula="of:=[.H327]+ h*[.F328]" office:value-type="float" office:value="249.955263846799" calcext:value-type="float">
            <text:p>249,9552638467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8]" office:value-type="float" office:value="3.25999999999997" calcext:value-type="float">
            <text:p>3,25999999999997</text:p>
          </table:table-cell>
          <table:table-cell table:style-name="ce1" table:formula="of:=[.H328]" office:value-type="float" office:value="249.955263846799" calcext:value-type="float">
            <text:p>249,955263846799</text:p>
          </table:table-cell>
          <table:table-cell table:style-name="ce1" table:formula="of:=-68 - ([.E329]^2/Ao)" office:value-type="float" office:value="-109.651755949815" calcext:value-type="float">
            <text:p>-109,651755949815</text:p>
          </table:table-cell>
          <table:table-cell table:style-name="ce1" table:formula="of:=[.G328]+h" office:value-type="float" office:value="3.26999999999997" calcext:value-type="float">
            <text:p>3,26999999999997</text:p>
          </table:table-cell>
          <table:table-cell table:style-name="ce1" table:formula="of:=[.H328]+ h*[.F329]" office:value-type="float" office:value="248.858746287301" calcext:value-type="float">
            <text:p>248,8587462873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9]" office:value-type="float" office:value="3.26999999999997" calcext:value-type="float">
            <text:p>3,26999999999997</text:p>
          </table:table-cell>
          <table:table-cell table:style-name="ce1" table:formula="of:=[.H329]" office:value-type="float" office:value="248.858746287301" calcext:value-type="float">
            <text:p>248,858746287301</text:p>
          </table:table-cell>
          <table:table-cell table:style-name="ce1" table:formula="of:=-68 - ([.E330]^2/Ao)" office:value-type="float" office:value="-109.287117069125" calcext:value-type="float">
            <text:p>-109,287117069125</text:p>
          </table:table-cell>
          <table:table-cell table:style-name="ce1" table:formula="of:=[.G329]+h" office:value-type="float" office:value="3.27999999999997" calcext:value-type="float">
            <text:p>3,27999999999997</text:p>
          </table:table-cell>
          <table:table-cell table:style-name="ce1" table:formula="of:=[.H329]+ h*[.F330]" office:value-type="float" office:value="247.76587511661" calcext:value-type="float">
            <text:p>247,765875116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0]" office:value-type="float" office:value="3.27999999999997" calcext:value-type="float">
            <text:p>3,27999999999997</text:p>
          </table:table-cell>
          <table:table-cell table:style-name="ce1" table:formula="of:=[.H330]" office:value-type="float" office:value="247.76587511661" calcext:value-type="float">
            <text:p>247,76587511661</text:p>
          </table:table-cell>
          <table:table-cell table:style-name="ce1" table:formula="of:=-68 - ([.E331]^2/Ao)" office:value-type="float" office:value="-108.925285914866" calcext:value-type="float">
            <text:p>-108,925285914866</text:p>
          </table:table-cell>
          <table:table-cell table:style-name="ce1" table:formula="of:=[.G330]+h" office:value-type="float" office:value="3.28999999999997" calcext:value-type="float">
            <text:p>3,28999999999997</text:p>
          </table:table-cell>
          <table:table-cell table:style-name="ce1" table:formula="of:=[.H330]+ h*[.F331]" office:value-type="float" office:value="246.676622257461" calcext:value-type="float">
            <text:p>246,6766222574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1]" office:value-type="float" office:value="3.28999999999997" calcext:value-type="float">
            <text:p>3,28999999999997</text:p>
          </table:table-cell>
          <table:table-cell table:style-name="ce1" table:formula="of:=[.H331]" office:value-type="float" office:value="246.676622257461" calcext:value-type="float">
            <text:p>246,676622257461</text:p>
          </table:table-cell>
          <table:table-cell table:style-name="ce1" table:formula="of:=-68 - ([.E332]^2/Ao)" office:value-type="float" office:value="-108.566237312233" calcext:value-type="float">
            <text:p>-108,566237312233</text:p>
          </table:table-cell>
          <table:table-cell table:style-name="ce1" table:formula="of:=[.G331]+h" office:value-type="float" office:value="3.29999999999997" calcext:value-type="float">
            <text:p>3,29999999999997</text:p>
          </table:table-cell>
          <table:table-cell table:style-name="ce1" table:formula="of:=[.H331]+ h*[.F332]" office:value-type="float" office:value="245.590959884339" calcext:value-type="float">
            <text:p>245,5909598843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2]" office:value-type="float" office:value="3.29999999999997" calcext:value-type="float">
            <text:p>3,29999999999997</text:p>
          </table:table-cell>
          <table:table-cell table:style-name="ce1" table:formula="of:=[.H332]" office:value-type="float" office:value="245.590959884339" calcext:value-type="float">
            <text:p>245,590959884339</text:p>
          </table:table-cell>
          <table:table-cell table:style-name="ce1" table:formula="of:=-68 - ([.E333]^2/Ao)" office:value-type="float" office:value="-108.209946384607" calcext:value-type="float">
            <text:p>-108,209946384607</text:p>
          </table:table-cell>
          <table:table-cell table:style-name="ce1" table:formula="of:=[.G332]+h" office:value-type="float" office:value="3.30999999999997" calcext:value-type="float">
            <text:p>3,30999999999997</text:p>
          </table:table-cell>
          <table:table-cell table:style-name="ce1" table:formula="of:=[.H332]+ h*[.F333]" office:value-type="float" office:value="244.508860420493" calcext:value-type="float">
            <text:p>244,5088604204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3]" office:value-type="float" office:value="3.30999999999997" calcext:value-type="float">
            <text:p>3,30999999999997</text:p>
          </table:table-cell>
          <table:table-cell table:style-name="ce1" table:formula="of:=[.H333]" office:value-type="float" office:value="244.508860420493" calcext:value-type="float">
            <text:p>244,508860420493</text:p>
          </table:table-cell>
          <table:table-cell table:style-name="ce1" table:formula="of:=-68 - ([.E334]^2/Ao)" office:value-type="float" office:value="-107.856388549419" calcext:value-type="float">
            <text:p>-107,856388549419</text:p>
          </table:table-cell>
          <table:table-cell table:style-name="ce1" table:formula="of:=[.G333]+h" office:value-type="float" office:value="3.31999999999997" calcext:value-type="float">
            <text:p>3,31999999999997</text:p>
          </table:table-cell>
          <table:table-cell table:style-name="ce1" table:formula="of:=[.H333]+ h*[.F334]" office:value-type="float" office:value="243.430296534999" calcext:value-type="float">
            <text:p>243,4302965349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4]" office:value-type="float" office:value="3.31999999999997" calcext:value-type="float">
            <text:p>3,31999999999997</text:p>
          </table:table-cell>
          <table:table-cell table:style-name="ce1" table:formula="of:=[.H334]" office:value-type="float" office:value="243.430296534999" calcext:value-type="float">
            <text:p>243,430296534999</text:p>
          </table:table-cell>
          <table:table-cell table:style-name="ce1" table:formula="of:=-68 - ([.E335]^2/Ao)" office:value-type="float" office:value="-107.505539514078" calcext:value-type="float">
            <text:p>-107,505539514078</text:p>
          </table:table-cell>
          <table:table-cell table:style-name="ce1" table:formula="of:=[.G334]+h" office:value-type="float" office:value="3.32999999999997" calcext:value-type="float">
            <text:p>3,32999999999997</text:p>
          </table:table-cell>
          <table:table-cell table:style-name="ce1" table:formula="of:=[.H334]+ h*[.F335]" office:value-type="float" office:value="242.355241139858" calcext:value-type="float">
            <text:p>242,3552411398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5]" office:value-type="float" office:value="3.32999999999997" calcext:value-type="float">
            <text:p>3,32999999999997</text:p>
          </table:table-cell>
          <table:table-cell table:style-name="ce1" table:formula="of:=[.H335]" office:value-type="float" office:value="242.355241139858" calcext:value-type="float">
            <text:p>242,355241139858</text:p>
          </table:table-cell>
          <table:table-cell table:style-name="ce1" table:formula="of:=-68 - ([.E336]^2/Ao)" office:value-type="float" office:value="-107.157375271972" calcext:value-type="float">
            <text:p>-107,157375271972</text:p>
          </table:table-cell>
          <table:table-cell table:style-name="ce1" table:formula="of:=[.G335]+h" office:value-type="float" office:value="3.33999999999997" calcext:value-type="float">
            <text:p>3,33999999999997</text:p>
          </table:table-cell>
          <table:table-cell table:style-name="ce1" table:formula="of:=[.H335]+ h*[.F336]" office:value-type="float" office:value="241.283667387138" calcext:value-type="float">
            <text:p>241,2836673871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6]" office:value-type="float" office:value="3.33999999999997" calcext:value-type="float">
            <text:p>3,33999999999997</text:p>
          </table:table-cell>
          <table:table-cell table:style-name="ce1" table:formula="of:=[.H336]" office:value-type="float" office:value="241.283667387138" calcext:value-type="float">
            <text:p>241,283667387138</text:p>
          </table:table-cell>
          <table:table-cell table:style-name="ce1" table:formula="of:=-68 - ([.E337]^2/Ao)" office:value-type="float" office:value="-106.811872098525" calcext:value-type="float">
            <text:p>-106,811872098525</text:p>
          </table:table-cell>
          <table:table-cell table:style-name="ce1" table:formula="of:=[.G336]+h" office:value-type="float" office:value="3.34999999999997" calcext:value-type="float">
            <text:p>3,34999999999997</text:p>
          </table:table-cell>
          <table:table-cell table:style-name="ce1" table:formula="of:=[.H336]+ h*[.F337]" office:value-type="float" office:value="240.215548666153" calcext:value-type="float">
            <text:p>240,2155486661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7]" office:value-type="float" office:value="3.34999999999997" calcext:value-type="float">
            <text:p>3,34999999999997</text:p>
          </table:table-cell>
          <table:table-cell table:style-name="ce1" table:formula="of:=[.H337]" office:value-type="float" office:value="240.215548666153" calcext:value-type="float">
            <text:p>240,215548666153</text:p>
          </table:table-cell>
          <table:table-cell table:style-name="ce1" table:formula="of:=-68 - ([.E338]^2/Ao)" office:value-type="float" office:value="-106.469006547321" calcext:value-type="float">
            <text:p>-106,469006547321</text:p>
          </table:table-cell>
          <table:table-cell table:style-name="ce1" table:formula="of:=[.G337]+h" office:value-type="float" office:value="3.35999999999997" calcext:value-type="float">
            <text:p>3,35999999999997</text:p>
          </table:table-cell>
          <table:table-cell table:style-name="ce1" table:formula="of:=[.H337]+ h*[.F338]" office:value-type="float" office:value="239.15085860068" calcext:value-type="float">
            <text:p>239,150858600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8]" office:value-type="float" office:value="3.35999999999997" calcext:value-type="float">
            <text:p>3,35999999999997</text:p>
          </table:table-cell>
          <table:table-cell table:style-name="ce1" table:formula="of:=[.H338]" office:value-type="float" office:value="239.15085860068" calcext:value-type="float">
            <text:p>239,15085860068</text:p>
          </table:table-cell>
          <table:table-cell table:style-name="ce1" table:formula="of:=-68 - ([.E339]^2/Ao)" office:value-type="float" office:value="-106.128755446295" calcext:value-type="float">
            <text:p>-106,128755446295</text:p>
          </table:table-cell>
          <table:table-cell table:style-name="ce1" table:formula="of:=[.G338]+h" office:value-type="float" office:value="3.36999999999997" calcext:value-type="float">
            <text:p>3,36999999999997</text:p>
          </table:table-cell>
          <table:table-cell table:style-name="ce1" table:formula="of:=[.H338]+ h*[.F339]" office:value-type="float" office:value="238.089571046217" calcext:value-type="float">
            <text:p>238,0895710462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9]" office:value-type="float" office:value="3.36999999999997" calcext:value-type="float">
            <text:p>3,36999999999997</text:p>
          </table:table-cell>
          <table:table-cell table:style-name="ce1" table:formula="of:=[.H339]" office:value-type="float" office:value="238.089571046217" calcext:value-type="float">
            <text:p>238,089571046217</text:p>
          </table:table-cell>
          <table:table-cell table:style-name="ce1" table:formula="of:=-68 - ([.E340]^2/Ao)" office:value-type="float" office:value="-105.791095893981" calcext:value-type="float">
            <text:p>-105,791095893981</text:p>
          </table:table-cell>
          <table:table-cell table:style-name="ce1" table:formula="of:=[.G339]+h" office:value-type="float" office:value="3.37999999999997" calcext:value-type="float">
            <text:p>3,37999999999997</text:p>
          </table:table-cell>
          <table:table-cell table:style-name="ce1" table:formula="of:=[.H339]+ h*[.F340]" office:value-type="float" office:value="237.031660087277" calcext:value-type="float">
            <text:p>237,0316600872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0]" office:value-type="float" office:value="3.37999999999997" calcext:value-type="float">
            <text:p>3,37999999999997</text:p>
          </table:table-cell>
          <table:table-cell table:style-name="ce1" table:formula="of:=[.H340]" office:value-type="float" office:value="237.031660087277" calcext:value-type="float">
            <text:p>237,031660087277</text:p>
          </table:table-cell>
          <table:table-cell table:style-name="ce1" table:formula="of:=-68 - ([.E341]^2/Ao)" office:value-type="float" office:value="-105.45600525582" calcext:value-type="float">
            <text:p>-105,45600525582</text:p>
          </table:table-cell>
          <table:table-cell table:style-name="ce1" table:formula="of:=[.G340]+h" office:value-type="float" office:value="3.38999999999997" calcext:value-type="float">
            <text:p>3,38999999999997</text:p>
          </table:table-cell>
          <table:table-cell table:style-name="ce1" table:formula="of:=[.H340]+ h*[.F341]" office:value-type="float" office:value="235.977100034719" calcext:value-type="float">
            <text:p>235,9771000347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1]" office:value-type="float" office:value="3.38999999999997" calcext:value-type="float">
            <text:p>3,38999999999997</text:p>
          </table:table-cell>
          <table:table-cell table:style-name="ce1" table:formula="of:=[.H341]" office:value-type="float" office:value="235.977100034719" calcext:value-type="float">
            <text:p>235,977100034719</text:p>
          </table:table-cell>
          <table:table-cell table:style-name="ce1" table:formula="of:=-68 - ([.E342]^2/Ao)" office:value-type="float" office:value="-105.12346116053" calcext:value-type="float">
            <text:p>-105,12346116053</text:p>
          </table:table-cell>
          <table:table-cell table:style-name="ce1" table:formula="of:=[.G341]+h" office:value-type="float" office:value="3.39999999999997" calcext:value-type="float">
            <text:p>3,39999999999997</text:p>
          </table:table-cell>
          <table:table-cell table:style-name="ce1" table:formula="of:=[.H341]+ h*[.F342]" office:value-type="float" office:value="234.925865423113" calcext:value-type="float">
            <text:p>234,9258654231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2]" office:value-type="float" office:value="3.39999999999997" calcext:value-type="float">
            <text:p>3,39999999999997</text:p>
          </table:table-cell>
          <table:table-cell table:style-name="ce1" table:formula="of:=[.H342]" office:value-type="float" office:value="234.925865423113" calcext:value-type="float">
            <text:p>234,925865423113</text:p>
          </table:table-cell>
          <table:table-cell table:style-name="ce1" table:formula="of:=-68 - ([.E343]^2/Ao)" office:value-type="float" office:value="-104.793441496533" calcext:value-type="float">
            <text:p>-104,793441496533</text:p>
          </table:table-cell>
          <table:table-cell table:style-name="ce1" table:formula="of:=[.G342]+h" office:value-type="float" office:value="3.40999999999997" calcext:value-type="float">
            <text:p>3,40999999999997</text:p>
          </table:table-cell>
          <table:table-cell table:style-name="ce1" table:formula="of:=[.H342]+ h*[.F343]" office:value-type="float" office:value="233.877931008148" calcext:value-type="float">
            <text:p>233,8779310081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3]" office:value-type="float" office:value="3.40999999999997" calcext:value-type="float">
            <text:p>3,40999999999997</text:p>
          </table:table-cell>
          <table:table-cell table:style-name="ce1" table:formula="of:=[.H343]" office:value-type="float" office:value="233.877931008148" calcext:value-type="float">
            <text:p>233,877931008148</text:p>
          </table:table-cell>
          <table:table-cell table:style-name="ce1" table:formula="of:=-68 - ([.E344]^2/Ao)" office:value-type="float" office:value="-104.465924408435" calcext:value-type="float">
            <text:p>-104,465924408435</text:p>
          </table:table-cell>
          <table:table-cell table:style-name="ce1" table:formula="of:=[.G343]+h" office:value-type="float" office:value="3.41999999999997" calcext:value-type="float">
            <text:p>3,41999999999997</text:p>
          </table:table-cell>
          <table:table-cell table:style-name="ce1" table:formula="of:=[.H343]+ h*[.F344]" office:value-type="float" office:value="232.833271764064" calcext:value-type="float">
            <text:p>232,8332717640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4]" office:value-type="float" office:value="3.41999999999997" calcext:value-type="float">
            <text:p>3,41999999999997</text:p>
          </table:table-cell>
          <table:table-cell table:style-name="ce1" table:formula="of:=[.H344]" office:value-type="float" office:value="232.833271764064" calcext:value-type="float">
            <text:p>232,833271764064</text:p>
          </table:table-cell>
          <table:table-cell table:style-name="ce1" table:formula="of:=-68 - ([.E345]^2/Ao)" office:value-type="float" office:value="-104.140888293572" calcext:value-type="float">
            <text:p>-104,140888293572</text:p>
          </table:table-cell>
          <table:table-cell table:style-name="ce1" table:formula="of:=[.G344]+h" office:value-type="float" office:value="3.42999999999997" calcext:value-type="float">
            <text:p>3,42999999999997</text:p>
          </table:table-cell>
          <table:table-cell table:style-name="ce1" table:formula="of:=[.H344]+ h*[.F345]" office:value-type="float" office:value="231.791862881128" calcext:value-type="float">
            <text:p>231,7918628811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5]" office:value-type="float" office:value="3.42999999999997" calcext:value-type="float">
            <text:p>3,42999999999997</text:p>
          </table:table-cell>
          <table:table-cell table:style-name="ce1" table:formula="of:=[.H345]" office:value-type="float" office:value="231.791862881128" calcext:value-type="float">
            <text:p>231,791862881128</text:p>
          </table:table-cell>
          <table:table-cell table:style-name="ce1" table:formula="of:=-68 - ([.E346]^2/Ao)" office:value-type="float" office:value="-103.818311798602" calcext:value-type="float">
            <text:p>-103,818311798602</text:p>
          </table:table-cell>
          <table:table-cell table:style-name="ce1" table:formula="of:=[.G345]+h" office:value-type="float" office:value="3.43999999999997" calcext:value-type="float">
            <text:p>3,43999999999997</text:p>
          </table:table-cell>
          <table:table-cell table:style-name="ce1" table:formula="of:=[.H345]+ h*[.F346]" office:value-type="float" office:value="230.753679763142" calcext:value-type="float">
            <text:p>230,7536797631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6]" office:value-type="float" office:value="3.43999999999997" calcext:value-type="float">
            <text:p>3,43999999999997</text:p>
          </table:table-cell>
          <table:table-cell table:style-name="ce1" table:formula="of:=[.H346]" office:value-type="float" office:value="230.753679763142" calcext:value-type="float">
            <text:p>230,753679763142</text:p>
          </table:table-cell>
          <table:table-cell table:style-name="ce1" table:formula="of:=-68 - ([.E347]^2/Ao)" office:value-type="float" office:value="-103.498173816154" calcext:value-type="float">
            <text:p>-103,498173816154</text:p>
          </table:table-cell>
          <table:table-cell table:style-name="ce1" table:formula="of:=[.G346]+h" office:value-type="float" office:value="3.44999999999997" calcext:value-type="float">
            <text:p>3,44999999999997</text:p>
          </table:table-cell>
          <table:table-cell table:style-name="ce1" table:formula="of:=[.H346]+ h*[.F347]" office:value-type="float" office:value="229.71869802498" calcext:value-type="float">
            <text:p>229,718698024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7]" office:value-type="float" office:value="3.44999999999997" calcext:value-type="float">
            <text:p>3,44999999999997</text:p>
          </table:table-cell>
          <table:table-cell table:style-name="ce1" table:formula="of:=[.H347]" office:value-type="float" office:value="229.71869802498" calcext:value-type="float">
            <text:p>229,71869802498</text:p>
          </table:table-cell>
          <table:table-cell table:style-name="ce1" table:formula="of:=-68 - ([.E348]^2/Ao)" office:value-type="float" office:value="-103.180453481528" calcext:value-type="float">
            <text:p>-103,180453481528</text:p>
          </table:table-cell>
          <table:table-cell table:style-name="ce1" table:formula="of:=[.G347]+h" office:value-type="float" office:value="3.45999999999997" calcext:value-type="float">
            <text:p>3,45999999999997</text:p>
          </table:table-cell>
          <table:table-cell table:style-name="ce1" table:formula="of:=[.H347]+ h*[.F348]" office:value-type="float" office:value="228.686893490165" calcext:value-type="float">
            <text:p>228,6868934901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8]" office:value-type="float" office:value="3.45999999999997" calcext:value-type="float">
            <text:p>3,45999999999997</text:p>
          </table:table-cell>
          <table:table-cell table:style-name="ce1" table:formula="of:=[.H348]" office:value-type="float" office:value="228.686893490165" calcext:value-type="float">
            <text:p>228,686893490165</text:p>
          </table:table-cell>
          <table:table-cell table:style-name="ce1" table:formula="of:=-68 - ([.E349]^2/Ao)" office:value-type="float" office:value="-102.865130169455" calcext:value-type="float">
            <text:p>-102,865130169455</text:p>
          </table:table-cell>
          <table:table-cell table:style-name="ce1" table:formula="of:=[.G348]+h" office:value-type="float" office:value="3.46999999999997" calcext:value-type="float">
            <text:p>3,46999999999997</text:p>
          </table:table-cell>
          <table:table-cell table:style-name="ce1" table:formula="of:=[.H348]+ h*[.F349]" office:value-type="float" office:value="227.658242188471" calcext:value-type="float">
            <text:p>227,6582421884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9]" office:value-type="float" office:value="3.46999999999997" calcext:value-type="float">
            <text:p>3,46999999999997</text:p>
          </table:table-cell>
          <table:table-cell table:style-name="ce1" table:formula="of:=[.H349]" office:value-type="float" office:value="227.658242188471" calcext:value-type="float">
            <text:p>227,658242188471</text:p>
          </table:table-cell>
          <table:table-cell table:style-name="ce1" table:formula="of:=-68 - ([.E350]^2/Ao)" office:value-type="float" office:value="-102.552183490896" calcext:value-type="float">
            <text:p>-102,552183490896</text:p>
          </table:table-cell>
          <table:table-cell table:style-name="ce1" table:formula="of:=[.G349]+h" office:value-type="float" office:value="3.47999999999997" calcext:value-type="float">
            <text:p>3,47999999999997</text:p>
          </table:table-cell>
          <table:table-cell table:style-name="ce1" table:formula="of:=[.H349]+ h*[.F350]" office:value-type="float" office:value="226.632720353562" calcext:value-type="float">
            <text:p>226,6327203535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0]" office:value-type="float" office:value="3.47999999999997" calcext:value-type="float">
            <text:p>3,47999999999997</text:p>
          </table:table-cell>
          <table:table-cell table:style-name="ce1" table:formula="of:=[.H350]" office:value-type="float" office:value="226.632720353562" calcext:value-type="float">
            <text:p>226,632720353562</text:p>
          </table:table-cell>
          <table:table-cell table:style-name="ce1" table:formula="of:=-68 - ([.E351]^2/Ao)" office:value-type="float" office:value="-102.241593289904" calcext:value-type="float">
            <text:p>-102,241593289904</text:p>
          </table:table-cell>
          <table:table-cell table:style-name="ce1" table:formula="of:=[.G350]+h" office:value-type="float" office:value="3.48999999999997" calcext:value-type="float">
            <text:p>3,48999999999997</text:p>
          </table:table-cell>
          <table:table-cell table:style-name="ce1" table:formula="of:=[.H350]+ h*[.F351]" office:value-type="float" office:value="225.610304420663" calcext:value-type="float">
            <text:p>225,6103044206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1]" office:value-type="float" office:value="3.48999999999997" calcext:value-type="float">
            <text:p>3,48999999999997</text:p>
          </table:table-cell>
          <table:table-cell table:style-name="ce1" table:formula="of:=[.H351]" office:value-type="float" office:value="225.610304420663" calcext:value-type="float">
            <text:p>225,610304420663</text:p>
          </table:table-cell>
          <table:table-cell table:style-name="ce1" table:formula="of:=-68 - ([.E352]^2/Ao)" office:value-type="float" office:value="-101.933339640523" calcext:value-type="float">
            <text:p>-101,933339640523</text:p>
          </table:table-cell>
          <table:table-cell table:style-name="ce1" table:formula="of:=[.G351]+h" office:value-type="float" office:value="3.49999999999997" calcext:value-type="float">
            <text:p>3,49999999999997</text:p>
          </table:table-cell>
          <table:table-cell table:style-name="ce1" table:formula="of:=[.H351]+ h*[.F352]" office:value-type="float" office:value="224.590971024257" calcext:value-type="float">
            <text:p>224,5909710242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2]" office:value-type="float" office:value="3.49999999999997" calcext:value-type="float">
            <text:p>3,49999999999997</text:p>
          </table:table-cell>
          <table:table-cell table:style-name="ce1" table:formula="of:=[.H352]" office:value-type="float" office:value="224.590971024257" calcext:value-type="float">
            <text:p>224,590971024257</text:p>
          </table:table-cell>
          <table:table-cell table:style-name="ce1" table:formula="of:=-68 - ([.E353]^2/Ao)" office:value-type="float" office:value="-101.627402843746" calcext:value-type="float">
            <text:p>-101,627402843746</text:p>
          </table:table-cell>
          <table:table-cell table:style-name="ce1" table:formula="of:=[.G352]+h" office:value-type="float" office:value="3.50999999999997" calcext:value-type="float">
            <text:p>3,50999999999997</text:p>
          </table:table-cell>
          <table:table-cell table:style-name="ce1" table:formula="of:=[.H352]+ h*[.F353]" office:value-type="float" office:value="223.57469699582" calcext:value-type="float">
            <text:p>223,574696995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3]" office:value-type="float" office:value="3.50999999999997" calcext:value-type="float">
            <text:p>3,50999999999997</text:p>
          </table:table-cell>
          <table:table-cell table:style-name="ce1" table:formula="of:=[.H353]" office:value-type="float" office:value="223.57469699582" calcext:value-type="float">
            <text:p>223,57469699582</text:p>
          </table:table-cell>
          <table:table-cell table:style-name="ce1" table:formula="of:=-68 - ([.E354]^2/Ao)" office:value-type="float" office:value="-101.323763424515" calcext:value-type="float">
            <text:p>-101,323763424515</text:p>
          </table:table-cell>
          <table:table-cell table:style-name="ce1" table:formula="of:=[.G353]+h" office:value-type="float" office:value="3.51999999999997" calcext:value-type="float">
            <text:p>3,51999999999997</text:p>
          </table:table-cell>
          <table:table-cell table:style-name="ce1" table:formula="of:=[.H353]+ h*[.F354]" office:value-type="float" office:value="222.561459361575" calcext:value-type="float">
            <text:p>222,5614593615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4]" office:value-type="float" office:value="3.51999999999997" calcext:value-type="float">
            <text:p>3,51999999999997</text:p>
          </table:table-cell>
          <table:table-cell table:style-name="ce1" table:formula="of:=[.H354]" office:value-type="float" office:value="222.561459361575" calcext:value-type="float">
            <text:p>222,561459361575</text:p>
          </table:table-cell>
          <table:table-cell table:style-name="ce1" table:formula="of:=-68 - ([.E355]^2/Ao)" office:value-type="float" office:value="-101.022402128769" calcext:value-type="float">
            <text:p>-101,022402128769</text:p>
          </table:table-cell>
          <table:table-cell table:style-name="ce1" table:formula="of:=[.G354]+h" office:value-type="float" office:value="3.52999999999997" calcext:value-type="float">
            <text:p>3,52999999999997</text:p>
          </table:table-cell>
          <table:table-cell table:style-name="ce1" table:formula="of:=[.H354]+ h*[.F355]" office:value-type="float" office:value="221.551235340287" calcext:value-type="float">
            <text:p>221,5512353402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5]" office:value-type="float" office:value="3.52999999999997" calcext:value-type="float">
            <text:p>3,52999999999997</text:p>
          </table:table-cell>
          <table:table-cell table:style-name="ce1" table:formula="of:=[.H355]" office:value-type="float" office:value="221.551235340287" calcext:value-type="float">
            <text:p>221,551235340287</text:p>
          </table:table-cell>
          <table:table-cell table:style-name="ce1" table:formula="of:=-68 - ([.E356]^2/Ao)" office:value-type="float" office:value="-100.723299920538" calcext:value-type="float">
            <text:p>-100,723299920538</text:p>
          </table:table-cell>
          <table:table-cell table:style-name="ce1" table:formula="of:=[.G355]+h" office:value-type="float" office:value="3.53999999999997" calcext:value-type="float">
            <text:p>3,53999999999997</text:p>
          </table:table-cell>
          <table:table-cell table:style-name="ce1" table:formula="of:=[.H355]+ h*[.F356]" office:value-type="float" office:value="220.544002341082" calcext:value-type="float">
            <text:p>220,5440023410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6]" office:value-type="float" office:value="3.53999999999997" calcext:value-type="float">
            <text:p>3,53999999999997</text:p>
          </table:table-cell>
          <table:table-cell table:style-name="ce1" table:formula="of:=[.H356]" office:value-type="float" office:value="220.544002341082" calcext:value-type="float">
            <text:p>220,544002341082</text:p>
          </table:table-cell>
          <table:table-cell table:style-name="ce1" table:formula="of:=-68 - ([.E357]^2/Ao)" office:value-type="float" office:value="-100.426437979082" calcext:value-type="float">
            <text:p>-100,426437979082</text:p>
          </table:table-cell>
          <table:table-cell table:style-name="ce1" table:formula="of:=[.G356]+h" office:value-type="float" office:value="3.54999999999997" calcext:value-type="float">
            <text:p>3,54999999999997</text:p>
          </table:table-cell>
          <table:table-cell table:style-name="ce1" table:formula="of:=[.H356]+ h*[.F357]" office:value-type="float" office:value="219.539737961291" calcext:value-type="float">
            <text:p>219,5397379612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7]" office:value-type="float" office:value="3.54999999999997" calcext:value-type="float">
            <text:p>3,54999999999997</text:p>
          </table:table-cell>
          <table:table-cell table:style-name="ce1" table:formula="of:=[.H357]" office:value-type="float" office:value="219.539737961291" calcext:value-type="float">
            <text:p>219,539737961291</text:p>
          </table:table-cell>
          <table:table-cell table:style-name="ce1" table:formula="of:=-68 - ([.E358]^2/Ao)" office:value-type="float" office:value="-100.131797696075" calcext:value-type="float">
            <text:p>-100,131797696075</text:p>
          </table:table-cell>
          <table:table-cell table:style-name="ce1" table:formula="of:=[.G357]+h" office:value-type="float" office:value="3.55999999999997" calcext:value-type="float">
            <text:p>3,55999999999997</text:p>
          </table:table-cell>
          <table:table-cell table:style-name="ce1" table:formula="of:=[.H357]+ h*[.F358]" office:value-type="float" office:value="218.53841998433" calcext:value-type="float">
            <text:p>218,538419984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8]" office:value-type="float" office:value="3.55999999999997" calcext:value-type="float">
            <text:p>3,55999999999997</text:p>
          </table:table-cell>
          <table:table-cell table:style-name="ce1" table:formula="of:=[.H358]" office:value-type="float" office:value="218.53841998433" calcext:value-type="float">
            <text:p>218,53841998433</text:p>
          </table:table-cell>
          <table:table-cell table:style-name="ce1" table:formula="of:=-68 - ([.E359]^2/Ao)" office:value-type="float" office:value="-99.8393606728317" calcext:value-type="float">
            <text:p>-99,8393606728317</text:p>
          </table:table-cell>
          <table:table-cell table:style-name="ce1" table:formula="of:=[.G358]+h" office:value-type="float" office:value="3.56999999999997" calcext:value-type="float">
            <text:p>3,56999999999997</text:p>
          </table:table-cell>
          <table:table-cell table:style-name="ce1" table:formula="of:=[.H358]+ h*[.F359]" office:value-type="float" office:value="217.540026377602" calcext:value-type="float">
            <text:p>217,5400263776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9]" office:value-type="float" office:value="3.56999999999997" calcext:value-type="float">
            <text:p>3,56999999999997</text:p>
          </table:table-cell>
          <table:table-cell table:style-name="ce1" table:formula="of:=[.H359]" office:value-type="float" office:value="217.540026377602" calcext:value-type="float">
            <text:p>217,540026377602</text:p>
          </table:table-cell>
          <table:table-cell table:style-name="ce1" table:formula="of:=-68 - ([.E360]^2/Ao)" office:value-type="float" office:value="-99.5491087175785" calcext:value-type="float">
            <text:p>-99,5491087175785</text:p>
          </table:table-cell>
          <table:table-cell table:style-name="ce1" table:formula="of:=[.G359]+h" office:value-type="float" office:value="3.57999999999997" calcext:value-type="float">
            <text:p>3,57999999999997</text:p>
          </table:table-cell>
          <table:table-cell table:style-name="ce1" table:formula="of:=[.H359]+ h*[.F360]" office:value-type="float" office:value="216.544535290426" calcext:value-type="float">
            <text:p>216,5445352904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0]" office:value-type="float" office:value="3.57999999999997" calcext:value-type="float">
            <text:p>3,57999999999997</text:p>
          </table:table-cell>
          <table:table-cell table:style-name="ce1" table:formula="of:=[.H360]" office:value-type="float" office:value="216.544535290426" calcext:value-type="float">
            <text:p>216,544535290426</text:p>
          </table:table-cell>
          <table:table-cell table:style-name="ce1" table:formula="of:=-68 - ([.E361]^2/Ao)" office:value-type="float" office:value="-99.2610238427644" calcext:value-type="float">
            <text:p>-99,2610238427644</text:p>
          </table:table-cell>
          <table:table-cell table:style-name="ce1" table:formula="of:=[.G360]+h" office:value-type="float" office:value="3.58999999999997" calcext:value-type="float">
            <text:p>3,58999999999997</text:p>
          </table:table-cell>
          <table:table-cell table:style-name="ce1" table:formula="of:=[.H360]+ h*[.F361]" office:value-type="float" office:value="215.551925051998" calcext:value-type="float">
            <text:p>215,5519250519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1]" office:value-type="float" office:value="3.58999999999997" calcext:value-type="float">
            <text:p>3,58999999999997</text:p>
          </table:table-cell>
          <table:table-cell table:style-name="ce1" table:formula="of:=[.H361]" office:value-type="float" office:value="215.551925051998" calcext:value-type="float">
            <text:p>215,551925051998</text:p>
          </table:table-cell>
          <table:table-cell table:style-name="ce1" table:formula="of:=-68 - ([.E362]^2/Ao)" office:value-type="float" office:value="-98.9750882624149" calcext:value-type="float">
            <text:p>-98,9750882624149</text:p>
          </table:table-cell>
          <table:table-cell table:style-name="ce1" table:formula="of:=[.G361]+h" office:value-type="float" office:value="3.59999999999997" calcext:value-type="float">
            <text:p>3,59999999999997</text:p>
          </table:table-cell>
          <table:table-cell table:style-name="ce1" table:formula="of:=[.H361]+ h*[.F362]" office:value-type="float" office:value="214.562174169374" calcext:value-type="float">
            <text:p>214,5621741693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2]" office:value-type="float" office:value="3.59999999999997" calcext:value-type="float">
            <text:p>3,59999999999997</text:p>
          </table:table-cell>
          <table:table-cell table:style-name="ce1" table:formula="of:=[.H362]" office:value-type="float" office:value="214.562174169374" calcext:value-type="float">
            <text:p>214,562174169374</text:p>
          </table:table-cell>
          <table:table-cell table:style-name="ce1" table:formula="of:=-68 - ([.E363]^2/Ao)" office:value-type="float" office:value="-98.6912843895259" calcext:value-type="float">
            <text:p>-98,6912843895259</text:p>
          </table:table-cell>
          <table:table-cell table:style-name="ce1" table:formula="of:=[.G362]+h" office:value-type="float" office:value="3.60999999999997" calcext:value-type="float">
            <text:p>3,60999999999997</text:p>
          </table:table-cell>
          <table:table-cell table:style-name="ce1" table:formula="of:=[.H362]+ h*[.F363]" office:value-type="float" office:value="213.575261325479" calcext:value-type="float">
            <text:p>213,5752613254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3]" office:value-type="float" office:value="3.60999999999997" calcext:value-type="float">
            <text:p>3,60999999999997</text:p>
          </table:table-cell>
          <table:table-cell table:style-name="ce1" table:formula="of:=[.H363]" office:value-type="float" office:value="213.575261325479" calcext:value-type="float">
            <text:p>213,575261325479</text:p>
          </table:table-cell>
          <table:table-cell table:style-name="ce1" table:formula="of:=-68 - ([.E364]^2/Ao)" office:value-type="float" office:value="-98.4095948334978" calcext:value-type="float">
            <text:p>-98,4095948334978</text:p>
          </table:table-cell>
          <table:table-cell table:style-name="ce1" table:formula="of:=[.G363]+h" office:value-type="float" office:value="3.61999999999997" calcext:value-type="float">
            <text:p>3,61999999999997</text:p>
          </table:table-cell>
          <table:table-cell table:style-name="ce1" table:formula="of:=[.H363]+ h*[.F364]" office:value-type="float" office:value="212.591165377144" calcext:value-type="float">
            <text:p>212,5911653771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4]" office:value-type="float" office:value="3.61999999999997" calcext:value-type="float">
            <text:p>3,61999999999997</text:p>
          </table:table-cell>
          <table:table-cell table:style-name="ce1" table:formula="of:=[.H364]" office:value-type="float" office:value="212.591165377144" calcext:value-type="float">
            <text:p>212,591165377144</text:p>
          </table:table-cell>
          <table:table-cell table:style-name="ce1" table:formula="of:=-68 - ([.E365]^2/Ao)" office:value-type="float" office:value="-98.1300023976081" calcext:value-type="float">
            <text:p>-98,1300023976081</text:p>
          </table:table-cell>
          <table:table-cell table:style-name="ce1" table:formula="of:=[.G364]+h" office:value-type="float" office:value="3.62999999999997" calcext:value-type="float">
            <text:p>3,62999999999997</text:p>
          </table:table-cell>
          <table:table-cell table:style-name="ce1" table:formula="of:=[.H364]+ h*[.F365]" office:value-type="float" office:value="211.609865353168" calcext:value-type="float">
            <text:p>211,6098653531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5]" office:value-type="float" office:value="3.62999999999997" calcext:value-type="float">
            <text:p>3,62999999999997</text:p>
          </table:table-cell>
          <table:table-cell table:style-name="ce1" table:formula="of:=[.H365]" office:value-type="float" office:value="211.609865353168" calcext:value-type="float">
            <text:p>211,609865353168</text:p>
          </table:table-cell>
          <table:table-cell table:style-name="ce1" table:formula="of:=-68 - ([.E366]^2/Ao)" office:value-type="float" office:value="-97.8524900765239" calcext:value-type="float">
            <text:p>-97,8524900765239</text:p>
          </table:table-cell>
          <table:table-cell table:style-name="ce1" table:formula="of:=[.G365]+h" office:value-type="float" office:value="3.63999999999997" calcext:value-type="float">
            <text:p>3,63999999999997</text:p>
          </table:table-cell>
          <table:table-cell table:style-name="ce1" table:formula="of:=[.H365]+ h*[.F366]" office:value-type="float" office:value="210.631340452403" calcext:value-type="float">
            <text:p>210,6313404524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6]" office:value-type="float" office:value="3.63999999999997" calcext:value-type="float">
            <text:p>3,63999999999997</text:p>
          </table:table-cell>
          <table:table-cell table:style-name="ce1" table:formula="of:=[.H366]" office:value-type="float" office:value="210.631340452403" calcext:value-type="float">
            <text:p>210,631340452403</text:p>
          </table:table-cell>
          <table:table-cell table:style-name="ce1" table:formula="of:=-68 - ([.E367]^2/Ao)" office:value-type="float" office:value="-97.5770410538506" calcext:value-type="float">
            <text:p>-97,5770410538506</text:p>
          </table:table-cell>
          <table:table-cell table:style-name="ce1" table:formula="of:=[.G366]+h" office:value-type="float" office:value="3.64999999999997" calcext:value-type="float">
            <text:p>3,64999999999997</text:p>
          </table:table-cell>
          <table:table-cell table:style-name="ce1" table:formula="of:=[.H366]+ h*[.F367]" office:value-type="float" office:value="209.655570041864" calcext:value-type="float">
            <text:p>209,6555700418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7]" office:value-type="float" office:value="3.64999999999997" calcext:value-type="float">
            <text:p>3,64999999999997</text:p>
          </table:table-cell>
          <table:table-cell table:style-name="ce1" table:formula="of:=[.H367]" office:value-type="float" office:value="209.655570041864" calcext:value-type="float">
            <text:p>209,655570041864</text:p>
          </table:table-cell>
          <table:table-cell table:style-name="ce1" table:formula="of:=-68 - ([.E368]^2/Ao)" office:value-type="float" office:value="-97.3036386997193" calcext:value-type="float">
            <text:p>-97,3036386997193</text:p>
          </table:table-cell>
          <table:table-cell table:style-name="ce1" table:formula="of:=[.G367]+h" office:value-type="float" office:value="3.65999999999997" calcext:value-type="float">
            <text:p>3,65999999999997</text:p>
          </table:table-cell>
          <table:table-cell table:style-name="ce1" table:formula="of:=[.H367]+ h*[.F368]" office:value-type="float" office:value="208.682533654867" calcext:value-type="float">
            <text:p>208,6825336548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8]" office:value-type="float" office:value="3.65999999999997" calcext:value-type="float">
            <text:p>3,65999999999997</text:p>
          </table:table-cell>
          <table:table-cell table:style-name="ce1" table:formula="of:=[.H368]" office:value-type="float" office:value="208.682533654867" calcext:value-type="float">
            <text:p>208,682533654867</text:p>
          </table:table-cell>
          <table:table-cell table:style-name="ce1" table:formula="of:=-68 - ([.E369]^2/Ao)" office:value-type="float" office:value="-97.0322665684098" calcext:value-type="float">
            <text:p>-97,0322665684098</text:p>
          </table:table-cell>
          <table:table-cell table:style-name="ce1" table:formula="of:=[.G368]+h" office:value-type="float" office:value="3.66999999999997" calcext:value-type="float">
            <text:p>3,66999999999997</text:p>
          </table:table-cell>
          <table:table-cell table:style-name="ce1" table:formula="of:=[.H368]+ h*[.F369]" office:value-type="float" office:value="207.712210989183" calcext:value-type="float">
            <text:p>207,7122109891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9]" office:value-type="float" office:value="3.66999999999997" calcext:value-type="float">
            <text:p>3,66999999999997</text:p>
          </table:table-cell>
          <table:table-cell table:style-name="ce1" table:formula="of:=[.H369]" office:value-type="float" office:value="207.712210989183" calcext:value-type="float">
            <text:p>207,712210989183</text:p>
          </table:table-cell>
          <table:table-cell table:style-name="ce1" table:formula="of:=-68 - ([.E370]^2/Ao)" office:value-type="float" office:value="-96.7629083960099" calcext:value-type="float">
            <text:p>-96,7629083960099</text:p>
          </table:table-cell>
          <table:table-cell table:style-name="ce1" table:formula="of:=[.G369]+h" office:value-type="float" office:value="3.67999999999997" calcext:value-type="float">
            <text:p>3,67999999999997</text:p>
          </table:table-cell>
          <table:table-cell table:style-name="ce1" table:formula="of:=[.H369]+ h*[.F370]" office:value-type="float" office:value="206.744581905223" calcext:value-type="float">
            <text:p>206,7445819052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0]" office:value-type="float" office:value="3.67999999999997" calcext:value-type="float">
            <text:p>3,67999999999997</text:p>
          </table:table-cell>
          <table:table-cell table:style-name="ce1" table:formula="of:=[.H370]" office:value-type="float" office:value="206.744581905223" calcext:value-type="float">
            <text:p>206,744581905223</text:p>
          </table:table-cell>
          <table:table-cell table:style-name="ce1" table:formula="of:=-68 - ([.E371]^2/Ao)" office:value-type="float" office:value="-96.4955480981103" calcext:value-type="float">
            <text:p>-96,4955480981103</text:p>
          </table:table-cell>
          <table:table-cell table:style-name="ce1" table:formula="of:=[.G370]+h" office:value-type="float" office:value="3.68999999999997" calcext:value-type="float">
            <text:p>3,68999999999997</text:p>
          </table:table-cell>
          <table:table-cell table:style-name="ce1" table:formula="of:=[.H370]+ h*[.F371]" office:value-type="float" office:value="205.779626424242" calcext:value-type="float">
            <text:p>205,7796264242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1]" office:value-type="float" office:value="3.68999999999997" calcext:value-type="float">
            <text:p>3,68999999999997</text:p>
          </table:table-cell>
          <table:table-cell table:style-name="ce1" table:formula="of:=[.H371]" office:value-type="float" office:value="205.779626424242" calcext:value-type="float">
            <text:p>205,779626424242</text:p>
          </table:table-cell>
          <table:table-cell table:style-name="ce1" table:formula="of:=-68 - ([.E372]^2/Ao)" office:value-type="float" office:value="-96.2301697675336" calcext:value-type="float">
            <text:p>-96,2301697675336</text:p>
          </table:table-cell>
          <table:table-cell table:style-name="ce1" table:formula="of:=[.G371]+h" office:value-type="float" office:value="3.69999999999997" calcext:value-type="float">
            <text:p>3,69999999999997</text:p>
          </table:table-cell>
          <table:table-cell table:style-name="ce1" table:formula="of:=[.H371]+ h*[.F372]" office:value-type="float" office:value="204.817324726566" calcext:value-type="float">
            <text:p>204,8173247265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2]" office:value-type="float" office:value="3.69999999999997" calcext:value-type="float">
            <text:p>3,69999999999997</text:p>
          </table:table-cell>
          <table:table-cell table:style-name="ce1" table:formula="of:=[.H372]" office:value-type="float" office:value="204.817324726566" calcext:value-type="float">
            <text:p>204,817324726566</text:p>
          </table:table-cell>
          <table:table-cell table:style-name="ce1" table:formula="of:=-68 - ([.E373]^2/Ao)" office:value-type="float" office:value="-95.9667576720985" calcext:value-type="float">
            <text:p>-95,9667576720985</text:p>
          </table:table-cell>
          <table:table-cell table:style-name="ce1" table:formula="of:=[.G372]+h" office:value-type="float" office:value="3.70999999999997" calcext:value-type="float">
            <text:p>3,70999999999997</text:p>
          </table:table-cell>
          <table:table-cell table:style-name="ce1" table:formula="of:=[.H372]+ h*[.F373]" office:value-type="float" office:value="203.857657149845" calcext:value-type="float">
            <text:p>203,8576571498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3]" office:value-type="float" office:value="3.70999999999997" calcext:value-type="float">
            <text:p>3,70999999999997</text:p>
          </table:table-cell>
          <table:table-cell table:style-name="ce1" table:formula="of:=[.H373]" office:value-type="float" office:value="203.857657149845" calcext:value-type="float">
            <text:p>203,857657149845</text:p>
          </table:table-cell>
          <table:table-cell table:style-name="ce1" table:formula="of:=-68 - ([.E374]^2/Ao)" office:value-type="float" office:value="-95.7052962524159" calcext:value-type="float">
            <text:p>-95,7052962524159</text:p>
          </table:table-cell>
          <table:table-cell table:style-name="ce1" table:formula="of:=[.G373]+h" office:value-type="float" office:value="3.71999999999996" calcext:value-type="float">
            <text:p>3,71999999999996</text:p>
          </table:table-cell>
          <table:table-cell table:style-name="ce1" table:formula="of:=[.H373]+ h*[.F374]" office:value-type="float" office:value="202.900604187321" calcext:value-type="float">
            <text:p>202,9006041873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4]" office:value-type="float" office:value="3.71999999999996" calcext:value-type="float">
            <text:p>3,71999999999996</text:p>
          </table:table-cell>
          <table:table-cell table:style-name="ce1" table:formula="of:=[.H374]" office:value-type="float" office:value="202.900604187321" calcext:value-type="float">
            <text:p>202,900604187321</text:p>
          </table:table-cell>
          <table:table-cell table:style-name="ce1" table:formula="of:=-68 - ([.E375]^2/Ao)" office:value-type="float" office:value="-95.44577011972" calcext:value-type="float">
            <text:p>-95,44577011972</text:p>
          </table:table-cell>
          <table:table-cell table:style-name="ce1" table:formula="of:=[.G374]+h" office:value-type="float" office:value="3.72999999999996" calcext:value-type="float">
            <text:p>3,72999999999996</text:p>
          </table:table-cell>
          <table:table-cell table:style-name="ce1" table:formula="of:=[.H374]+ h*[.F375]" office:value-type="float" office:value="201.946146486124" calcext:value-type="float">
            <text:p>201,9461464861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5]" office:value-type="float" office:value="3.72999999999996" calcext:value-type="float">
            <text:p>3,72999999999996</text:p>
          </table:table-cell>
          <table:table-cell table:style-name="ce1" table:formula="of:=[.H375]" office:value-type="float" office:value="201.946146486124" calcext:value-type="float">
            <text:p>201,946146486124</text:p>
          </table:table-cell>
          <table:table-cell table:style-name="ce1" table:formula="of:=-68 - ([.E376]^2/Ao)" office:value-type="float" office:value="-95.18816405373" calcext:value-type="float">
            <text:p>-95,18816405373</text:p>
          </table:table-cell>
          <table:table-cell table:style-name="ce1" table:formula="of:=[.G375]+h" office:value-type="float" office:value="3.73999999999996" calcext:value-type="float">
            <text:p>3,73999999999996</text:p>
          </table:table-cell>
          <table:table-cell table:style-name="ce1" table:formula="of:=[.H375]+ h*[.F376]" office:value-type="float" office:value="200.994264845587" calcext:value-type="float">
            <text:p>200,9942648455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6]" office:value-type="float" office:value="3.73999999999996" calcext:value-type="float">
            <text:p>3,73999999999996</text:p>
          </table:table-cell>
          <table:table-cell table:style-name="ce1" table:formula="of:=[.H376]" office:value-type="float" office:value="200.994264845587" calcext:value-type="float">
            <text:p>200,994264845587</text:p>
          </table:table-cell>
          <table:table-cell table:style-name="ce1" table:formula="of:=-68 - ([.E377]^2/Ao)" office:value-type="float" office:value="-94.9324630005452" calcext:value-type="float">
            <text:p>-94,9324630005452</text:p>
          </table:table-cell>
          <table:table-cell table:style-name="ce1" table:formula="of:=[.G376]+h" office:value-type="float" office:value="3.74999999999996" calcext:value-type="float">
            <text:p>3,74999999999996</text:p>
          </table:table-cell>
          <table:table-cell table:style-name="ce1" table:formula="of:=[.H376]+ h*[.F377]" office:value-type="float" office:value="200.044940215581" calcext:value-type="float">
            <text:p>200,0449402155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7]" office:value-type="float" office:value="3.74999999999996" calcext:value-type="float">
            <text:p>3,74999999999996</text:p>
          </table:table-cell>
          <table:table-cell table:style-name="ce1" table:formula="of:=[.H377]" office:value-type="float" office:value="200.044940215581" calcext:value-type="float">
            <text:p>200,044940215581</text:p>
          </table:table-cell>
          <table:table-cell table:style-name="ce1" table:formula="of:=-68 - ([.E378]^2/Ao)" office:value-type="float" office:value="-94.6786520705703" calcext:value-type="float">
            <text:p>-94,6786520705703</text:p>
          </table:table-cell>
          <table:table-cell table:style-name="ce1" table:formula="of:=[.G377]+h" office:value-type="float" office:value="3.75999999999996" calcext:value-type="float">
            <text:p>3,75999999999996</text:p>
          </table:table-cell>
          <table:table-cell table:style-name="ce1" table:formula="of:=[.H377]+ h*[.F378]" office:value-type="float" office:value="199.098153694876" calcext:value-type="float">
            <text:p>199,0981536948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8]" office:value-type="float" office:value="3.75999999999996" calcext:value-type="float">
            <text:p>3,75999999999996</text:p>
          </table:table-cell>
          <table:table-cell table:style-name="ce1" table:formula="of:=[.H378]" office:value-type="float" office:value="199.098153694876" calcext:value-type="float">
            <text:p>199,098153694876</text:p>
          </table:table-cell>
          <table:table-cell table:style-name="ce1" table:formula="of:=-68 - ([.E379]^2/Ao)" office:value-type="float" office:value="-94.4267165364722" calcext:value-type="float">
            <text:p>-94,4267165364722</text:p>
          </table:table-cell>
          <table:table-cell table:style-name="ce1" table:formula="of:=[.G378]+h" office:value-type="float" office:value="3.76999999999996" calcext:value-type="float">
            <text:p>3,76999999999996</text:p>
          </table:table-cell>
          <table:table-cell table:style-name="ce1" table:formula="of:=[.H378]+ h*[.F379]" office:value-type="float" office:value="198.153886529511" calcext:value-type="float">
            <text:p>198,1538865295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9]" office:value-type="float" office:value="3.76999999999996" calcext:value-type="float">
            <text:p>3,76999999999996</text:p>
          </table:table-cell>
          <table:table-cell table:style-name="ce1" table:formula="of:=[.H379]" office:value-type="float" office:value="198.153886529511" calcext:value-type="float">
            <text:p>198,153886529511</text:p>
          </table:table-cell>
          <table:table-cell table:style-name="ce1" table:formula="of:=-68 - ([.E380]^2/Ao)" office:value-type="float" office:value="-94.1766418311668" calcext:value-type="float">
            <text:p>-94,1766418311668</text:p>
          </table:table-cell>
          <table:table-cell table:style-name="ce1" table:formula="of:=[.G379]+h" office:value-type="float" office:value="3.77999999999996" calcext:value-type="float">
            <text:p>3,77999999999996</text:p>
          </table:table-cell>
          <table:table-cell table:style-name="ce1" table:formula="of:=[.H379]+ h*[.F380]" office:value-type="float" office:value="197.212120111199" calcext:value-type="float">
            <text:p>197,2121201111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0]" office:value-type="float" office:value="3.77999999999996" calcext:value-type="float">
            <text:p>3,77999999999996</text:p>
          </table:table-cell>
          <table:table-cell table:style-name="ce1" table:formula="of:=[.H380]" office:value-type="float" office:value="197.212120111199" calcext:value-type="float">
            <text:p>197,212120111199</text:p>
          </table:table-cell>
          <table:table-cell table:style-name="ce1" table:formula="of:=-68 - ([.E381]^2/Ao)" office:value-type="float" office:value="-93.928413545836" calcext:value-type="float">
            <text:p>-93,928413545836</text:p>
          </table:table-cell>
          <table:table-cell table:style-name="ce1" table:formula="of:=[.G380]+h" office:value-type="float" office:value="3.78999999999996" calcext:value-type="float">
            <text:p>3,78999999999996</text:p>
          </table:table-cell>
          <table:table-cell table:style-name="ce1" table:formula="of:=[.H380]+ h*[.F381]" office:value-type="float" office:value="196.272835975741" calcext:value-type="float">
            <text:p>196,2728359757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1]" office:value-type="float" office:value="3.78999999999996" calcext:value-type="float">
            <text:p>3,78999999999996</text:p>
          </table:table-cell>
          <table:table-cell table:style-name="ce1" table:formula="of:=[.H381]" office:value-type="float" office:value="196.272835975741" calcext:value-type="float">
            <text:p>196,272835975741</text:p>
          </table:table-cell>
          <table:table-cell table:style-name="ce1" table:formula="of:=-68 - ([.E382]^2/Ao)" office:value-type="float" office:value="-93.6820174279734" calcext:value-type="float">
            <text:p>-93,6820174279734</text:p>
          </table:table-cell>
          <table:table-cell table:style-name="ce1" table:formula="of:=[.G381]+h" office:value-type="float" office:value="3.79999999999996" calcext:value-type="float">
            <text:p>3,79999999999996</text:p>
          </table:table-cell>
          <table:table-cell table:style-name="ce1" table:formula="of:=[.H381]+ h*[.F382]" office:value-type="float" office:value="195.336015801461" calcext:value-type="float">
            <text:p>195,3360158014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2]" office:value-type="float" office:value="3.79999999999996" calcext:value-type="float">
            <text:p>3,79999999999996</text:p>
          </table:table-cell>
          <table:table-cell table:style-name="ce1" table:formula="of:=[.H382]" office:value-type="float" office:value="195.336015801461" calcext:value-type="float">
            <text:p>195,336015801461</text:p>
          </table:table-cell>
          <table:table-cell table:style-name="ce1" table:formula="of:=-68 - ([.E383]^2/Ao)" office:value-type="float" office:value="-93.4374393794591" calcext:value-type="float">
            <text:p>-93,4374393794591</text:p>
          </table:table-cell>
          <table:table-cell table:style-name="ce1" table:formula="of:=[.G382]+h" office:value-type="float" office:value="3.80999999999996" calcext:value-type="float">
            <text:p>3,80999999999996</text:p>
          </table:table-cell>
          <table:table-cell table:style-name="ce1" table:formula="of:=[.H382]+ h*[.F383]" office:value-type="float" office:value="194.401641407666" calcext:value-type="float">
            <text:p>194,4016414076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3]" office:value-type="float" office:value="3.80999999999996" calcext:value-type="float">
            <text:p>3,80999999999996</text:p>
          </table:table-cell>
          <table:table-cell table:style-name="ce1" table:formula="of:=[.H383]" office:value-type="float" office:value="194.401641407666" calcext:value-type="float">
            <text:p>194,401641407666</text:p>
          </table:table-cell>
          <table:table-cell table:style-name="ce1" table:formula="of:=-68 - ([.E384]^2/Ao)" office:value-type="float" office:value="-93.1946654546633" calcext:value-type="float">
            <text:p>-93,1946654546633</text:p>
          </table:table-cell>
          <table:table-cell table:style-name="ce1" table:formula="of:=[.G383]+h" office:value-type="float" office:value="3.81999999999996" calcext:value-type="float">
            <text:p>3,81999999999996</text:p>
          </table:table-cell>
          <table:table-cell table:style-name="ce1" table:formula="of:=[.H383]+ h*[.F384]" office:value-type="float" office:value="193.46969475312" calcext:value-type="float">
            <text:p>193,469694753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4]" office:value-type="float" office:value="3.81999999999996" calcext:value-type="float">
            <text:p>3,81999999999996</text:p>
          </table:table-cell>
          <table:table-cell table:style-name="ce1" table:formula="of:=[.H384]" office:value-type="float" office:value="193.46969475312" calcext:value-type="float">
            <text:p>193,46969475312</text:p>
          </table:table-cell>
          <table:table-cell table:style-name="ce1" table:formula="of:=-68 - ([.E385]^2/Ao)" office:value-type="float" office:value="-92.9536818585769" calcext:value-type="float">
            <text:p>-92,9536818585769</text:p>
          </table:table-cell>
          <table:table-cell table:style-name="ce1" table:formula="of:=[.G384]+h" office:value-type="float" office:value="3.82999999999996" calcext:value-type="float">
            <text:p>3,82999999999996</text:p>
          </table:table-cell>
          <table:table-cell table:style-name="ce1" table:formula="of:=[.H384]+ h*[.F385]" office:value-type="float" office:value="192.540157934534" calcext:value-type="float">
            <text:p>192,5401579345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5]" office:value-type="float" office:value="3.82999999999996" calcext:value-type="float">
            <text:p>3,82999999999996</text:p>
          </table:table-cell>
          <table:table-cell table:style-name="ce1" table:formula="of:=[.H385]" office:value-type="float" office:value="192.540157934534" calcext:value-type="float">
            <text:p>192,540157934534</text:p>
          </table:table-cell>
          <table:table-cell table:style-name="ce1" table:formula="of:=-68 - ([.E386]^2/Ao)" office:value-type="float" office:value="-92.7144749449702" calcext:value-type="float">
            <text:p>-92,7144749449702</text:p>
          </table:table-cell>
          <table:table-cell table:style-name="ce1" table:formula="of:=[.G385]+h" office:value-type="float" office:value="3.83999999999996" calcext:value-type="float">
            <text:p>3,83999999999996</text:p>
          </table:table-cell>
          <table:table-cell table:style-name="ce1" table:formula="of:=[.H385]+ h*[.F386]" office:value-type="float" office:value="191.613013185084" calcext:value-type="float">
            <text:p>191,6130131850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6]" office:value-type="float" office:value="3.83999999999996" calcext:value-type="float">
            <text:p>3,83999999999996</text:p>
          </table:table-cell>
          <table:table-cell table:style-name="ce1" table:formula="of:=[.H386]" office:value-type="float" office:value="191.613013185084" calcext:value-type="float">
            <text:p>191,613013185084</text:p>
          </table:table-cell>
          <table:table-cell table:style-name="ce1" table:formula="of:=-68 - ([.E387]^2/Ao)" office:value-type="float" office:value="-92.4770312145782" calcext:value-type="float">
            <text:p>-92,4770312145782</text:p>
          </table:table-cell>
          <table:table-cell table:style-name="ce1" table:formula="of:=[.G386]+h" office:value-type="float" office:value="3.84999999999996" calcext:value-type="float">
            <text:p>3,84999999999996</text:p>
          </table:table-cell>
          <table:table-cell table:style-name="ce1" table:formula="of:=[.H386]+ h*[.F387]" office:value-type="float" office:value="190.688242872939" calcext:value-type="float">
            <text:p>190,6882428729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7]" office:value-type="float" office:value="3.84999999999996" calcext:value-type="float">
            <text:p>3,84999999999996</text:p>
          </table:table-cell>
          <table:table-cell table:style-name="ce1" table:formula="of:=[.H387]" office:value-type="float" office:value="190.688242872939" calcext:value-type="float">
            <text:p>190,688242872939</text:p>
          </table:table-cell>
          <table:table-cell table:style-name="ce1" table:formula="of:=-68 - ([.E388]^2/Ao)" office:value-type="float" office:value="-92.2413373133125" calcext:value-type="float">
            <text:p>-92,2413373133125</text:p>
          </table:table-cell>
          <table:table-cell table:style-name="ce1" table:formula="of:=[.G387]+h" office:value-type="float" office:value="3.85999999999996" calcext:value-type="float">
            <text:p>3,85999999999996</text:p>
          </table:table-cell>
          <table:table-cell table:style-name="ce1" table:formula="of:=[.H387]+ h*[.F388]" office:value-type="float" office:value="189.765829499805" calcext:value-type="float">
            <text:p>189,7658294998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8]" office:value-type="float" office:value="3.85999999999996" calcext:value-type="float">
            <text:p>3,85999999999996</text:p>
          </table:table-cell>
          <table:table-cell table:style-name="ce1" table:formula="of:=[.H388]" office:value-type="float" office:value="189.765829499805" calcext:value-type="float">
            <text:p>189,765829499805</text:p>
          </table:table-cell>
          <table:table-cell table:style-name="ce1" table:formula="of:=-68 - ([.E389]^2/Ao)" office:value-type="float" office:value="-92.0073800304995" calcext:value-type="float">
            <text:p>-92,0073800304995</text:p>
          </table:table-cell>
          <table:table-cell table:style-name="ce1" table:formula="of:=[.G388]+h" office:value-type="float" office:value="3.86999999999996" calcext:value-type="float">
            <text:p>3,86999999999996</text:p>
          </table:table-cell>
          <table:table-cell table:style-name="ce1" table:formula="of:=[.H388]+ h*[.F389]" office:value-type="float" office:value="188.8457556995" calcext:value-type="float">
            <text:p>188,84575569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9]" office:value-type="float" office:value="3.86999999999996" calcext:value-type="float">
            <text:p>3,86999999999996</text:p>
          </table:table-cell>
          <table:table-cell table:style-name="ce1" table:formula="of:=[.H389]" office:value-type="float" office:value="188.8457556995" calcext:value-type="float">
            <text:p>188,8457556995</text:p>
          </table:table-cell>
          <table:table-cell table:style-name="ce1" table:formula="of:=-68 - ([.E390]^2/Ao)" office:value-type="float" office:value="-91.7751462971436" calcext:value-type="float">
            <text:p>-91,7751462971436</text:p>
          </table:table-cell>
          <table:table-cell table:style-name="ce1" table:formula="of:=[.G389]+h" office:value-type="float" office:value="3.87999999999996" calcext:value-type="float">
            <text:p>3,87999999999996</text:p>
          </table:table-cell>
          <table:table-cell table:style-name="ce1" table:formula="of:=[.H389]+ h*[.F390]" office:value-type="float" office:value="187.928004236529" calcext:value-type="float">
            <text:p>187,9280042365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0]" office:value-type="float" office:value="3.87999999999996" calcext:value-type="float">
            <text:p>3,87999999999996</text:p>
          </table:table-cell>
          <table:table-cell table:style-name="ce1" table:formula="of:=[.H390]" office:value-type="float" office:value="187.928004236529" calcext:value-type="float">
            <text:p>187,928004236529</text:p>
          </table:table-cell>
          <table:table-cell table:style-name="ce1" table:formula="of:=-68 - ([.E391]^2/Ao)" office:value-type="float" office:value="-91.5446231842166" calcext:value-type="float">
            <text:p>-91,5446231842166</text:p>
          </table:table-cell>
          <table:table-cell table:style-name="ce1" table:formula="of:=[.G390]+h" office:value-type="float" office:value="3.88999999999996" calcext:value-type="float">
            <text:p>3,88999999999996</text:p>
          </table:table-cell>
          <table:table-cell table:style-name="ce1" table:formula="of:=[.H390]+ h*[.F391]" office:value-type="float" office:value="187.012558004687" calcext:value-type="float">
            <text:p>187,0125580046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1]" office:value-type="float" office:value="3.88999999999996" calcext:value-type="float">
            <text:p>3,88999999999996</text:p>
          </table:table-cell>
          <table:table-cell table:style-name="ce1" table:formula="of:=[.H391]" office:value-type="float" office:value="187.012558004687" calcext:value-type="float">
            <text:p>187,012558004687</text:p>
          </table:table-cell>
          <table:table-cell table:style-name="ce1" table:formula="of:=-68 - ([.E392]^2/Ao)" office:value-type="float" office:value="-91.3157979009709" calcext:value-type="float">
            <text:p>-91,3157979009709</text:p>
          </table:table-cell>
          <table:table-cell table:style-name="ce1" table:formula="of:=[.G391]+h" office:value-type="float" office:value="3.89999999999996" calcext:value-type="float">
            <text:p>3,89999999999996</text:p>
          </table:table-cell>
          <table:table-cell table:style-name="ce1" table:formula="of:=[.H391]+ h*[.F392]" office:value-type="float" office:value="186.099400025677" calcext:value-type="float">
            <text:p>186,0994000256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2]" office:value-type="float" office:value="3.89999999999996" calcext:value-type="float">
            <text:p>3,89999999999996</text:p>
          </table:table-cell>
          <table:table-cell table:style-name="ce1" table:formula="of:=[.H392]" office:value-type="float" office:value="186.099400025677" calcext:value-type="float">
            <text:p>186,099400025677</text:p>
          </table:table-cell>
          <table:table-cell table:style-name="ce1" table:formula="of:=-68 - ([.E393]^2/Ao)" office:value-type="float" office:value="-91.088657793278" calcext:value-type="float">
            <text:p>-91,088657793278</text:p>
          </table:table-cell>
          <table:table-cell table:style-name="ce1" table:formula="of:=[.G392]+h" office:value-type="float" office:value="3.90999999999996" calcext:value-type="float">
            <text:p>3,90999999999996</text:p>
          </table:table-cell>
          <table:table-cell table:style-name="ce1" table:formula="of:=[.H392]+ h*[.F393]" office:value-type="float" office:value="185.188513447744" calcext:value-type="float">
            <text:p>185,1885134477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3]" office:value-type="float" office:value="3.90999999999996" calcext:value-type="float">
            <text:p>3,90999999999996</text:p>
          </table:table-cell>
          <table:table-cell table:style-name="ce1" table:formula="of:=[.H393]" office:value-type="float" office:value="185.188513447744" calcext:value-type="float">
            <text:p>185,188513447744</text:p>
          </table:table-cell>
          <table:table-cell table:style-name="ce1" table:formula="of:=-68 - ([.E394]^2/Ao)" office:value-type="float" office:value="-90.8631903419903" calcext:value-type="float">
            <text:p>-90,8631903419903</text:p>
          </table:table-cell>
          <table:table-cell table:style-name="ce1" table:formula="of:=[.G393]+h" office:value-type="float" office:value="3.91999999999996" calcext:value-type="float">
            <text:p>3,91999999999996</text:p>
          </table:table-cell>
          <table:table-cell table:style-name="ce1" table:formula="of:=[.H393]+ h*[.F394]" office:value-type="float" office:value="184.279881544324" calcext:value-type="float">
            <text:p>184,2798815443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4]" office:value-type="float" office:value="3.91999999999996" calcext:value-type="float">
            <text:p>3,91999999999996</text:p>
          </table:table-cell>
          <table:table-cell table:style-name="ce1" table:formula="of:=[.H394]" office:value-type="float" office:value="184.279881544324" calcext:value-type="float">
            <text:p>184,279881544324</text:p>
          </table:table-cell>
          <table:table-cell table:style-name="ce1" table:formula="of:=-68 - ([.E395]^2/Ao)" office:value-type="float" office:value="-90.6393831613268" calcext:value-type="float">
            <text:p>-90,6393831613268</text:p>
          </table:table-cell>
          <table:table-cell table:style-name="ce1" table:formula="of:=[.G394]+h" office:value-type="float" office:value="3.92999999999996" calcext:value-type="float">
            <text:p>3,92999999999996</text:p>
          </table:table-cell>
          <table:table-cell table:style-name="ce1" table:formula="of:=[.H394]+ h*[.F395]" office:value-type="float" office:value="183.373487712711" calcext:value-type="float">
            <text:p>183,3734877127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5]" office:value-type="float" office:value="3.92999999999996" calcext:value-type="float">
            <text:p>3,92999999999996</text:p>
          </table:table-cell>
          <table:table-cell table:style-name="ce1" table:formula="of:=[.H395]" office:value-type="float" office:value="183.373487712711" calcext:value-type="float">
            <text:p>183,373487712711</text:p>
          </table:table-cell>
          <table:table-cell table:style-name="ce1" table:formula="of:=-68 - ([.E396]^2/Ao)" office:value-type="float" office:value="-90.4172239972825" calcext:value-type="float">
            <text:p>-90,4172239972825</text:p>
          </table:table-cell>
          <table:table-cell table:style-name="ce1" table:formula="of:=[.G395]+h" office:value-type="float" office:value="3.93999999999996" calcext:value-type="float">
            <text:p>3,93999999999996</text:p>
          </table:table-cell>
          <table:table-cell table:style-name="ce1" table:formula="of:=[.H395]+ h*[.F396]" office:value-type="float" office:value="182.469315472738" calcext:value-type="float">
            <text:p>182,4693154727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6]" office:value-type="float" office:value="3.93999999999996" calcext:value-type="float">
            <text:p>3,93999999999996</text:p>
          </table:table-cell>
          <table:table-cell table:style-name="ce1" table:formula="of:=[.H396]" office:value-type="float" office:value="182.469315472738" calcext:value-type="float">
            <text:p>182,469315472738</text:p>
          </table:table-cell>
          <table:table-cell table:style-name="ce1" table:formula="of:=-68 - ([.E397]^2/Ao)" office:value-type="float" office:value="-90.1967007260598" calcext:value-type="float">
            <text:p>-90,1967007260598</text:p>
          </table:table-cell>
          <table:table-cell table:style-name="ce1" table:formula="of:=[.G396]+h" office:value-type="float" office:value="3.94999999999996" calcext:value-type="float">
            <text:p>3,94999999999996</text:p>
          </table:table-cell>
          <table:table-cell table:style-name="ce1" table:formula="of:=[.H396]+ h*[.F397]" office:value-type="float" office:value="181.567348465478" calcext:value-type="float">
            <text:p>181,5673484654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7]" office:value-type="float" office:value="3.94999999999996" calcext:value-type="float">
            <text:p>3,94999999999996</text:p>
          </table:table-cell>
          <table:table-cell table:style-name="ce1" table:formula="of:=[.H397]" office:value-type="float" office:value="181.567348465478" calcext:value-type="float">
            <text:p>181,567348465478</text:p>
          </table:table-cell>
          <table:table-cell table:style-name="ce1" table:formula="of:=-68 - ([.E398]^2/Ao)" office:value-type="float" office:value="-89.9778013525228" calcext:value-type="float">
            <text:p>-89,9778013525228</text:p>
          </table:table-cell>
          <table:table-cell table:style-name="ce1" table:formula="of:=[.G397]+h" office:value-type="float" office:value="3.95999999999996" calcext:value-type="float">
            <text:p>3,95999999999996</text:p>
          </table:table-cell>
          <table:table-cell table:style-name="ce1" table:formula="of:=[.H397]+ h*[.F398]" office:value-type="float" office:value="180.667570451952" calcext:value-type="float">
            <text:p>180,6675704519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8]" office:value-type="float" office:value="3.95999999999996" calcext:value-type="float">
            <text:p>3,95999999999996</text:p>
          </table:table-cell>
          <table:table-cell table:style-name="ce1" table:formula="of:=[.H398]" office:value-type="float" office:value="180.667570451952" calcext:value-type="float">
            <text:p>180,667570451952</text:p>
          </table:table-cell>
          <table:table-cell table:style-name="ce1" table:formula="of:=-68 - ([.E399]^2/Ao)" office:value-type="float" office:value="-89.7605140086741" calcext:value-type="float">
            <text:p>-89,7605140086741</text:p>
          </table:table-cell>
          <table:table-cell table:style-name="ce1" table:formula="of:=[.G398]+h" office:value-type="float" office:value="3.96999999999996" calcext:value-type="float">
            <text:p>3,96999999999996</text:p>
          </table:table-cell>
          <table:table-cell table:style-name="ce1" table:formula="of:=[.H398]+ h*[.F399]" office:value-type="float" office:value="179.769965311866" calcext:value-type="float">
            <text:p>179,7699653118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9]" office:value-type="float" office:value="3.96999999999996" calcext:value-type="float">
            <text:p>3,96999999999996</text:p>
          </table:table-cell>
          <table:table-cell table:style-name="ce1" table:formula="of:=[.H399]" office:value-type="float" office:value="179.769965311866" calcext:value-type="float">
            <text:p>179,769965311866</text:p>
          </table:table-cell>
          <table:table-cell table:style-name="ce1" table:formula="of:=-68 - ([.E400]^2/Ao)" office:value-type="float" office:value="-89.5448269521529" calcext:value-type="float">
            <text:p>-89,5448269521529</text:p>
          </table:table-cell>
          <table:table-cell table:style-name="ce1" table:formula="of:=[.G399]+h" office:value-type="float" office:value="3.97999999999996" calcext:value-type="float">
            <text:p>3,97999999999996</text:p>
          </table:table-cell>
          <table:table-cell table:style-name="ce1" table:formula="of:=[.H399]+ h*[.F400]" office:value-type="float" office:value="178.874517042344" calcext:value-type="float">
            <text:p>178,8745170423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0]" office:value-type="float" office:value="3.97999999999996" calcext:value-type="float">
            <text:p>3,97999999999996</text:p>
          </table:table-cell>
          <table:table-cell table:style-name="ce1" table:formula="of:=[.H400]" office:value-type="float" office:value="178.874517042344" calcext:value-type="float">
            <text:p>178,874517042344</text:p>
          </table:table-cell>
          <table:table-cell table:style-name="ce1" table:formula="of:=-68 - ([.E401]^2/Ao)" office:value-type="float" office:value="-89.3307285647546" calcext:value-type="float">
            <text:p>-89,3307285647546</text:p>
          </table:table-cell>
          <table:table-cell table:style-name="ce1" table:formula="of:=[.G400]+h" office:value-type="float" office:value="3.98999999999996" calcext:value-type="float">
            <text:p>3,98999999999996</text:p>
          </table:table-cell>
          <table:table-cell table:style-name="ce1" table:formula="of:=[.H400]+ h*[.F401]" office:value-type="float" office:value="177.981209756697" calcext:value-type="float">
            <text:p>177,9812097566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1]" office:value-type="float" office:value="3.98999999999996" calcext:value-type="float">
            <text:p>3,98999999999996</text:p>
          </table:table-cell>
          <table:table-cell table:style-name="ce1" table:formula="of:=[.H401]" office:value-type="float" office:value="177.981209756697" calcext:value-type="float">
            <text:p>177,981209756697</text:p>
          </table:table-cell>
          <table:table-cell table:style-name="ce1" table:formula="of:=-68 - ([.E402]^2/Ao)" office:value-type="float" office:value="-89.1182073509715" calcext:value-type="float">
            <text:p>-89,1182073509715</text:p>
          </table:table-cell>
          <table:table-cell table:style-name="ce1" table:formula="of:=[.G401]+h" office:value-type="float" office:value="3.99999999999996" calcext:value-type="float">
            <text:p>3,99999999999996</text:p>
          </table:table-cell>
          <table:table-cell table:style-name="ce1" table:formula="of:=[.H401]+ h*[.F402]" office:value-type="float" office:value="177.090027683187" calcext:value-type="float">
            <text:p>177,0900276831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2]" office:value-type="float" office:value="3.99999999999996" calcext:value-type="float">
            <text:p>3,99999999999996</text:p>
          </table:table-cell>
          <table:table-cell table:style-name="ce1" table:formula="of:=[.H402]" office:value-type="float" office:value="177.090027683187" calcext:value-type="float">
            <text:p>177,090027683187</text:p>
          </table:table-cell>
          <table:table-cell table:style-name="ce1" table:formula="of:=-68 - ([.E403]^2/Ao)" office:value-type="float" office:value="-88.9072519365546" calcext:value-type="float">
            <text:p>-88,9072519365546</text:p>
          </table:table-cell>
          <table:table-cell table:style-name="ce1" table:formula="of:=[.G402]+h" office:value-type="float" office:value="4.00999999999996" calcext:value-type="float">
            <text:p>4,00999999999996</text:p>
          </table:table-cell>
          <table:table-cell table:style-name="ce1" table:formula="of:=[.H402]+ h*[.F403]" office:value-type="float" office:value="176.200955163821" calcext:value-type="float">
            <text:p>176,2009551638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3]" office:value-type="float" office:value="4.00999999999996" calcext:value-type="float">
            <text:p>4,00999999999996</text:p>
          </table:table-cell>
          <table:table-cell table:style-name="ce1" table:formula="of:=[.H403]" office:value-type="float" office:value="176.200955163821" calcext:value-type="float">
            <text:p>176,200955163821</text:p>
          </table:table-cell>
          <table:table-cell table:style-name="ce1" table:formula="of:=-68 - ([.E404]^2/Ao)" office:value-type="float" office:value="-88.6978510670953" calcext:value-type="float">
            <text:p>-88,6978510670953</text:p>
          </table:table-cell>
          <table:table-cell table:style-name="ce1" table:formula="of:=[.G403]+h" office:value-type="float" office:value="4.01999999999996" calcext:value-type="float">
            <text:p>4,01999999999996</text:p>
          </table:table-cell>
          <table:table-cell table:style-name="ce1" table:formula="of:=[.H403]+ h*[.F404]" office:value-type="float" office:value="175.31397665315" calcext:value-type="float">
            <text:p>175,313976653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4]" office:value-type="float" office:value="4.01999999999996" calcext:value-type="float">
            <text:p>4,01999999999996</text:p>
          </table:table-cell>
          <table:table-cell table:style-name="ce1" table:formula="of:=[.H404]" office:value-type="float" office:value="175.31397665315" calcext:value-type="float">
            <text:p>175,31397665315</text:p>
          </table:table-cell>
          <table:table-cell table:style-name="ce1" table:formula="of:=-68 - ([.E405]^2/Ao)" office:value-type="float" office:value="-88.4899936066276" calcext:value-type="float">
            <text:p>-88,4899936066276</text:p>
          </table:table-cell>
          <table:table-cell table:style-name="ce1" table:formula="of:=[.G404]+h" office:value-type="float" office:value="4.02999999999996" calcext:value-type="float">
            <text:p>4,02999999999996</text:p>
          </table:table-cell>
          <table:table-cell table:style-name="ce1" table:formula="of:=[.H404]+ h*[.F405]" office:value-type="float" office:value="174.429076717084" calcext:value-type="float">
            <text:p>174,4290767170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5]" office:value-type="float" office:value="4.02999999999996" calcext:value-type="float">
            <text:p>4,02999999999996</text:p>
          </table:table-cell>
          <table:table-cell table:style-name="ce1" table:formula="of:=[.H405]" office:value-type="float" office:value="174.429076717084" calcext:value-type="float">
            <text:p>174,429076717084</text:p>
          </table:table-cell>
          <table:table-cell table:style-name="ce1" table:formula="of:=-68 - ([.E406]^2/Ao)" office:value-type="float" office:value="-88.2836685362496" calcext:value-type="float">
            <text:p>-88,2836685362496</text:p>
          </table:table-cell>
          <table:table-cell table:style-name="ce1" table:formula="of:=[.G405]+h" office:value-type="float" office:value="4.03999999999996" calcext:value-type="float">
            <text:p>4,03999999999996</text:p>
          </table:table-cell>
          <table:table-cell table:style-name="ce1" table:formula="of:=[.H405]+ h*[.F406]" office:value-type="float" office:value="173.546240031722" calcext:value-type="float">
            <text:p>173,5462400317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6]" office:value-type="float" office:value="4.03999999999996" calcext:value-type="float">
            <text:p>4,03999999999996</text:p>
          </table:table-cell>
          <table:table-cell table:style-name="ce1" table:formula="of:=[.H406]" office:value-type="float" office:value="173.546240031722" calcext:value-type="float">
            <text:p>173,546240031722</text:p>
          </table:table-cell>
          <table:table-cell table:style-name="ce1" table:formula="of:=-68 - ([.E407]^2/Ao)" office:value-type="float" office:value="-88.0788649527653" calcext:value-type="float">
            <text:p>-88,0788649527653</text:p>
          </table:table-cell>
          <table:table-cell table:style-name="ce1" table:formula="of:=[.G406]+h" office:value-type="float" office:value="4.04999999999996" calcext:value-type="float">
            <text:p>4,04999999999996</text:p>
          </table:table-cell>
          <table:table-cell table:style-name="ce1" table:formula="of:=[.H406]+ h*[.F407]" office:value-type="float" office:value="172.665451382194" calcext:value-type="float">
            <text:p>172,6654513821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7]" office:value-type="float" office:value="4.04999999999996" calcext:value-type="float">
            <text:p>4,04999999999996</text:p>
          </table:table-cell>
          <table:table-cell table:style-name="ce1" table:formula="of:=[.H407]" office:value-type="float" office:value="172.665451382194" calcext:value-type="float">
            <text:p>172,665451382194</text:p>
          </table:table-cell>
          <table:table-cell table:style-name="ce1" table:formula="of:=-68 - ([.E408]^2/Ao)" office:value-type="float" office:value="-87.8755720673445" calcext:value-type="float">
            <text:p>-87,8755720673445</text:p>
          </table:table-cell>
          <table:table-cell table:style-name="ce1" table:formula="of:=[.G407]+h" office:value-type="float" office:value="4.05999999999996" calcext:value-type="float">
            <text:p>4,05999999999996</text:p>
          </table:table-cell>
          <table:table-cell table:style-name="ce1" table:formula="of:=[.H407]+ h*[.F408]" office:value-type="float" office:value="171.786695661521" calcext:value-type="float">
            <text:p>171,7866956615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8]" office:value-type="float" office:value="4.05999999999996" calcext:value-type="float">
            <text:p>4,05999999999996</text:p>
          </table:table-cell>
          <table:table-cell table:style-name="ce1" table:formula="of:=[.H408]" office:value-type="float" office:value="171.786695661521" calcext:value-type="float">
            <text:p>171,786695661521</text:p>
          </table:table-cell>
          <table:table-cell table:style-name="ce1" table:formula="of:=-68 - ([.E409]^2/Ao)" office:value-type="float" office:value="-87.6737792042026" calcext:value-type="float">
            <text:p>-87,6737792042026</text:p>
          </table:table-cell>
          <table:table-cell table:style-name="ce1" table:formula="of:=[.G408]+h" office:value-type="float" office:value="4.06999999999996" calcext:value-type="float">
            <text:p>4,06999999999996</text:p>
          </table:table-cell>
          <table:table-cell table:style-name="ce1" table:formula="of:=[.H408]+ h*[.F409]" office:value-type="float" office:value="170.909957869479" calcext:value-type="float">
            <text:p>170,9099578694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9]" office:value-type="float" office:value="4.06999999999996" calcext:value-type="float">
            <text:p>4,06999999999996</text:p>
          </table:table-cell>
          <table:table-cell table:style-name="ce1" table:formula="of:=[.H409]" office:value-type="float" office:value="170.909957869479" calcext:value-type="float">
            <text:p>170,909957869479</text:p>
          </table:table-cell>
          <table:table-cell table:style-name="ce1" table:formula="of:=-68 - ([.E410]^2/Ao)" office:value-type="float" office:value="-87.4734757992979" calcext:value-type="float">
            <text:p>-87,4734757992979</text:p>
          </table:table-cell>
          <table:table-cell table:style-name="ce1" table:formula="of:=[.G409]+h" office:value-type="float" office:value="4.07999999999996" calcext:value-type="float">
            <text:p>4,07999999999996</text:p>
          </table:table-cell>
          <table:table-cell table:style-name="ce1" table:formula="of:=[.H409]+ h*[.F410]" office:value-type="float" office:value="170.035223111486" calcext:value-type="float">
            <text:p>170,0352231114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0]" office:value-type="float" office:value="4.07999999999996" calcext:value-type="float">
            <text:p>4,07999999999996</text:p>
          </table:table-cell>
          <table:table-cell table:style-name="ce1" table:formula="of:=[.H410]" office:value-type="float" office:value="170.035223111486" calcext:value-type="float">
            <text:p>170,035223111486</text:p>
          </table:table-cell>
          <table:table-cell table:style-name="ce1" table:formula="of:=-68 - ([.E411]^2/Ao)" office:value-type="float" office:value="-87.2746513990484" calcext:value-type="float">
            <text:p>-87,2746513990484</text:p>
          </table:table-cell>
          <table:table-cell table:style-name="ce1" table:formula="of:=[.G410]+h" office:value-type="float" office:value="4.08999999999996" calcext:value-type="float">
            <text:p>4,08999999999996</text:p>
          </table:table-cell>
          <table:table-cell table:style-name="ce1" table:formula="of:=[.H410]+ h*[.F411]" office:value-type="float" office:value="169.162476597495" calcext:value-type="float">
            <text:p>169,1624765974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1]" office:value-type="float" office:value="4.08999999999996" calcext:value-type="float">
            <text:p>4,08999999999996</text:p>
          </table:table-cell>
          <table:table-cell table:style-name="ce1" table:formula="of:=[.H411]" office:value-type="float" office:value="169.162476597495" calcext:value-type="float">
            <text:p>169,162476597495</text:p>
          </table:table-cell>
          <table:table-cell table:style-name="ce1" table:formula="of:=-68 - ([.E412]^2/Ao)" office:value-type="float" office:value="-87.0772956590654" calcext:value-type="float">
            <text:p>-87,0772956590654</text:p>
          </table:table-cell>
          <table:table-cell table:style-name="ce1" table:formula="of:=[.G411]+h" office:value-type="float" office:value="4.09999999999996" calcext:value-type="float">
            <text:p>4,09999999999996</text:p>
          </table:table-cell>
          <table:table-cell table:style-name="ce1" table:formula="of:=[.H411]+ h*[.F412]" office:value-type="float" office:value="168.291703640904" calcext:value-type="float">
            <text:p>168,2917036409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2]" office:value-type="float" office:value="4.09999999999996" calcext:value-type="float">
            <text:p>4,09999999999996</text:p>
          </table:table-cell>
          <table:table-cell table:style-name="ce1" table:formula="of:=[.H412]" office:value-type="float" office:value="168.291703640904" calcext:value-type="float">
            <text:p>168,291703640904</text:p>
          </table:table-cell>
          <table:table-cell table:style-name="ce1" table:formula="of:=-68 - ([.E413]^2/Ao)" office:value-type="float" office:value="-86.8813983429053" calcext:value-type="float">
            <text:p>-86,8813983429053</text:p>
          </table:table-cell>
          <table:table-cell table:style-name="ce1" table:formula="of:=[.G412]+h" office:value-type="float" office:value="4.10999999999996" calcext:value-type="float">
            <text:p>4,10999999999996</text:p>
          </table:table-cell>
          <table:table-cell table:style-name="ce1" table:formula="of:=[.H412]+ h*[.F413]" office:value-type="float" office:value="167.422889657475" calcext:value-type="float">
            <text:p>167,4228896574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3]" office:value-type="float" office:value="4.10999999999996" calcext:value-type="float">
            <text:p>4,10999999999996</text:p>
          </table:table-cell>
          <table:table-cell table:style-name="ce1" table:formula="of:=[.H413]" office:value-type="float" office:value="167.422889657475" calcext:value-type="float">
            <text:p>167,422889657475</text:p>
          </table:table-cell>
          <table:table-cell table:style-name="ce1" table:formula="of:=-68 - ([.E414]^2/Ao)" office:value-type="float" office:value="-86.6869493208395" calcext:value-type="float">
            <text:p>-86,6869493208395</text:p>
          </table:table-cell>
          <table:table-cell table:style-name="ce1" table:formula="of:=[.G413]+h" office:value-type="float" office:value="4.11999999999996" calcext:value-type="float">
            <text:p>4,11999999999996</text:p>
          </table:table-cell>
          <table:table-cell table:style-name="ce1" table:formula="of:=[.H413]+ h*[.F414]" office:value-type="float" office:value="166.556020164267" calcext:value-type="float">
            <text:p>166,5560201642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4]" office:value-type="float" office:value="4.11999999999996" calcext:value-type="float">
            <text:p>4,11999999999996</text:p>
          </table:table-cell>
          <table:table-cell table:style-name="ce1" table:formula="of:=[.H414]" office:value-type="float" office:value="166.556020164267" calcext:value-type="float">
            <text:p>166,556020164267</text:p>
          </table:table-cell>
          <table:table-cell table:style-name="ce1" table:formula="of:=-68 - ([.E415]^2/Ao)" office:value-type="float" office:value="-86.4939385686398" calcext:value-type="float">
            <text:p>-86,4939385686398</text:p>
          </table:table-cell>
          <table:table-cell table:style-name="ce1" table:formula="of:=[.G414]+h" office:value-type="float" office:value="4.12999999999996" calcext:value-type="float">
            <text:p>4,12999999999996</text:p>
          </table:table-cell>
          <table:table-cell table:style-name="ce1" table:formula="of:=[.H414]+ h*[.F415]" office:value-type="float" office:value="165.691080778581" calcext:value-type="float">
            <text:p>165,6910807785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5]" office:value-type="float" office:value="4.12999999999996" calcext:value-type="float">
            <text:p>4,12999999999996</text:p>
          </table:table-cell>
          <table:table-cell table:style-name="ce1" table:formula="of:=[.H415]" office:value-type="float" office:value="165.691080778581" calcext:value-type="float">
            <text:p>165,691080778581</text:p>
          </table:table-cell>
          <table:table-cell table:style-name="ce1" table:formula="of:=-68 - ([.E416]^2/Ao)" office:value-type="float" office:value="-86.3023561663827" calcext:value-type="float">
            <text:p>-86,3023561663827</text:p>
          </table:table-cell>
          <table:table-cell table:style-name="ce1" table:formula="of:=[.G415]+h" office:value-type="float" office:value="4.13999999999996" calcext:value-type="float">
            <text:p>4,13999999999996</text:p>
          </table:table-cell>
          <table:table-cell table:style-name="ce1" table:formula="of:=[.H415]+ h*[.F416]" office:value-type="float" office:value="164.828057216917" calcext:value-type="float">
            <text:p>164,8280572169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6]" office:value-type="float" office:value="4.13999999999996" calcext:value-type="float">
            <text:p>4,13999999999996</text:p>
          </table:table-cell>
          <table:table-cell table:style-name="ce1" table:formula="of:=[.H416]" office:value-type="float" office:value="164.828057216917" calcext:value-type="float">
            <text:p>164,828057216917</text:p>
          </table:table-cell>
          <table:table-cell table:style-name="ce1" table:formula="of:=-68 - ([.E417]^2/Ao)" office:value-type="float" office:value="-86.1121922972688" calcext:value-type="float">
            <text:p>-86,1121922972688</text:p>
          </table:table-cell>
          <table:table-cell table:style-name="ce1" table:formula="of:=[.G416]+h" office:value-type="float" office:value="4.14999999999996" calcext:value-type="float">
            <text:p>4,14999999999996</text:p>
          </table:table-cell>
          <table:table-cell table:style-name="ce1" table:formula="of:=[.H416]+ h*[.F417]" office:value-type="float" office:value="163.966935293944" calcext:value-type="float">
            <text:p>163,9669352939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7]" office:value-type="float" office:value="4.14999999999996" calcext:value-type="float">
            <text:p>4,14999999999996</text:p>
          </table:table-cell>
          <table:table-cell table:style-name="ce1" table:formula="of:=[.H417]" office:value-type="float" office:value="163.966935293944" calcext:value-type="float">
            <text:p>163,966935293944</text:p>
          </table:table-cell>
          <table:table-cell table:style-name="ce1" table:formula="of:=-68 - ([.E418]^2/Ao)" office:value-type="float" office:value="-85.923437246459" calcext:value-type="float">
            <text:p>-85,923437246459</text:p>
          </table:table-cell>
          <table:table-cell table:style-name="ce1" table:formula="of:=[.G417]+h" office:value-type="float" office:value="4.15999999999996" calcext:value-type="float">
            <text:p>4,15999999999996</text:p>
          </table:table-cell>
          <table:table-cell table:style-name="ce1" table:formula="of:=[.H417]+ h*[.F418]" office:value-type="float" office:value="163.107700921479" calcext:value-type="float">
            <text:p>163,1077009214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8]" office:value-type="float" office:value="4.15999999999996" calcext:value-type="float">
            <text:p>4,15999999999996</text:p>
          </table:table-cell>
          <table:table-cell table:style-name="ce1" table:formula="of:=[.H418]" office:value-type="float" office:value="163.107700921479" calcext:value-type="float">
            <text:p>163,107700921479</text:p>
          </table:table-cell>
          <table:table-cell table:style-name="ce1" table:formula="of:=-68 - ([.E419]^2/Ao)" office:value-type="float" office:value="-85.7360813999272" calcext:value-type="float">
            <text:p>-85,7360813999272</text:p>
          </table:table-cell>
          <table:table-cell table:style-name="ce1" table:formula="of:=[.G418]+h" office:value-type="float" office:value="4.16999999999996" calcext:value-type="float">
            <text:p>4,16999999999996</text:p>
          </table:table-cell>
          <table:table-cell table:style-name="ce1" table:formula="of:=[.H418]+ h*[.F419]" office:value-type="float" office:value="162.25034010748" calcext:value-type="float">
            <text:p>162,250340107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9]" office:value-type="float" office:value="4.16999999999996" calcext:value-type="float">
            <text:p>4,16999999999996</text:p>
          </table:table-cell>
          <table:table-cell table:style-name="ce1" table:formula="of:=[.H419]" office:value-type="float" office:value="162.25034010748" calcext:value-type="float">
            <text:p>162,25034010748</text:p>
          </table:table-cell>
          <table:table-cell table:style-name="ce1" table:formula="of:=-68 - ([.E420]^2/Ao)" office:value-type="float" office:value="-85.5501152433287" calcext:value-type="float">
            <text:p>-85,5501152433287</text:p>
          </table:table-cell>
          <table:table-cell table:style-name="ce1" table:formula="of:=[.G419]+h" office:value-type="float" office:value="4.17999999999996" calcext:value-type="float">
            <text:p>4,17999999999996</text:p>
          </table:table-cell>
          <table:table-cell table:style-name="ce1" table:formula="of:=[.H419]+ h*[.F420]" office:value-type="float" office:value="161.394838955047" calcext:value-type="float">
            <text:p>161,3948389550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0]" office:value-type="float" office:value="4.17999999999996" calcext:value-type="float">
            <text:p>4,17999999999996</text:p>
          </table:table-cell>
          <table:table-cell table:style-name="ce1" table:formula="of:=[.H420]" office:value-type="float" office:value="161.394838955047" calcext:value-type="float">
            <text:p>161,394838955047</text:p>
          </table:table-cell>
          <table:table-cell table:style-name="ce1" table:formula="of:=-68 - ([.E421]^2/Ao)" office:value-type="float" office:value="-85.3655293608837" calcext:value-type="float">
            <text:p>-85,3655293608837</text:p>
          </table:table-cell>
          <table:table-cell table:style-name="ce1" table:formula="of:=[.G420]+h" office:value-type="float" office:value="4.18999999999996" calcext:value-type="float">
            <text:p>4,18999999999996</text:p>
          </table:table-cell>
          <table:table-cell table:style-name="ce1" table:formula="of:=[.H420]+ h*[.F421]" office:value-type="float" office:value="160.541183661438" calcext:value-type="float">
            <text:p>160,5411836614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1]" office:value-type="float" office:value="4.18999999999996" calcext:value-type="float">
            <text:p>4,18999999999996</text:p>
          </table:table-cell>
          <table:table-cell table:style-name="ce1" table:formula="of:=[.H421]" office:value-type="float" office:value="160.541183661438" calcext:value-type="float">
            <text:p>160,541183661438</text:p>
          </table:table-cell>
          <table:table-cell table:style-name="ce1" table:formula="of:=-68 - ([.E422]^2/Ao)" office:value-type="float" office:value="-85.1823144342771" calcext:value-type="float">
            <text:p>-85,1823144342771</text:p>
          </table:table-cell>
          <table:table-cell table:style-name="ce1" table:formula="of:=[.G421]+h" office:value-type="float" office:value="4.19999999999996" calcext:value-type="float">
            <text:p>4,19999999999996</text:p>
          </table:table-cell>
          <table:table-cell table:style-name="ce1" table:formula="of:=[.H421]+ h*[.F422]" office:value-type="float" office:value="159.689360517095" calcext:value-type="float">
            <text:p>159,6893605170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2]" office:value-type="float" office:value="4.19999999999996" calcext:value-type="float">
            <text:p>4,19999999999996</text:p>
          </table:table-cell>
          <table:table-cell table:style-name="ce1" table:formula="of:=[.H422]" office:value-type="float" office:value="159.689360517095" calcext:value-type="float">
            <text:p>159,689360517095</text:p>
          </table:table-cell>
          <table:table-cell table:style-name="ce1" table:formula="of:=-68 - ([.E423]^2/Ao)" office:value-type="float" office:value="-85.0004612415726" calcext:value-type="float">
            <text:p>-85,0004612415726</text:p>
          </table:table-cell>
          <table:table-cell table:style-name="ce1" table:formula="of:=[.G422]+h" office:value-type="float" office:value="4.20999999999996" calcext:value-type="float">
            <text:p>4,20999999999996</text:p>
          </table:table-cell>
          <table:table-cell table:style-name="ce1" table:formula="of:=[.H422]+ h*[.F423]" office:value-type="float" office:value="158.83935590468" calcext:value-type="float">
            <text:p>158,839355904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3]" office:value-type="float" office:value="4.20999999999996" calcext:value-type="float">
            <text:p>4,20999999999996</text:p>
          </table:table-cell>
          <table:table-cell table:style-name="ce1" table:formula="of:=[.H423]" office:value-type="float" office:value="158.83935590468" calcext:value-type="float">
            <text:p>158,83935590468</text:p>
          </table:table-cell>
          <table:table-cell table:style-name="ce1" table:formula="of:=-68 - ([.E424]^2/Ao)" office:value-type="float" office:value="-84.8199606561423" calcext:value-type="float">
            <text:p>-84,8199606561423</text:p>
          </table:table-cell>
          <table:table-cell table:style-name="ce1" table:formula="of:=[.G423]+h" office:value-type="float" office:value="4.21999999999995" calcext:value-type="float">
            <text:p>4,21999999999995</text:p>
          </table:table-cell>
          <table:table-cell table:style-name="ce1" table:formula="of:=[.H423]+ h*[.F424]" office:value-type="float" office:value="157.991156298118" calcext:value-type="float">
            <text:p>157,9911562981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4]" office:value-type="float" office:value="4.21999999999995" calcext:value-type="float">
            <text:p>4,21999999999995</text:p>
          </table:table-cell>
          <table:table-cell table:style-name="ce1" table:formula="of:=[.H424]" office:value-type="float" office:value="157.991156298118" calcext:value-type="float">
            <text:p>157,991156298118</text:p>
          </table:table-cell>
          <table:table-cell table:style-name="ce1" table:formula="of:=-68 - ([.E425]^2/Ao)" office:value-type="float" office:value="-84.6408036456109" calcext:value-type="float">
            <text:p>-84,6408036456109</text:p>
          </table:table-cell>
          <table:table-cell table:style-name="ce1" table:formula="of:=[.G424]+h" office:value-type="float" office:value="4.22999999999995" calcext:value-type="float">
            <text:p>4,22999999999995</text:p>
          </table:table-cell>
          <table:table-cell table:style-name="ce1" table:formula="of:=[.H424]+ h*[.F425]" office:value-type="float" office:value="157.144748261662" calcext:value-type="float">
            <text:p>157,1447482616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5]" office:value-type="float" office:value="4.22999999999995" calcext:value-type="float">
            <text:p>4,22999999999995</text:p>
          </table:table-cell>
          <table:table-cell table:style-name="ce1" table:formula="of:=[.H425]" office:value-type="float" office:value="157.144748261662" calcext:value-type="float">
            <text:p>157,144748261662</text:p>
          </table:table-cell>
          <table:table-cell table:style-name="ce1" table:formula="of:=-68 - ([.E426]^2/Ao)" office:value-type="float" office:value="-84.4629812708141" calcext:value-type="float">
            <text:p>-84,4629812708141</text:p>
          </table:table-cell>
          <table:table-cell table:style-name="ce1" table:formula="of:=[.G425]+h" office:value-type="float" office:value="4.23999999999995" calcext:value-type="float">
            <text:p>4,23999999999995</text:p>
          </table:table-cell>
          <table:table-cell table:style-name="ce1" table:formula="of:=[.H425]+ h*[.F426]" office:value-type="float" office:value="156.300118448954" calcext:value-type="float">
            <text:p>156,3001184489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6]" office:value-type="float" office:value="4.23999999999995" calcext:value-type="float">
            <text:p>4,23999999999995</text:p>
          </table:table-cell>
          <table:table-cell table:style-name="ce1" table:formula="of:=[.H426]" office:value-type="float" office:value="156.300118448954" calcext:value-type="float">
            <text:p>156,300118448954</text:p>
          </table:table-cell>
          <table:table-cell table:style-name="ce1" table:formula="of:=-68 - ([.E427]^2/Ao)" office:value-type="float" office:value="-84.2864846847714" calcext:value-type="float">
            <text:p>-84,2864846847714</text:p>
          </table:table-cell>
          <table:table-cell table:style-name="ce1" table:formula="of:=[.G426]+h" office:value-type="float" office:value="4.24999999999995" calcext:value-type="float">
            <text:p>4,24999999999995</text:p>
          </table:table-cell>
          <table:table-cell table:style-name="ce1" table:formula="of:=[.H426]+ h*[.F427]" office:value-type="float" office:value="155.457253602106" calcext:value-type="float">
            <text:p>155,4572536021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7]" office:value-type="float" office:value="4.24999999999995" calcext:value-type="float">
            <text:p>4,24999999999995</text:p>
          </table:table-cell>
          <table:table-cell table:style-name="ce1" table:formula="of:=[.H427]" office:value-type="float" office:value="155.457253602106" calcext:value-type="float">
            <text:p>155,457253602106</text:p>
          </table:table-cell>
          <table:table-cell table:style-name="ce1" table:formula="of:=-68 - ([.E428]^2/Ao)" office:value-type="float" office:value="-84.1113051316731" calcext:value-type="float">
            <text:p>-84,1113051316731</text:p>
          </table:table-cell>
          <table:table-cell table:style-name="ce1" table:formula="of:=[.G427]+h" office:value-type="float" office:value="4.25999999999995" calcext:value-type="float">
            <text:p>4,25999999999995</text:p>
          </table:table-cell>
          <table:table-cell table:style-name="ce1" table:formula="of:=[.H427]+ h*[.F428]" office:value-type="float" office:value="154.616140550789" calcext:value-type="float">
            <text:p>154,6161405507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8]" office:value-type="float" office:value="4.25999999999995" calcext:value-type="float">
            <text:p>4,25999999999995</text:p>
          </table:table-cell>
          <table:table-cell table:style-name="ce1" table:formula="of:=[.H428]" office:value-type="float" office:value="154.616140550789" calcext:value-type="float">
            <text:p>154,616140550789</text:p>
          </table:table-cell>
          <table:table-cell table:style-name="ce1" table:formula="of:=-68 - ([.E429]^2/Ao)" office:value-type="float" office:value="-83.937433945881" calcext:value-type="float">
            <text:p>-83,937433945881</text:p>
          </table:table-cell>
          <table:table-cell table:style-name="ce1" table:formula="of:=[.G428]+h" office:value-type="float" office:value="4.26999999999995" calcext:value-type="float">
            <text:p>4,26999999999995</text:p>
          </table:table-cell>
          <table:table-cell table:style-name="ce1" table:formula="of:=[.H428]+ h*[.F429]" office:value-type="float" office:value="153.776766211331" calcext:value-type="float">
            <text:p>153,7767662113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9]" office:value-type="float" office:value="4.26999999999995" calcext:value-type="float">
            <text:p>4,26999999999995</text:p>
          </table:table-cell>
          <table:table-cell table:style-name="ce1" table:formula="of:=[.H429]" office:value-type="float" office:value="153.776766211331" calcext:value-type="float">
            <text:p>153,776766211331</text:p>
          </table:table-cell>
          <table:table-cell table:style-name="ce1" table:formula="of:=-68 - ([.E430]^2/Ao)" office:value-type="float" office:value="-83.7648625509428" calcext:value-type="float">
            <text:p>-83,7648625509428</text:p>
          </table:table-cell>
          <table:table-cell table:style-name="ce1" table:formula="of:=[.G429]+h" office:value-type="float" office:value="4.27999999999995" calcext:value-type="float">
            <text:p>4,27999999999995</text:p>
          </table:table-cell>
          <table:table-cell table:style-name="ce1" table:formula="of:=[.H429]+ h*[.F430]" office:value-type="float" office:value="152.939117585821" calcext:value-type="float">
            <text:p>152,9391175858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0]" office:value-type="float" office:value="4.27999999999995" calcext:value-type="float">
            <text:p>4,27999999999995</text:p>
          </table:table-cell>
          <table:table-cell table:style-name="ce1" table:formula="of:=[.H430]" office:value-type="float" office:value="152.939117585821" calcext:value-type="float">
            <text:p>152,939117585821</text:p>
          </table:table-cell>
          <table:table-cell table:style-name="ce1" table:formula="of:=-68 - ([.E431]^2/Ao)" office:value-type="float" office:value="-83.5935824586198" calcext:value-type="float">
            <text:p>-83,5935824586198</text:p>
          </table:table-cell>
          <table:table-cell table:style-name="ce1" table:formula="of:=[.G430]+h" office:value-type="float" office:value="4.28999999999995" calcext:value-type="float">
            <text:p>4,28999999999995</text:p>
          </table:table-cell>
          <table:table-cell table:style-name="ce1" table:formula="of:=[.H430]+ h*[.F431]" office:value-type="float" office:value="152.103181761235" calcext:value-type="float">
            <text:p>152,1031817612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1]" office:value-type="float" office:value="4.28999999999995" calcext:value-type="float">
            <text:p>4,28999999999995</text:p>
          </table:table-cell>
          <table:table-cell table:style-name="ce1" table:formula="of:=[.H431]" office:value-type="float" office:value="152.103181761235" calcext:value-type="float">
            <text:p>152,103181761235</text:p>
          </table:table-cell>
          <table:table-cell table:style-name="ce1" table:formula="of:=-68 - ([.E432]^2/Ao)" office:value-type="float" office:value="-83.4235852679276" calcext:value-type="float">
            <text:p>-83,4235852679276</text:p>
          </table:table-cell>
          <table:table-cell table:style-name="ce1" table:formula="of:=[.G431]+h" office:value-type="float" office:value="4.29999999999995" calcext:value-type="float">
            <text:p>4,29999999999995</text:p>
          </table:table-cell>
          <table:table-cell table:style-name="ce1" table:formula="of:=[.H431]+ h*[.F432]" office:value-type="float" office:value="151.268945908556" calcext:value-type="float">
            <text:p>151,2689459085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2]" office:value-type="float" office:value="4.29999999999995" calcext:value-type="float">
            <text:p>4,29999999999995</text:p>
          </table:table-cell>
          <table:table-cell table:style-name="ce1" table:formula="of:=[.H432]" office:value-type="float" office:value="151.268945908556" calcext:value-type="float">
            <text:p>151,268945908556</text:p>
          </table:table-cell>
          <table:table-cell table:style-name="ce1" table:formula="of:=-68 - ([.E433]^2/Ao)" office:value-type="float" office:value="-83.2548626641904" calcext:value-type="float">
            <text:p>-83,2548626641904</text:p>
          </table:table-cell>
          <table:table-cell table:style-name="ce1" table:formula="of:=[.G432]+h" office:value-type="float" office:value="4.30999999999995" calcext:value-type="float">
            <text:p>4,30999999999995</text:p>
          </table:table-cell>
          <table:table-cell table:style-name="ce1" table:formula="of:=[.H432]+ h*[.F433]" office:value-type="float" office:value="150.436397281914" calcext:value-type="float">
            <text:p>150,4363972819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3]" office:value-type="float" office:value="4.30999999999995" calcext:value-type="float">
            <text:p>4,30999999999995</text:p>
          </table:table-cell>
          <table:table-cell table:style-name="ce1" table:formula="of:=[.H433]" office:value-type="float" office:value="150.436397281914" calcext:value-type="float">
            <text:p>150,436397281914</text:p>
          </table:table-cell>
          <table:table-cell table:style-name="ce1" table:formula="of:=-68 - ([.E434]^2/Ao)" office:value-type="float" office:value="-83.0874064181079" calcext:value-type="float">
            <text:p>-83,0874064181079</text:p>
          </table:table-cell>
          <table:table-cell table:style-name="ce1" table:formula="of:=[.G433]+h" office:value-type="float" office:value="4.31999999999995" calcext:value-type="float">
            <text:p>4,31999999999995</text:p>
          </table:table-cell>
          <table:table-cell table:style-name="ce1" table:formula="of:=[.H433]+ h*[.F434]" office:value-type="float" office:value="149.605523217733" calcext:value-type="float">
            <text:p>149,6055232177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4]" office:value-type="float" office:value="4.31999999999995" calcext:value-type="float">
            <text:p>4,31999999999995</text:p>
          </table:table-cell>
          <table:table-cell table:style-name="ce1" table:formula="of:=[.H434]" office:value-type="float" office:value="149.605523217733" calcext:value-type="float">
            <text:p>149,605523217733</text:p>
          </table:table-cell>
          <table:table-cell table:style-name="ce1" table:formula="of:=-68 - ([.E435]^2/Ao)" office:value-type="float" office:value="-82.9212083848344" calcext:value-type="float">
            <text:p>-82,9212083848344</text:p>
          </table:table-cell>
          <table:table-cell table:style-name="ce1" table:formula="of:=[.G434]+h" office:value-type="float" office:value="4.32999999999995" calcext:value-type="float">
            <text:p>4,32999999999995</text:p>
          </table:table-cell>
          <table:table-cell table:style-name="ce1" table:formula="of:=[.H434]+ h*[.F435]" office:value-type="float" office:value="148.776311133884" calcext:value-type="float">
            <text:p>148,7763111338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5]" office:value-type="float" office:value="4.32999999999995" calcext:value-type="float">
            <text:p>4,32999999999995</text:p>
          </table:table-cell>
          <table:table-cell table:style-name="ce1" table:formula="of:=[.H435]" office:value-type="float" office:value="148.776311133884" calcext:value-type="float">
            <text:p>148,776311133884</text:p>
          </table:table-cell>
          <table:table-cell table:style-name="ce1" table:formula="of:=-68 - ([.E436]^2/Ao)" office:value-type="float" office:value="-82.7562605030709" calcext:value-type="float">
            <text:p>-82,7562605030709</text:p>
          </table:table-cell>
          <table:table-cell table:style-name="ce1" table:formula="of:=[.G435]+h" office:value-type="float" office:value="4.33999999999995" calcext:value-type="float">
            <text:p>4,33999999999995</text:p>
          </table:table-cell>
          <table:table-cell table:style-name="ce1" table:formula="of:=[.H435]+ h*[.F436]" office:value-type="float" office:value="147.948748528854" calcext:value-type="float">
            <text:p>147,9487485288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6]" office:value-type="float" office:value="4.33999999999995" calcext:value-type="float">
            <text:p>4,33999999999995</text:p>
          </table:table-cell>
          <table:table-cell table:style-name="ce1" table:formula="of:=[.H436]" office:value-type="float" office:value="147.948748528854" calcext:value-type="float">
            <text:p>147,948748528854</text:p>
          </table:table-cell>
          <table:table-cell table:style-name="ce1" table:formula="of:=-68 - ([.E437]^2/Ao)" office:value-type="float" office:value="-82.5925547941693" calcext:value-type="float">
            <text:p>-82,5925547941693</text:p>
          </table:table-cell>
          <table:table-cell table:style-name="ce1" table:formula="of:=[.G436]+h" office:value-type="float" office:value="4.34999999999995" calcext:value-type="float">
            <text:p>4,34999999999995</text:p>
          </table:table-cell>
          <table:table-cell table:style-name="ce1" table:formula="of:=[.H436]+ h*[.F437]" office:value-type="float" office:value="147.122822980912" calcext:value-type="float">
            <text:p>147,1228229809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7]" office:value-type="float" office:value="4.34999999999995" calcext:value-type="float">
            <text:p>4,34999999999995</text:p>
          </table:table-cell>
          <table:table-cell table:style-name="ce1" table:formula="of:=[.H437]" office:value-type="float" office:value="147.122822980912" calcext:value-type="float">
            <text:p>147,122822980912</text:p>
          </table:table-cell>
          <table:table-cell table:style-name="ce1" table:formula="of:=-68 - ([.E438]^2/Ao)" office:value-type="float" office:value="-82.4300833612485" calcext:value-type="float">
            <text:p>-82,4300833612485</text:p>
          </table:table-cell>
          <table:table-cell table:style-name="ce1" table:formula="of:=[.G437]+h" office:value-type="float" office:value="4.35999999999995" calcext:value-type="float">
            <text:p>4,35999999999995</text:p>
          </table:table-cell>
          <table:table-cell table:style-name="ce1" table:formula="of:=[.H437]+ h*[.F438]" office:value-type="float" office:value="146.2985221473" calcext:value-type="float">
            <text:p>146,29852214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8]" office:value-type="float" office:value="4.35999999999995" calcext:value-type="float">
            <text:p>4,35999999999995</text:p>
          </table:table-cell>
          <table:table-cell table:style-name="ce1" table:formula="of:=[.H438]" office:value-type="float" office:value="146.2985221473" calcext:value-type="float">
            <text:p>146,2985221473</text:p>
          </table:table-cell>
          <table:table-cell table:style-name="ce1" table:formula="of:=-68 - ([.E439]^2/Ao)" office:value-type="float" office:value="-82.2688383883226" calcext:value-type="float">
            <text:p>-82,2688383883226</text:p>
          </table:table-cell>
          <table:table-cell table:style-name="ce1" table:formula="of:=[.G438]+h" office:value-type="float" office:value="4.36999999999995" calcext:value-type="float">
            <text:p>4,36999999999995</text:p>
          </table:table-cell>
          <table:table-cell table:style-name="ce1" table:formula="of:=[.H438]+ h*[.F439]" office:value-type="float" office:value="145.475833763416" calcext:value-type="float">
            <text:p>145,4758337634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9]" office:value-type="float" office:value="4.36999999999995" calcext:value-type="float">
            <text:p>4,36999999999995</text:p>
          </table:table-cell>
          <table:table-cell table:style-name="ce1" table:formula="of:=[.H439]" office:value-type="float" office:value="145.475833763416" calcext:value-type="float">
            <text:p>145,475833763416</text:p>
          </table:table-cell>
          <table:table-cell table:style-name="ce1" table:formula="of:=-68 - ([.E440]^2/Ao)" office:value-type="float" office:value="-82.1088121394408" calcext:value-type="float">
            <text:p>-82,1088121394408</text:p>
          </table:table-cell>
          <table:table-cell table:style-name="ce1" table:formula="of:=[.G439]+h" office:value-type="float" office:value="4.37999999999995" calcext:value-type="float">
            <text:p>4,37999999999995</text:p>
          </table:table-cell>
          <table:table-cell table:style-name="ce1" table:formula="of:=[.H439]+ h*[.F440]" office:value-type="float" office:value="144.654745642022" calcext:value-type="float">
            <text:p>144,6547456420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0]" office:value-type="float" office:value="4.37999999999995" calcext:value-type="float">
            <text:p>4,37999999999995</text:p>
          </table:table-cell>
          <table:table-cell table:style-name="ce1" table:formula="of:=[.H440]" office:value-type="float" office:value="144.654745642022" calcext:value-type="float">
            <text:p>144,654745642022</text:p>
          </table:table-cell>
          <table:table-cell table:style-name="ce1" table:formula="of:=-68 - ([.E441]^2/Ao)" office:value-type="float" office:value="-81.9499969578387" calcext:value-type="float">
            <text:p>-81,9499969578387</text:p>
          </table:table-cell>
          <table:table-cell table:style-name="ce1" table:formula="of:=[.G440]+h" office:value-type="float" office:value="4.38999999999995" calcext:value-type="float">
            <text:p>4,38999999999995</text:p>
          </table:table-cell>
          <table:table-cell table:style-name="ce1" table:formula="of:=[.H440]+ h*[.F441]" office:value-type="float" office:value="143.835245672444" calcext:value-type="float">
            <text:p>143,8352456724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1]" office:value-type="float" office:value="4.38999999999995" calcext:value-type="float">
            <text:p>4,38999999999995</text:p>
          </table:table-cell>
          <table:table-cell table:style-name="ce1" table:formula="of:=[.H441]" office:value-type="float" office:value="143.835245672444" calcext:value-type="float">
            <text:p>143,835245672444</text:p>
          </table:table-cell>
          <table:table-cell table:style-name="ce1" table:formula="of:=-68 - ([.E442]^2/Ao)" office:value-type="float" office:value="-81.7923852651015" calcext:value-type="float">
            <text:p>-81,7923852651015</text:p>
          </table:table-cell>
          <table:table-cell table:style-name="ce1" table:formula="of:=[.G441]+h" office:value-type="float" office:value="4.39999999999995" calcext:value-type="float">
            <text:p>4,39999999999995</text:p>
          </table:table-cell>
          <table:table-cell table:style-name="ce1" table:formula="of:=[.H441]+ h*[.F442]" office:value-type="float" office:value="143.017321819793" calcext:value-type="float">
            <text:p>143,0173218197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2]" office:value-type="float" office:value="4.39999999999995" calcext:value-type="float">
            <text:p>4,39999999999995</text:p>
          </table:table-cell>
          <table:table-cell table:style-name="ce1" table:formula="of:=[.H442]" office:value-type="float" office:value="143.017321819793" calcext:value-type="float">
            <text:p>143,017321819793</text:p>
          </table:table-cell>
          <table:table-cell table:style-name="ce1" table:formula="of:=-68 - ([.E443]^2/Ao)" office:value-type="float" office:value="-81.6359695603374" calcext:value-type="float">
            <text:p>-81,6359695603374</text:p>
          </table:table-cell>
          <table:table-cell table:style-name="ce1" table:formula="of:=[.G442]+h" office:value-type="float" office:value="4.40999999999995" calcext:value-type="float">
            <text:p>4,40999999999995</text:p>
          </table:table-cell>
          <table:table-cell table:style-name="ce1" table:formula="of:=[.H442]+ h*[.F443]" office:value-type="float" office:value="142.200962124189" calcext:value-type="float">
            <text:p>142,2009621241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3]" office:value-type="float" office:value="4.40999999999995" calcext:value-type="float">
            <text:p>4,40999999999995</text:p>
          </table:table-cell>
          <table:table-cell table:style-name="ce1" table:formula="of:=[.H443]" office:value-type="float" office:value="142.200962124189" calcext:value-type="float">
            <text:p>142,200962124189</text:p>
          </table:table-cell>
          <table:table-cell table:style-name="ce1" table:formula="of:=-68 - ([.E444]^2/Ao)" office:value-type="float" office:value="-81.4807424193634" calcext:value-type="float">
            <text:p>-81,4807424193634</text:p>
          </table:table-cell>
          <table:table-cell table:style-name="ce1" table:formula="of:=[.G443]+h" office:value-type="float" office:value="4.41999999999995" calcext:value-type="float">
            <text:p>4,41999999999995</text:p>
          </table:table-cell>
          <table:table-cell table:style-name="ce1" table:formula="of:=[.H443]+ h*[.F444]" office:value-type="float" office:value="141.386154699996" calcext:value-type="float">
            <text:p>141,3861546999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4]" office:value-type="float" office:value="4.41999999999995" calcext:value-type="float">
            <text:p>4,41999999999995</text:p>
          </table:table-cell>
          <table:table-cell table:style-name="ce1" table:formula="of:=[.H444]" office:value-type="float" office:value="141.386154699996" calcext:value-type="float">
            <text:p>141,386154699996</text:p>
          </table:table-cell>
          <table:table-cell table:style-name="ce1" table:formula="of:=-68 - ([.E445]^2/Ao)" office:value-type="float" office:value="-81.3266964939007" calcext:value-type="float">
            <text:p>-81,3266964939007</text:p>
          </table:table-cell>
          <table:table-cell table:style-name="ce1" table:formula="of:=[.G444]+h" office:value-type="float" office:value="4.42999999999995" calcext:value-type="float">
            <text:p>4,42999999999995</text:p>
          </table:table-cell>
          <table:table-cell table:style-name="ce1" table:formula="of:=[.H444]+ h*[.F445]" office:value-type="float" office:value="140.572887735057" calcext:value-type="float">
            <text:p>140,5728877350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5]" office:value-type="float" office:value="4.42999999999995" calcext:value-type="float">
            <text:p>4,42999999999995</text:p>
          </table:table-cell>
          <table:table-cell table:style-name="ce1" table:formula="of:=[.H445]" office:value-type="float" office:value="140.572887735057" calcext:value-type="float">
            <text:p>140,572887735057</text:p>
          </table:table-cell>
          <table:table-cell table:style-name="ce1" table:formula="of:=-68 - ([.E446]^2/Ao)" office:value-type="float" office:value="-81.1738245107819" calcext:value-type="float">
            <text:p>-81,1738245107819</text:p>
          </table:table-cell>
          <table:table-cell table:style-name="ce1" table:formula="of:=[.G445]+h" office:value-type="float" office:value="4.43999999999995" calcext:value-type="float">
            <text:p>4,43999999999995</text:p>
          </table:table-cell>
          <table:table-cell table:style-name="ce1" table:formula="of:=[.H445]+ h*[.F446]" office:value-type="float" office:value="139.761149489949" calcext:value-type="float">
            <text:p>139,7611494899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6]" office:value-type="float" office:value="4.43999999999995" calcext:value-type="float">
            <text:p>4,43999999999995</text:p>
          </table:table-cell>
          <table:table-cell table:style-name="ce1" table:formula="of:=[.H446]" office:value-type="float" office:value="139.761149489949" calcext:value-type="float">
            <text:p>139,761149489949</text:p>
          </table:table-cell>
          <table:table-cell table:style-name="ce1" table:formula="of:=-68 - ([.E447]^2/Ao)" office:value-type="float" office:value="-81.0221192711679" calcext:value-type="float">
            <text:p>-81,0221192711679</text:p>
          </table:table-cell>
          <table:table-cell table:style-name="ce1" table:formula="of:=[.G446]+h" office:value-type="float" office:value="4.44999999999995" calcext:value-type="float">
            <text:p>4,44999999999995</text:p>
          </table:table-cell>
          <table:table-cell table:style-name="ce1" table:formula="of:=[.H446]+ h*[.F447]" office:value-type="float" office:value="138.950928297237" calcext:value-type="float">
            <text:p>138,9509282972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7]" office:value-type="float" office:value="4.44999999999995" calcext:value-type="float">
            <text:p>4,44999999999995</text:p>
          </table:table-cell>
          <table:table-cell table:style-name="ce1" table:formula="of:=[.H447]" office:value-type="float" office:value="138.950928297237" calcext:value-type="float">
            <text:p>138,950928297237</text:p>
          </table:table-cell>
          <table:table-cell table:style-name="ce1" table:formula="of:=-68 - ([.E448]^2/Ao)" office:value-type="float" office:value="-80.8715736497759" calcext:value-type="float">
            <text:p>-80,8715736497759</text:p>
          </table:table-cell>
          <table:table-cell table:style-name="ce1" table:formula="of:=[.G447]+h" office:value-type="float" office:value="4.45999999999995" calcext:value-type="float">
            <text:p>4,45999999999995</text:p>
          </table:table-cell>
          <table:table-cell table:style-name="ce1" table:formula="of:=[.H447]+ h*[.F448]" office:value-type="float" office:value="138.142212560739" calcext:value-type="float">
            <text:p>138,1422125607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8]" office:value-type="float" office:value="4.45999999999995" calcext:value-type="float">
            <text:p>4,45999999999995</text:p>
          </table:table-cell>
          <table:table-cell table:style-name="ce1" table:formula="of:=[.H448]" office:value-type="float" office:value="138.142212560739" calcext:value-type="float">
            <text:p>138,142212560739</text:p>
          </table:table-cell>
          <table:table-cell table:style-name="ce1" table:formula="of:=-68 - ([.E449]^2/Ao)" office:value-type="float" office:value="-80.7221805941177" calcext:value-type="float">
            <text:p>-80,7221805941177</text:p>
          </table:table-cell>
          <table:table-cell table:style-name="ce1" table:formula="of:=[.G448]+h" office:value-type="float" office:value="4.46999999999995" calcext:value-type="float">
            <text:p>4,46999999999995</text:p>
          </table:table-cell>
          <table:table-cell table:style-name="ce1" table:formula="of:=[.H448]+ h*[.F449]" office:value-type="float" office:value="137.334990754798" calcext:value-type="float">
            <text:p>137,3349907547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9]" office:value-type="float" office:value="4.46999999999995" calcext:value-type="float">
            <text:p>4,46999999999995</text:p>
          </table:table-cell>
          <table:table-cell table:style-name="ce1" table:formula="of:=[.H449]" office:value-type="float" office:value="137.334990754798" calcext:value-type="float">
            <text:p>137,334990754798</text:p>
          </table:table-cell>
          <table:table-cell table:style-name="ce1" table:formula="of:=-68 - ([.E450]^2/Ao)" office:value-type="float" office:value="-80.573933123747" calcext:value-type="float">
            <text:p>-80,573933123747</text:p>
          </table:table-cell>
          <table:table-cell table:style-name="ce1" table:formula="of:=[.G449]+h" office:value-type="float" office:value="4.47999999999995" calcext:value-type="float">
            <text:p>4,47999999999995</text:p>
          </table:table-cell>
          <table:table-cell table:style-name="ce1" table:formula="of:=[.H449]+ h*[.F450]" office:value-type="float" office:value="136.529251423561" calcext:value-type="float">
            <text:p>136,5292514235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0]" office:value-type="float" office:value="4.47999999999995" calcext:value-type="float">
            <text:p>4,47999999999995</text:p>
          </table:table-cell>
          <table:table-cell table:style-name="ce1" table:formula="of:=[.H450]" office:value-type="float" office:value="136.529251423561" calcext:value-type="float">
            <text:p>136,529251423561</text:p>
          </table:table-cell>
          <table:table-cell table:style-name="ce1" table:formula="of:=-68 - ([.E451]^2/Ao)" office:value-type="float" office:value="-80.4268243295186" calcext:value-type="float">
            <text:p>-80,4268243295186</text:p>
          </table:table-cell>
          <table:table-cell table:style-name="ce1" table:formula="of:=[.G450]+h" office:value-type="float" office:value="4.48999999999995" calcext:value-type="float">
            <text:p>4,48999999999995</text:p>
          </table:table-cell>
          <table:table-cell table:style-name="ce1" table:formula="of:=[.H450]+ h*[.F451]" office:value-type="float" office:value="135.724983180265" calcext:value-type="float">
            <text:p>135,7249831802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1]" office:value-type="float" office:value="4.48999999999995" calcext:value-type="float">
            <text:p>4,48999999999995</text:p>
          </table:table-cell>
          <table:table-cell table:style-name="ce1" table:formula="of:=[.H451]" office:value-type="float" office:value="135.724983180265" calcext:value-type="float">
            <text:p>135,724983180265</text:p>
          </table:table-cell>
          <table:table-cell table:style-name="ce1" table:formula="of:=-68 - ([.E452]^2/Ao)" office:value-type="float" office:value="-80.2808473728556" calcext:value-type="float">
            <text:p>-80,2808473728556</text:p>
          </table:table-cell>
          <table:table-cell table:style-name="ce1" table:formula="of:=[.G451]+h" office:value-type="float" office:value="4.49999999999995" calcext:value-type="float">
            <text:p>4,49999999999995</text:p>
          </table:table-cell>
          <table:table-cell table:style-name="ce1" table:formula="of:=[.H451]+ h*[.F452]" office:value-type="float" office:value="134.922174706537" calcext:value-type="float">
            <text:p>134,9221747065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2]" office:value-type="float" office:value="4.49999999999995" calcext:value-type="float">
            <text:p>4,49999999999995</text:p>
          </table:table-cell>
          <table:table-cell table:style-name="ce1" table:formula="of:=[.H452]" office:value-type="float" office:value="134.922174706537" calcext:value-type="float">
            <text:p>134,922174706537</text:p>
          </table:table-cell>
          <table:table-cell table:style-name="ce1" table:formula="of:=-68 - ([.E453]^2/Ao)" office:value-type="float" office:value="-80.1359954850275" calcext:value-type="float">
            <text:p>-80,1359954850275</text:p>
          </table:table-cell>
          <table:table-cell table:style-name="ce1" table:formula="of:=[.G452]+h" office:value-type="float" office:value="4.50999999999995" calcext:value-type="float">
            <text:p>4,50999999999995</text:p>
          </table:table-cell>
          <table:table-cell table:style-name="ce1" table:formula="of:=[.H452]+ h*[.F453]" office:value-type="float" office:value="134.120814751687" calcext:value-type="float">
            <text:p>134,1208147516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3]" office:value-type="float" office:value="4.50999999999995" calcext:value-type="float">
            <text:p>4,50999999999995</text:p>
          </table:table-cell>
          <table:table-cell table:style-name="ce1" table:formula="of:=[.H453]" office:value-type="float" office:value="134.120814751687" calcext:value-type="float">
            <text:p>134,120814751687</text:p>
          </table:table-cell>
          <table:table-cell table:style-name="ce1" table:formula="of:=-68 - ([.E454]^2/Ao)" office:value-type="float" office:value="-79.9922619664375" calcext:value-type="float">
            <text:p>-79,9922619664375</text:p>
          </table:table-cell>
          <table:table-cell table:style-name="ce1" table:formula="of:=[.G453]+h" office:value-type="float" office:value="4.51999999999995" calcext:value-type="float">
            <text:p>4,51999999999995</text:p>
          </table:table-cell>
          <table:table-cell table:style-name="ce1" table:formula="of:=[.H453]+ h*[.F454]" office:value-type="float" office:value="133.320892132022" calcext:value-type="float">
            <text:p>133,3208921320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4]" office:value-type="float" office:value="4.51999999999995" calcext:value-type="float">
            <text:p>4,51999999999995</text:p>
          </table:table-cell>
          <table:table-cell table:style-name="ce1" table:formula="of:=[.H454]" office:value-type="float" office:value="133.320892132022" calcext:value-type="float">
            <text:p>133,320892132022</text:p>
          </table:table-cell>
          <table:table-cell table:style-name="ce1" table:formula="of:=-68 - ([.E455]^2/Ao)" office:value-type="float" office:value="-79.8496401859189" calcext:value-type="float">
            <text:p>-79,8496401859189</text:p>
          </table:table-cell>
          <table:table-cell table:style-name="ce1" table:formula="of:=[.G454]+h" office:value-type="float" office:value="4.52999999999995" calcext:value-type="float">
            <text:p>4,52999999999995</text:p>
          </table:table-cell>
          <table:table-cell table:style-name="ce1" table:formula="of:=[.H454]+ h*[.F455]" office:value-type="float" office:value="132.522395730163" calcext:value-type="float">
            <text:p>132,5223957301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5]" office:value-type="float" office:value="4.52999999999995" calcext:value-type="float">
            <text:p>4,52999999999995</text:p>
          </table:table-cell>
          <table:table-cell table:style-name="ce1" table:formula="of:=[.H455]" office:value-type="float" office:value="132.522395730163" calcext:value-type="float">
            <text:p>132,522395730163</text:p>
          </table:table-cell>
          <table:table-cell table:style-name="ce1" table:formula="of:=-68 - ([.E456]^2/Ao)" office:value-type="float" office:value="-79.7081235800413" calcext:value-type="float">
            <text:p>-79,7081235800413</text:p>
          </table:table-cell>
          <table:table-cell table:style-name="ce1" table:formula="of:=[.G455]+h" office:value-type="float" office:value="4.53999999999995" calcext:value-type="float">
            <text:p>4,53999999999995</text:p>
          </table:table-cell>
          <table:table-cell table:style-name="ce1" table:formula="of:=[.H455]+ h*[.F456]" office:value-type="float" office:value="131.725314494363" calcext:value-type="float">
            <text:p>131,7253144943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6]" office:value-type="float" office:value="4.53999999999995" calcext:value-type="float">
            <text:p>4,53999999999995</text:p>
          </table:table-cell>
          <table:table-cell table:style-name="ce1" table:formula="of:=[.H456]" office:value-type="float" office:value="131.725314494363" calcext:value-type="float">
            <text:p>131,725314494363</text:p>
          </table:table-cell>
          <table:table-cell table:style-name="ce1" table:formula="of:=-68 - ([.E457]^2/Ao)" office:value-type="float" office:value="-79.5677056524258" calcext:value-type="float">
            <text:p>-79,5677056524258</text:p>
          </table:table-cell>
          <table:table-cell table:style-name="ce1" table:formula="of:=[.G456]+h" office:value-type="float" office:value="4.54999999999995" calcext:value-type="float">
            <text:p>4,54999999999995</text:p>
          </table:table-cell>
          <table:table-cell table:style-name="ce1" table:formula="of:=[.H456]+ h*[.F457]" office:value-type="float" office:value="130.929637437838" calcext:value-type="float">
            <text:p>130,9296374378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7]" office:value-type="float" office:value="4.54999999999995" calcext:value-type="float">
            <text:p>4,54999999999995</text:p>
          </table:table-cell>
          <table:table-cell table:style-name="ce1" table:formula="of:=[.H457]" office:value-type="float" office:value="130.929637437838" calcext:value-type="float">
            <text:p>130,929637437838</text:p>
          </table:table-cell>
          <table:table-cell table:style-name="ce1" table:formula="of:=-68 - ([.E458]^2/Ao)" office:value-type="float" office:value="-79.4283799730692" calcext:value-type="float">
            <text:p>-79,4283799730692</text:p>
          </table:table-cell>
          <table:table-cell table:style-name="ce1" table:formula="of:=[.G457]+h" office:value-type="float" office:value="4.55999999999995" calcext:value-type="float">
            <text:p>4,55999999999995</text:p>
          </table:table-cell>
          <table:table-cell table:style-name="ce1" table:formula="of:=[.H457]+ h*[.F458]" office:value-type="float" office:value="130.135353638108" calcext:value-type="float">
            <text:p>130,1353536381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8]" office:value-type="float" office:value="4.55999999999995" calcext:value-type="float">
            <text:p>4,55999999999995</text:p>
          </table:table-cell>
          <table:table-cell table:style-name="ce1" table:formula="of:=[.H458]" office:value-type="float" office:value="130.135353638108" calcext:value-type="float">
            <text:p>130,135353638108</text:p>
          </table:table-cell>
          <table:table-cell table:style-name="ce1" table:formula="of:=-68 - ([.E459]^2/Ao)" office:value-type="float" office:value="-79.2901401776769" calcext:value-type="float">
            <text:p>-79,2901401776769</text:p>
          </table:table-cell>
          <table:table-cell table:style-name="ce1" table:formula="of:=[.G458]+h" office:value-type="float" office:value="4.56999999999995" calcext:value-type="float">
            <text:p>4,56999999999995</text:p>
          </table:table-cell>
          <table:table-cell table:style-name="ce1" table:formula="of:=[.H458]+ h*[.F459]" office:value-type="float" office:value="129.342452236331" calcext:value-type="float">
            <text:p>129,3424522363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9]" office:value-type="float" office:value="4.56999999999995" calcext:value-type="float">
            <text:p>4,56999999999995</text:p>
          </table:table-cell>
          <table:table-cell table:style-name="ce1" table:formula="of:=[.H459]" office:value-type="float" office:value="129.342452236331" calcext:value-type="float">
            <text:p>129,342452236331</text:p>
          </table:table-cell>
          <table:table-cell table:style-name="ce1" table:formula="of:=-68 - ([.E460]^2/Ao)" office:value-type="float" office:value="-79.152979967005" calcext:value-type="float">
            <text:p>-79,152979967005</text:p>
          </table:table-cell>
          <table:table-cell table:style-name="ce1" table:formula="of:=[.G459]+h" office:value-type="float" office:value="4.57999999999995" calcext:value-type="float">
            <text:p>4,57999999999995</text:p>
          </table:table-cell>
          <table:table-cell table:style-name="ce1" table:formula="of:=[.H459]+ h*[.F460]" office:value-type="float" office:value="128.550922436661" calcext:value-type="float">
            <text:p>128,5509224366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0]" office:value-type="float" office:value="4.57999999999995" calcext:value-type="float">
            <text:p>4,57999999999995</text:p>
          </table:table-cell>
          <table:table-cell table:style-name="ce1" table:formula="of:=[.H460]" office:value-type="float" office:value="128.550922436661" calcext:value-type="float">
            <text:p>128,550922436661</text:p>
          </table:table-cell>
          <table:table-cell table:style-name="ce1" table:formula="of:=-68 - ([.E461]^2/Ao)" office:value-type="float" office:value="-79.0168931062109" calcext:value-type="float">
            <text:p>-79,0168931062109</text:p>
          </table:table-cell>
          <table:table-cell table:style-name="ce1" table:formula="of:=[.G460]+h" office:value-type="float" office:value="4.58999999999995" calcext:value-type="float">
            <text:p>4,58999999999995</text:p>
          </table:table-cell>
          <table:table-cell table:style-name="ce1" table:formula="of:=[.H460]+ h*[.F461]" office:value-type="float" office:value="127.760753505599" calcext:value-type="float">
            <text:p>127,7607535055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1]" office:value-type="float" office:value="4.58999999999995" calcext:value-type="float">
            <text:p>4,58999999999995</text:p>
          </table:table-cell>
          <table:table-cell table:style-name="ce1" table:formula="of:=[.H461]" office:value-type="float" office:value="127.760753505599" calcext:value-type="float">
            <text:p>127,760753505599</text:p>
          </table:table-cell>
          <table:table-cell table:style-name="ce1" table:formula="of:=-68 - ([.E462]^2/Ao)" office:value-type="float" office:value="-78.8818734242122" calcext:value-type="float">
            <text:p>-78,8818734242122</text:p>
          </table:table-cell>
          <table:table-cell table:style-name="ce1" table:formula="of:=[.G461]+h" office:value-type="float" office:value="4.59999999999995" calcext:value-type="float">
            <text:p>4,59999999999995</text:p>
          </table:table-cell>
          <table:table-cell table:style-name="ce1" table:formula="of:=[.H461]+ h*[.F462]" office:value-type="float" office:value="126.971934771357" calcext:value-type="float">
            <text:p>126,9719347713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2]" office:value-type="float" office:value="4.59999999999995" calcext:value-type="float">
            <text:p>4,59999999999995</text:p>
          </table:table-cell>
          <table:table-cell table:style-name="ce1" table:formula="of:=[.H462]" office:value-type="float" office:value="126.971934771357" calcext:value-type="float">
            <text:p>126,971934771357</text:p>
          </table:table-cell>
          <table:table-cell table:style-name="ce1" table:formula="of:=-68 - ([.E463]^2/Ao)" office:value-type="float" office:value="-78.7479148130544" calcext:value-type="float">
            <text:p>-78,7479148130544</text:p>
          </table:table-cell>
          <table:table-cell table:style-name="ce1" table:formula="of:=[.G462]+h" office:value-type="float" office:value="4.60999999999995" calcext:value-type="float">
            <text:p>4,60999999999995</text:p>
          </table:table-cell>
          <table:table-cell table:style-name="ce1" table:formula="of:=[.H462]+ h*[.F463]" office:value-type="float" office:value="126.184455623226" calcext:value-type="float">
            <text:p>126,1844556232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3]" office:value-type="float" office:value="4.60999999999995" calcext:value-type="float">
            <text:p>4,60999999999995</text:p>
          </table:table-cell>
          <table:table-cell table:style-name="ce1" table:formula="of:=[.H463]" office:value-type="float" office:value="126.184455623226" calcext:value-type="float">
            <text:p>126,184455623226</text:p>
          </table:table-cell>
          <table:table-cell table:style-name="ce1" table:formula="of:=-68 - ([.E464]^2/Ao)" office:value-type="float" office:value="-78.6150112272866" calcext:value-type="float">
            <text:p>-78,6150112272866</text:p>
          </table:table-cell>
          <table:table-cell table:style-name="ce1" table:formula="of:=[.G463]+h" office:value-type="float" office:value="4.61999999999995" calcext:value-type="float">
            <text:p>4,61999999999995</text:p>
          </table:table-cell>
          <table:table-cell table:style-name="ce1" table:formula="of:=[.H463]+ h*[.F464]" office:value-type="float" office:value="125.398305510953" calcext:value-type="float">
            <text:p>125,398305510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4]" office:value-type="float" office:value="4.61999999999995" calcext:value-type="float">
            <text:p>4,61999999999995</text:p>
          </table:table-cell>
          <table:table-cell table:style-name="ce1" table:formula="of:=[.H464]" office:value-type="float" office:value="125.398305510953" calcext:value-type="float">
            <text:p>125,398305510953</text:p>
          </table:table-cell>
          <table:table-cell table:style-name="ce1" table:formula="of:=-68 - ([.E465]^2/Ao)" office:value-type="float" office:value="-78.4831566833456" calcext:value-type="float">
            <text:p>-78,4831566833456</text:p>
          </table:table-cell>
          <table:table-cell table:style-name="ce1" table:formula="of:=[.G464]+h" office:value-type="float" office:value="4.62999999999995" calcext:value-type="float">
            <text:p>4,62999999999995</text:p>
          </table:table-cell>
          <table:table-cell table:style-name="ce1" table:formula="of:=[.H464]+ h*[.F465]" office:value-type="float" office:value="124.61347394412" calcext:value-type="float">
            <text:p>124,613473944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5]" office:value-type="float" office:value="4.62999999999995" calcext:value-type="float">
            <text:p>4,62999999999995</text:p>
          </table:table-cell>
          <table:table-cell table:style-name="ce1" table:formula="of:=[.H465]" office:value-type="float" office:value="124.61347394412" calcext:value-type="float">
            <text:p>124,61347394412</text:p>
          </table:table-cell>
          <table:table-cell table:style-name="ce1" table:formula="of:=-68 - ([.E466]^2/Ao)" office:value-type="float" office:value="-78.3523452589479" calcext:value-type="float">
            <text:p>-78,3523452589479</text:p>
          </table:table-cell>
          <table:table-cell table:style-name="ce1" table:formula="of:=[.G465]+h" office:value-type="float" office:value="4.63999999999995" calcext:value-type="float">
            <text:p>4,63999999999995</text:p>
          </table:table-cell>
          <table:table-cell table:style-name="ce1" table:formula="of:=[.H465]+ h*[.F466]" office:value-type="float" office:value="123.82995049153" calcext:value-type="float">
            <text:p>123,829950491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6]" office:value-type="float" office:value="4.63999999999995" calcext:value-type="float">
            <text:p>4,63999999999995</text:p>
          </table:table-cell>
          <table:table-cell table:style-name="ce1" table:formula="of:=[.H466]" office:value-type="float" office:value="123.82995049153" calcext:value-type="float">
            <text:p>123,82995049153</text:p>
          </table:table-cell>
          <table:table-cell table:style-name="ce1" table:formula="of:=-68 - ([.E467]^2/Ao)" office:value-type="float" office:value="-78.2225710924899" calcext:value-type="float">
            <text:p>-78,2225710924899</text:p>
          </table:table-cell>
          <table:table-cell table:style-name="ce1" table:formula="of:=[.G466]+h" office:value-type="float" office:value="4.64999999999995" calcext:value-type="float">
            <text:p>4,64999999999995</text:p>
          </table:table-cell>
          <table:table-cell table:style-name="ce1" table:formula="of:=[.H466]+ h*[.F467]" office:value-type="float" office:value="123.047724780605" calcext:value-type="float">
            <text:p>123,0477247806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7]" office:value-type="float" office:value="4.64999999999995" calcext:value-type="float">
            <text:p>4,64999999999995</text:p>
          </table:table-cell>
          <table:table-cell table:style-name="ce1" table:formula="of:=[.H467]" office:value-type="float" office:value="123.047724780605" calcext:value-type="float">
            <text:p>123,047724780605</text:p>
          </table:table-cell>
          <table:table-cell table:style-name="ce1" table:formula="of:=-68 - ([.E468]^2/Ao)" office:value-type="float" office:value="-78.0938283824557" calcext:value-type="float">
            <text:p>-78,0938283824557</text:p>
          </table:table-cell>
          <table:table-cell table:style-name="ce1" table:formula="of:=[.G467]+h" office:value-type="float" office:value="4.65999999999995" calcext:value-type="float">
            <text:p>4,65999999999995</text:p>
          </table:table-cell>
          <table:table-cell table:style-name="ce1" table:formula="of:=[.H467]+ h*[.F468]" office:value-type="float" office:value="122.266786496781" calcext:value-type="float">
            <text:p>122,2667864967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8]" office:value-type="float" office:value="4.65999999999995" calcext:value-type="float">
            <text:p>4,65999999999995</text:p>
          </table:table-cell>
          <table:table-cell table:style-name="ce1" table:formula="of:=[.H468]" office:value-type="float" office:value="122.266786496781" calcext:value-type="float">
            <text:p>122,266786496781</text:p>
          </table:table-cell>
          <table:table-cell table:style-name="ce1" table:formula="of:=-68 - ([.E469]^2/Ao)" office:value-type="float" office:value="-77.9661113868329" calcext:value-type="float">
            <text:p>-77,9661113868329</text:p>
          </table:table-cell>
          <table:table-cell table:style-name="ce1" table:formula="of:=[.G468]+h" office:value-type="float" office:value="4.66999999999995" calcext:value-type="float">
            <text:p>4,66999999999995</text:p>
          </table:table-cell>
          <table:table-cell table:style-name="ce1" table:formula="of:=[.H468]+ h*[.F469]" office:value-type="float" office:value="121.487125382912" calcext:value-type="float">
            <text:p>121,4871253829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9]" office:value-type="float" office:value="4.66999999999995" calcext:value-type="float">
            <text:p>4,66999999999995</text:p>
          </table:table-cell>
          <table:table-cell table:style-name="ce1" table:formula="of:=[.H469]" office:value-type="float" office:value="121.487125382912" calcext:value-type="float">
            <text:p>121,487125382912</text:p>
          </table:table-cell>
          <table:table-cell table:style-name="ce1" table:formula="of:=-68 - ([.E470]^2/Ao)" office:value-type="float" office:value="-77.8394144225357" calcext:value-type="float">
            <text:p>-77,8394144225357</text:p>
          </table:table-cell>
          <table:table-cell table:style-name="ce1" table:formula="of:=[.G469]+h" office:value-type="float" office:value="4.67999999999995" calcext:value-type="float">
            <text:p>4,67999999999995</text:p>
          </table:table-cell>
          <table:table-cell table:style-name="ce1" table:formula="of:=[.H469]+ h*[.F470]" office:value-type="float" office:value="120.708731238687" calcext:value-type="float">
            <text:p>120,7087312386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0]" office:value-type="float" office:value="4.67999999999995" calcext:value-type="float">
            <text:p>4,67999999999995</text:p>
          </table:table-cell>
          <table:table-cell table:style-name="ce1" table:formula="of:=[.H470]" office:value-type="float" office:value="120.708731238687" calcext:value-type="float">
            <text:p>120,708731238687</text:p>
          </table:table-cell>
          <table:table-cell table:style-name="ce1" table:formula="of:=-68 - ([.E471]^2/Ao)" office:value-type="float" office:value="-77.7137318648357" calcext:value-type="float">
            <text:p>-77,7137318648357</text:p>
          </table:table-cell>
          <table:table-cell table:style-name="ce1" table:formula="of:=[.G470]+h" office:value-type="float" office:value="4.68999999999994" calcext:value-type="float">
            <text:p>4,68999999999994</text:p>
          </table:table-cell>
          <table:table-cell table:style-name="ce1" table:formula="of:=[.H470]+ h*[.F471]" office:value-type="float" office:value="119.931593920039" calcext:value-type="float">
            <text:p>119,9315939200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1]" office:value-type="float" office:value="4.68999999999994" calcext:value-type="float">
            <text:p>4,68999999999994</text:p>
          </table:table-cell>
          <table:table-cell table:style-name="ce1" table:formula="of:=[.H471]" office:value-type="float" office:value="119.931593920039" calcext:value-type="float">
            <text:p>119,931593920039</text:p>
          </table:table-cell>
          <table:table-cell table:style-name="ce1" table:formula="of:=-68 - ([.E472]^2/Ao)" office:value-type="float" office:value="-77.5890581468007" calcext:value-type="float">
            <text:p>-77,5890581468007</text:p>
          </table:table-cell>
          <table:table-cell table:style-name="ce1" table:formula="of:=[.G471]+h" office:value-type="float" office:value="4.69999999999994" calcext:value-type="float">
            <text:p>4,69999999999994</text:p>
          </table:table-cell>
          <table:table-cell table:style-name="ce1" table:formula="of:=[.H471]+ h*[.F472]" office:value-type="float" office:value="119.155703338571" calcext:value-type="float">
            <text:p>119,1557033385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2]" office:value-type="float" office:value="4.69999999999994" calcext:value-type="float">
            <text:p>4,69999999999994</text:p>
          </table:table-cell>
          <table:table-cell table:style-name="ce1" table:formula="of:=[.H472]" office:value-type="float" office:value="119.155703338571" calcext:value-type="float">
            <text:p>119,155703338571</text:p>
          </table:table-cell>
          <table:table-cell table:style-name="ce1" table:formula="of:=-68 - ([.E473]^2/Ao)" office:value-type="float" office:value="-77.4653877587397" calcext:value-type="float">
            <text:p>-77,4653877587397</text:p>
          </table:table-cell>
          <table:table-cell table:style-name="ce1" table:formula="of:=[.G472]+h" office:value-type="float" office:value="4.70999999999994" calcext:value-type="float">
            <text:p>4,70999999999994</text:p>
          </table:table-cell>
          <table:table-cell table:style-name="ce1" table:formula="of:=[.H472]+ h*[.F473]" office:value-type="float" office:value="118.381049460983" calcext:value-type="float">
            <text:p>118,3810494609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3]" office:value-type="float" office:value="4.70999999999994" calcext:value-type="float">
            <text:p>4,70999999999994</text:p>
          </table:table-cell>
          <table:table-cell table:style-name="ce1" table:formula="of:=[.H473]" office:value-type="float" office:value="118.381049460983" calcext:value-type="float">
            <text:p>118,381049460983</text:p>
          </table:table-cell>
          <table:table-cell table:style-name="ce1" table:formula="of:=-68 - ([.E474]^2/Ao)" office:value-type="float" office:value="-77.3427152476559" calcext:value-type="float">
            <text:p>-77,3427152476559</text:p>
          </table:table-cell>
          <table:table-cell table:style-name="ce1" table:formula="of:=[.G473]+h" office:value-type="float" office:value="4.71999999999994" calcext:value-type="float">
            <text:p>4,71999999999994</text:p>
          </table:table-cell>
          <table:table-cell table:style-name="ce1" table:formula="of:=[.H473]+ h*[.F474]" office:value-type="float" office:value="117.607622308507" calcext:value-type="float">
            <text:p>117,6076223085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4]" office:value-type="float" office:value="4.71999999999994" calcext:value-type="float">
            <text:p>4,71999999999994</text:p>
          </table:table-cell>
          <table:table-cell table:style-name="ce1" table:formula="of:=[.H474]" office:value-type="float" office:value="117.607622308507" calcext:value-type="float">
            <text:p>117,607622308507</text:p>
          </table:table-cell>
          <table:table-cell table:style-name="ce1" table:formula="of:=-68 - ([.E475]^2/Ao)" office:value-type="float" office:value="-77.2210352167069" calcext:value-type="float">
            <text:p>-77,2210352167069</text:p>
          </table:table-cell>
          <table:table-cell table:style-name="ce1" table:formula="of:=[.G474]+h" office:value-type="float" office:value="4.72999999999994" calcext:value-type="float">
            <text:p>4,72999999999994</text:p>
          </table:table-cell>
          <table:table-cell table:style-name="ce1" table:formula="of:=[.H474]+ h*[.F475]" office:value-type="float" office:value="116.83541195634" calcext:value-type="float">
            <text:p>116,835411956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5]" office:value-type="float" office:value="4.72999999999994" calcext:value-type="float">
            <text:p>4,72999999999994</text:p>
          </table:table-cell>
          <table:table-cell table:style-name="ce1" table:formula="of:=[.H475]" office:value-type="float" office:value="116.83541195634" calcext:value-type="float">
            <text:p>116,83541195634</text:p>
          </table:table-cell>
          <table:table-cell table:style-name="ce1" table:formula="of:=-68 - ([.E476]^2/Ao)" office:value-type="float" office:value="-77.1003423246717" calcext:value-type="float">
            <text:p>-77,1003423246717</text:p>
          </table:table-cell>
          <table:table-cell table:style-name="ce1" table:formula="of:=[.G475]+h" office:value-type="float" office:value="4.73999999999994" calcext:value-type="float">
            <text:p>4,73999999999994</text:p>
          </table:table-cell>
          <table:table-cell table:style-name="ce1" table:formula="of:=[.H475]+ h*[.F476]" office:value-type="float" office:value="116.064408533093" calcext:value-type="float">
            <text:p>116,0644085330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6]" office:value-type="float" office:value="4.73999999999994" calcext:value-type="float">
            <text:p>4,73999999999994</text:p>
          </table:table-cell>
          <table:table-cell table:style-name="ce1" table:formula="of:=[.H476]" office:value-type="float" office:value="116.064408533093" calcext:value-type="float">
            <text:p>116,064408533093</text:p>
          </table:table-cell>
          <table:table-cell table:style-name="ce1" table:formula="of:=-68 - ([.E477]^2/Ao)" office:value-type="float" office:value="-76.9806312854245" calcext:value-type="float">
            <text:p>-76,9806312854245</text:p>
          </table:table-cell>
          <table:table-cell table:style-name="ce1" table:formula="of:=[.G476]+h" office:value-type="float" office:value="4.74999999999994" calcext:value-type="float">
            <text:p>4,74999999999994</text:p>
          </table:table-cell>
          <table:table-cell table:style-name="ce1" table:formula="of:=[.H476]+ h*[.F477]" office:value-type="float" office:value="115.294602220239" calcext:value-type="float">
            <text:p>115,2946022202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7]" office:value-type="float" office:value="4.74999999999994" calcext:value-type="float">
            <text:p>4,74999999999994</text:p>
          </table:table-cell>
          <table:table-cell table:style-name="ce1" table:formula="of:=[.H477]" office:value-type="float" office:value="115.294602220239" calcext:value-type="float">
            <text:p>115,294602220239</text:p>
          </table:table-cell>
          <table:table-cell table:style-name="ce1" table:formula="of:=-68 - ([.E478]^2/Ao)" office:value-type="float" office:value="-76.8618968674154" calcext:value-type="float">
            <text:p>-76,8618968674154</text:p>
          </table:table-cell>
          <table:table-cell table:style-name="ce1" table:formula="of:=[.G477]+h" office:value-type="float" office:value="4.75999999999994" calcext:value-type="float">
            <text:p>4,75999999999994</text:p>
          </table:table-cell>
          <table:table-cell table:style-name="ce1" table:formula="of:=[.H477]+ h*[.F478]" office:value-type="float" office:value="114.525983251565" calcext:value-type="float">
            <text:p>114,5259832515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8]" office:value-type="float" office:value="4.75999999999994" calcext:value-type="float">
            <text:p>4,75999999999994</text:p>
          </table:table-cell>
          <table:table-cell table:style-name="ce1" table:formula="of:=[.H478]" office:value-type="float" office:value="114.525983251565" calcext:value-type="float">
            <text:p>114,525983251565</text:p>
          </table:table-cell>
          <table:table-cell table:style-name="ce1" table:formula="of:=-68 - ([.E479]^2/Ao)" office:value-type="float" office:value="-76.7441338931585" calcext:value-type="float">
            <text:p>-76,7441338931585</text:p>
          </table:table-cell>
          <table:table-cell table:style-name="ce1" table:formula="of:=[.G478]+h" office:value-type="float" office:value="4.76999999999994" calcext:value-type="float">
            <text:p>4,76999999999994</text:p>
          </table:table-cell>
          <table:table-cell table:style-name="ce1" table:formula="of:=[.H478]+ h*[.F479]" office:value-type="float" office:value="113.758541912633" calcext:value-type="float">
            <text:p>113,7585419126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9]" office:value-type="float" office:value="4.76999999999994" calcext:value-type="float">
            <text:p>4,76999999999994</text:p>
          </table:table-cell>
          <table:table-cell table:style-name="ce1" table:formula="of:=[.H479]" office:value-type="float" office:value="113.758541912633" calcext:value-type="float">
            <text:p>113,758541912633</text:p>
          </table:table-cell>
          <table:table-cell table:style-name="ce1" table:formula="of:=-68 - ([.E480]^2/Ao)" office:value-type="float" office:value="-76.6273372387255" calcext:value-type="float">
            <text:p>-76,6273372387255</text:p>
          </table:table-cell>
          <table:table-cell table:style-name="ce1" table:formula="of:=[.G479]+h" office:value-type="float" office:value="4.77999999999994" calcext:value-type="float">
            <text:p>4,77999999999994</text:p>
          </table:table-cell>
          <table:table-cell table:style-name="ce1" table:formula="of:=[.H479]+ h*[.F480]" office:value-type="float" office:value="112.992268540246" calcext:value-type="float">
            <text:p>112,9922685402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0]" office:value-type="float" office:value="4.77999999999994" calcext:value-type="float">
            <text:p>4,77999999999994</text:p>
          </table:table-cell>
          <table:table-cell table:style-name="ce1" table:formula="of:=[.H480]" office:value-type="float" office:value="112.992268540246" calcext:value-type="float">
            <text:p>112,992268540246</text:p>
          </table:table-cell>
          <table:table-cell table:style-name="ce1" table:formula="of:=-68 - ([.E481]^2/Ao)" office:value-type="float" office:value="-76.5115018332473" calcext:value-type="float">
            <text:p>-76,5115018332473</text:p>
          </table:table-cell>
          <table:table-cell table:style-name="ce1" table:formula="of:=[.G480]+h" office:value-type="float" office:value="4.78999999999994" calcext:value-type="float">
            <text:p>4,78999999999994</text:p>
          </table:table-cell>
          <table:table-cell table:style-name="ce1" table:formula="of:=[.H480]+ h*[.F481]" office:value-type="float" office:value="112.227153521913" calcext:value-type="float">
            <text:p>112,2271535219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1]" office:value-type="float" office:value="4.78999999999994" calcext:value-type="float">
            <text:p>4,78999999999994</text:p>
          </table:table-cell>
          <table:table-cell table:style-name="ce1" table:formula="of:=[.H481]" office:value-type="float" office:value="112.227153521913" calcext:value-type="float">
            <text:p>112,227153521913</text:p>
          </table:table-cell>
          <table:table-cell table:style-name="ce1" table:formula="of:=-68 - ([.E482]^2/Ao)" office:value-type="float" office:value="-76.3966226584207" calcext:value-type="float">
            <text:p>-76,3966226584207</text:p>
          </table:table-cell>
          <table:table-cell table:style-name="ce1" table:formula="of:=[.G481]+h" office:value-type="float" office:value="4.79999999999994" calcext:value-type="float">
            <text:p>4,79999999999994</text:p>
          </table:table-cell>
          <table:table-cell table:style-name="ce1" table:formula="of:=[.H481]+ h*[.F482]" office:value-type="float" office:value="111.463187295329" calcext:value-type="float">
            <text:p>111,4631872953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2]" office:value-type="float" office:value="4.79999999999994" calcext:value-type="float">
            <text:p>4,79999999999994</text:p>
          </table:table-cell>
          <table:table-cell table:style-name="ce1" table:formula="of:=[.H482]" office:value-type="float" office:value="111.463187295329" calcext:value-type="float">
            <text:p>111,463187295329</text:p>
          </table:table-cell>
          <table:table-cell table:style-name="ce1" table:formula="of:=-68 - ([.E483]^2/Ao)" office:value-type="float" office:value="-76.2826947480224" calcext:value-type="float">
            <text:p>-76,2826947480224</text:p>
          </table:table-cell>
          <table:table-cell table:style-name="ce1" table:formula="of:=[.G482]+h" office:value-type="float" office:value="4.80999999999994" calcext:value-type="float">
            <text:p>4,80999999999994</text:p>
          </table:table-cell>
          <table:table-cell table:style-name="ce1" table:formula="of:=[.H482]+ h*[.F483]" office:value-type="float" office:value="110.700360347849" calcext:value-type="float">
            <text:p>110,7003603478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3]" office:value-type="float" office:value="4.80999999999994" calcext:value-type="float">
            <text:p>4,80999999999994</text:p>
          </table:table-cell>
          <table:table-cell table:style-name="ce1" table:formula="of:=[.H483]" office:value-type="float" office:value="110.700360347849" calcext:value-type="float">
            <text:p>110,700360347849</text:p>
          </table:table-cell>
          <table:table-cell table:style-name="ce1" table:formula="of:=-68 - ([.E484]^2/Ao)" office:value-type="float" office:value="-76.1697131874291" calcext:value-type="float">
            <text:p>-76,1697131874291</text:p>
          </table:table-cell>
          <table:table-cell table:style-name="ce1" table:formula="of:=[.G483]+h" office:value-type="float" office:value="4.81999999999994" calcext:value-type="float">
            <text:p>4,81999999999994</text:p>
          </table:table-cell>
          <table:table-cell table:style-name="ce1" table:formula="of:=[.H483]+ h*[.F484]" office:value-type="float" office:value="109.938663215975" calcext:value-type="float">
            <text:p>109,9386632159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4]" office:value-type="float" office:value="4.81999999999994" calcext:value-type="float">
            <text:p>4,81999999999994</text:p>
          </table:table-cell>
          <table:table-cell table:style-name="ce1" table:formula="of:=[.H484]" office:value-type="float" office:value="109.938663215975" calcext:value-type="float">
            <text:p>109,938663215975</text:p>
          </table:table-cell>
          <table:table-cell table:style-name="ce1" table:formula="of:=-68 - ([.E485]^2/Ao)" office:value-type="float" office:value="-76.0576731131437" calcext:value-type="float">
            <text:p>-76,0576731131437</text:p>
          </table:table-cell>
          <table:table-cell table:style-name="ce1" table:formula="of:=[.G484]+h" office:value-type="float" office:value="4.82999999999994" calcext:value-type="float">
            <text:p>4,82999999999994</text:p>
          </table:table-cell>
          <table:table-cell table:style-name="ce1" table:formula="of:=[.H484]+ h*[.F485]" office:value-type="float" office:value="109.178086484843" calcext:value-type="float">
            <text:p>109,1780864848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5]" office:value-type="float" office:value="4.82999999999994" calcext:value-type="float">
            <text:p>4,82999999999994</text:p>
          </table:table-cell>
          <table:table-cell table:style-name="ce1" table:formula="of:=[.H485]" office:value-type="float" office:value="109.178086484843" calcext:value-type="float">
            <text:p>109,178086484843</text:p>
          </table:table-cell>
          <table:table-cell table:style-name="ce1" table:formula="of:=-68 - ([.E486]^2/Ao)" office:value-type="float" office:value="-75.9465697123279" calcext:value-type="float">
            <text:p>-75,9465697123279</text:p>
          </table:table-cell>
          <table:table-cell table:style-name="ce1" table:formula="of:=[.G485]+h" office:value-type="float" office:value="4.83999999999994" calcext:value-type="float">
            <text:p>4,83999999999994</text:p>
          </table:table-cell>
          <table:table-cell table:style-name="ce1" table:formula="of:=[.H485]+ h*[.F486]" office:value-type="float" office:value="108.41862078772" calcext:value-type="float">
            <text:p>108,418620787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6]" office:value-type="float" office:value="4.83999999999994" calcext:value-type="float">
            <text:p>4,83999999999994</text:p>
          </table:table-cell>
          <table:table-cell table:style-name="ce1" table:formula="of:=[.H486]" office:value-type="float" office:value="108.41862078772" calcext:value-type="float">
            <text:p>108,41862078772</text:p>
          </table:table-cell>
          <table:table-cell table:style-name="ce1" table:formula="of:=-68 - ([.E487]^2/Ao)" office:value-type="float" office:value="-75.8363982223409" calcext:value-type="float">
            <text:p>-75,8363982223409</text:p>
          </table:table-cell>
          <table:table-cell table:style-name="ce1" table:formula="of:=[.G486]+h" office:value-type="float" office:value="4.84999999999994" calcext:value-type="float">
            <text:p>4,84999999999994</text:p>
          </table:table-cell>
          <table:table-cell table:style-name="ce1" table:formula="of:=[.H486]+ h*[.F487]" office:value-type="float" office:value="107.660256805496" calcext:value-type="float">
            <text:p>107,6602568054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7]" office:value-type="float" office:value="4.84999999999994" calcext:value-type="float">
            <text:p>4,84999999999994</text:p>
          </table:table-cell>
          <table:table-cell table:style-name="ce1" table:formula="of:=[.H487]" office:value-type="float" office:value="107.660256805496" calcext:value-type="float">
            <text:p>107,660256805496</text:p>
          </table:table-cell>
          <table:table-cell table:style-name="ce1" table:formula="of:=-68 - ([.E488]^2/Ao)" office:value-type="float" office:value="-75.7271539302836" calcext:value-type="float">
            <text:p>-75,7271539302836</text:p>
          </table:table-cell>
          <table:table-cell table:style-name="ce1" table:formula="of:=[.G487]+h" office:value-type="float" office:value="4.85999999999994" calcext:value-type="float">
            <text:p>4,85999999999994</text:p>
          </table:table-cell>
          <table:table-cell table:style-name="ce1" table:formula="of:=[.H487]+ h*[.F488]" office:value-type="float" office:value="106.902985266194" calcext:value-type="float">
            <text:p>106,9029852661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8]" office:value-type="float" office:value="4.85999999999994" calcext:value-type="float">
            <text:p>4,85999999999994</text:p>
          </table:table-cell>
          <table:table-cell table:style-name="ce1" table:formula="of:=[.H488]" office:value-type="float" office:value="106.902985266194" calcext:value-type="float">
            <text:p>106,902985266194</text:p>
          </table:table-cell>
          <table:table-cell table:style-name="ce1" table:formula="of:=-68 - ([.E489]^2/Ao)" office:value-type="float" office:value="-75.6188321725494" calcext:value-type="float">
            <text:p>-75,6188321725494</text:p>
          </table:table-cell>
          <table:table-cell table:style-name="ce1" table:formula="of:=[.G488]+h" office:value-type="float" office:value="4.86999999999994" calcext:value-type="float">
            <text:p>4,86999999999994</text:p>
          </table:table-cell>
          <table:table-cell table:style-name="ce1" table:formula="of:=[.H488]+ h*[.F489]" office:value-type="float" office:value="106.146796944468" calcext:value-type="float">
            <text:p>106,1467969444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9]" office:value-type="float" office:value="4.86999999999994" calcext:value-type="float">
            <text:p>4,86999999999994</text:p>
          </table:table-cell>
          <table:table-cell table:style-name="ce1" table:formula="of:=[.H489]" office:value-type="float" office:value="106.146796944468" calcext:value-type="float">
            <text:p>106,146796944468</text:p>
          </table:table-cell>
          <table:table-cell table:style-name="ce1" table:formula="of:=-68 - ([.E490]^2/Ao)" office:value-type="float" office:value="-75.5114283343801" calcext:value-type="float">
            <text:p>-75,5114283343801</text:p>
          </table:table-cell>
          <table:table-cell table:style-name="ce1" table:formula="of:=[.G489]+h" office:value-type="float" office:value="4.87999999999994" calcext:value-type="float">
            <text:p>4,87999999999994</text:p>
          </table:table-cell>
          <table:table-cell table:style-name="ce1" table:formula="of:=[.H489]+ h*[.F490]" office:value-type="float" office:value="105.391682661124" calcext:value-type="float">
            <text:p>105,3916826611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0]" office:value-type="float" office:value="4.87999999999994" calcext:value-type="float">
            <text:p>4,87999999999994</text:p>
          </table:table-cell>
          <table:table-cell table:style-name="ce1" table:formula="of:=[.H490]" office:value-type="float" office:value="105.391682661124" calcext:value-type="float">
            <text:p>105,391682661124</text:p>
          </table:table-cell>
          <table:table-cell table:style-name="ce1" table:formula="of:=-68 - ([.E491]^2/Ao)" office:value-type="float" office:value="-75.4049378494288" calcext:value-type="float">
            <text:p>-75,4049378494288</text:p>
          </table:table-cell>
          <table:table-cell table:style-name="ce1" table:formula="of:=[.G490]+h" office:value-type="float" office:value="4.88999999999994" calcext:value-type="float">
            <text:p>4,88999999999994</text:p>
          </table:table-cell>
          <table:table-cell table:style-name="ce1" table:formula="of:=[.H490]+ h*[.F491]" office:value-type="float" office:value="104.63763328263" calcext:value-type="float">
            <text:p>104,637633282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1]" office:value-type="float" office:value="4.88999999999994" calcext:value-type="float">
            <text:p>4,88999999999994</text:p>
          </table:table-cell>
          <table:table-cell table:style-name="ce1" table:formula="of:=[.H491]" office:value-type="float" office:value="104.63763328263" calcext:value-type="float">
            <text:p>104,63763328263</text:p>
          </table:table-cell>
          <table:table-cell table:style-name="ce1" table:formula="of:=-68 - ([.E492]^2/Ao)" office:value-type="float" office:value="-75.2993561993268" calcext:value-type="float">
            <text:p>-75,2993561993268</text:p>
          </table:table-cell>
          <table:table-cell table:style-name="ce1" table:formula="of:=[.G491]+h" office:value-type="float" office:value="4.89999999999994" calcext:value-type="float">
            <text:p>4,89999999999994</text:p>
          </table:table-cell>
          <table:table-cell table:style-name="ce1" table:formula="of:=[.H491]+ h*[.F492]" office:value-type="float" office:value="103.884639720637" calcext:value-type="float">
            <text:p>103,8846397206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2]" office:value-type="float" office:value="4.89999999999994" calcext:value-type="float">
            <text:p>4,89999999999994</text:p>
          </table:table-cell>
          <table:table-cell table:style-name="ce1" table:formula="of:=[.H492]" office:value-type="float" office:value="103.884639720637" calcext:value-type="float">
            <text:p>103,884639720637</text:p>
          </table:table-cell>
          <table:table-cell table:style-name="ce1" table:formula="of:=-68 - ([.E493]^2/Ao)" office:value-type="float" office:value="-75.1946789132577" calcext:value-type="float">
            <text:p>-75,1946789132577</text:p>
          </table:table-cell>
          <table:table-cell table:style-name="ce1" table:formula="of:=[.G492]+h" office:value-type="float" office:value="4.90999999999994" calcext:value-type="float">
            <text:p>4,90999999999994</text:p>
          </table:table-cell>
          <table:table-cell table:style-name="ce1" table:formula="of:=[.H492]+ h*[.F493]" office:value-type="float" office:value="103.132692931504" calcext:value-type="float">
            <text:p>103,1326929315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3]" office:value-type="float" office:value="4.90999999999994" calcext:value-type="float">
            <text:p>4,90999999999994</text:p>
          </table:table-cell>
          <table:table-cell table:style-name="ce1" table:formula="of:=[.H493]" office:value-type="float" office:value="103.132692931504" calcext:value-type="float">
            <text:p>103,132692931504</text:p>
          </table:table-cell>
          <table:table-cell table:style-name="ce1" table:formula="of:=-68 - ([.E494]^2/Ao)" office:value-type="float" office:value="-75.090901567536" calcext:value-type="float">
            <text:p>-75,090901567536</text:p>
          </table:table-cell>
          <table:table-cell table:style-name="ce1" table:formula="of:=[.G493]+h" office:value-type="float" office:value="4.91999999999994" calcext:value-type="float">
            <text:p>4,91999999999994</text:p>
          </table:table-cell>
          <table:table-cell table:style-name="ce1" table:formula="of:=[.H493]+ h*[.F494]" office:value-type="float" office:value="102.381783915829" calcext:value-type="float">
            <text:p>102,3817839158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4]" office:value-type="float" office:value="4.91999999999994" calcext:value-type="float">
            <text:p>4,91999999999994</text:p>
          </table:table-cell>
          <table:table-cell table:style-name="ce1" table:formula="of:=[.H494]" office:value-type="float" office:value="102.381783915829" calcext:value-type="float">
            <text:p>102,381783915829</text:p>
          </table:table-cell>
          <table:table-cell table:style-name="ce1" table:formula="of:=-68 - ([.E495]^2/Ao)" office:value-type="float" office:value="-74.9880197851917" calcext:value-type="float">
            <text:p>-74,9880197851917</text:p>
          </table:table-cell>
          <table:table-cell table:style-name="ce1" table:formula="of:=[.G494]+h" office:value-type="float" office:value="4.92999999999994" calcext:value-type="float">
            <text:p>4,92999999999994</text:p>
          </table:table-cell>
          <table:table-cell table:style-name="ce1" table:formula="of:=[.H494]+ h*[.F495]" office:value-type="float" office:value="101.631903717977" calcext:value-type="float">
            <text:p>101,6319037179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5]" office:value-type="float" office:value="4.92999999999994" calcext:value-type="float">
            <text:p>4,92999999999994</text:p>
          </table:table-cell>
          <table:table-cell table:style-name="ce1" table:formula="of:=[.H495]" office:value-type="float" office:value="101.631903717977" calcext:value-type="float">
            <text:p>101,631903717977</text:p>
          </table:table-cell>
          <table:table-cell table:style-name="ce1" table:formula="of:=-68 - ([.E496]^2/Ao)" office:value-type="float" office:value="-74.8860292355601" calcext:value-type="float">
            <text:p>-74,8860292355601</text:p>
          </table:table-cell>
          <table:table-cell table:style-name="ce1" table:formula="of:=[.G495]+h" office:value-type="float" office:value="4.93999999999994" calcext:value-type="float">
            <text:p>4,93999999999994</text:p>
          </table:table-cell>
          <table:table-cell table:style-name="ce1" table:formula="of:=[.H495]+ h*[.F496]" office:value-type="float" office:value="100.883043425621" calcext:value-type="float">
            <text:p>100,8830434256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6]" office:value-type="float" office:value="4.93999999999994" calcext:value-type="float">
            <text:p>4,93999999999994</text:p>
          </table:table-cell>
          <table:table-cell table:style-name="ce1" table:formula="of:=[.H496]" office:value-type="float" office:value="100.883043425621" calcext:value-type="float">
            <text:p>100,883043425621</text:p>
          </table:table-cell>
          <table:table-cell table:style-name="ce1" table:formula="of:=-68 - ([.E497]^2/Ao)" office:value-type="float" office:value="-74.7849256338772" calcext:value-type="float">
            <text:p>-74,7849256338772</text:p>
          </table:table-cell>
          <table:table-cell table:style-name="ce1" table:formula="of:=[.G496]+h" office:value-type="float" office:value="4.94999999999994" calcext:value-type="float">
            <text:p>4,94999999999994</text:p>
          </table:table-cell>
          <table:table-cell table:style-name="ce1" table:formula="of:=[.H496]+ h*[.F497]" office:value-type="float" office:value="100.135194169283" calcext:value-type="float">
            <text:p>100,1351941692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7]" office:value-type="float" office:value="4.94999999999994" calcext:value-type="float">
            <text:p>4,94999999999994</text:p>
          </table:table-cell>
          <table:table-cell table:style-name="ce1" table:formula="of:=[.H497]" office:value-type="float" office:value="100.135194169283" calcext:value-type="float">
            <text:p>100,135194169283</text:p>
          </table:table-cell>
          <table:table-cell table:style-name="ce1" table:formula="of:=-68 - ([.E498]^2/Ao)" office:value-type="float" office:value="-74.68470474088" calcext:value-type="float">
            <text:p>-74,68470474088</text:p>
          </table:table-cell>
          <table:table-cell table:style-name="ce1" table:formula="of:=[.G497]+h" office:value-type="float" office:value="4.95999999999994" calcext:value-type="float">
            <text:p>4,95999999999994</text:p>
          </table:table-cell>
          <table:table-cell table:style-name="ce1" table:formula="of:=[.H497]+ h*[.F498]" office:value-type="float" office:value="99.3883471218738" calcext:value-type="float">
            <text:p>99,38834712187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8]" office:value-type="float" office:value="4.95999999999994" calcext:value-type="float">
            <text:p>4,95999999999994</text:p>
          </table:table-cell>
          <table:table-cell table:style-name="ce1" table:formula="of:=[.H498]" office:value-type="float" office:value="99.3883471218738" calcext:value-type="float">
            <text:p>99,3883471218738</text:p>
          </table:table-cell>
          <table:table-cell table:style-name="ce1" table:formula="of:=-68 - ([.E499]^2/Ao)" office:value-type="float" office:value="-74.585362362412" calcext:value-type="float">
            <text:p>-74,585362362412</text:p>
          </table:table-cell>
          <table:table-cell table:style-name="ce1" table:formula="of:=[.G498]+h" office:value-type="float" office:value="4.96999999999994" calcext:value-type="float">
            <text:p>4,96999999999994</text:p>
          </table:table-cell>
          <table:table-cell table:style-name="ce1" table:formula="of:=[.H498]+ h*[.F499]" office:value-type="float" office:value="98.6424934982496" calcext:value-type="float">
            <text:p>98,64249349824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9]" office:value-type="float" office:value="4.96999999999994" calcext:value-type="float">
            <text:p>4,96999999999994</text:p>
          </table:table-cell>
          <table:table-cell table:style-name="ce1" table:formula="of:=[.H499]" office:value-type="float" office:value="98.6424934982496" calcext:value-type="float">
            <text:p>98,6424934982496</text:p>
          </table:table-cell>
          <table:table-cell table:style-name="ce1" table:formula="of:=-68 - ([.E500]^2/Ao)" office:value-type="float" office:value="-74.4868943490348" calcext:value-type="float">
            <text:p>-74,4868943490348</text:p>
          </table:table-cell>
          <table:table-cell table:style-name="ce1" table:formula="of:=[.G499]+h" office:value-type="float" office:value="4.97999999999994" calcext:value-type="float">
            <text:p>4,97999999999994</text:p>
          </table:table-cell>
          <table:table-cell table:style-name="ce1" table:formula="of:=[.H499]+ h*[.F500]" office:value-type="float" office:value="97.8976245547593" calcext:value-type="float">
            <text:p>97,89762455475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0]" office:value-type="float" office:value="4.97999999999994" calcext:value-type="float">
            <text:p>4,97999999999994</text:p>
          </table:table-cell>
          <table:table-cell table:style-name="ce1" table:formula="of:=[.H500]" office:value-type="float" office:value="97.8976245547593" calcext:value-type="float">
            <text:p>97,8976245547593</text:p>
          </table:table-cell>
          <table:table-cell table:style-name="ce1" table:formula="of:=-68 - ([.E501]^2/Ao)" office:value-type="float" office:value="-74.3892965956431" calcext:value-type="float">
            <text:p>-74,3892965956431</text:p>
          </table:table-cell>
          <table:table-cell table:style-name="ce1" table:formula="of:=[.G500]+h" office:value-type="float" office:value="4.98999999999994" calcext:value-type="float">
            <text:p>4,98999999999994</text:p>
          </table:table-cell>
          <table:table-cell table:style-name="ce1" table:formula="of:=[.H500]+ h*[.F501]" office:value-type="float" office:value="97.1537315888029" calcext:value-type="float">
            <text:p>97,15373158880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1]" office:value-type="float" office:value="4.98999999999994" calcext:value-type="float">
            <text:p>4,98999999999994</text:p>
          </table:table-cell>
          <table:table-cell table:style-name="ce1" table:formula="of:=[.H501]" office:value-type="float" office:value="97.1537315888029" calcext:value-type="float">
            <text:p>97,1537315888029</text:p>
          </table:table-cell>
          <table:table-cell table:style-name="ce1" table:formula="of:=-68 - ([.E502]^2/Ao)" office:value-type="float" office:value="-74.2925650410861" calcext:value-type="float">
            <text:p>-74,2925650410861</text:p>
          </table:table-cell>
          <table:table-cell table:style-name="ce1" table:formula="of:=[.G501]+h" office:value-type="float" office:value="4.99999999999994" calcext:value-type="float">
            <text:p>4,99999999999994</text:p>
          </table:table-cell>
          <table:table-cell table:style-name="ce1" table:formula="of:=[.H501]+ h*[.F502]" office:value-type="float" office:value="96.410805938392" calcext:value-type="float">
            <text:p>96,4108059383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2]" office:value-type="float" office:value="4.99999999999994" calcext:value-type="float">
            <text:p>4,99999999999994</text:p>
          </table:table-cell>
          <table:table-cell table:style-name="ce1" table:formula="of:=[.H502]" office:value-type="float" office:value="96.410805938392" calcext:value-type="float">
            <text:p>96,410805938392</text:p>
          </table:table-cell>
          <table:table-cell table:style-name="ce1" table:formula="of:=-68 - ([.E503]^2/Ao)" office:value-type="float" office:value="-74.1966956677935" calcext:value-type="float">
            <text:p>-74,1966956677935</text:p>
          </table:table-cell>
          <table:table-cell table:style-name="ce1" table:formula="of:=[.G502]+h" office:value-type="float" office:value="5.00999999999994" calcext:value-type="float">
            <text:p>5,00999999999994</text:p>
          </table:table-cell>
          <table:table-cell table:style-name="ce1" table:formula="of:=[.H502]+ h*[.F503]" office:value-type="float" office:value="95.6688389817141" calcext:value-type="float">
            <text:p>95,66883898171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3]" office:value-type="float" office:value="5.00999999999994" calcext:value-type="float">
            <text:p>5,00999999999994</text:p>
          </table:table-cell>
          <table:table-cell table:style-name="ce1" table:formula="of:=[.H503]" office:value-type="float" office:value="95.6688389817141" calcext:value-type="float">
            <text:p>95,6688389817141</text:p>
          </table:table-cell>
          <table:table-cell table:style-name="ce1" table:formula="of:=-68 - ([.E504]^2/Ao)" office:value-type="float" office:value="-74.1016845014061" calcext:value-type="float">
            <text:p>-74,1016845014061</text:p>
          </table:table-cell>
          <table:table-cell table:style-name="ce1" table:formula="of:=[.G503]+h" office:value-type="float" office:value="5.01999999999994" calcext:value-type="float">
            <text:p>5,01999999999994</text:p>
          </table:table-cell>
          <table:table-cell table:style-name="ce1" table:formula="of:=[.H503]+ h*[.F504]" office:value-type="float" office:value="94.9278221367" calcext:value-type="float">
            <text:p>94,92782213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4]" office:value-type="float" office:value="5.01999999999994" calcext:value-type="float">
            <text:p>5,01999999999994</text:p>
          </table:table-cell>
          <table:table-cell table:style-name="ce1" table:formula="of:=[.H504]" office:value-type="float" office:value="94.9278221367" calcext:value-type="float">
            <text:p>94,9278221367</text:p>
          </table:table-cell>
          <table:table-cell table:style-name="ce1" table:formula="of:=-68 - ([.E505]^2/Ao)" office:value-type="float" office:value="-74.0075276104113" calcext:value-type="float">
            <text:p>-74,0075276104113</text:p>
          </table:table-cell>
          <table:table-cell table:style-name="ce1" table:formula="of:=[.G504]+h" office:value-type="float" office:value="5.02999999999994" calcext:value-type="float">
            <text:p>5,02999999999994</text:p>
          </table:table-cell>
          <table:table-cell table:style-name="ce1" table:formula="of:=[.H504]+ h*[.F505]" office:value-type="float" office:value="94.1877468605959" calcext:value-type="float">
            <text:p>94,18774686059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5]" office:value-type="float" office:value="5.02999999999994" calcext:value-type="float">
            <text:p>5,02999999999994</text:p>
          </table:table-cell>
          <table:table-cell table:style-name="ce1" table:formula="of:=[.H505]" office:value-type="float" office:value="94.1877468605959" calcext:value-type="float">
            <text:p>94,1877468605959</text:p>
          </table:table-cell>
          <table:table-cell table:style-name="ce1" table:formula="of:=-68 - ([.E506]^2/Ao)" office:value-type="float" office:value="-73.9142211057838" calcext:value-type="float">
            <text:p>-73,9142211057838</text:p>
          </table:table-cell>
          <table:table-cell table:style-name="ce1" table:formula="of:=[.G505]+h" office:value-type="float" office:value="5.03999999999994" calcext:value-type="float">
            <text:p>5,03999999999994</text:p>
          </table:table-cell>
          <table:table-cell table:style-name="ce1" table:formula="of:=[.H505]+ h*[.F506]" office:value-type="float" office:value="93.448604649538" calcext:value-type="float">
            <text:p>93,4486046495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6]" office:value-type="float" office:value="5.03999999999994" calcext:value-type="float">
            <text:p>5,03999999999994</text:p>
          </table:table-cell>
          <table:table-cell table:style-name="ce1" table:formula="of:=[.H506]" office:value-type="float" office:value="93.448604649538" calcext:value-type="float">
            <text:p>93,448604649538</text:p>
          </table:table-cell>
          <table:table-cell table:style-name="ce1" table:formula="of:=-68 - ([.E507]^2/Ao)" office:value-type="float" office:value="-73.8217611406304" calcext:value-type="float">
            <text:p>-73,8217611406304</text:p>
          </table:table-cell>
          <table:table-cell table:style-name="ce1" table:formula="of:=[.G506]+h" office:value-type="float" office:value="5.04999999999994" calcext:value-type="float">
            <text:p>5,04999999999994</text:p>
          </table:table-cell>
          <table:table-cell table:style-name="ce1" table:formula="of:=[.H506]+ h*[.F507]" office:value-type="float" office:value="92.7103870381317" calcext:value-type="float">
            <text:p>92,71038703813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7]" office:value-type="float" office:value="5.04999999999994" calcext:value-type="float">
            <text:p>5,04999999999994</text:p>
          </table:table-cell>
          <table:table-cell table:style-name="ce1" table:formula="of:=[.H507]" office:value-type="float" office:value="92.7103870381317" calcext:value-type="float">
            <text:p>92,7103870381317</text:p>
          </table:table-cell>
          <table:table-cell table:style-name="ce1" table:formula="of:=-68 - ([.E508]^2/Ao)" office:value-type="float" office:value="-73.7301439098401" calcext:value-type="float">
            <text:p>-73,7301439098401</text:p>
          </table:table-cell>
          <table:table-cell table:style-name="ce1" table:formula="of:=[.G507]+h" office:value-type="float" office:value="5.05999999999994" calcext:value-type="float">
            <text:p>5,05999999999994</text:p>
          </table:table-cell>
          <table:table-cell table:style-name="ce1" table:formula="of:=[.H507]+ h*[.F508]" office:value-type="float" office:value="91.9730855990333" calcext:value-type="float">
            <text:p>91,97308559903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8]" office:value-type="float" office:value="5.05999999999994" calcext:value-type="float">
            <text:p>5,05999999999994</text:p>
          </table:table-cell>
          <table:table-cell table:style-name="ce1" table:formula="of:=[.H508]" office:value-type="float" office:value="91.9730855990333" calcext:value-type="float">
            <text:p>91,9730855990333</text:p>
          </table:table-cell>
          <table:table-cell table:style-name="ce1" table:formula="of:=-68 - ([.E509]^2/Ao)" office:value-type="float" office:value="-73.6393656497381" calcext:value-type="float">
            <text:p>-73,6393656497381</text:p>
          </table:table-cell>
          <table:table-cell table:style-name="ce1" table:formula="of:=[.G508]+h" office:value-type="float" office:value="5.06999999999994" calcext:value-type="float">
            <text:p>5,06999999999994</text:p>
          </table:table-cell>
          <table:table-cell table:style-name="ce1" table:formula="of:=[.H508]+ h*[.F509]" office:value-type="float" office:value="91.236691942536" calcext:value-type="float">
            <text:p>91,2366919425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9]" office:value-type="float" office:value="5.06999999999994" calcext:value-type="float">
            <text:p>5,06999999999994</text:p>
          </table:table-cell>
          <table:table-cell table:style-name="ce1" table:formula="of:=[.H509]" office:value-type="float" office:value="91.236691942536" calcext:value-type="float">
            <text:p>91,236691942536</text:p>
          </table:table-cell>
          <table:table-cell table:style-name="ce1" table:formula="of:=-68 - ([.E510]^2/Ao)" office:value-type="float" office:value="-73.5494226377448" calcext:value-type="float">
            <text:p>-73,5494226377448</text:p>
          </table:table-cell>
          <table:table-cell table:style-name="ce1" table:formula="of:=[.G509]+h" office:value-type="float" office:value="5.07999999999994" calcext:value-type="float">
            <text:p>5,07999999999994</text:p>
          </table:table-cell>
          <table:table-cell table:style-name="ce1" table:formula="of:=[.H509]+ h*[.F510]" office:value-type="float" office:value="90.5011977161585" calcext:value-type="float">
            <text:p>90,50119771615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0]" office:value-type="float" office:value="5.07999999999994" calcext:value-type="float">
            <text:p>5,07999999999994</text:p>
          </table:table-cell>
          <table:table-cell table:style-name="ce1" table:formula="of:=[.H510]" office:value-type="float" office:value="90.5011977161585" calcext:value-type="float">
            <text:p>90,5011977161585</text:p>
          </table:table-cell>
          <table:table-cell table:style-name="ce1" table:formula="of:=-68 - ([.E511]^2/Ao)" office:value-type="float" office:value="-73.4603111920395" calcext:value-type="float">
            <text:p>-73,4603111920395</text:p>
          </table:table-cell>
          <table:table-cell table:style-name="ce1" table:formula="of:=[.G510]+h" office:value-type="float" office:value="5.08999999999994" calcext:value-type="float">
            <text:p>5,08999999999994</text:p>
          </table:table-cell>
          <table:table-cell table:style-name="ce1" table:formula="of:=[.H510]+ h*[.F511]" office:value-type="float" office:value="89.7665946042381" calcext:value-type="float">
            <text:p>89,76659460423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1]" office:value-type="float" office:value="5.08999999999994" calcext:value-type="float">
            <text:p>5,08999999999994</text:p>
          </table:table-cell>
          <table:table-cell table:style-name="ce1" table:formula="of:=[.H511]" office:value-type="float" office:value="89.7665946042381" calcext:value-type="float">
            <text:p>89,7665946042381</text:p>
          </table:table-cell>
          <table:table-cell table:style-name="ce1" table:formula="of:=-68 - ([.E512]^2/Ao)" office:value-type="float" office:value="-73.3720276712278" calcext:value-type="float">
            <text:p>-73,3720276712278</text:p>
          </table:table-cell>
          <table:table-cell table:style-name="ce1" table:formula="of:=[.G511]+h" office:value-type="float" office:value="5.09999999999994" calcext:value-type="float">
            <text:p>5,09999999999994</text:p>
          </table:table-cell>
          <table:table-cell table:style-name="ce1" table:formula="of:=[.H511]+ h*[.F512]" office:value-type="float" office:value="89.0328743275258" calcext:value-type="float">
            <text:p>89,03287432752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2]" office:value-type="float" office:value="5.09999999999994" calcext:value-type="float">
            <text:p>5,09999999999994</text:p>
          </table:table-cell>
          <table:table-cell table:style-name="ce1" table:formula="of:=[.H512]" office:value-type="float" office:value="89.0328743275258" calcext:value-type="float">
            <text:p>89,0328743275258</text:p>
          </table:table-cell>
          <table:table-cell table:style-name="ce1" table:formula="of:=-68 - ([.E513]^2/Ao)" office:value-type="float" office:value="-73.284568474014" calcext:value-type="float">
            <text:p>-73,284568474014</text:p>
          </table:table-cell>
          <table:table-cell table:style-name="ce1" table:formula="of:=[.G512]+h" office:value-type="float" office:value="5.10999999999994" calcext:value-type="float">
            <text:p>5,10999999999994</text:p>
          </table:table-cell>
          <table:table-cell table:style-name="ce1" table:formula="of:=[.H512]+ h*[.F513]" office:value-type="float" office:value="88.3000286427857" calcext:value-type="float">
            <text:p>88,30002864278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3]" office:value-type="float" office:value="5.10999999999994" calcext:value-type="float">
            <text:p>5,10999999999994</text:p>
          </table:table-cell>
          <table:table-cell table:style-name="ce1" table:formula="of:=[.H513]" office:value-type="float" office:value="88.3000286427857" calcext:value-type="float">
            <text:p>88,3000286427857</text:p>
          </table:table-cell>
          <table:table-cell table:style-name="ce1" table:formula="of:=-68 - ([.E514]^2/Ao)" office:value-type="float" office:value="-73.1979300388778" calcext:value-type="float">
            <text:p>-73,1979300388778</text:p>
          </table:table-cell>
          <table:table-cell table:style-name="ce1" table:formula="of:=[.G513]+h" office:value-type="float" office:value="5.11999999999994" calcext:value-type="float">
            <text:p>5,11999999999994</text:p>
          </table:table-cell>
          <table:table-cell table:style-name="ce1" table:formula="of:=[.H513]+ h*[.F514]" office:value-type="float" office:value="87.5680493423969" calcext:value-type="float">
            <text:p>87,56804934239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4]" office:value-type="float" office:value="5.11999999999994" calcext:value-type="float">
            <text:p>5,11999999999994</text:p>
          </table:table-cell>
          <table:table-cell table:style-name="ce1" table:formula="of:=[.H514]" office:value-type="float" office:value="87.5680493423969" calcext:value-type="float">
            <text:p>87,5680493423969</text:p>
          </table:table-cell>
          <table:table-cell table:style-name="ce1" table:formula="of:=-68 - ([.E515]^2/Ao)" office:value-type="float" office:value="-73.112108843755" calcext:value-type="float">
            <text:p>-73,112108843755</text:p>
          </table:table-cell>
          <table:table-cell table:style-name="ce1" table:formula="of:=[.G514]+h" office:value-type="float" office:value="5.12999999999994" calcext:value-type="float">
            <text:p>5,12999999999994</text:p>
          </table:table-cell>
          <table:table-cell table:style-name="ce1" table:formula="of:=[.H514]+ h*[.F515]" office:value-type="float" office:value="86.8369282539594" calcext:value-type="float">
            <text:p>86,83692825395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5]" office:value-type="float" office:value="5.12999999999994" calcext:value-type="float">
            <text:p>5,12999999999994</text:p>
          </table:table-cell>
          <table:table-cell table:style-name="ce1" table:formula="of:=[.H515]" office:value-type="float" office:value="86.8369282539594" calcext:value-type="float">
            <text:p>86,8369282539594</text:p>
          </table:table-cell>
          <table:table-cell table:style-name="ce1" table:formula="of:=-68 - ([.E516]^2/Ao)" office:value-type="float" office:value="-73.0271014057222" calcext:value-type="float">
            <text:p>-73,0271014057222</text:p>
          </table:table-cell>
          <table:table-cell table:style-name="ce1" table:formula="of:=[.G515]+h" office:value-type="float" office:value="5.13999999999994" calcext:value-type="float">
            <text:p>5,13999999999994</text:p>
          </table:table-cell>
          <table:table-cell table:style-name="ce1" table:formula="of:=[.H515]+ h*[.F516]" office:value-type="float" office:value="86.1066572399022" calcext:value-type="float">
            <text:p>86,10665723990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6]" office:value-type="float" office:value="5.13999999999994" calcext:value-type="float">
            <text:p>5,13999999999994</text:p>
          </table:table-cell>
          <table:table-cell table:style-name="ce1" table:formula="of:=[.H516]" office:value-type="float" office:value="86.1066572399022" calcext:value-type="float">
            <text:p>86,1066572399022</text:p>
          </table:table-cell>
          <table:table-cell table:style-name="ce1" table:formula="of:=-68 - ([.E517]^2/Ao)" office:value-type="float" office:value="-72.9429042806867" calcext:value-type="float">
            <text:p>-72,9429042806867</text:p>
          </table:table-cell>
          <table:table-cell table:style-name="ce1" table:formula="of:=[.G516]+h" office:value-type="float" office:value="5.14999999999994" calcext:value-type="float">
            <text:p>5,14999999999994</text:p>
          </table:table-cell>
          <table:table-cell table:style-name="ce1" table:formula="of:=[.H516]+ h*[.F517]" office:value-type="float" office:value="85.3772281970953" calcext:value-type="float">
            <text:p>85,3772281970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7]" office:value-type="float" office:value="5.14999999999994" calcext:value-type="float">
            <text:p>5,14999999999994</text:p>
          </table:table-cell>
          <table:table-cell table:style-name="ce1" table:formula="of:=[.H517]" office:value-type="float" office:value="85.3772281970953" calcext:value-type="float">
            <text:p>85,3772281970953</text:p>
          </table:table-cell>
          <table:table-cell table:style-name="ce1" table:formula="of:=-68 - ([.E518]^2/Ao)" office:value-type="float" office:value="-72.8595140630793" calcext:value-type="float">
            <text:p>-72,8595140630793</text:p>
          </table:table-cell>
          <table:table-cell table:style-name="ce1" table:formula="of:=[.G517]+h" office:value-type="float" office:value="5.15999999999993" calcext:value-type="float">
            <text:p>5,15999999999993</text:p>
          </table:table-cell>
          <table:table-cell table:style-name="ce1" table:formula="of:=[.H517]+ h*[.F518]" office:value-type="float" office:value="84.6486330564645" calcext:value-type="float">
            <text:p>84,64863305646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8]" office:value-type="float" office:value="5.15999999999993" calcext:value-type="float">
            <text:p>5,15999999999993</text:p>
          </table:table-cell>
          <table:table-cell table:style-name="ce1" table:formula="of:=[.H518]" office:value-type="float" office:value="84.6486330564645" calcext:value-type="float">
            <text:p>84,6486330564645</text:p>
          </table:table-cell>
          <table:table-cell table:style-name="ce1" table:formula="of:=-68 - ([.E519]^2/Ao)" office:value-type="float" office:value="-72.776927385552" calcext:value-type="float">
            <text:p>-72,776927385552</text:p>
          </table:table-cell>
          <table:table-cell table:style-name="ce1" table:formula="of:=[.G518]+h" office:value-type="float" office:value="5.16999999999993" calcext:value-type="float">
            <text:p>5,16999999999993</text:p>
          </table:table-cell>
          <table:table-cell table:style-name="ce1" table:formula="of:=[.H518]+ h*[.F519]" office:value-type="float" office:value="83.920863782609" calcext:value-type="float">
            <text:p>83,9208637826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9]" office:value-type="float" office:value="5.16999999999993" calcext:value-type="float">
            <text:p>5,16999999999993</text:p>
          </table:table-cell>
          <table:table-cell table:style-name="ce1" table:formula="of:=[.H519]" office:value-type="float" office:value="83.920863782609" calcext:value-type="float">
            <text:p>83,920863782609</text:p>
          </table:table-cell>
          <table:table-cell table:style-name="ce1" table:formula="of:=-68 - ([.E520]^2/Ao)" office:value-type="float" office:value="-72.6951409186795" calcext:value-type="float">
            <text:p>-72,6951409186795</text:p>
          </table:table-cell>
          <table:table-cell table:style-name="ce1" table:formula="of:=[.G519]+h" office:value-type="float" office:value="5.17999999999993" calcext:value-type="float">
            <text:p>5,17999999999993</text:p>
          </table:table-cell>
          <table:table-cell table:style-name="ce1" table:formula="of:=[.H519]+ h*[.F520]" office:value-type="float" office:value="83.1939123734222" calcext:value-type="float">
            <text:p>83,19391237342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0]" office:value-type="float" office:value="5.17999999999993" calcext:value-type="float">
            <text:p>5,17999999999993</text:p>
          </table:table-cell>
          <table:table-cell table:style-name="ce1" table:formula="of:=[.H520]" office:value-type="float" office:value="83.1939123734222" calcext:value-type="float">
            <text:p>83,1939123734222</text:p>
          </table:table-cell>
          <table:table-cell table:style-name="ce1" table:formula="of:=-68 - ([.E521]^2/Ao)" office:value-type="float" office:value="-72.6141513706644" calcext:value-type="float">
            <text:p>-72,6141513706644</text:p>
          </table:table-cell>
          <table:table-cell table:style-name="ce1" table:formula="of:=[.G520]+h" office:value-type="float" office:value="5.18999999999993" calcext:value-type="float">
            <text:p>5,18999999999993</text:p>
          </table:table-cell>
          <table:table-cell table:style-name="ce1" table:formula="of:=[.H520]+ h*[.F521]" office:value-type="float" office:value="82.4677708597155" calcext:value-type="float">
            <text:p>82,46777085971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1]" office:value-type="float" office:value="5.18999999999993" calcext:value-type="float">
            <text:p>5,18999999999993</text:p>
          </table:table-cell>
          <table:table-cell table:style-name="ce1" table:formula="of:=[.H521]" office:value-type="float" office:value="82.4677708597155" calcext:value-type="float">
            <text:p>82,4677708597155</text:p>
          </table:table-cell>
          <table:table-cell table:style-name="ce1" table:formula="of:=-68 - ([.E522]^2/Ao)" office:value-type="float" office:value="-72.533955487047" calcext:value-type="float">
            <text:p>-72,533955487047</text:p>
          </table:table-cell>
          <table:table-cell table:style-name="ce1" table:formula="of:=[.G521]+h" office:value-type="float" office:value="5.19999999999993" calcext:value-type="float">
            <text:p>5,19999999999993</text:p>
          </table:table-cell>
          <table:table-cell table:style-name="ce1" table:formula="of:=[.H521]+ h*[.F522]" office:value-type="float" office:value="81.7424313048451" calcext:value-type="float">
            <text:p>81,74243130484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2]" office:value-type="float" office:value="5.19999999999993" calcext:value-type="float">
            <text:p>5,19999999999993</text:p>
          </table:table-cell>
          <table:table-cell table:style-name="ce1" table:formula="of:=[.H522]" office:value-type="float" office:value="81.7424313048451" calcext:value-type="float">
            <text:p>81,7424313048451</text:p>
          </table:table-cell>
          <table:table-cell table:style-name="ce1" table:formula="of:=-68 - ([.E523]^2/Ao)" office:value-type="float" office:value="-72.4545500504182" calcext:value-type="float">
            <text:p>-72,4545500504182</text:p>
          </table:table-cell>
          <table:table-cell table:style-name="ce1" table:formula="of:=[.G522]+h" office:value-type="float" office:value="5.20999999999993" calcext:value-type="float">
            <text:p>5,20999999999993</text:p>
          </table:table-cell>
          <table:table-cell table:style-name="ce1" table:formula="of:=[.H522]+ h*[.F523]" office:value-type="float" office:value="81.0178858043409" calcext:value-type="float">
            <text:p>81,01788580434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3]" office:value-type="float" office:value="5.20999999999993" calcext:value-type="float">
            <text:p>5,20999999999993</text:p>
          </table:table-cell>
          <table:table-cell table:style-name="ce1" table:formula="of:=[.H523]" office:value-type="float" office:value="81.0178858043409" calcext:value-type="float">
            <text:p>81,0178858043409</text:p>
          </table:table-cell>
          <table:table-cell table:style-name="ce1" table:formula="of:=-68 - ([.E524]^2/Ao)" office:value-type="float" office:value="-72.3759318801368" calcext:value-type="float">
            <text:p>-72,3759318801368</text:p>
          </table:table-cell>
          <table:table-cell table:style-name="ce1" table:formula="of:=[.G523]+h" office:value-type="float" office:value="5.21999999999993" calcext:value-type="float">
            <text:p>5,21999999999993</text:p>
          </table:table-cell>
          <table:table-cell table:style-name="ce1" table:formula="of:=[.H523]+ h*[.F524]" office:value-type="float" office:value="80.2941264855395" calcext:value-type="float">
            <text:p>80,29412648553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4]" office:value-type="float" office:value="5.21999999999993" calcext:value-type="float">
            <text:p>5,21999999999993</text:p>
          </table:table-cell>
          <table:table-cell table:style-name="ce1" table:formula="of:=[.H524]" office:value-type="float" office:value="80.2941264855395" calcext:value-type="float">
            <text:p>80,2941264855395</text:p>
          </table:table-cell>
          <table:table-cell table:style-name="ce1" table:formula="of:=-68 - ([.E525]^2/Ao)" office:value-type="float" office:value="-72.2980978320505" calcext:value-type="float">
            <text:p>-72,2980978320505</text:p>
          </table:table-cell>
          <table:table-cell table:style-name="ce1" table:formula="of:=[.G524]+h" office:value-type="float" office:value="5.22999999999993" calcext:value-type="float">
            <text:p>5,22999999999993</text:p>
          </table:table-cell>
          <table:table-cell table:style-name="ce1" table:formula="of:=[.H524]+ h*[.F525]" office:value-type="float" office:value="79.571145507219" calcext:value-type="float">
            <text:p>79,5711455072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5]" office:value-type="float" office:value="5.22999999999993" calcext:value-type="float">
            <text:p>5,22999999999993</text:p>
          </table:table-cell>
          <table:table-cell table:style-name="ce1" table:formula="of:=[.H525]" office:value-type="float" office:value="79.571145507219" calcext:value-type="float">
            <text:p>79,571145507219</text:p>
          </table:table-cell>
          <table:table-cell table:style-name="ce1" table:formula="of:=-68 - ([.E526]^2/Ao)" office:value-type="float" office:value="-72.2210447982207" calcext:value-type="float">
            <text:p>-72,2210447982207</text:p>
          </table:table-cell>
          <table:table-cell table:style-name="ce1" table:formula="of:=[.G525]+h" office:value-type="float" office:value="5.23999999999993" calcext:value-type="float">
            <text:p>5,23999999999993</text:p>
          </table:table-cell>
          <table:table-cell table:style-name="ce1" table:formula="of:=[.H525]+ h*[.F526]" office:value-type="float" office:value="78.8489350592368" calcext:value-type="float">
            <text:p>78,84893505923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6]" office:value-type="float" office:value="5.23999999999993" calcext:value-type="float">
            <text:p>5,23999999999993</text:p>
          </table:table-cell>
          <table:table-cell table:style-name="ce1" table:formula="of:=[.H526]" office:value-type="float" office:value="78.8489350592368" calcext:value-type="float">
            <text:p>78,8489350592368</text:p>
          </table:table-cell>
          <table:table-cell table:style-name="ce1" table:formula="of:=-68 - ([.E527]^2/Ao)" office:value-type="float" office:value="-72.1447697066505" calcext:value-type="float">
            <text:p>-72,1447697066505</text:p>
          </table:table-cell>
          <table:table-cell table:style-name="ce1" table:formula="of:=[.G526]+h" office:value-type="float" office:value="5.24999999999993" calcext:value-type="float">
            <text:p>5,24999999999993</text:p>
          </table:table-cell>
          <table:table-cell table:style-name="ce1" table:formula="of:=[.H526]+ h*[.F527]" office:value-type="float" office:value="78.1274873621703" calcext:value-type="float">
            <text:p>78,12748736217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7]" office:value-type="float" office:value="5.24999999999993" calcext:value-type="float">
            <text:p>5,24999999999993</text:p>
          </table:table-cell>
          <table:table-cell table:style-name="ce1" table:formula="of:=[.H527]" office:value-type="float" office:value="78.1274873621703" calcext:value-type="float">
            <text:p>78,1274873621703</text:p>
          </table:table-cell>
          <table:table-cell table:style-name="ce1" table:formula="of:=-68 - ([.E528]^2/Ao)" office:value-type="float" office:value="-72.0692695210174" calcext:value-type="float">
            <text:p>-72,0692695210174</text:p>
          </table:table-cell>
          <table:table-cell table:style-name="ce1" table:formula="of:=[.G527]+h" office:value-type="float" office:value="5.25999999999993" calcext:value-type="float">
            <text:p>5,25999999999993</text:p>
          </table:table-cell>
          <table:table-cell table:style-name="ce1" table:formula="of:=[.H527]+ h*[.F528]" office:value-type="float" office:value="77.4067946669601" calcext:value-type="float">
            <text:p>77,40679466696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8]" office:value-type="float" office:value="5.25999999999993" calcext:value-type="float">
            <text:p>5,25999999999993</text:p>
          </table:table-cell>
          <table:table-cell table:style-name="ce1" table:formula="of:=[.H528]" office:value-type="float" office:value="77.4067946669601" calcext:value-type="float">
            <text:p>77,4067946669601</text:p>
          </table:table-cell>
          <table:table-cell table:style-name="ce1" table:formula="of:=-68 - ([.E529]^2/Ao)" office:value-type="float" office:value="-71.9945412404086" calcext:value-type="float">
            <text:p>-71,9945412404086</text:p>
          </table:table-cell>
          <table:table-cell table:style-name="ce1" table:formula="of:=[.G528]+h" office:value-type="float" office:value="5.26999999999993" calcext:value-type="float">
            <text:p>5,26999999999993</text:p>
          </table:table-cell>
          <table:table-cell table:style-name="ce1" table:formula="of:=[.H528]+ h*[.F529]" office:value-type="float" office:value="76.686849254556" calcext:value-type="float">
            <text:p>76,6868492545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9]" office:value-type="float" office:value="5.26999999999993" calcext:value-type="float">
            <text:p>5,26999999999993</text:p>
          </table:table-cell>
          <table:table-cell table:style-name="ce1" table:formula="of:=[.H529]" office:value-type="float" office:value="76.686849254556" calcext:value-type="float">
            <text:p>76,686849254556</text:p>
          </table:table-cell>
          <table:table-cell table:style-name="ce1" table:formula="of:=-68 - ([.E530]^2/Ao)" office:value-type="float" office:value="-71.9205818990607" calcext:value-type="float">
            <text:p>-71,9205818990607</text:p>
          </table:table-cell>
          <table:table-cell table:style-name="ce1" table:formula="of:=[.G529]+h" office:value-type="float" office:value="5.27999999999993" calcext:value-type="float">
            <text:p>5,27999999999993</text:p>
          </table:table-cell>
          <table:table-cell table:style-name="ce1" table:formula="of:=[.H529]+ h*[.F530]" office:value-type="float" office:value="75.9676434355654" calcext:value-type="float">
            <text:p>75,96764343556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0]" office:value-type="float" office:value="5.27999999999993" calcext:value-type="float">
            <text:p>5,27999999999993</text:p>
          </table:table-cell>
          <table:table-cell table:style-name="ce1" table:formula="of:=[.H530]" office:value-type="float" office:value="75.9676434355654" calcext:value-type="float">
            <text:p>75,9676434355654</text:p>
          </table:table-cell>
          <table:table-cell table:style-name="ce1" table:formula="of:=-68 - ([.E531]^2/Ao)" office:value-type="float" office:value="-71.8473885661021" calcext:value-type="float">
            <text:p>-71,8473885661021</text:p>
          </table:table-cell>
          <table:table-cell table:style-name="ce1" table:formula="of:=[.G530]+h" office:value-type="float" office:value="5.28999999999993" calcext:value-type="float">
            <text:p>5,28999999999993</text:p>
          </table:table-cell>
          <table:table-cell table:style-name="ce1" table:formula="of:=[.H530]+ h*[.F531]" office:value-type="float" office:value="75.2491695499044" calcext:value-type="float">
            <text:p>75,24916954990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1]" office:value-type="float" office:value="5.28999999999993" calcext:value-type="float">
            <text:p>5,28999999999993</text:p>
          </table:table-cell>
          <table:table-cell table:style-name="ce1" table:formula="of:=[.H531]" office:value-type="float" office:value="75.2491695499044" calcext:value-type="float">
            <text:p>75,2491695499044</text:p>
          </table:table-cell>
          <table:table-cell table:style-name="ce1" table:formula="of:=-68 - ([.E532]^2/Ao)" office:value-type="float" office:value="-71.7749583453002" calcext:value-type="float">
            <text:p>-71,7749583453002</text:p>
          </table:table-cell>
          <table:table-cell table:style-name="ce1" table:formula="of:=[.G531]+h" office:value-type="float" office:value="5.29999999999993" calcext:value-type="float">
            <text:p>5,29999999999993</text:p>
          </table:table-cell>
          <table:table-cell table:style-name="ce1" table:formula="of:=[.H531]+ h*[.F532]" office:value-type="float" office:value="74.5314199664514" calcext:value-type="float">
            <text:p>74,53141996645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2]" office:value-type="float" office:value="5.29999999999993" calcext:value-type="float">
            <text:p>5,29999999999993</text:p>
          </table:table-cell>
          <table:table-cell table:style-name="ce1" table:formula="of:=[.H532]" office:value-type="float" office:value="74.5314199664514" calcext:value-type="float">
            <text:p>74,5314199664514</text:p>
          </table:table-cell>
          <table:table-cell table:style-name="ce1" table:formula="of:=-68 - ([.E533]^2/Ao)" office:value-type="float" office:value="-71.7032883748104" calcext:value-type="float">
            <text:p>-71,7032883748104</text:p>
          </table:table-cell>
          <table:table-cell table:style-name="ce1" table:formula="of:=[.G532]+h" office:value-type="float" office:value="5.30999999999993" calcext:value-type="float">
            <text:p>5,30999999999993</text:p>
          </table:table-cell>
          <table:table-cell table:style-name="ce1" table:formula="of:=[.H532]+ h*[.F533]" office:value-type="float" office:value="73.8143870827033" calcext:value-type="float">
            <text:p>73,81438708270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3]" office:value-type="float" office:value="5.30999999999993" calcext:value-type="float">
            <text:p>5,30999999999993</text:p>
          </table:table-cell>
          <table:table-cell table:style-name="ce1" table:formula="of:=[.H533]" office:value-type="float" office:value="73.8143870827033" calcext:value-type="float">
            <text:p>73,8143870827033</text:p>
          </table:table-cell>
          <table:table-cell table:style-name="ce1" table:formula="of:=-68 - ([.E534]^2/Ao)" office:value-type="float" office:value="-71.6323758269301" calcext:value-type="float">
            <text:p>-71,6323758269301</text:p>
          </table:table-cell>
          <table:table-cell table:style-name="ce1" table:formula="of:=[.G533]+h" office:value-type="float" office:value="5.31999999999993" calcext:value-type="float">
            <text:p>5,31999999999993</text:p>
          </table:table-cell>
          <table:table-cell table:style-name="ce1" table:formula="of:=[.H533]+ h*[.F534]" office:value-type="float" office:value="73.098063324434" calcext:value-type="float">
            <text:p>73,0980633244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4]" office:value-type="float" office:value="5.31999999999993" calcext:value-type="float">
            <text:p>5,31999999999993</text:p>
          </table:table-cell>
          <table:table-cell table:style-name="ce1" table:formula="of:=[.H534]" office:value-type="float" office:value="73.098063324434" calcext:value-type="float">
            <text:p>73,098063324434</text:p>
          </table:table-cell>
          <table:table-cell table:style-name="ce1" table:formula="of:=-68 - ([.E535]^2/Ao)" office:value-type="float" office:value="-71.5622179078553" calcext:value-type="float">
            <text:p>-71,5622179078553</text:p>
          </table:table-cell>
          <table:table-cell table:style-name="ce1" table:formula="of:=[.G534]+h" office:value-type="float" office:value="5.32999999999993" calcext:value-type="float">
            <text:p>5,32999999999993</text:p>
          </table:table-cell>
          <table:table-cell table:style-name="ce1" table:formula="of:=[.H534]+ h*[.F535]" office:value-type="float" office:value="72.3824411453554" calcext:value-type="float">
            <text:p>72,38244114535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5]" office:value-type="float" office:value="5.32999999999993" calcext:value-type="float">
            <text:p>5,32999999999993</text:p>
          </table:table-cell>
          <table:table-cell table:style-name="ce1" table:formula="of:=[.H535]" office:value-type="float" office:value="72.3824411453554" calcext:value-type="float">
            <text:p>72,3824411453554</text:p>
          </table:table-cell>
          <table:table-cell table:style-name="ce1" table:formula="of:=-68 - ([.E536]^2/Ao)" office:value-type="float" office:value="-71.4928118574406" calcext:value-type="float">
            <text:p>-71,4928118574406</text:p>
          </table:table-cell>
          <table:table-cell table:style-name="ce1" table:formula="of:=[.G535]+h" office:value-type="float" office:value="5.33999999999993" calcext:value-type="float">
            <text:p>5,33999999999993</text:p>
          </table:table-cell>
          <table:table-cell table:style-name="ce1" table:formula="of:=[.H535]+ h*[.F536]" office:value-type="float" office:value="71.667513026781" calcext:value-type="float">
            <text:p>71,6675130267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6]" office:value-type="float" office:value="5.33999999999993" calcext:value-type="float">
            <text:p>5,33999999999993</text:p>
          </table:table-cell>
          <table:table-cell table:style-name="ce1" table:formula="of:=[.H536]" office:value-type="float" office:value="71.667513026781" calcext:value-type="float">
            <text:p>71,667513026781</text:p>
          </table:table-cell>
          <table:table-cell table:style-name="ce1" table:formula="of:=-68 - ([.E537]^2/Ao)" office:value-type="float" office:value="-71.4241549489626" calcext:value-type="float">
            <text:p>-71,4241549489626</text:p>
          </table:table-cell>
          <table:table-cell table:style-name="ce1" table:formula="of:=[.G536]+h" office:value-type="float" office:value="5.34999999999993" calcext:value-type="float">
            <text:p>5,34999999999993</text:p>
          </table:table-cell>
          <table:table-cell table:style-name="ce1" table:formula="of:=[.H536]+ h*[.F537]" office:value-type="float" office:value="70.9532714772914" calcext:value-type="float">
            <text:p>70,95327147729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7]" office:value-type="float" office:value="5.34999999999993" calcext:value-type="float">
            <text:p>5,34999999999993</text:p>
          </table:table-cell>
          <table:table-cell table:style-name="ce1" table:formula="of:=[.H537]" office:value-type="float" office:value="70.9532714772914" calcext:value-type="float">
            <text:p>70,9532714772914</text:p>
          </table:table-cell>
          <table:table-cell table:style-name="ce1" table:formula="of:=-68 - ([.E538]^2/Ao)" office:value-type="float" office:value="-71.3562444888868" calcext:value-type="float">
            <text:p>-71,3562444888868</text:p>
          </table:table-cell>
          <table:table-cell table:style-name="ce1" table:formula="of:=[.G537]+h" office:value-type="float" office:value="5.35999999999993" calcext:value-type="float">
            <text:p>5,35999999999993</text:p>
          </table:table-cell>
          <table:table-cell table:style-name="ce1" table:formula="of:=[.H537]+ h*[.F538]" office:value-type="float" office:value="70.2397090324025" calcext:value-type="float">
            <text:p>70,23970903240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8]" office:value-type="float" office:value="5.35999999999993" calcext:value-type="float">
            <text:p>5,35999999999993</text:p>
          </table:table-cell>
          <table:table-cell table:style-name="ce1" table:formula="of:=[.H538]" office:value-type="float" office:value="70.2397090324025" calcext:value-type="float">
            <text:p>70,2397090324025</text:p>
          </table:table-cell>
          <table:table-cell table:style-name="ce1" table:formula="of:=-68 - ([.E539]^2/Ao)" office:value-type="float" office:value="-71.2890778166377" calcext:value-type="float">
            <text:p>-71,2890778166377</text:p>
          </table:table-cell>
          <table:table-cell table:style-name="ce1" table:formula="of:=[.G538]+h" office:value-type="float" office:value="5.36999999999993" calcext:value-type="float">
            <text:p>5,36999999999993</text:p>
          </table:table-cell>
          <table:table-cell table:style-name="ce1" table:formula="of:=[.H538]+ h*[.F539]" office:value-type="float" office:value="69.5268182542362" calcext:value-type="float">
            <text:p>69,52681825423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9]" office:value-type="float" office:value="5.36999999999993" calcext:value-type="float">
            <text:p>5,36999999999993</text:p>
          </table:table-cell>
          <table:table-cell table:style-name="ce1" table:formula="of:=[.H539]" office:value-type="float" office:value="69.5268182542362" calcext:value-type="float">
            <text:p>69,5268182542362</text:p>
          </table:table-cell>
          <table:table-cell table:style-name="ce1" table:formula="of:=-68 - ([.E540]^2/Ao)" office:value-type="float" office:value="-71.2226523043717" calcext:value-type="float">
            <text:p>-71,2226523043717</text:p>
          </table:table-cell>
          <table:table-cell table:style-name="ce1" table:formula="of:=[.G539]+h" office:value-type="float" office:value="5.37999999999993" calcext:value-type="float">
            <text:p>5,37999999999993</text:p>
          </table:table-cell>
          <table:table-cell table:style-name="ce1" table:formula="of:=[.H539]+ h*[.F540]" office:value-type="float" office:value="68.8145917311925" calcext:value-type="float">
            <text:p>68,81459173119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0]" office:value-type="float" office:value="5.37999999999993" calcext:value-type="float">
            <text:p>5,37999999999993</text:p>
          </table:table-cell>
          <table:table-cell table:style-name="ce1" table:formula="of:=[.H540]" office:value-type="float" office:value="68.8145917311925" calcext:value-type="float">
            <text:p>68,8145917311925</text:p>
          </table:table-cell>
          <table:table-cell table:style-name="ce1" table:formula="of:=-68 - ([.E541]^2/Ao)" office:value-type="float" office:value="-71.1569653567538" calcext:value-type="float">
            <text:p>-71,1569653567538</text:p>
          </table:table-cell>
          <table:table-cell table:style-name="ce1" table:formula="of:=[.G540]+h" office:value-type="float" office:value="5.38999999999993" calcext:value-type="float">
            <text:p>5,38999999999993</text:p>
          </table:table-cell>
          <table:table-cell table:style-name="ce1" table:formula="of:=[.H540]+ h*[.F541]" office:value-type="float" office:value="68.1030220776249" calcext:value-type="float">
            <text:p>68,10302207762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1]" office:value-type="float" office:value="5.38999999999993" calcext:value-type="float">
            <text:p>5,38999999999993</text:p>
          </table:table-cell>
          <table:table-cell table:style-name="ce1" table:formula="of:=[.H541]" office:value-type="float" office:value="68.1030220776249" calcext:value-type="float">
            <text:p>68,1030220776249</text:p>
          </table:table-cell>
          <table:table-cell table:style-name="ce1" table:formula="of:=-68 - ([.E542]^2/Ao)" office:value-type="float" office:value="-71.092014410737" calcext:value-type="float">
            <text:p>-71,092014410737</text:p>
          </table:table-cell>
          <table:table-cell table:style-name="ce1" table:formula="of:=[.G541]+h" office:value-type="float" office:value="5.39999999999993" calcext:value-type="float">
            <text:p>5,39999999999993</text:p>
          </table:table-cell>
          <table:table-cell table:style-name="ce1" table:formula="of:=[.H541]+ h*[.F542]" office:value-type="float" office:value="67.3921019335175" calcext:value-type="float">
            <text:p>67,39210193351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2]" office:value-type="float" office:value="5.39999999999993" calcext:value-type="float">
            <text:p>5,39999999999993</text:p>
          </table:table-cell>
          <table:table-cell table:style-name="ce1" table:formula="of:=[.H542]" office:value-type="float" office:value="67.3921019335175" calcext:value-type="float">
            <text:p>67,3921019335175</text:p>
          </table:table-cell>
          <table:table-cell table:style-name="ce1" table:formula="of:=-68 - ([.E543]^2/Ao)" office:value-type="float" office:value="-71.0277969353451" calcext:value-type="float">
            <text:p>-71,0277969353451</text:p>
          </table:table-cell>
          <table:table-cell table:style-name="ce1" table:formula="of:=[.G542]+h" office:value-type="float" office:value="5.40999999999993" calcext:value-type="float">
            <text:p>5,40999999999993</text:p>
          </table:table-cell>
          <table:table-cell table:style-name="ce1" table:formula="of:=[.H542]+ h*[.F543]" office:value-type="float" office:value="66.6818239641641" calcext:value-type="float">
            <text:p>66,68182396416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3]" office:value-type="float" office:value="5.40999999999993" calcext:value-type="float">
            <text:p>5,40999999999993</text:p>
          </table:table-cell>
          <table:table-cell table:style-name="ce1" table:formula="of:=[.H543]" office:value-type="float" office:value="66.6818239641641" calcext:value-type="float">
            <text:p>66,6818239641641</text:p>
          </table:table-cell>
          <table:table-cell table:style-name="ce1" table:formula="of:=-68 - ([.E544]^2/Ao)" office:value-type="float" office:value="-70.9643104314585" calcext:value-type="float">
            <text:p>-70,9643104314585</text:p>
          </table:table-cell>
          <table:table-cell table:style-name="ce1" table:formula="of:=[.G543]+h" office:value-type="float" office:value="5.41999999999993" calcext:value-type="float">
            <text:p>5,41999999999993</text:p>
          </table:table-cell>
          <table:table-cell table:style-name="ce1" table:formula="of:=[.H543]+ h*[.F544]" office:value-type="float" office:value="65.9721808598495" calcext:value-type="float">
            <text:p>65,97218085984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4]" office:value-type="float" office:value="5.41999999999993" calcext:value-type="float">
            <text:p>5,41999999999993</text:p>
          </table:table-cell>
          <table:table-cell table:style-name="ce1" table:formula="of:=[.H544]" office:value-type="float" office:value="65.9721808598495" calcext:value-type="float">
            <text:p>65,9721808598495</text:p>
          </table:table-cell>
          <table:table-cell table:style-name="ce1" table:formula="of:=-68 - ([.E545]^2/Ao)" office:value-type="float" office:value="-70.9015524316031" calcext:value-type="float">
            <text:p>-70,9015524316031</text:p>
          </table:table-cell>
          <table:table-cell table:style-name="ce1" table:formula="of:=[.G544]+h" office:value-type="float" office:value="5.42999999999993" calcext:value-type="float">
            <text:p>5,42999999999993</text:p>
          </table:table-cell>
          <table:table-cell table:style-name="ce1" table:formula="of:=[.H544]+ h*[.F545]" office:value-type="float" office:value="65.2631653355335" calcext:value-type="float">
            <text:p>65,26316533553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5]" office:value-type="float" office:value="5.42999999999993" calcext:value-type="float">
            <text:p>5,42999999999993</text:p>
          </table:table-cell>
          <table:table-cell table:style-name="ce1" table:formula="of:=[.H545]" office:value-type="float" office:value="65.2631653355335" calcext:value-type="float">
            <text:p>65,2631653355335</text:p>
          </table:table-cell>
          <table:table-cell table:style-name="ce1" table:formula="of:=-68 - ([.E546]^2/Ao)" office:value-type="float" office:value="-70.8395204997421" calcext:value-type="float">
            <text:p>-70,8395204997421</text:p>
          </table:table-cell>
          <table:table-cell table:style-name="ce1" table:formula="of:=[.G545]+h" office:value-type="float" office:value="5.43999999999993" calcext:value-type="float">
            <text:p>5,43999999999993</text:p>
          </table:table-cell>
          <table:table-cell table:style-name="ce1" table:formula="of:=[.H545]+ h*[.F546]" office:value-type="float" office:value="64.5547701305361" calcext:value-type="float">
            <text:p>64,55477013053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6]" office:value-type="float" office:value="5.43999999999993" calcext:value-type="float">
            <text:p>5,43999999999993</text:p>
          </table:table-cell>
          <table:table-cell table:style-name="ce1" table:formula="of:=[.H546]" office:value-type="float" office:value="64.5547701305361" calcext:value-type="float">
            <text:p>64,5547701305361</text:p>
          </table:table-cell>
          <table:table-cell table:style-name="ce1" table:formula="of:=-68 - ([.E547]^2/Ao)" office:value-type="float" office:value="-70.7782122310709" calcext:value-type="float">
            <text:p>-70,7782122310709</text:p>
          </table:table-cell>
          <table:table-cell table:style-name="ce1" table:formula="of:=[.G546]+h" office:value-type="float" office:value="5.44999999999993" calcext:value-type="float">
            <text:p>5,44999999999993</text:p>
          </table:table-cell>
          <table:table-cell table:style-name="ce1" table:formula="of:=[.H546]+ h*[.F547]" office:value-type="float" office:value="63.8469880082253" calcext:value-type="float">
            <text:p>63,84698800822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7]" office:value-type="float" office:value="5.44999999999993" calcext:value-type="float">
            <text:p>5,44999999999993</text:p>
          </table:table-cell>
          <table:table-cell table:style-name="ce1" table:formula="of:=[.H547]" office:value-type="float" office:value="63.8469880082253" calcext:value-type="float">
            <text:p>63,8469880082253</text:p>
          </table:table-cell>
          <table:table-cell table:style-name="ce1" table:formula="of:=-68 - ([.E548]^2/Ao)" office:value-type="float" office:value="-70.717625251815" calcext:value-type="float">
            <text:p>-70,717625251815</text:p>
          </table:table-cell>
          <table:table-cell table:style-name="ce1" table:formula="of:=[.G547]+h" office:value-type="float" office:value="5.45999999999993" calcext:value-type="float">
            <text:p>5,45999999999993</text:p>
          </table:table-cell>
          <table:table-cell table:style-name="ce1" table:formula="of:=[.H547]+ h*[.F548]" office:value-type="float" office:value="63.1398117557072" calcext:value-type="float">
            <text:p>63,13981175570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8]" office:value-type="float" office:value="5.45999999999993" calcext:value-type="float">
            <text:p>5,45999999999993</text:p>
          </table:table-cell>
          <table:table-cell table:style-name="ce1" table:formula="of:=[.H548]" office:value-type="float" office:value="63.1398117557072" calcext:value-type="float">
            <text:p>63,1398117557072</text:p>
          </table:table-cell>
          <table:table-cell table:style-name="ce1" table:formula="of:=-68 - ([.E549]^2/Ao)" office:value-type="float" office:value="-70.6577572190308" calcext:value-type="float">
            <text:p>-70,6577572190308</text:p>
          </table:table-cell>
          <table:table-cell table:style-name="ce1" table:formula="of:=[.G548]+h" office:value-type="float" office:value="5.46999999999993" calcext:value-type="float">
            <text:p>5,46999999999993</text:p>
          </table:table-cell>
          <table:table-cell table:style-name="ce1" table:formula="of:=[.H548]+ h*[.F549]" office:value-type="float" office:value="62.4332341835169" calcext:value-type="float">
            <text:p>62,43323418351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9]" office:value-type="float" office:value="5.46999999999993" calcext:value-type="float">
            <text:p>5,46999999999993</text:p>
          </table:table-cell>
          <table:table-cell table:style-name="ce1" table:formula="of:=[.H549]" office:value-type="float" office:value="62.4332341835169" calcext:value-type="float">
            <text:p>62,4332341835169</text:p>
          </table:table-cell>
          <table:table-cell table:style-name="ce1" table:formula="of:=-68 - ([.E550]^2/Ao)" office:value-type="float" office:value="-70.5986058204093" calcext:value-type="float">
            <text:p>-70,5986058204093</text:p>
          </table:table-cell>
          <table:table-cell table:style-name="ce1" table:formula="of:=[.G549]+h" office:value-type="float" office:value="5.47999999999993" calcext:value-type="float">
            <text:p>5,47999999999993</text:p>
          </table:table-cell>
          <table:table-cell table:style-name="ce1" table:formula="of:=[.H549]+ h*[.F550]" office:value-type="float" office:value="61.7272481253128" calcext:value-type="float">
            <text:p>61,72724812531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0]" office:value-type="float" office:value="5.47999999999993" calcext:value-type="float">
            <text:p>5,47999999999993</text:p>
          </table:table-cell>
          <table:table-cell table:style-name="ce1" table:formula="of:=[.H550]" office:value-type="float" office:value="61.7272481253128" calcext:value-type="float">
            <text:p>61,7272481253128</text:p>
          </table:table-cell>
          <table:table-cell table:style-name="ce1" table:formula="of:=-68 - ([.E551]^2/Ao)" office:value-type="float" office:value="-70.5401687740826" calcext:value-type="float">
            <text:p>-70,5401687740826</text:p>
          </table:table-cell>
          <table:table-cell table:style-name="ce1" table:formula="of:=[.G550]+h" office:value-type="float" office:value="5.48999999999993" calcext:value-type="float">
            <text:p>5,48999999999993</text:p>
          </table:table-cell>
          <table:table-cell table:style-name="ce1" table:formula="of:=[.H550]+ h*[.F551]" office:value-type="float" office:value="61.021846437572" calcext:value-type="float">
            <text:p>61,0218464375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1]" office:value-type="float" office:value="5.48999999999993" calcext:value-type="float">
            <text:p>5,48999999999993</text:p>
          </table:table-cell>
          <table:table-cell table:style-name="ce1" table:formula="of:=[.H551]" office:value-type="float" office:value="61.021846437572" calcext:value-type="float">
            <text:p>61,021846437572</text:p>
          </table:table-cell>
          <table:table-cell table:style-name="ce1" table:formula="of:=-68 - ([.E552]^2/Ao)" office:value-type="float" office:value="-70.4824438284337" calcext:value-type="float">
            <text:p>-70,4824438284337</text:p>
          </table:table-cell>
          <table:table-cell table:style-name="ce1" table:formula="of:=[.G551]+h" office:value-type="float" office:value="5.49999999999993" calcext:value-type="float">
            <text:p>5,49999999999993</text:p>
          </table:table-cell>
          <table:table-cell table:style-name="ce1" table:formula="of:=[.H551]+ h*[.F552]" office:value-type="float" office:value="60.3170219992876" calcext:value-type="float">
            <text:p>60,31702199928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2]" office:value-type="float" office:value="5.49999999999993" calcext:value-type="float">
            <text:p>5,49999999999993</text:p>
          </table:table-cell>
          <table:table-cell table:style-name="ce1" table:formula="of:=[.H552]" office:value-type="float" office:value="60.3170219992876" calcext:value-type="float">
            <text:p>60,3170219992876</text:p>
          </table:table-cell>
          <table:table-cell table:style-name="ce1" table:formula="of:=-68 - ([.E553]^2/Ao)" office:value-type="float" office:value="-70.4254287619084" calcext:value-type="float">
            <text:p>-70,4254287619084</text:p>
          </table:table-cell>
          <table:table-cell table:style-name="ce1" table:formula="of:=[.G552]+h" office:value-type="float" office:value="5.50999999999993" calcext:value-type="float">
            <text:p>5,50999999999993</text:p>
          </table:table-cell>
          <table:table-cell table:style-name="ce1" table:formula="of:=[.H552]+ h*[.F553]" office:value-type="float" office:value="59.6127677116685" calcext:value-type="float">
            <text:p>59,61276771166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3]" office:value-type="float" office:value="5.50999999999993" calcext:value-type="float">
            <text:p>5,50999999999993</text:p>
          </table:table-cell>
          <table:table-cell table:style-name="ce1" table:formula="of:=[.H553]" office:value-type="float" office:value="59.6127677116685" calcext:value-type="float">
            <text:p>59,6127677116685</text:p>
          </table:table-cell>
          <table:table-cell table:style-name="ce1" table:formula="of:=-68 - ([.E554]^2/Ao)" office:value-type="float" office:value="-70.3691213828302" calcext:value-type="float">
            <text:p>-70,3691213828302</text:p>
          </table:table-cell>
          <table:table-cell table:style-name="ce1" table:formula="of:=[.G553]+h" office:value-type="float" office:value="5.51999999999993" calcext:value-type="float">
            <text:p>5,51999999999993</text:p>
          </table:table-cell>
          <table:table-cell table:style-name="ce1" table:formula="of:=[.H553]+ h*[.F554]" office:value-type="float" office:value="58.9090764978402" calcext:value-type="float">
            <text:p>58,90907649784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4]" office:value-type="float" office:value="5.51999999999993" calcext:value-type="float">
            <text:p>5,51999999999993</text:p>
          </table:table-cell>
          <table:table-cell table:style-name="ce1" table:formula="of:=[.H554]" office:value-type="float" office:value="58.9090764978402" calcext:value-type="float">
            <text:p>58,9090764978402</text:p>
          </table:table-cell>
          <table:table-cell table:style-name="ce1" table:formula="of:=-68 - ([.E555]^2/Ao)" office:value-type="float" office:value="-70.3135195292189" calcext:value-type="float">
            <text:p>-70,3135195292189</text:p>
          </table:table-cell>
          <table:table-cell table:style-name="ce1" table:formula="of:=[.G554]+h" office:value-type="float" office:value="5.52999999999993" calcext:value-type="float">
            <text:p>5,52999999999993</text:p>
          </table:table-cell>
          <table:table-cell table:style-name="ce1" table:formula="of:=[.H554]+ h*[.F555]" office:value-type="float" office:value="58.2059413025481" calcext:value-type="float">
            <text:p>58,20594130254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5]" office:value-type="float" office:value="5.52999999999993" calcext:value-type="float">
            <text:p>5,52999999999993</text:p>
          </table:table-cell>
          <table:table-cell table:style-name="ce1" table:formula="of:=[.H555]" office:value-type="float" office:value="58.2059413025481" calcext:value-type="float">
            <text:p>58,2059413025481</text:p>
          </table:table-cell>
          <table:table-cell table:style-name="ce1" table:formula="of:=-68 - ([.E556]^2/Ao)" office:value-type="float" office:value="-70.2586210686105" calcext:value-type="float">
            <text:p>-70,2586210686105</text:p>
          </table:table-cell>
          <table:table-cell table:style-name="ce1" table:formula="of:=[.G555]+h" office:value-type="float" office:value="5.53999999999993" calcext:value-type="float">
            <text:p>5,53999999999993</text:p>
          </table:table-cell>
          <table:table-cell table:style-name="ce1" table:formula="of:=[.H555]+ h*[.F556]" office:value-type="float" office:value="57.503355091862" calcext:value-type="float">
            <text:p>57,5033550918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6]" office:value-type="float" office:value="5.53999999999993" calcext:value-type="float">
            <text:p>5,53999999999993</text:p>
          </table:table-cell>
          <table:table-cell table:style-name="ce1" table:formula="of:=[.H556]" office:value-type="float" office:value="57.503355091862" calcext:value-type="float">
            <text:p>57,503355091862</text:p>
          </table:table-cell>
          <table:table-cell table:style-name="ce1" table:formula="of:=-68 - ([.E557]^2/Ao)" office:value-type="float" office:value="-70.2044238978805" calcext:value-type="float">
            <text:p>-70,2044238978805</text:p>
          </table:table-cell>
          <table:table-cell table:style-name="ce1" table:formula="of:=[.G556]+h" office:value-type="float" office:value="5.54999999999993" calcext:value-type="float">
            <text:p>5,54999999999993</text:p>
          </table:table-cell>
          <table:table-cell table:style-name="ce1" table:formula="of:=[.H556]+ h*[.F557]" office:value-type="float" office:value="56.8013108528831" calcext:value-type="float">
            <text:p>56,80131085288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7]" office:value-type="float" office:value="5.54999999999993" calcext:value-type="float">
            <text:p>5,54999999999993</text:p>
          </table:table-cell>
          <table:table-cell table:style-name="ce1" table:formula="of:=[.H557]" office:value-type="float" office:value="56.8013108528831" calcext:value-type="float">
            <text:p>56,8013108528831</text:p>
          </table:table-cell>
          <table:table-cell table:style-name="ce1" table:formula="of:=-68 - ([.E558]^2/Ao)" office:value-type="float" office:value="-70.1509259430706" calcext:value-type="float">
            <text:p>-70,1509259430706</text:p>
          </table:table-cell>
          <table:table-cell table:style-name="ce1" table:formula="of:=[.G557]+h" office:value-type="float" office:value="5.55999999999993" calcext:value-type="float">
            <text:p>5,55999999999993</text:p>
          </table:table-cell>
          <table:table-cell table:style-name="ce1" table:formula="of:=[.H557]+ h*[.F558]" office:value-type="float" office:value="56.0998015934524" calcext:value-type="float">
            <text:p>56,09980159345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8]" office:value-type="float" office:value="5.55999999999993" calcext:value-type="float">
            <text:p>5,55999999999993</text:p>
          </table:table-cell>
          <table:table-cell table:style-name="ce1" table:formula="of:=[.H558]" office:value-type="float" office:value="56.0998015934524" calcext:value-type="float">
            <text:p>56,0998015934524</text:p>
          </table:table-cell>
          <table:table-cell table:style-name="ce1" table:formula="of:=-68 - ([.E559]^2/Ao)" office:value-type="float" office:value="-70.0981251592165" calcext:value-type="float">
            <text:p>-70,0981251592165</text:p>
          </table:table-cell>
          <table:table-cell table:style-name="ce1" table:formula="of:=[.G558]+h" office:value-type="float" office:value="5.56999999999993" calcext:value-type="float">
            <text:p>5,56999999999993</text:p>
          </table:table-cell>
          <table:table-cell table:style-name="ce1" table:formula="of:=[.H558]+ h*[.F559]" office:value-type="float" office:value="55.3988203418603" calcext:value-type="float">
            <text:p>55,39882034186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9]" office:value-type="float" office:value="5.56999999999993" calcext:value-type="float">
            <text:p>5,56999999999993</text:p>
          </table:table-cell>
          <table:table-cell table:style-name="ce1" table:formula="of:=[.H559]" office:value-type="float" office:value="55.3988203418603" calcext:value-type="float">
            <text:p>55,3988203418603</text:p>
          </table:table-cell>
          <table:table-cell table:style-name="ce1" table:formula="of:=-68 - ([.E560]^2/Ao)" office:value-type="float" office:value="-70.0460195301798" calcext:value-type="float">
            <text:p>-70,0460195301798</text:p>
          </table:table-cell>
          <table:table-cell table:style-name="ce1" table:formula="of:=[.G559]+h" office:value-type="float" office:value="5.57999999999993" calcext:value-type="float">
            <text:p>5,57999999999993</text:p>
          </table:table-cell>
          <table:table-cell table:style-name="ce1" table:formula="of:=[.H559]+ h*[.F560]" office:value-type="float" office:value="54.6983601465585" calcext:value-type="float">
            <text:p>54,69836014655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0]" office:value-type="float" office:value="5.57999999999993" calcext:value-type="float">
            <text:p>5,57999999999993</text:p>
          </table:table-cell>
          <table:table-cell table:style-name="ce1" table:formula="of:=[.H560]" office:value-type="float" office:value="54.6983601465585" calcext:value-type="float">
            <text:p>54,6983601465585</text:p>
          </table:table-cell>
          <table:table-cell table:style-name="ce1" table:formula="of:=-68 - ([.E561]^2/Ao)" office:value-type="float" office:value="-69.9946070684817" calcext:value-type="float">
            <text:p>-69,9946070684817</text:p>
          </table:table-cell>
          <table:table-cell table:style-name="ce1" table:formula="of:=[.G560]+h" office:value-type="float" office:value="5.58999999999993" calcext:value-type="float">
            <text:p>5,58999999999993</text:p>
          </table:table-cell>
          <table:table-cell table:style-name="ce1" table:formula="of:=[.H560]+ h*[.F561]" office:value-type="float" office:value="53.9984140758737" calcext:value-type="float">
            <text:p>53,99841407587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1]" office:value-type="float" office:value="5.58999999999993" calcext:value-type="float">
            <text:p>5,58999999999993</text:p>
          </table:table-cell>
          <table:table-cell table:style-name="ce1" table:formula="of:=[.H561]" office:value-type="float" office:value="53.9984140758737" calcext:value-type="float">
            <text:p>53,9984140758737</text:p>
          </table:table-cell>
          <table:table-cell table:style-name="ce1" table:formula="of:=-68 - ([.E562]^2/Ao)" office:value-type="float" office:value="-69.9438858151397" calcext:value-type="float">
            <text:p>-69,9438858151397</text:p>
          </table:table-cell>
          <table:table-cell table:style-name="ce1" table:formula="of:=[.G561]+h" office:value-type="float" office:value="5.59999999999993" calcext:value-type="float">
            <text:p>5,59999999999993</text:p>
          </table:table-cell>
          <table:table-cell table:style-name="ce1" table:formula="of:=[.H561]+ h*[.F562]" office:value-type="float" office:value="53.2989752177223" calcext:value-type="float">
            <text:p>53,29897521772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2]" office:value-type="float" office:value="5.59999999999993" calcext:value-type="float">
            <text:p>5,59999999999993</text:p>
          </table:table-cell>
          <table:table-cell table:style-name="ce1" table:formula="of:=[.H562]" office:value-type="float" office:value="53.2989752177223" calcext:value-type="float">
            <text:p>53,2989752177223</text:p>
          </table:table-cell>
          <table:table-cell table:style-name="ce1" table:formula="of:=-68 - ([.E563]^2/Ao)" office:value-type="float" office:value="-69.8938538395063" calcext:value-type="float">
            <text:p>-69,8938538395063</text:p>
          </table:table-cell>
          <table:table-cell table:style-name="ce1" table:formula="of:=[.G562]+h" office:value-type="float" office:value="5.60999999999993" calcext:value-type="float">
            <text:p>5,60999999999993</text:p>
          </table:table-cell>
          <table:table-cell table:style-name="ce1" table:formula="of:=[.H562]+ h*[.F563]" office:value-type="float" office:value="52.6000366793272" calcext:value-type="float">
            <text:p>52,60003667932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3]" office:value-type="float" office:value="5.60999999999993" calcext:value-type="float">
            <text:p>5,60999999999993</text:p>
          </table:table-cell>
          <table:table-cell table:style-name="ce1" table:formula="of:=[.H563]" office:value-type="float" office:value="52.6000366793272" calcext:value-type="float">
            <text:p>52,6000366793272</text:p>
          </table:table-cell>
          <table:table-cell table:style-name="ce1" table:formula="of:=-68 - ([.E564]^2/Ao)" office:value-type="float" office:value="-69.8445092391111" calcext:value-type="float">
            <text:p>-69,8445092391111</text:p>
          </table:table-cell>
          <table:table-cell table:style-name="ce1" table:formula="of:=[.G563]+h" office:value-type="float" office:value="5.61999999999993" calcext:value-type="float">
            <text:p>5,61999999999993</text:p>
          </table:table-cell>
          <table:table-cell table:style-name="ce1" table:formula="of:=[.H563]+ h*[.F564]" office:value-type="float" office:value="51.9015915869361" calcext:value-type="float">
            <text:p>51,90159158693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4]" office:value-type="float" office:value="5.61999999999993" calcext:value-type="float">
            <text:p>5,61999999999993</text:p>
          </table:table-cell>
          <table:table-cell table:style-name="ce1" table:formula="of:=[.H564]" office:value-type="float" office:value="51.9015915869361" calcext:value-type="float">
            <text:p>51,9015915869361</text:p>
          </table:table-cell>
          <table:table-cell table:style-name="ce1" table:formula="of:=-68 - ([.E565]^2/Ao)" office:value-type="float" office:value="-69.7958501395047" calcext:value-type="float">
            <text:p>-69,7958501395047</text:p>
          </table:table-cell>
          <table:table-cell table:style-name="ce1" table:formula="of:=[.G564]+h" office:value-type="float" office:value="5.62999999999992" calcext:value-type="float">
            <text:p>5,62999999999992</text:p>
          </table:table-cell>
          <table:table-cell table:style-name="ce1" table:formula="of:=[.H564]+ h*[.F565]" office:value-type="float" office:value="51.203633085541" calcext:value-type="float">
            <text:p>51,2036330855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5]" office:value-type="float" office:value="5.62999999999992" calcext:value-type="float">
            <text:p>5,62999999999992</text:p>
          </table:table-cell>
          <table:table-cell table:style-name="ce1" table:formula="of:=[.H565]" office:value-type="float" office:value="51.203633085541" calcext:value-type="float">
            <text:p>51,203633085541</text:p>
          </table:table-cell>
          <table:table-cell table:style-name="ce1" table:formula="of:=-68 - ([.E566]^2/Ao)" office:value-type="float" office:value="-69.7478746941058" calcext:value-type="float">
            <text:p>-69,7478746941058</text:p>
          </table:table-cell>
          <table:table-cell table:style-name="ce1" table:formula="of:=[.G565]+h" office:value-type="float" office:value="5.63999999999992" calcext:value-type="float">
            <text:p>5,63999999999992</text:p>
          </table:table-cell>
          <table:table-cell table:style-name="ce1" table:formula="of:=[.H565]+ h*[.F566]" office:value-type="float" office:value="50.5061543386" calcext:value-type="float">
            <text:p>50,50615433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6]" office:value-type="float" office:value="5.63999999999992" calcext:value-type="float">
            <text:p>5,63999999999992</text:p>
          </table:table-cell>
          <table:table-cell table:style-name="ce1" table:formula="of:=[.H566]" office:value-type="float" office:value="50.5061543386" calcext:value-type="float">
            <text:p>50,5061543386</text:p>
          </table:table-cell>
          <table:table-cell table:style-name="ce1" table:formula="of:=-68 - ([.E567]^2/Ao)" office:value-type="float" office:value="-69.7005810840497" calcext:value-type="float">
            <text:p>-69,7005810840497</text:p>
          </table:table-cell>
          <table:table-cell table:style-name="ce1" table:formula="of:=[.G566]+h" office:value-type="float" office:value="5.64999999999992" calcext:value-type="float">
            <text:p>5,64999999999992</text:p>
          </table:table-cell>
          <table:table-cell table:style-name="ce1" table:formula="of:=[.H566]+ h*[.F567]" office:value-type="float" office:value="49.8091485277595" calcext:value-type="float">
            <text:p>49,80914852775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7]" office:value-type="float" office:value="5.64999999999992" calcext:value-type="float">
            <text:p>5,64999999999992</text:p>
          </table:table-cell>
          <table:table-cell table:style-name="ce1" table:formula="of:=[.H567]" office:value-type="float" office:value="49.8091485277595" calcext:value-type="float">
            <text:p>49,8091485277595</text:p>
          </table:table-cell>
          <table:table-cell table:style-name="ce1" table:formula="of:=-68 - ([.E568]^2/Ao)" office:value-type="float" office:value="-69.6539675180403" calcext:value-type="float">
            <text:p>-69,6539675180403</text:p>
          </table:table-cell>
          <table:table-cell table:style-name="ce1" table:formula="of:=[.G567]+h" office:value-type="float" office:value="5.65999999999992" calcext:value-type="float">
            <text:p>5,65999999999992</text:p>
          </table:table-cell>
          <table:table-cell table:style-name="ce1" table:formula="of:=[.H567]+ h*[.F568]" office:value-type="float" office:value="49.1126088525791" calcext:value-type="float">
            <text:p>49,11260885257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8]" office:value-type="float" office:value="5.65999999999992" calcext:value-type="float">
            <text:p>5,65999999999992</text:p>
          </table:table-cell>
          <table:table-cell table:style-name="ce1" table:formula="of:=[.H568]" office:value-type="float" office:value="49.1126088525791" calcext:value-type="float">
            <text:p>49,1126088525791</text:p>
          </table:table-cell>
          <table:table-cell table:style-name="ce1" table:formula="of:=-68 - ([.E569]^2/Ao)" office:value-type="float" office:value="-69.6080322322043" calcext:value-type="float">
            <text:p>-69,6080322322043</text:p>
          </table:table-cell>
          <table:table-cell table:style-name="ce1" table:formula="of:=[.G568]+h" office:value-type="float" office:value="5.66999999999992" calcext:value-type="float">
            <text:p>5,66999999999992</text:p>
          </table:table-cell>
          <table:table-cell table:style-name="ce1" table:formula="of:=[.H568]+ h*[.F569]" office:value-type="float" office:value="48.416528530257" calcext:value-type="float">
            <text:p>48,4165285302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9]" office:value-type="float" office:value="5.66999999999992" calcext:value-type="float">
            <text:p>5,66999999999992</text:p>
          </table:table-cell>
          <table:table-cell table:style-name="ce1" table:formula="of:=[.H569]" office:value-type="float" office:value="48.416528530257" calcext:value-type="float">
            <text:p>48,416528530257</text:p>
          </table:table-cell>
          <table:table-cell table:style-name="ce1" table:formula="of:=-68 - ([.E570]^2/Ao)" office:value-type="float" office:value="-69.5627734899475" calcext:value-type="float">
            <text:p>-69,5627734899475</text:p>
          </table:table-cell>
          <table:table-cell table:style-name="ce1" table:formula="of:=[.G569]+h" office:value-type="float" office:value="5.67999999999992" calcext:value-type="float">
            <text:p>5,67999999999992</text:p>
          </table:table-cell>
          <table:table-cell table:style-name="ce1" table:formula="of:=[.H569]+ h*[.F570]" office:value-type="float" office:value="47.7209007953576" calcext:value-type="float">
            <text:p>47,72090079535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0]" office:value-type="float" office:value="5.67999999999992" calcext:value-type="float">
            <text:p>5,67999999999992</text:p>
          </table:table-cell>
          <table:table-cell table:style-name="ce1" table:formula="of:=[.H570]" office:value-type="float" office:value="47.7209007953576" calcext:value-type="float">
            <text:p>47,7209007953576</text:p>
          </table:table-cell>
          <table:table-cell table:style-name="ce1" table:formula="of:=-68 - ([.E571]^2/Ao)" office:value-type="float" office:value="-69.5181895818136" calcext:value-type="float">
            <text:p>-69,5181895818136</text:p>
          </table:table-cell>
          <table:table-cell table:style-name="ce1" table:formula="of:=[.G570]+h" office:value-type="float" office:value="5.68999999999992" calcext:value-type="float">
            <text:p>5,68999999999992</text:p>
          </table:table-cell>
          <table:table-cell table:style-name="ce1" table:formula="of:=[.H570]+ h*[.F571]" office:value-type="float" office:value="47.0257188995394" calcext:value-type="float">
            <text:p>47,02571889953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1]" office:value-type="float" office:value="5.68999999999992" calcext:value-type="float">
            <text:p>5,68999999999992</text:p>
          </table:table-cell>
          <table:table-cell table:style-name="ce1" table:formula="of:=[.H571]" office:value-type="float" office:value="47.0257188995394" calcext:value-type="float">
            <text:p>47,0257188995394</text:p>
          </table:table-cell>
          <table:table-cell table:style-name="ce1" table:formula="of:=-68 - ([.E572]^2/Ao)" office:value-type="float" office:value="-69.4742788253457" calcext:value-type="float">
            <text:p>-69,4742788253457</text:p>
          </table:table-cell>
          <table:table-cell table:style-name="ce1" table:formula="of:=[.G571]+h" office:value-type="float" office:value="5.69999999999992" calcext:value-type="float">
            <text:p>5,69999999999992</text:p>
          </table:table-cell>
          <table:table-cell table:style-name="ce1" table:formula="of:=[.H571]+ h*[.F572]" office:value-type="float" office:value="46.330976111286" calcext:value-type="float">
            <text:p>46,3309761112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2]" office:value-type="float" office:value="5.69999999999992" calcext:value-type="float">
            <text:p>5,69999999999992</text:p>
          </table:table-cell>
          <table:table-cell table:style-name="ce1" table:formula="of:=[.H572]" office:value-type="float" office:value="46.330976111286" calcext:value-type="float">
            <text:p>46,330976111286</text:p>
          </table:table-cell>
          <table:table-cell table:style-name="ce1" table:formula="of:=-68 - ([.E573]^2/Ao)" office:value-type="float" office:value="-69.4310395649497" calcext:value-type="float">
            <text:p>-69,4310395649497</text:p>
          </table:table-cell>
          <table:table-cell table:style-name="ce1" table:formula="of:=[.G572]+h" office:value-type="float" office:value="5.70999999999992" calcext:value-type="float">
            <text:p>5,70999999999992</text:p>
          </table:table-cell>
          <table:table-cell table:style-name="ce1" table:formula="of:=[.H572]+ h*[.F573]" office:value-type="float" office:value="45.6366657156365" calcext:value-type="float">
            <text:p>45,63666571563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3]" office:value-type="float" office:value="5.70999999999992" calcext:value-type="float">
            <text:p>5,70999999999992</text:p>
          </table:table-cell>
          <table:table-cell table:style-name="ce1" table:formula="of:=[.H573]" office:value-type="float" office:value="45.6366657156365" calcext:value-type="float">
            <text:p>45,6366657156365</text:p>
          </table:table-cell>
          <table:table-cell table:style-name="ce1" table:formula="of:=-68 - ([.E574]^2/Ao)" office:value-type="float" office:value="-69.3884701717605" calcext:value-type="float">
            <text:p>-69,3884701717605</text:p>
          </table:table-cell>
          <table:table-cell table:style-name="ce1" table:formula="of:=[.G573]+h" office:value-type="float" office:value="5.71999999999992" calcext:value-type="float">
            <text:p>5,71999999999992</text:p>
          </table:table-cell>
          <table:table-cell table:style-name="ce1" table:formula="of:=[.H573]+ h*[.F574]" office:value-type="float" office:value="44.9427810139189" calcext:value-type="float">
            <text:p>44,94278101391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4]" office:value-type="float" office:value="5.71999999999992" calcext:value-type="float">
            <text:p>5,71999999999992</text:p>
          </table:table-cell>
          <table:table-cell table:style-name="ce1" table:formula="of:=[.H574]" office:value-type="float" office:value="44.9427810139189" calcext:value-type="float">
            <text:p>44,9427810139189</text:p>
          </table:table-cell>
          <table:table-cell table:style-name="ce1" table:formula="of:=-68 - ([.E575]^2/Ao)" office:value-type="float" office:value="-69.34656904351" calcext:value-type="float">
            <text:p>-69,34656904351</text:p>
          </table:table-cell>
          <table:table-cell table:style-name="ce1" table:formula="of:=[.G574]+h" office:value-type="float" office:value="5.72999999999992" calcext:value-type="float">
            <text:p>5,72999999999992</text:p>
          </table:table-cell>
          <table:table-cell table:style-name="ce1" table:formula="of:=[.H574]+ h*[.F575]" office:value-type="float" office:value="44.2493153234838" calcext:value-type="float">
            <text:p>44,24931532348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5]" office:value-type="float" office:value="5.72999999999992" calcext:value-type="float">
            <text:p>5,72999999999992</text:p>
          </table:table-cell>
          <table:table-cell table:style-name="ce1" table:formula="of:=[.H575]" office:value-type="float" office:value="44.2493153234838" calcext:value-type="float">
            <text:p>44,2493153234838</text:p>
          </table:table-cell>
          <table:table-cell table:style-name="ce1" table:formula="of:=-68 - ([.E576]^2/Ao)" office:value-type="float" office:value="-69.3053346043981" calcext:value-type="float">
            <text:p>-69,3053346043981</text:p>
          </table:table-cell>
          <table:table-cell table:style-name="ce1" table:formula="of:=[.G575]+h" office:value-type="float" office:value="5.73999999999992" calcext:value-type="float">
            <text:p>5,73999999999992</text:p>
          </table:table-cell>
          <table:table-cell table:style-name="ce1" table:formula="of:=[.H575]+ h*[.F576]" office:value-type="float" office:value="43.5562619774398" calcext:value-type="float">
            <text:p>43,55626197743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6]" office:value-type="float" office:value="5.73999999999992" calcext:value-type="float">
            <text:p>5,73999999999992</text:p>
          </table:table-cell>
          <table:table-cell table:style-name="ce1" table:formula="of:=[.H576]" office:value-type="float" office:value="43.5562619774398" calcext:value-type="float">
            <text:p>43,5562619774398</text:p>
          </table:table-cell>
          <table:table-cell table:style-name="ce1" table:formula="of:=-68 - ([.E577]^2/Ao)" office:value-type="float" office:value="-69.2647653049649" calcext:value-type="float">
            <text:p>-69,2647653049649</text:p>
          </table:table-cell>
          <table:table-cell table:style-name="ce1" table:formula="of:=[.G576]+h" office:value-type="float" office:value="5.74999999999992" calcext:value-type="float">
            <text:p>5,74999999999992</text:p>
          </table:table-cell>
          <table:table-cell table:style-name="ce1" table:formula="of:=[.H576]+ h*[.F577]" office:value-type="float" office:value="42.8636143243901" calcext:value-type="float">
            <text:p>42,86361432439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7]" office:value-type="float" office:value="5.74999999999992" calcext:value-type="float">
            <text:p>5,74999999999992</text:p>
          </table:table-cell>
          <table:table-cell table:style-name="ce1" table:formula="of:=[.H577]" office:value-type="float" office:value="42.8636143243901" calcext:value-type="float">
            <text:p>42,8636143243901</text:p>
          </table:table-cell>
          <table:table-cell table:style-name="ce1" table:formula="of:=-68 - ([.E578]^2/Ao)" office:value-type="float" office:value="-69.2248596219667" calcext:value-type="float">
            <text:p>-69,2248596219667</text:p>
          </table:table-cell>
          <table:table-cell table:style-name="ce1" table:formula="of:=[.G577]+h" office:value-type="float" office:value="5.75999999999992" calcext:value-type="float">
            <text:p>5,75999999999992</text:p>
          </table:table-cell>
          <table:table-cell table:style-name="ce1" table:formula="of:=[.H577]+ h*[.F578]" office:value-type="float" office:value="42.1713657281705" calcext:value-type="float">
            <text:p>42,17136572817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8]" office:value-type="float" office:value="5.75999999999992" calcext:value-type="float">
            <text:p>5,75999999999992</text:p>
          </table:table-cell>
          <table:table-cell table:style-name="ce1" table:formula="of:=[.H578]" office:value-type="float" office:value="42.1713657281705" calcext:value-type="float">
            <text:p>42,1713657281705</text:p>
          </table:table-cell>
          <table:table-cell table:style-name="ce1" table:formula="of:=-68 - ([.E579]^2/Ao)" office:value-type="float" office:value="-69.1856160582527" calcext:value-type="float">
            <text:p>-69,1856160582527</text:p>
          </table:table-cell>
          <table:table-cell table:style-name="ce1" table:formula="of:=[.G578]+h" office:value-type="float" office:value="5.76999999999992" calcext:value-type="float">
            <text:p>5,76999999999992</text:p>
          </table:table-cell>
          <table:table-cell table:style-name="ce1" table:formula="of:=[.H578]+ h*[.F579]" office:value-type="float" office:value="41.4795095675879" calcext:value-type="float">
            <text:p>41,47950956758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9]" office:value-type="float" office:value="5.76999999999992" calcext:value-type="float">
            <text:p>5,76999999999992</text:p>
          </table:table-cell>
          <table:table-cell table:style-name="ce1" table:formula="of:=[.H579]" office:value-type="float" office:value="41.4795095675879" calcext:value-type="float">
            <text:p>41,4795095675879</text:p>
          </table:table-cell>
          <table:table-cell table:style-name="ce1" table:formula="of:=-68 - ([.E580]^2/Ao)" office:value-type="float" office:value="-69.1470331426451" calcext:value-type="float">
            <text:p>-69,1470331426451</text:p>
          </table:table-cell>
          <table:table-cell table:style-name="ce1" table:formula="of:=[.G579]+h" office:value-type="float" office:value="5.77999999999992" calcext:value-type="float">
            <text:p>5,77999999999992</text:p>
          </table:table-cell>
          <table:table-cell table:style-name="ce1" table:formula="of:=[.H579]+ h*[.F580]" office:value-type="float" office:value="40.7880392361615" calcext:value-type="float">
            <text:p>40,78803923616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0]" office:value-type="float" office:value="5.77999999999992" calcext:value-type="float">
            <text:p>5,77999999999992</text:p>
          </table:table-cell>
          <table:table-cell table:style-name="ce1" table:formula="of:=[.H580]" office:value-type="float" office:value="40.7880392361615" calcext:value-type="float">
            <text:p>40,7880392361615</text:p>
          </table:table-cell>
          <table:table-cell table:style-name="ce1" table:formula="of:=-68 - ([.E581]^2/Ao)" office:value-type="float" office:value="-69.1091094298204" calcext:value-type="float">
            <text:p>-69,1091094298204</text:p>
          </table:table-cell>
          <table:table-cell table:style-name="ce1" table:formula="of:=[.G580]+h" office:value-type="float" office:value="5.78999999999992" calcext:value-type="float">
            <text:p>5,78999999999992</text:p>
          </table:table-cell>
          <table:table-cell table:style-name="ce1" table:formula="of:=[.H580]+ h*[.F581]" office:value-type="float" office:value="40.0969481418633" calcext:value-type="float">
            <text:p>40,09694814186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1]" office:value-type="float" office:value="5.78999999999992" calcext:value-type="float">
            <text:p>5,78999999999992</text:p>
          </table:table-cell>
          <table:table-cell table:style-name="ce1" table:formula="of:=[.H581]" office:value-type="float" office:value="40.0969481418633" calcext:value-type="float">
            <text:p>40,0969481418633</text:p>
          </table:table-cell>
          <table:table-cell table:style-name="ce1" table:formula="of:=-68 - ([.E582]^2/Ao)" office:value-type="float" office:value="-69.0718435001942" calcext:value-type="float">
            <text:p>-69,0718435001942</text:p>
          </table:table-cell>
          <table:table-cell table:style-name="ce1" table:formula="of:=[.G581]+h" office:value-type="float" office:value="5.79999999999992" calcext:value-type="float">
            <text:p>5,79999999999992</text:p>
          </table:table-cell>
          <table:table-cell table:style-name="ce1" table:formula="of:=[.H581]+ h*[.F582]" office:value-type="float" office:value="39.4062297068613" calcext:value-type="float">
            <text:p>39,40622970686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2]" office:value-type="float" office:value="5.79999999999992" calcext:value-type="float">
            <text:p>5,79999999999992</text:p>
          </table:table-cell>
          <table:table-cell table:style-name="ce1" table:formula="of:=[.H582]" office:value-type="float" office:value="39.4062297068613" calcext:value-type="float">
            <text:p>39,4062297068613</text:p>
          </table:table-cell>
          <table:table-cell table:style-name="ce1" table:formula="of:=-68 - ([.E583]^2/Ao)" office:value-type="float" office:value="-69.0352339598066" calcext:value-type="float">
            <text:p>-69,0352339598066</text:p>
          </table:table-cell>
          <table:table-cell table:style-name="ce1" table:formula="of:=[.G582]+h" office:value-type="float" office:value="5.80999999999992" calcext:value-type="float">
            <text:p>5,80999999999992</text:p>
          </table:table-cell>
          <table:table-cell table:style-name="ce1" table:formula="of:=[.H582]+ h*[.F583]" office:value-type="float" office:value="38.7158773672633" calcext:value-type="float">
            <text:p>38,71587736726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3]" office:value-type="float" office:value="5.80999999999992" calcext:value-type="float">
            <text:p>5,80999999999992</text:p>
          </table:table-cell>
          <table:table-cell table:style-name="ce1" table:formula="of:=[.H583]" office:value-type="float" office:value="38.7158773672633" calcext:value-type="float">
            <text:p>38,7158773672633</text:p>
          </table:table-cell>
          <table:table-cell table:style-name="ce1" table:formula="of:=-68 - ([.E584]^2/Ao)" office:value-type="float" office:value="-68.9992794402113" calcext:value-type="float">
            <text:p>-68,9992794402113</text:p>
          </table:table-cell>
          <table:table-cell table:style-name="ce1" table:formula="of:=[.G583]+h" office:value-type="float" office:value="5.81999999999992" calcext:value-type="float">
            <text:p>5,81999999999992</text:p>
          </table:table-cell>
          <table:table-cell table:style-name="ce1" table:formula="of:=[.H583]+ h*[.F584]" office:value-type="float" office:value="38.0258845728612" calcext:value-type="float">
            <text:p>38,02588457286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4]" office:value-type="float" office:value="5.81999999999992" calcext:value-type="float">
            <text:p>5,81999999999992</text:p>
          </table:table-cell>
          <table:table-cell table:style-name="ce1" table:formula="of:=[.H584]" office:value-type="float" office:value="38.0258845728612" calcext:value-type="float">
            <text:p>38,0258845728612</text:p>
          </table:table-cell>
          <table:table-cell table:style-name="ce1" table:formula="of:=-68 - ([.E585]^2/Ao)" office:value-type="float" office:value="-68.9639785983657" calcext:value-type="float">
            <text:p>-68,9639785983657</text:p>
          </table:table-cell>
          <table:table-cell table:style-name="ce1" table:formula="of:=[.G584]+h" office:value-type="float" office:value="5.82999999999992" calcext:value-type="float">
            <text:p>5,82999999999992</text:p>
          </table:table-cell>
          <table:table-cell table:style-name="ce1" table:formula="of:=[.H584]+ h*[.F585]" office:value-type="float" office:value="37.3362447868775" calcext:value-type="float">
            <text:p>37,33624478687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5]" office:value-type="float" office:value="5.82999999999992" calcext:value-type="float">
            <text:p>5,82999999999992</text:p>
          </table:table-cell>
          <table:table-cell table:style-name="ce1" table:formula="of:=[.H585]" office:value-type="float" office:value="37.3362447868775" calcext:value-type="float">
            <text:p>37,3362447868775</text:p>
          </table:table-cell>
          <table:table-cell table:style-name="ce1" table:formula="of:=-68 - ([.E586]^2/Ao)" office:value-type="float" office:value="-68.9293301165238" calcext:value-type="float">
            <text:p>-68,9293301165238</text:p>
          </table:table-cell>
          <table:table-cell table:style-name="ce1" table:formula="of:=[.G585]+h" office:value-type="float" office:value="5.83999999999992" calcext:value-type="float">
            <text:p>5,83999999999992</text:p>
          </table:table-cell>
          <table:table-cell table:style-name="ce1" table:formula="of:=[.H585]+ h*[.F586]" office:value-type="float" office:value="36.6469514857123" calcext:value-type="float">
            <text:p>36,64695148571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6]" office:value-type="float" office:value="5.83999999999992" calcext:value-type="float">
            <text:p>5,83999999999992</text:p>
          </table:table-cell>
          <table:table-cell table:style-name="ce1" table:formula="of:=[.H586]" office:value-type="float" office:value="36.6469514857123" calcext:value-type="float">
            <text:p>36,6469514857123</text:p>
          </table:table-cell>
          <table:table-cell table:style-name="ce1" table:formula="of:=-68 - ([.E587]^2/Ao)" office:value-type="float" office:value="-68.8953327021308" calcext:value-type="float">
            <text:p>-68,8953327021308</text:p>
          </table:table-cell>
          <table:table-cell table:style-name="ce1" table:formula="of:=[.G586]+h" office:value-type="float" office:value="5.84999999999992" calcext:value-type="float">
            <text:p>5,84999999999992</text:p>
          </table:table-cell>
          <table:table-cell table:style-name="ce1" table:formula="of:=[.H586]+ h*[.F587]" office:value-type="float" office:value="35.957998158691" calcext:value-type="float">
            <text:p>35,9579981586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7]" office:value-type="float" office:value="5.84999999999992" calcext:value-type="float">
            <text:p>5,84999999999992</text:p>
          </table:table-cell>
          <table:table-cell table:style-name="ce1" table:formula="of:=[.H587]" office:value-type="float" office:value="35.957998158691" calcext:value-type="float">
            <text:p>35,957998158691</text:p>
          </table:table-cell>
          <table:table-cell table:style-name="ce1" table:formula="of:=-68 - ([.E588]^2/Ao)" office:value-type="float" office:value="-68.8619850877203" calcext:value-type="float">
            <text:p>-68,8619850877203</text:p>
          </table:table-cell>
          <table:table-cell table:style-name="ce1" table:formula="of:=[.G587]+h" office:value-type="float" office:value="5.85999999999992" calcext:value-type="float">
            <text:p>5,85999999999992</text:p>
          </table:table-cell>
          <table:table-cell table:style-name="ce1" table:formula="of:=[.H587]+ h*[.F588]" office:value-type="float" office:value="35.2693783078138" calcext:value-type="float">
            <text:p>35,26937830781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8]" office:value-type="float" office:value="5.85999999999992" calcext:value-type="float">
            <text:p>5,85999999999992</text:p>
          </table:table-cell>
          <table:table-cell table:style-name="ce1" table:formula="of:=[.H588]" office:value-type="float" office:value="35.2693783078138" calcext:value-type="float">
            <text:p>35,2693783078138</text:p>
          </table:table-cell>
          <table:table-cell table:style-name="ce1" table:formula="of:=-68 - ([.E589]^2/Ao)" office:value-type="float" office:value="-68.8292860308131" calcext:value-type="float">
            <text:p>-68,8292860308131</text:p>
          </table:table-cell>
          <table:table-cell table:style-name="ce1" table:formula="of:=[.G588]+h" office:value-type="float" office:value="5.86999999999992" calcext:value-type="float">
            <text:p>5,86999999999992</text:p>
          </table:table-cell>
          <table:table-cell table:style-name="ce1" table:formula="of:=[.H588]+ h*[.F589]" office:value-type="float" office:value="34.5810854475056" calcext:value-type="float">
            <text:p>34,58108544750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9]" office:value-type="float" office:value="5.86999999999992" calcext:value-type="float">
            <text:p>5,86999999999992</text:p>
          </table:table-cell>
          <table:table-cell table:style-name="ce1" table:formula="of:=[.H589]" office:value-type="float" office:value="34.5810854475056" calcext:value-type="float">
            <text:p>34,5810854475056</text:p>
          </table:table-cell>
          <table:table-cell table:style-name="ce1" table:formula="of:=-68 - ([.E590]^2/Ao)" office:value-type="float" office:value="-68.7972343138185" calcext:value-type="float">
            <text:p>-68,7972343138185</text:p>
          </table:table-cell>
          <table:table-cell table:style-name="ce1" table:formula="of:=[.G589]+h" office:value-type="float" office:value="5.87999999999992" calcext:value-type="float">
            <text:p>5,87999999999992</text:p>
          </table:table-cell>
          <table:table-cell table:style-name="ce1" table:formula="of:=[.H589]+ h*[.F590]" office:value-type="float" office:value="33.8931131043674" calcext:value-type="float">
            <text:p>33,89311310436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0]" office:value-type="float" office:value="5.87999999999992" calcext:value-type="float">
            <text:p>5,87999999999992</text:p>
          </table:table-cell>
          <table:table-cell table:style-name="ce1" table:formula="of:=[.H590]" office:value-type="float" office:value="33.8931131043674" calcext:value-type="float">
            <text:p>33,8931131043674</text:p>
          </table:table-cell>
          <table:table-cell table:style-name="ce1" table:formula="of:=-68 - ([.E591]^2/Ao)" office:value-type="float" office:value="-68.765828743937" calcext:value-type="float">
            <text:p>-68,765828743937</text:p>
          </table:table-cell>
          <table:table-cell table:style-name="ce1" table:formula="of:=[.G590]+h" office:value-type="float" office:value="5.88999999999992" calcext:value-type="float">
            <text:p>5,88999999999992</text:p>
          </table:table-cell>
          <table:table-cell table:style-name="ce1" table:formula="of:=[.H590]+ h*[.F591]" office:value-type="float" office:value="33.2054548169281" calcext:value-type="float">
            <text:p>33,20545481692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1]" office:value-type="float" office:value="5.88999999999992" calcext:value-type="float">
            <text:p>5,88999999999992</text:p>
          </table:table-cell>
          <table:table-cell table:style-name="ce1" table:formula="of:=[.H591]" office:value-type="float" office:value="33.2054548169281" calcext:value-type="float">
            <text:p>33,2054548169281</text:p>
          </table:table-cell>
          <table:table-cell table:style-name="ce1" table:formula="of:=-68 - ([.E592]^2/Ao)" office:value-type="float" office:value="-68.735068153066" calcext:value-type="float">
            <text:p>-68,735068153066</text:p>
          </table:table-cell>
          <table:table-cell table:style-name="ce1" table:formula="of:=[.G591]+h" office:value-type="float" office:value="5.89999999999992" calcext:value-type="float">
            <text:p>5,89999999999992</text:p>
          </table:table-cell>
          <table:table-cell table:style-name="ce1" table:formula="of:=[.H591]+ h*[.F592]" office:value-type="float" office:value="32.5181041353974" calcext:value-type="float">
            <text:p>32,51810413539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2]" office:value-type="float" office:value="5.89999999999992" calcext:value-type="float">
            <text:p>5,89999999999992</text:p>
          </table:table-cell>
          <table:table-cell table:style-name="ce1" table:formula="of:=[.H592]" office:value-type="float" office:value="32.5181041353974" calcext:value-type="float">
            <text:p>32,5181041353974</text:p>
          </table:table-cell>
          <table:table-cell table:style-name="ce1" table:formula="of:=-68 - ([.E593]^2/Ao)" office:value-type="float" office:value="-68.704951397707" calcext:value-type="float">
            <text:p>-68,704951397707</text:p>
          </table:table-cell>
          <table:table-cell table:style-name="ce1" table:formula="of:=[.G592]+h" office:value-type="float" office:value="5.90999999999992" calcext:value-type="float">
            <text:p>5,90999999999992</text:p>
          </table:table-cell>
          <table:table-cell table:style-name="ce1" table:formula="of:=[.H592]+ h*[.F593]" office:value-type="float" office:value="31.8310546214203" calcext:value-type="float">
            <text:p>31,83105462142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3]" office:value-type="float" office:value="5.90999999999992" calcext:value-type="float">
            <text:p>5,90999999999992</text:p>
          </table:table-cell>
          <table:table-cell table:style-name="ce1" table:formula="of:=[.H593]" office:value-type="float" office:value="31.8310546214203" calcext:value-type="float">
            <text:p>31,8310546214203</text:p>
          </table:table-cell>
          <table:table-cell table:style-name="ce1" table:formula="of:=-68 - ([.E594]^2/Ao)" office:value-type="float" office:value="-68.6754773588746" calcext:value-type="float">
            <text:p>-68,6754773588746</text:p>
          </table:table-cell>
          <table:table-cell table:style-name="ce1" table:formula="of:=[.G593]+h" office:value-type="float" office:value="5.91999999999992" calcext:value-type="float">
            <text:p>5,91999999999992</text:p>
          </table:table-cell>
          <table:table-cell table:style-name="ce1" table:formula="of:=[.H593]+ h*[.F594]" office:value-type="float" office:value="31.1442998478316" calcext:value-type="float">
            <text:p>31,14429984783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4]" office:value-type="float" office:value="5.91999999999992" calcext:value-type="float">
            <text:p>5,91999999999992</text:p>
          </table:table-cell>
          <table:table-cell table:style-name="ce1" table:formula="of:=[.H594]" office:value-type="float" office:value="31.1442998478316" calcext:value-type="float">
            <text:p>31,1442998478316</text:p>
          </table:table-cell>
          <table:table-cell table:style-name="ce1" table:formula="of:=-68 - ([.E595]^2/Ao)" office:value-type="float" office:value="-68.6466449420078" calcext:value-type="float">
            <text:p>-68,6466449420078</text:p>
          </table:table-cell>
          <table:table-cell table:style-name="ce1" table:formula="of:=[.G594]+h" office:value-type="float" office:value="5.92999999999992" calcext:value-type="float">
            <text:p>5,92999999999992</text:p>
          </table:table-cell>
          <table:table-cell table:style-name="ce1" table:formula="of:=[.H594]+ h*[.F595]" office:value-type="float" office:value="30.4578333984115" calcext:value-type="float">
            <text:p>30,45783339841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5]" office:value-type="float" office:value="5.92999999999992" calcext:value-type="float">
            <text:p>5,92999999999992</text:p>
          </table:table-cell>
          <table:table-cell table:style-name="ce1" table:formula="of:=[.H595]" office:value-type="float" office:value="30.4578333984115" calcext:value-type="float">
            <text:p>30,4578333984115</text:p>
          </table:table-cell>
          <table:table-cell table:style-name="ce1" table:formula="of:=-68 - ([.E596]^2/Ao)" office:value-type="float" office:value="-68.6184530768836" calcext:value-type="float">
            <text:p>-68,6184530768836</text:p>
          </table:table-cell>
          <table:table-cell table:style-name="ce1" table:formula="of:=[.G595]+h" office:value-type="float" office:value="5.93999999999992" calcext:value-type="float">
            <text:p>5,93999999999992</text:p>
          </table:table-cell>
          <table:table-cell table:style-name="ce1" table:formula="of:=[.H595]+ h*[.F596]" office:value-type="float" office:value="29.7716488676427" calcext:value-type="float">
            <text:p>29,77164886764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6]" office:value-type="float" office:value="5.93999999999992" calcext:value-type="float">
            <text:p>5,93999999999992</text:p>
          </table:table-cell>
          <table:table-cell table:style-name="ce1" table:formula="of:=[.H596]" office:value-type="float" office:value="29.7716488676427" calcext:value-type="float">
            <text:p>29,7716488676427</text:p>
          </table:table-cell>
          <table:table-cell table:style-name="ce1" table:formula="of:=-68 - ([.E597]^2/Ao)" office:value-type="float" office:value="-68.5909007175321" calcext:value-type="float">
            <text:p>-68,5909007175321</text:p>
          </table:table-cell>
          <table:table-cell table:style-name="ce1" table:formula="of:=[.G596]+h" office:value-type="float" office:value="5.94999999999992" calcext:value-type="float">
            <text:p>5,94999999999992</text:p>
          </table:table-cell>
          <table:table-cell table:style-name="ce1" table:formula="of:=[.H596]+ h*[.F597]" office:value-type="float" office:value="29.0857398604674" calcext:value-type="float">
            <text:p>29,08573986046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7]" office:value-type="float" office:value="5.94999999999992" calcext:value-type="float">
            <text:p>5,94999999999992</text:p>
          </table:table-cell>
          <table:table-cell table:style-name="ce1" table:formula="of:=[.H597]" office:value-type="float" office:value="29.0857398604674" calcext:value-type="float">
            <text:p>29,0857398604674</text:p>
          </table:table-cell>
          <table:table-cell table:style-name="ce1" table:formula="of:=-68 - ([.E598]^2/Ao)" office:value-type="float" office:value="-68.5639868421539" calcext:value-type="float">
            <text:p>-68,5639868421539</text:p>
          </table:table-cell>
          <table:table-cell table:style-name="ce1" table:formula="of:=[.G597]+h" office:value-type="float" office:value="5.95999999999992" calcext:value-type="float">
            <text:p>5,95999999999992</text:p>
          </table:table-cell>
          <table:table-cell table:style-name="ce1" table:formula="of:=[.H597]+ h*[.F598]" office:value-type="float" office:value="28.4000999920458" calcext:value-type="float">
            <text:p>28,40009999204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8]" office:value-type="float" office:value="5.95999999999992" calcext:value-type="float">
            <text:p>5,95999999999992</text:p>
          </table:table-cell>
          <table:table-cell table:style-name="ce1" table:formula="of:=[.H598]" office:value-type="float" office:value="28.4000999920458" calcext:value-type="float">
            <text:p>28,4000999920458</text:p>
          </table:table-cell>
          <table:table-cell table:style-name="ce1" table:formula="of:=-68 - ([.E599]^2/Ao)" office:value-type="float" office:value="-68.5377104530388" calcext:value-type="float">
            <text:p>-68,5377104530388</text:p>
          </table:table-cell>
          <table:table-cell table:style-name="ce1" table:formula="of:=[.G598]+h" office:value-type="float" office:value="5.96999999999992" calcext:value-type="float">
            <text:p>5,96999999999992</text:p>
          </table:table-cell>
          <table:table-cell table:style-name="ce1" table:formula="of:=[.H598]+ h*[.F599]" office:value-type="float" office:value="27.7147228875154" calcext:value-type="float">
            <text:p>27,71472288751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9]" office:value-type="float" office:value="5.96999999999992" calcext:value-type="float">
            <text:p>5,96999999999992</text:p>
          </table:table-cell>
          <table:table-cell table:style-name="ce1" table:formula="of:=[.H599]" office:value-type="float" office:value="27.7147228875154" calcext:value-type="float">
            <text:p>27,7147228875154</text:p>
          </table:table-cell>
          <table:table-cell table:style-name="ce1" table:formula="of:=-68 - ([.E600]^2/Ao)" office:value-type="float" office:value="-68.5120705764878" calcext:value-type="float">
            <text:p>-68,5120705764878</text:p>
          </table:table-cell>
          <table:table-cell table:style-name="ce1" table:formula="of:=[.G599]+h" office:value-type="float" office:value="5.97999999999992" calcext:value-type="float">
            <text:p>5,97999999999992</text:p>
          </table:table-cell>
          <table:table-cell table:style-name="ce1" table:formula="of:=[.H599]+ h*[.F600]" office:value-type="float" office:value="27.0296021817506" calcext:value-type="float">
            <text:p>27,02960218175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0]" office:value-type="float" office:value="5.97999999999992" calcext:value-type="float">
            <text:p>5,97999999999992</text:p>
          </table:table-cell>
          <table:table-cell table:style-name="ce1" table:formula="of:=[.H600]" office:value-type="float" office:value="27.0296021817506" calcext:value-type="float">
            <text:p>27,0296021817506</text:p>
          </table:table-cell>
          <table:table-cell table:style-name="ce1" table:formula="of:=-68 - ([.E601]^2/Ao)" office:value-type="float" office:value="-68.4870662627358" calcext:value-type="float">
            <text:p>-68,4870662627358</text:p>
          </table:table-cell>
          <table:table-cell table:style-name="ce1" table:formula="of:=[.G600]+h" office:value-type="float" office:value="5.98999999999992" calcext:value-type="float">
            <text:p>5,98999999999992</text:p>
          </table:table-cell>
          <table:table-cell table:style-name="ce1" table:formula="of:=[.H600]+ h*[.F601]" office:value-type="float" office:value="26.3447315191232" calcext:value-type="float">
            <text:p>26,34473151912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1]" office:value-type="float" office:value="5.98999999999992" calcext:value-type="float">
            <text:p>5,98999999999992</text:p>
          </table:table-cell>
          <table:table-cell table:style-name="ce1" table:formula="of:=[.H601]" office:value-type="float" office:value="26.3447315191232" calcext:value-type="float">
            <text:p>26,3447315191232</text:p>
          </table:table-cell>
          <table:table-cell table:style-name="ce1" table:formula="of:=-68 - ([.E602]^2/Ao)" office:value-type="float" office:value="-68.4626965858765" calcext:value-type="float">
            <text:p>-68,4626965858765</text:p>
          </table:table-cell>
          <table:table-cell table:style-name="ce1" table:formula="of:=[.G601]+h" office:value-type="float" office:value="5.99999999999992" calcext:value-type="float">
            <text:p>5,99999999999992</text:p>
          </table:table-cell>
          <table:table-cell table:style-name="ce1" table:formula="of:=[.H601]+ h*[.F602]" office:value-type="float" office:value="25.6601045532644" calcext:value-type="float">
            <text:p>25,66010455326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2]" office:value-type="float" office:value="5.99999999999992" calcext:value-type="float">
            <text:p>5,99999999999992</text:p>
          </table:table-cell>
          <table:table-cell table:style-name="ce1" table:formula="of:=[.H602]" office:value-type="float" office:value="25.6601045532644" calcext:value-type="float">
            <text:p>25,6601045532644</text:p>
          </table:table-cell>
          <table:table-cell table:style-name="ce1" table:formula="of:=-68 - ([.E603]^2/Ao)" office:value-type="float" office:value="-68.4389606437896" calcext:value-type="float">
            <text:p>-68,4389606437896</text:p>
          </table:table-cell>
          <table:table-cell table:style-name="ce1" table:formula="of:=[.G602]+h" office:value-type="float" office:value="6.00999999999992" calcext:value-type="float">
            <text:p>6,00999999999992</text:p>
          </table:table-cell>
          <table:table-cell table:style-name="ce1" table:formula="of:=[.H602]+ h*[.F603]" office:value-type="float" office:value="24.9757149468265" calcext:value-type="float">
            <text:p>24,97571494682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3]" office:value-type="float" office:value="6.00999999999992" calcext:value-type="float">
            <text:p>6,00999999999992</text:p>
          </table:table-cell>
          <table:table-cell table:style-name="ce1" table:formula="of:=[.H603]" office:value-type="float" office:value="24.9757149468265" calcext:value-type="float">
            <text:p>24,9757149468265</text:p>
          </table:table-cell>
          <table:table-cell table:style-name="ce1" table:formula="of:=-68 - ([.E604]^2/Ao)" office:value-type="float" office:value="-68.4158575580701" calcext:value-type="float">
            <text:p>-68,4158575580701</text:p>
          </table:table-cell>
          <table:table-cell table:style-name="ce1" table:formula="of:=[.G603]+h" office:value-type="float" office:value="6.01999999999992" calcext:value-type="float">
            <text:p>6,01999999999992</text:p>
          </table:table-cell>
          <table:table-cell table:style-name="ce1" table:formula="of:=[.H603]+ h*[.F604]" office:value-type="float" office:value="24.2915563712458" calcext:value-type="float">
            <text:p>24,29155637124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4]" office:value-type="float" office:value="6.01999999999992" calcext:value-type="float">
            <text:p>6,01999999999992</text:p>
          </table:table-cell>
          <table:table-cell table:style-name="ce1" table:formula="of:=[.H604]" office:value-type="float" office:value="24.2915563712458" calcext:value-type="float">
            <text:p>24,2915563712458</text:p>
          </table:table-cell>
          <table:table-cell table:style-name="ce1" table:formula="of:=-68 - ([.E605]^2/Ao)" office:value-type="float" office:value="-68.3933864739583" calcext:value-type="float">
            <text:p>-68,3933864739583</text:p>
          </table:table-cell>
          <table:table-cell table:style-name="ce1" table:formula="of:=[.G604]+h" office:value-type="float" office:value="6.02999999999992" calcext:value-type="float">
            <text:p>6,02999999999992</text:p>
          </table:table-cell>
          <table:table-cell table:style-name="ce1" table:formula="of:=[.H604]+ h*[.F605]" office:value-type="float" office:value="23.6076225065063" calcext:value-type="float">
            <text:p>23,60762250650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5]" office:value-type="float" office:value="6.02999999999992" calcext:value-type="float">
            <text:p>6,02999999999992</text:p>
          </table:table-cell>
          <table:table-cell table:style-name="ce1" table:formula="of:=[.H605]" office:value-type="float" office:value="23.6076225065063" calcext:value-type="float">
            <text:p>23,6076225065063</text:p>
          </table:table-cell>
          <table:table-cell table:style-name="ce1" table:formula="of:=-68 - ([.E606]^2/Ao)" office:value-type="float" office:value="-68.3715465602731" calcext:value-type="float">
            <text:p>-68,3715465602731</text:p>
          </table:table-cell>
          <table:table-cell table:style-name="ce1" table:formula="of:=[.G605]+h" office:value-type="float" office:value="6.03999999999992" calcext:value-type="float">
            <text:p>6,03999999999992</text:p>
          </table:table-cell>
          <table:table-cell table:style-name="ce1" table:formula="of:=[.H605]+ h*[.F606]" office:value-type="float" office:value="22.9239070409035" calcext:value-type="float">
            <text:p>22,92390704090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6]" office:value-type="float" office:value="6.03999999999992" calcext:value-type="float">
            <text:p>6,03999999999992</text:p>
          </table:table-cell>
          <table:table-cell table:style-name="ce1" table:formula="of:=[.H606]" office:value-type="float" office:value="22.9239070409035" calcext:value-type="float">
            <text:p>22,9239070409035</text:p>
          </table:table-cell>
          <table:table-cell table:style-name="ce1" table:formula="of:=-68 - ([.E607]^2/Ao)" office:value-type="float" office:value="-68.3503370093467" calcext:value-type="float">
            <text:p>-68,3503370093467</text:p>
          </table:table-cell>
          <table:table-cell table:style-name="ce1" table:formula="of:=[.G606]+h" office:value-type="float" office:value="6.04999999999992" calcext:value-type="float">
            <text:p>6,04999999999992</text:p>
          </table:table-cell>
          <table:table-cell table:style-name="ce1" table:formula="of:=[.H606]+ h*[.F607]" office:value-type="float" office:value="22.2404036708101" calcext:value-type="float">
            <text:p>22,24040367081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7]" office:value-type="float" office:value="6.04999999999992" calcext:value-type="float">
            <text:p>6,04999999999992</text:p>
          </table:table-cell>
          <table:table-cell table:style-name="ce1" table:formula="of:=[.H607]" office:value-type="float" office:value="22.2404036708101" calcext:value-type="float">
            <text:p>22,2404036708101</text:p>
          </table:table-cell>
          <table:table-cell table:style-name="ce1" table:formula="of:=-68 - ([.E608]^2/Ao)" office:value-type="float" office:value="-68.3297570369604" calcext:value-type="float">
            <text:p>-68,3297570369604</text:p>
          </table:table-cell>
          <table:table-cell table:style-name="ce1" table:formula="of:=[.G607]+h" office:value-type="float" office:value="6.05999999999992" calcext:value-type="float">
            <text:p>6,05999999999992</text:p>
          </table:table-cell>
          <table:table-cell table:style-name="ce1" table:formula="of:=[.H607]+ h*[.F608]" office:value-type="float" office:value="21.5571061004405" calcext:value-type="float">
            <text:p>21,55710610044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8]" office:value-type="float" office:value="6.05999999999992" calcext:value-type="float">
            <text:p>6,05999999999992</text:p>
          </table:table-cell>
          <table:table-cell table:style-name="ce1" table:formula="of:=[.H608]" office:value-type="float" office:value="21.5571061004405" calcext:value-type="float">
            <text:p>21,5571061004405</text:p>
          </table:table-cell>
          <table:table-cell table:style-name="ce1" table:formula="of:=-68 - ([.E609]^2/Ao)" office:value-type="float" office:value="-68.3098058822838" calcext:value-type="float">
            <text:p>-68,3098058822838</text:p>
          </table:table-cell>
          <table:table-cell table:style-name="ce1" table:formula="of:=[.G608]+h" office:value-type="float" office:value="6.06999999999992" calcext:value-type="float">
            <text:p>6,06999999999992</text:p>
          </table:table-cell>
          <table:table-cell table:style-name="ce1" table:formula="of:=[.H608]+ h*[.F609]" office:value-type="float" office:value="20.8740080416176" calcext:value-type="float">
            <text:p>20,87400804161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9]" office:value-type="float" office:value="6.06999999999992" calcext:value-type="float">
            <text:p>6,06999999999992</text:p>
          </table:table-cell>
          <table:table-cell table:style-name="ce1" table:formula="of:=[.H609]" office:value-type="float" office:value="20.8740080416176" calcext:value-type="float">
            <text:p>20,8740080416176</text:p>
          </table:table-cell>
          <table:table-cell table:style-name="ce1" table:formula="of:=-68 - ([.E610]^2/Ao)" office:value-type="float" office:value="-68.2904828078143" calcext:value-type="float">
            <text:p>-68,2904828078143</text:p>
          </table:table-cell>
          <table:table-cell table:style-name="ce1" table:formula="of:=[.G609]+h" office:value-type="float" office:value="6.07999999999992" calcext:value-type="float">
            <text:p>6,07999999999992</text:p>
          </table:table-cell>
          <table:table-cell table:style-name="ce1" table:formula="of:=[.H609]+ h*[.F610]" office:value-type="float" office:value="20.1911032135395" calcext:value-type="float">
            <text:p>20,19110321353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0]" office:value-type="float" office:value="6.07999999999992" calcext:value-type="float">
            <text:p>6,07999999999992</text:p>
          </table:table-cell>
          <table:table-cell table:style-name="ce1" table:formula="of:=[.H610]" office:value-type="float" office:value="20.1911032135395" calcext:value-type="float">
            <text:p>20,1911032135395</text:p>
          </table:table-cell>
          <table:table-cell table:style-name="ce1" table:formula="of:=-68 - ([.E611]^2/Ao)" office:value-type="float" office:value="-68.2717870993199" calcext:value-type="float">
            <text:p>-68,2717870993199</text:p>
          </table:table-cell>
          <table:table-cell table:style-name="ce1" table:formula="of:=[.G610]+h" office:value-type="float" office:value="6.08999999999992" calcext:value-type="float">
            <text:p>6,08999999999992</text:p>
          </table:table-cell>
          <table:table-cell table:style-name="ce1" table:formula="of:=[.H610]+ h*[.F611]" office:value-type="float" office:value="19.5083853425463" calcext:value-type="float">
            <text:p>19,50838534254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1]" office:value-type="float" office:value="6.08999999999992" calcext:value-type="float">
            <text:p>6,08999999999992</text:p>
          </table:table-cell>
          <table:table-cell table:style-name="ce1" table:formula="of:=[.H611]" office:value-type="float" office:value="19.5083853425463" calcext:value-type="float">
            <text:p>19,5083853425463</text:p>
          </table:table-cell>
          <table:table-cell table:style-name="ce1" table:formula="of:=-68 - ([.E612]^2/Ao)" office:value-type="float" office:value="-68.2537180657822" calcext:value-type="float">
            <text:p>-68,2537180657822</text:p>
          </table:table-cell>
          <table:table-cell table:style-name="ce1" table:formula="of:=[.G611]+h" office:value-type="float" office:value="6.09999999999991" calcext:value-type="float">
            <text:p>6,09999999999991</text:p>
          </table:table-cell>
          <table:table-cell table:style-name="ce1" table:formula="of:=[.H611]+ h*[.F612]" office:value-type="float" office:value="18.8258481618885" calcext:value-type="float">
            <text:p>18,82584816188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2]" office:value-type="float" office:value="6.09999999999991" calcext:value-type="float">
            <text:p>6,09999999999991</text:p>
          </table:table-cell>
          <table:table-cell table:style-name="ce1" table:formula="of:=[.H612]" office:value-type="float" office:value="18.8258481618885" calcext:value-type="float">
            <text:p>18,8258481618885</text:p>
          </table:table-cell>
          <table:table-cell table:style-name="ce1" table:formula="of:=-68 - ([.E613]^2/Ao)" office:value-type="float" office:value="-68.236275039343" calcext:value-type="float">
            <text:p>-68,236275039343</text:p>
          </table:table-cell>
          <table:table-cell table:style-name="ce1" table:formula="of:=[.G612]+h" office:value-type="float" office:value="6.10999999999991" calcext:value-type="float">
            <text:p>6,10999999999991</text:p>
          </table:table-cell>
          <table:table-cell table:style-name="ce1" table:formula="of:=[.H612]+ h*[.F613]" office:value-type="float" office:value="18.143485411495" calcext:value-type="float">
            <text:p>18,1434854114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3]" office:value-type="float" office:value="6.10999999999991" calcext:value-type="float">
            <text:p>6,10999999999991</text:p>
          </table:table-cell>
          <table:table-cell table:style-name="ce1" table:formula="of:=[.H613]" office:value-type="float" office:value="18.143485411495" calcext:value-type="float">
            <text:p>18,143485411495</text:p>
          </table:table-cell>
          <table:table-cell table:style-name="ce1" table:formula="of:=-68 - ([.E614]^2/Ao)" office:value-type="float" office:value="-68.2194573752514" calcext:value-type="float">
            <text:p>-68,2194573752514</text:p>
          </table:table-cell>
          <table:table-cell table:style-name="ce1" table:formula="of:=[.G613]+h" office:value-type="float" office:value="6.11999999999991" calcext:value-type="float">
            <text:p>6,11999999999991</text:p>
          </table:table-cell>
          <table:table-cell table:style-name="ce1" table:formula="of:=[.H613]+ h*[.F614]" office:value-type="float" office:value="17.4612908377425" calcext:value-type="float">
            <text:p>17,46129083774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4]" office:value-type="float" office:value="6.11999999999991" calcext:value-type="float">
            <text:p>6,11999999999991</text:p>
          </table:table-cell>
          <table:table-cell table:style-name="ce1" table:formula="of:=[.H614]" office:value-type="float" office:value="17.4612908377425" calcext:value-type="float">
            <text:p>17,4612908377425</text:p>
          </table:table-cell>
          <table:table-cell table:style-name="ce1" table:formula="of:=-68 - ([.E615]^2/Ao)" office:value-type="float" office:value="-68.2032644518135" calcext:value-type="float">
            <text:p>-68,2032644518135</text:p>
          </table:table-cell>
          <table:table-cell table:style-name="ce1" table:formula="of:=[.G614]+h" office:value-type="float" office:value="6.12999999999991" calcext:value-type="float">
            <text:p>6,12999999999991</text:p>
          </table:table-cell>
          <table:table-cell table:style-name="ce1" table:formula="of:=[.H614]+ h*[.F615]" office:value-type="float" office:value="16.7792581932244" calcext:value-type="float">
            <text:p>16,77925819322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5]" office:value-type="float" office:value="6.12999999999991" calcext:value-type="float">
            <text:p>6,12999999999991</text:p>
          </table:table-cell>
          <table:table-cell table:style-name="ce1" table:formula="of:=[.H615]" office:value-type="float" office:value="16.7792581932244" calcext:value-type="float">
            <text:p>16,7792581932244</text:p>
          </table:table-cell>
          <table:table-cell table:style-name="ce1" table:formula="of:=-68 - ([.E616]^2/Ao)" office:value-type="float" office:value="-68.1876956703433" calcext:value-type="float">
            <text:p>-68,1876956703433</text:p>
          </table:table-cell>
          <table:table-cell table:style-name="ce1" table:formula="of:=[.G615]+h" office:value-type="float" office:value="6.13999999999991" calcext:value-type="float">
            <text:p>6,13999999999991</text:p>
          </table:table-cell>
          <table:table-cell table:style-name="ce1" table:formula="of:=[.H615]+ h*[.F616]" office:value-type="float" office:value="16.0973812365209" calcext:value-type="float">
            <text:p>16,09738123652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6]" office:value-type="float" office:value="6.13999999999991" calcext:value-type="float">
            <text:p>6,13999999999991</text:p>
          </table:table-cell>
          <table:table-cell table:style-name="ce1" table:formula="of:=[.H616]" office:value-type="float" office:value="16.0973812365209" calcext:value-type="float">
            <text:p>16,0973812365209</text:p>
          </table:table-cell>
          <table:table-cell table:style-name="ce1" table:formula="of:=-68 - ([.E617]^2/Ao)" office:value-type="float" office:value="-68.1727504551159" calcext:value-type="float">
            <text:p>-68,1727504551159</text:p>
          </table:table-cell>
          <table:table-cell table:style-name="ce1" table:formula="of:=[.G616]+h" office:value-type="float" office:value="6.14999999999991" calcext:value-type="float">
            <text:p>6,14999999999991</text:p>
          </table:table-cell>
          <table:table-cell table:style-name="ce1" table:formula="of:=[.H616]+ h*[.F617]" office:value-type="float" office:value="15.4156537319698" calcext:value-type="float">
            <text:p>15,41565373196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7]" office:value-type="float" office:value="6.14999999999991" calcext:value-type="float">
            <text:p>6,14999999999991</text:p>
          </table:table-cell>
          <table:table-cell table:style-name="ce1" table:formula="of:=[.H617]" office:value-type="float" office:value="15.4156537319698" calcext:value-type="float">
            <text:p>15,4156537319698</text:p>
          </table:table-cell>
          <table:table-cell table:style-name="ce1" table:formula="of:=-68 - ([.E618]^2/Ao)" office:value-type="float" office:value="-68.1584282533227" calcext:value-type="float">
            <text:p>-68,1584282533227</text:p>
          </table:table-cell>
          <table:table-cell table:style-name="ce1" table:formula="of:=[.G617]+h" office:value-type="float" office:value="6.15999999999991" calcext:value-type="float">
            <text:p>6,15999999999991</text:p>
          </table:table-cell>
          <table:table-cell table:style-name="ce1" table:formula="of:=[.H617]+ h*[.F618]" office:value-type="float" office:value="14.7340694494366" calcext:value-type="float">
            <text:p>14,73406944943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8]" office:value-type="float" office:value="6.15999999999991" calcext:value-type="float">
            <text:p>6,15999999999991</text:p>
          </table:table-cell>
          <table:table-cell table:style-name="ce1" table:formula="of:=[.H618]" office:value-type="float" office:value="14.7340694494366" calcext:value-type="float">
            <text:p>14,7340694494366</text:p>
          </table:table-cell>
          <table:table-cell table:style-name="ce1" table:formula="of:=-68 - ([.E619]^2/Ao)" office:value-type="float" office:value="-68.1447285350272" calcext:value-type="float">
            <text:p>-68,1447285350272</text:p>
          </table:table-cell>
          <table:table-cell table:style-name="ce1" table:formula="of:=[.G618]+h" office:value-type="float" office:value="6.16999999999991" calcext:value-type="float">
            <text:p>6,16999999999991</text:p>
          </table:table-cell>
          <table:table-cell table:style-name="ce1" table:formula="of:=[.H618]+ h*[.F619]" office:value-type="float" office:value="14.0526221640863" calcext:value-type="float">
            <text:p>14,05262216408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9]" office:value-type="float" office:value="6.16999999999991" calcext:value-type="float">
            <text:p>6,16999999999991</text:p>
          </table:table-cell>
          <table:table-cell table:style-name="ce1" table:formula="of:=[.H619]" office:value-type="float" office:value="14.0526221640863" calcext:value-type="float">
            <text:p>14,0526221640863</text:p>
          </table:table-cell>
          <table:table-cell table:style-name="ce1" table:formula="of:=-68 - ([.E620]^2/Ao)" office:value-type="float" office:value="-68.1316507931244" calcext:value-type="float">
            <text:p>-68,1316507931244</text:p>
          </table:table-cell>
          <table:table-cell table:style-name="ce1" table:formula="of:=[.G619]+h" office:value-type="float" office:value="6.17999999999991" calcext:value-type="float">
            <text:p>6,17999999999991</text:p>
          </table:table-cell>
          <table:table-cell table:style-name="ce1" table:formula="of:=[.H619]+ h*[.F620]" office:value-type="float" office:value="13.371305656155" calcext:value-type="float">
            <text:p>13,3713056561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0]" office:value-type="float" office:value="6.17999999999991" calcext:value-type="float">
            <text:p>6,17999999999991</text:p>
          </table:table-cell>
          <table:table-cell table:style-name="ce1" table:formula="of:=[.H620]" office:value-type="float" office:value="13.371305656155" calcext:value-type="float">
            <text:p>13,371305656155</text:p>
          </table:table-cell>
          <table:table-cell table:style-name="ce1" table:formula="of:=-68 - ([.E621]^2/Ao)" office:value-type="float" office:value="-68.1191945433002" calcext:value-type="float">
            <text:p>-68,1191945433002</text:p>
          </table:table-cell>
          <table:table-cell table:style-name="ce1" table:formula="of:=[.G620]+h" office:value-type="float" office:value="6.18999999999991" calcext:value-type="float">
            <text:p>6,18999999999991</text:p>
          </table:table-cell>
          <table:table-cell table:style-name="ce1" table:formula="of:=[.H620]+ h*[.F621]" office:value-type="float" office:value="12.690113710722" calcext:value-type="float">
            <text:p>12,6901137107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1]" office:value-type="float" office:value="6.18999999999991" calcext:value-type="float">
            <text:p>6,18999999999991</text:p>
          </table:table-cell>
          <table:table-cell table:style-name="ce1" table:formula="of:=[.H621]" office:value-type="float" office:value="12.690113710722" calcext:value-type="float">
            <text:p>12,690113710722</text:p>
          </table:table-cell>
          <table:table-cell table:style-name="ce1" table:formula="of:=-68 - ([.E622]^2/Ao)" office:value-type="float" office:value="-68.107359323994" calcext:value-type="float">
            <text:p>-68,107359323994</text:p>
          </table:table-cell>
          <table:table-cell table:style-name="ce1" table:formula="of:=[.G621]+h" office:value-type="float" office:value="6.19999999999991" calcext:value-type="float">
            <text:p>6,19999999999991</text:p>
          </table:table-cell>
          <table:table-cell table:style-name="ce1" table:formula="of:=[.H621]+ h*[.F622]" office:value-type="float" office:value="12.0090401174821" calcext:value-type="float">
            <text:p>12,00904011748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2]" office:value-type="float" office:value="6.19999999999991" calcext:value-type="float">
            <text:p>6,19999999999991</text:p>
          </table:table-cell>
          <table:table-cell table:style-name="ce1" table:formula="of:=[.H622]" office:value-type="float" office:value="12.0090401174821" calcext:value-type="float">
            <text:p>12,0090401174821</text:p>
          </table:table-cell>
          <table:table-cell table:style-name="ce1" table:formula="of:=-68 - ([.E623]^2/Ao)" office:value-type="float" office:value="-68.0961446963622" calcext:value-type="float">
            <text:p>-68,0961446963622</text:p>
          </table:table-cell>
          <table:table-cell table:style-name="ce1" table:formula="of:=[.G622]+h" office:value-type="float" office:value="6.20999999999991" calcext:value-type="float">
            <text:p>6,20999999999991</text:p>
          </table:table-cell>
          <table:table-cell table:style-name="ce1" table:formula="of:=[.H622]+ h*[.F623]" office:value-type="float" office:value="11.3280786705185" calcext:value-type="float">
            <text:p>11,32807867051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3]" office:value-type="float" office:value="6.20999999999991" calcext:value-type="float">
            <text:p>6,20999999999991</text:p>
          </table:table-cell>
          <table:table-cell table:style-name="ce1" table:formula="of:=[.H623]" office:value-type="float" office:value="11.3280786705185" calcext:value-type="float">
            <text:p>11,3280786705185</text:p>
          </table:table-cell>
          <table:table-cell table:style-name="ce1" table:formula="of:=-68 - ([.E624]^2/Ao)" office:value-type="float" office:value="-68.0855502442436" calcext:value-type="float">
            <text:p>-68,0855502442436</text:p>
          </table:table-cell>
          <table:table-cell table:style-name="ce1" table:formula="of:=[.G623]+h" office:value-type="float" office:value="6.21999999999991" calcext:value-type="float">
            <text:p>6,21999999999991</text:p>
          </table:table-cell>
          <table:table-cell table:style-name="ce1" table:formula="of:=[.H623]+ h*[.F624]" office:value-type="float" office:value="10.647223168076" calcext:value-type="float">
            <text:p>10,6472231680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4]" office:value-type="float" office:value="6.21999999999991" calcext:value-type="float">
            <text:p>6,21999999999991</text:p>
          </table:table-cell>
          <table:table-cell table:style-name="ce1" table:formula="of:=[.H624]" office:value-type="float" office:value="10.647223168076" calcext:value-type="float">
            <text:p>10,647223168076</text:p>
          </table:table-cell>
          <table:table-cell table:style-name="ce1" table:formula="of:=-68 - ([.E625]^2/Ao)" office:value-type="float" office:value="-68.0755755741272" calcext:value-type="float">
            <text:p>-68,0755755741272</text:p>
          </table:table-cell>
          <table:table-cell table:style-name="ce1" table:formula="of:=[.G624]+h" office:value-type="float" office:value="6.22999999999991" calcext:value-type="float">
            <text:p>6,22999999999991</text:p>
          </table:table-cell>
          <table:table-cell table:style-name="ce1" table:formula="of:=[.H624]+ h*[.F625]" office:value-type="float" office:value="9.96646741233477" calcext:value-type="float">
            <text:p>9,966467412334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5]" office:value-type="float" office:value="6.22999999999991" calcext:value-type="float">
            <text:p>6,22999999999991</text:p>
          </table:table-cell>
          <table:table-cell table:style-name="ce1" table:formula="of:=[.H625]" office:value-type="float" office:value="9.96646741233477" calcext:value-type="float">
            <text:p>9,96646741233477</text:p>
          </table:table-cell>
          <table:table-cell table:style-name="ce1" table:formula="of:=-68 - ([.E626]^2/Ao)" office:value-type="float" office:value="-68.0662203151208" calcext:value-type="float">
            <text:p>-68,0662203151208</text:p>
          </table:table-cell>
          <table:table-cell table:style-name="ce1" table:formula="of:=[.G625]+h" office:value-type="float" office:value="6.23999999999991" calcext:value-type="float">
            <text:p>6,23999999999991</text:p>
          </table:table-cell>
          <table:table-cell table:style-name="ce1" table:formula="of:=[.H625]+ h*[.F626]" office:value-type="float" office:value="9.28580520918356" calcext:value-type="float">
            <text:p>9,285805209183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6]" office:value-type="float" office:value="6.23999999999991" calcext:value-type="float">
            <text:p>6,23999999999991</text:p>
          </table:table-cell>
          <table:table-cell table:style-name="ce1" table:formula="of:=[.H626]" office:value-type="float" office:value="9.28580520918356" calcext:value-type="float">
            <text:p>9,28580520918356</text:p>
          </table:table-cell>
          <table:table-cell table:style-name="ce1" table:formula="of:=-68 - ([.E627]^2/Ao)" office:value-type="float" office:value="-68.0574841189219" calcext:value-type="float">
            <text:p>-68,0574841189219</text:p>
          </table:table-cell>
          <table:table-cell table:style-name="ce1" table:formula="of:=[.G626]+h" office:value-type="float" office:value="6.24999999999991" calcext:value-type="float">
            <text:p>6,24999999999991</text:p>
          </table:table-cell>
          <table:table-cell table:style-name="ce1" table:formula="of:=[.H626]+ h*[.F627]" office:value-type="float" office:value="8.60523036799434" calcext:value-type="float">
            <text:p>8,605230367994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7]" office:value-type="float" office:value="6.24999999999991" calcext:value-type="float">
            <text:p>6,24999999999991</text:p>
          </table:table-cell>
          <table:table-cell table:style-name="ce1" table:formula="of:=[.H627]" office:value-type="float" office:value="8.60523036799434" calcext:value-type="float">
            <text:p>8,60523036799434</text:p>
          </table:table-cell>
          <table:table-cell table:style-name="ce1" table:formula="of:=-68 - ([.E628]^2/Ao)" office:value-type="float" office:value="-68.0493666597908" calcext:value-type="float">
            <text:p>-68,0493666597908</text:p>
          </table:table-cell>
          <table:table-cell table:style-name="ce1" table:formula="of:=[.G627]+h" office:value-type="float" office:value="6.25999999999991" calcext:value-type="float">
            <text:p>6,25999999999991</text:p>
          </table:table-cell>
          <table:table-cell table:style-name="ce1" table:formula="of:=[.H627]+ h*[.F628]" office:value-type="float" office:value="7.92473670139643" calcext:value-type="float">
            <text:p>7,924736701396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8]" office:value-type="float" office:value="6.25999999999991" calcext:value-type="float">
            <text:p>6,25999999999991</text:p>
          </table:table-cell>
          <table:table-cell table:style-name="ce1" table:formula="of:=[.H628]" office:value-type="float" office:value="7.92473670139643" calcext:value-type="float">
            <text:p>7,92473670139643</text:p>
          </table:table-cell>
          <table:table-cell table:style-name="ce1" table:formula="of:=-68 - ([.E629]^2/Ao)" office:value-type="float" office:value="-68.0418676345243" calcext:value-type="float">
            <text:p>-68,0418676345243</text:p>
          </table:table-cell>
          <table:table-cell table:style-name="ce1" table:formula="of:=[.G628]+h" office:value-type="float" office:value="6.26999999999991" calcext:value-type="float">
            <text:p>6,26999999999991</text:p>
          </table:table-cell>
          <table:table-cell table:style-name="ce1" table:formula="of:=[.H628]+ h*[.F629]" office:value-type="float" office:value="7.24431802505119" calcext:value-type="float">
            <text:p>7,244318025051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9]" office:value-type="float" office:value="6.26999999999991" calcext:value-type="float">
            <text:p>6,26999999999991</text:p>
          </table:table-cell>
          <table:table-cell table:style-name="ce1" table:formula="of:=[.H629]" office:value-type="float" office:value="7.24431802505119" calcext:value-type="float">
            <text:p>7,24431802505119</text:p>
          </table:table-cell>
          <table:table-cell table:style-name="ce1" table:formula="of:=-68 - ([.E630]^2/Ao)" office:value-type="float" office:value="-68.0349867624321" calcext:value-type="float">
            <text:p>-68,0349867624321</text:p>
          </table:table-cell>
          <table:table-cell table:style-name="ce1" table:formula="of:=[.G629]+h" office:value-type="float" office:value="6.27999999999991" calcext:value-type="float">
            <text:p>6,27999999999991</text:p>
          </table:table-cell>
          <table:table-cell table:style-name="ce1" table:formula="of:=[.H629]+ h*[.F630]" office:value-type="float" office:value="6.56396815742687" calcext:value-type="float">
            <text:p>6,563968157426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0]" office:value-type="float" office:value="6.27999999999991" calcext:value-type="float">
            <text:p>6,27999999999991</text:p>
          </table:table-cell>
          <table:table-cell table:style-name="ce1" table:formula="of:=[.H630]" office:value-type="float" office:value="6.56396815742687" calcext:value-type="float">
            <text:p>6,56396815742687</text:p>
          </table:table-cell>
          <table:table-cell table:style-name="ce1" table:formula="of:=-68 - ([.E631]^2/Ao)" office:value-type="float" office:value="-68.0287237853145" calcext:value-type="float">
            <text:p>-68,0287237853145</text:p>
          </table:table-cell>
          <table:table-cell table:style-name="ce1" table:formula="of:=[.G630]+h" office:value-type="float" office:value="6.28999999999991" calcext:value-type="float">
            <text:p>6,28999999999991</text:p>
          </table:table-cell>
          <table:table-cell table:style-name="ce1" table:formula="of:=[.H630]+ h*[.F631]" office:value-type="float" office:value="5.88368091957373" calcext:value-type="float">
            <text:p>5,883680919573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1]" office:value-type="float" office:value="6.28999999999991" calcext:value-type="float">
            <text:p>6,28999999999991</text:p>
          </table:table-cell>
          <table:table-cell table:style-name="ce1" table:formula="of:=[.H631]" office:value-type="float" office:value="5.88368091957373" calcext:value-type="float">
            <text:p>5,88368091957373</text:p>
          </table:table-cell>
          <table:table-cell table:style-name="ce1" table:formula="of:=-68 - ([.E632]^2/Ao)" office:value-type="float" office:value="-68.0230784674422" calcext:value-type="float">
            <text:p>-68,0230784674422</text:p>
          </table:table-cell>
          <table:table-cell table:style-name="ce1" table:formula="of:=[.G631]+h" office:value-type="float" office:value="6.29999999999991" calcext:value-type="float">
            <text:p>6,29999999999991</text:p>
          </table:table-cell>
          <table:table-cell table:style-name="ce1" table:formula="of:=[.H631]+ h*[.F632]" office:value-type="float" office:value="5.2034501348993" calcext:value-type="float">
            <text:p>5,20345013489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2]" office:value-type="float" office:value="6.29999999999991" calcext:value-type="float">
            <text:p>6,29999999999991</text:p>
          </table:table-cell>
          <table:table-cell table:style-name="ce1" table:formula="of:=[.H632]" office:value-type="float" office:value="5.2034501348993" calcext:value-type="float">
            <text:p>5,2034501348993</text:p>
          </table:table-cell>
          <table:table-cell table:style-name="ce1" table:formula="of:=-68 - ([.E633]^2/Ao)" office:value-type="float" office:value="-68.0180505955376" calcext:value-type="float">
            <text:p>-68,0180505955376</text:p>
          </table:table-cell>
          <table:table-cell table:style-name="ce1" table:formula="of:=[.G632]+h" office:value-type="float" office:value="6.30999999999991" calcext:value-type="float">
            <text:p>6,30999999999991</text:p>
          </table:table-cell>
          <table:table-cell table:style-name="ce1" table:formula="of:=[.H632]+ h*[.F633]" office:value-type="float" office:value="4.52326962894393" calcext:value-type="float">
            <text:p>4,523269628943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3]" office:value-type="float" office:value="6.30999999999991" calcext:value-type="float">
            <text:p>6,30999999999991</text:p>
          </table:table-cell>
          <table:table-cell table:style-name="ce1" table:formula="of:=[.H633]" office:value-type="float" office:value="4.52326962894393" calcext:value-type="float">
            <text:p>4,52326962894393</text:p>
          </table:table-cell>
          <table:table-cell table:style-name="ce1" table:formula="of:=-68 - ([.E634]^2/Ao)" office:value-type="float" office:value="-68.0136399787574" calcext:value-type="float">
            <text:p>-68,0136399787574</text:p>
          </table:table-cell>
          <table:table-cell table:style-name="ce1" table:formula="of:=[.G633]+h" office:value-type="float" office:value="6.31999999999991" calcext:value-type="float">
            <text:p>6,31999999999991</text:p>
          </table:table-cell>
          <table:table-cell table:style-name="ce1" table:formula="of:=[.H633]+ h*[.F634]" office:value-type="float" office:value="3.84313322915635" calcext:value-type="float">
            <text:p>3,843133229156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4]" office:value-type="float" office:value="6.31999999999991" calcext:value-type="float">
            <text:p>6,31999999999991</text:p>
          </table:table-cell>
          <table:table-cell table:style-name="ce1" table:formula="of:=[.H634]" office:value-type="float" office:value="3.84313322915635" calcext:value-type="float">
            <text:p>3,84313322915635</text:p>
          </table:table-cell>
          <table:table-cell table:style-name="ce1" table:formula="of:=-68 - ([.E635]^2/Ao)" office:value-type="float" office:value="-68.009846448678" calcext:value-type="float">
            <text:p>-68,009846448678</text:p>
          </table:table-cell>
          <table:table-cell table:style-name="ce1" table:formula="of:=[.G634]+h" office:value-type="float" office:value="6.32999999999991" calcext:value-type="float">
            <text:p>6,32999999999991</text:p>
          </table:table-cell>
          <table:table-cell table:style-name="ce1" table:formula="of:=[.H634]+ h*[.F635]" office:value-type="float" office:value="3.16303476466957" calcext:value-type="float">
            <text:p>3,163034764669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5]" office:value-type="float" office:value="6.32999999999991" calcext:value-type="float">
            <text:p>6,32999999999991</text:p>
          </table:table-cell>
          <table:table-cell table:style-name="ce1" table:formula="of:=[.H635]" office:value-type="float" office:value="3.16303476466957" calcext:value-type="float">
            <text:p>3,16303476466957</text:p>
          </table:table-cell>
          <table:table-cell table:style-name="ce1" table:formula="of:=-68 - ([.E636]^2/Ao)" office:value-type="float" office:value="-68.0066698592817" calcext:value-type="float">
            <text:p>-68,0066698592817</text:p>
          </table:table-cell>
          <table:table-cell table:style-name="ce1" table:formula="of:=[.G635]+h" office:value-type="float" office:value="6.33999999999991" calcext:value-type="float">
            <text:p>6,33999999999991</text:p>
          </table:table-cell>
          <table:table-cell table:style-name="ce1" table:formula="of:=[.H635]+ h*[.F636]" office:value-type="float" office:value="2.48296806607676" calcext:value-type="float">
            <text:p>2,482968066076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6]" office:value-type="float" office:value="6.33999999999991" calcext:value-type="float">
            <text:p>6,33999999999991</text:p>
          </table:table-cell>
          <table:table-cell table:style-name="ce1" table:formula="of:=[.H636]" office:value-type="float" office:value="2.48296806607676" calcext:value-type="float">
            <text:p>2,48296806607676</text:p>
          </table:table-cell>
          <table:table-cell table:style-name="ce1" table:formula="of:=-68 - ([.E637]^2/Ao)" office:value-type="float" office:value="-68.0041100869448" calcext:value-type="float">
            <text:p>-68,0041100869448</text:p>
          </table:table-cell>
          <table:table-cell table:style-name="ce1" table:formula="of:=[.G636]+h" office:value-type="float" office:value="6.34999999999991" calcext:value-type="float">
            <text:p>6,34999999999991</text:p>
          </table:table-cell>
          <table:table-cell table:style-name="ce1" table:formula="of:=[.H636]+ h*[.F637]" office:value-type="float" office:value="1.80292696520731" calcext:value-type="float">
            <text:p>1,802926965207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7]" office:value-type="float" office:value="6.34999999999991" calcext:value-type="float">
            <text:p>6,34999999999991</text:p>
          </table:table-cell>
          <table:table-cell table:style-name="ce1" table:formula="of:=[.H637]" office:value-type="float" office:value="1.80292696520731" calcext:value-type="float">
            <text:p>1,80292696520731</text:p>
          </table:table-cell>
          <table:table-cell table:style-name="ce1" table:formula="of:=-68 - ([.E638]^2/Ao)" office:value-type="float" office:value="-68.0021670304279" calcext:value-type="float">
            <text:p>-68,0021670304279</text:p>
          </table:table-cell>
          <table:table-cell table:style-name="ce1" table:formula="of:=[.G637]+h" office:value-type="float" office:value="6.35999999999991" calcext:value-type="float">
            <text:p>6,35999999999991</text:p>
          </table:table-cell>
          <table:table-cell table:style-name="ce1" table:formula="of:=[.H637]+ h*[.F638]" office:value-type="float" office:value="1.12290529490303" calcext:value-type="float">
            <text:p>1,122905294903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8]" office:value-type="float" office:value="6.35999999999991" calcext:value-type="float">
            <text:p>6,35999999999991</text:p>
          </table:table-cell>
          <table:table-cell table:style-name="ce1" table:formula="of:=[.H638]" office:value-type="float" office:value="1.12290529490303" calcext:value-type="float">
            <text:p>1,12290529490303</text:p>
          </table:table-cell>
          <table:table-cell table:style-name="ce1" table:formula="of:=-68 - ([.E639]^2/Ao)" office:value-type="float" office:value="-68.0008406108675" calcext:value-type="float">
            <text:p>-68,0008406108675</text:p>
          </table:table-cell>
          <table:table-cell table:style-name="ce1" table:formula="of:=[.G638]+h" office:value-type="float" office:value="6.36999999999991" calcext:value-type="float">
            <text:p>6,36999999999991</text:p>
          </table:table-cell>
          <table:table-cell table:style-name="ce1" table:formula="of:=[.H638]+ h*[.F639]" office:value-type="float" office:value="0.442896888794354" calcext:value-type="float">
            <text:p>0,4428968887943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9]" office:value-type="float" office:value="6.36999999999991" calcext:value-type="float">
            <text:p>6,36999999999991</text:p>
          </table:table-cell>
          <table:table-cell table:style-name="ce1" table:formula="of:=[.H639]" office:value-type="float" office:value="0.442896888794354" calcext:value-type="float">
            <text:p>0,442896888794354</text:p>
          </table:table-cell>
          <table:table-cell table:style-name="ce1" table:formula="of:=-68 - ([.E640]^2/Ao)" office:value-type="float" office:value="-68.0001307717694" calcext:value-type="float">
            <text:p>-68,0001307717694</text:p>
          </table:table-cell>
          <table:table-cell table:style-name="ce1" table:formula="of:=[.G639]+h" office:value-type="float" office:value="6.37999999999991" calcext:value-type="float">
            <text:p>6,37999999999991</text:p>
          </table:table-cell>
          <table:table-cell table:style-name="ce1" table:formula="of:=[.H639]+ h*[.F640]" office:value-type="float" office:value="-0.23710441892334" calcext:value-type="float">
            <text:p>-0,237104418923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0]" office:value-type="float" office:value="6.37999999999991" calcext:value-type="float">
            <text:p>6,37999999999991</text:p>
          </table:table-cell>
          <table:table-cell table:style-name="ce1" table:formula="of:=[.H640]" office:value-type="float" office:value="-0.23710441892334" calcext:value-type="float">
            <text:p>-0,23710441892334</text:p>
          </table:table-cell>
          <table:table-cell table:style-name="ce1" table:formula="of:=-68 - ([.E641]^2/Ao)" office:value-type="float" office:value="-68.0000374790037" calcext:value-type="float">
            <text:p>-68,0000374790037</text:p>
          </table:table-cell>
          <table:table-cell table:style-name="ce1" table:formula="of:=[.G640]+h" office:value-type="float" office:value="6.38999999999991" calcext:value-type="float">
            <text:p>6,38999999999991</text:p>
          </table:table-cell>
          <table:table-cell table:style-name="ce1" table:formula="of:=[.H640]+ h*[.F641]" office:value-type="float" office:value="-0.917104793713377" calcext:value-type="float">
            <text:p>-0,917104793713377</text:p>
          </table:table-cell>
          <table:table-cell table:number-columns-repeated="4"/>
        </table:table-row>
        <table:table-row table:style-name="ro2" table:number-rows-repeated="98">
          <table:table-cell table:number-columns-repeated="3"/>
          <table:table-cell table:style-name="ce1" table:number-columns-repeated="5"/>
          <table:table-cell table:number-columns-repeated="4"/>
        </table:table-row>
        <table:table-row table:style-name="ro2" table:number-rows-repeated="1047836">
          <table:table-cell table:number-columns-repeated="12"/>
        </table:table-row>
        <table:table-row table:style-name="ro2">
          <table:table-cell table:number-columns-repeated="12"/>
        </table:table-row>
        <table:named-expressions>
          <table:named-range table:name="Ao" table:base-cell-address="$'Ao = 1500'.$B$3" table:cell-range-address="$'Ao = 1500'.$B$3"/>
          <table:named-range table:name="h" table:base-cell-address="$'Ao = 1500'.$A$1" table:cell-range-address="$'Ao = 1500'.$B$1"/>
          <table:named-range table:name="to" table:base-cell-address="$'Ao = 1500'.$A$1" table:cell-range-address="$'Ao = 1500'.$B$2"/>
        </table:named-expressions>
      </table:table>
      <table:table table:name="Ao = 20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01" calcext:value-type="float">
            <text:p>0,01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A/dt</text:p>
          </table:table-cell>
          <table:table-cell table:style-name="ce3" office:value-type="string" calcext:value-type="string">
            <text:p>t(i+1)</text:p>
          </table:table-cell>
          <table:table-cell table:style-name="ce3" office:value-type="string" calcext:value-type="string">
            <text:p>A(i+1)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" table:formula="of:=to" office:value-type="float" office:value="0" calcext:value-type="float">
            <text:p>0</text:p>
          </table:table-cell>
          <table:table-cell table:style-name="ce1" table:formula="of:=Ao" office:value-type="float" office:value="2000" calcext:value-type="float">
            <text:p>2000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1" table:formula="of:=[.G2]" office:value-type="float" office:value="0" calcext:value-type="float">
            <text:p>0</text:p>
          </table:table-cell>
          <table:table-cell table:style-name="ce1" table:formula="of:=[.H2]" office:value-type="float" office:value="2000" calcext:value-type="float">
            <text:p>2000</text:p>
          </table:table-cell>
          <table:table-cell table:style-name="ce1" table:formula="of:=- 68 - ([.E3]^2/Ao)" office:value-type="float" office:value="-2068" calcext:value-type="float">
            <text:p>-2068</text:p>
          </table:table-cell>
          <table:table-cell table:style-name="ce1" table:formula="of:=[.G2]+h" office:value-type="float" office:value="0.01" calcext:value-type="float">
            <text:p>0,01</text:p>
          </table:table-cell>
          <table:table-cell table:style-name="ce1" table:formula="of:=[.H2]+ h*[.F3]" office:value-type="float" office:value="1979.32" calcext:value-type="float">
            <text:p>1979,3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ce1" table:formula="of:=[.G3]" office:value-type="float" office:value="0.01" calcext:value-type="float">
            <text:p>0,01</text:p>
          </table:table-cell>
          <table:table-cell table:style-name="ce1" table:formula="of:=[.H3]" office:value-type="float" office:value="1979.32" calcext:value-type="float">
            <text:p>1979,32</text:p>
          </table:table-cell>
          <table:table-cell table:style-name="ce1" table:formula="of:=-68 - ([.E4]^2/Ao)" office:value-type="float" office:value="-2026.8538312" calcext:value-type="float">
            <text:p>-2026,8538312</text:p>
          </table:table-cell>
          <table:table-cell table:style-name="ce1" table:formula="of:=[.G3]+h" office:value-type="float" office:value="0.02" calcext:value-type="float">
            <text:p>0,02</text:p>
          </table:table-cell>
          <table:table-cell table:style-name="ce1" table:formula="of:=[.H3]+ h*[.F4]" office:value-type="float" office:value="1959.051461688" calcext:value-type="float">
            <text:p>1959,051461688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4]" office:value-type="float" office:value="0.02" calcext:value-type="float">
            <text:p>0,02</text:p>
          </table:table-cell>
          <table:table-cell table:style-name="ce1" table:formula="of:=[.H4]" office:value-type="float" office:value="1959.051461688" calcext:value-type="float">
            <text:p>1959,051461688</text:p>
          </table:table-cell>
          <table:table-cell table:style-name="ce1" table:formula="of:=-68 - ([.E5]^2/Ao)" office:value-type="float" office:value="-1986.94131477094" calcext:value-type="float">
            <text:p>-1986,94131477094</text:p>
          </table:table-cell>
          <table:table-cell table:style-name="ce1" table:formula="of:=[.G4]+h" office:value-type="float" office:value="0.03" calcext:value-type="float">
            <text:p>0,03</text:p>
          </table:table-cell>
          <table:table-cell table:style-name="ce1" table:formula="of:=[.H4]+ h*[.F5]" office:value-type="float" office:value="1939.18204854029" calcext:value-type="float">
            <text:p>1939,18204854029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5]" office:value-type="float" office:value="0.03" calcext:value-type="float">
            <text:p>0,03</text:p>
          </table:table-cell>
          <table:table-cell table:style-name="ce1" table:formula="of:=[.H5]" office:value-type="float" office:value="1939.18204854029" calcext:value-type="float">
            <text:p>1939,18204854029</text:p>
          </table:table-cell>
          <table:table-cell table:style-name="ce1" table:formula="of:=-68 - ([.E6]^2/Ao)" office:value-type="float" office:value="-1948.21350869046" calcext:value-type="float">
            <text:p>-1948,21350869046</text:p>
          </table:table-cell>
          <table:table-cell table:style-name="ce1" table:formula="of:=[.G5]+h" office:value-type="float" office:value="0.04" calcext:value-type="float">
            <text:p>0,04</text:p>
          </table:table-cell>
          <table:table-cell table:style-name="ce1" table:formula="of:=[.H5]+ h*[.F6]" office:value-type="float" office:value="1919.69991345339" calcext:value-type="float">
            <text:p>1919,69991345339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dA/dt = -68 – A² / Ao</text:p>
          </table:table-cell>
          <table:table-cell table:number-columns-repeated="2"/>
          <table:table-cell table:style-name="ce1" table:formula="of:=[.G6]" office:value-type="float" office:value="0.04" calcext:value-type="float">
            <text:p>0,04</text:p>
          </table:table-cell>
          <table:table-cell table:style-name="ce1" table:formula="of:=[.H6]" office:value-type="float" office:value="1919.69991345339" calcext:value-type="float">
            <text:p>1919,69991345339</text:p>
          </table:table-cell>
          <table:table-cell table:style-name="ce1" table:formula="of:=-68 - ([.E7]^2/Ao)" office:value-type="float" office:value="-1910.62387885647" calcext:value-type="float">
            <text:p>-1910,62387885647</text:p>
          </table:table-cell>
          <table:table-cell table:style-name="ce1" table:formula="of:=[.G6]+h" office:value-type="float" office:value="0.05" calcext:value-type="float">
            <text:p>0,05</text:p>
          </table:table-cell>
          <table:table-cell table:style-name="ce1" table:formula="of:=[.H6]+ h*[.F7]" office:value-type="float" office:value="1900.59367466482" calcext:value-type="float">
            <text:p>1900,5936746648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7]" office:value-type="float" office:value="0.05" calcext:value-type="float">
            <text:p>0,05</text:p>
          </table:table-cell>
          <table:table-cell table:style-name="ce1" table:formula="of:=[.H7]" office:value-type="float" office:value="1900.59367466482" calcext:value-type="float">
            <text:p>1900,59367466482</text:p>
          </table:table-cell>
          <table:table-cell table:style-name="ce1" table:formula="of:=-68 - ([.E8]^2/Ao)" office:value-type="float" office:value="-1874.12815808796" calcext:value-type="float">
            <text:p>-1874,12815808796</text:p>
          </table:table-cell>
          <table:table-cell table:style-name="ce1" table:formula="of:=[.G7]+h" office:value-type="float" office:value="0.06" calcext:value-type="float">
            <text:p>0,06</text:p>
          </table:table-cell>
          <table:table-cell table:style-name="ce1" table:formula="of:=[.H7]+ h*[.F8]" office:value-type="float" office:value="1881.85239308394" calcext:value-type="float">
            <text:p>1881,85239308394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8]" office:value-type="float" office:value="0.06" calcext:value-type="float">
            <text:p>0,06</text:p>
          </table:table-cell>
          <table:table-cell table:style-name="ce1" table:formula="of:=[.H8]" office:value-type="float" office:value="1881.85239308394" calcext:value-type="float">
            <text:p>1881,85239308394</text:p>
          </table:table-cell>
          <table:table-cell table:style-name="ce1" table:formula="of:=-68 - ([.E9]^2/Ao)" office:value-type="float" office:value="-1838.68421467788" calcext:value-type="float">
            <text:p>-1838,68421467788</text:p>
          </table:table-cell>
          <table:table-cell table:style-name="ce1" table:formula="of:=[.G8]+h" office:value-type="float" office:value="0.07" calcext:value-type="float">
            <text:p>0,07</text:p>
          </table:table-cell>
          <table:table-cell table:style-name="ce1" table:formula="of:=[.H8]+ h*[.F9]" office:value-type="float" office:value="1863.46555093716" calcext:value-type="float">
            <text:p>1863,46555093716</text:p>
          </table:table-cell>
          <table:table-cell/>
          <table:table-cell table:style-name="ce6"/>
          <table:table-cell/>
          <table:table-cell table:style-name="ce1"/>
        </table:table-row>
        <table:table-row table:style-name="ro2">
          <table:table-cell table:number-columns-repeated="3"/>
          <table:table-cell table:style-name="ce1" table:formula="of:=[.G9]" office:value-type="float" office:value="0.07" calcext:value-type="float">
            <text:p>0,07</text:p>
          </table:table-cell>
          <table:table-cell table:style-name="ce1" table:formula="of:=[.H9]" office:value-type="float" office:value="1863.46555093716" calcext:value-type="float">
            <text:p>1863,46555093716</text:p>
          </table:table-cell>
          <table:table-cell table:style-name="ce1" table:formula="of:=-68 - ([.E10]^2/Ao)" office:value-type="float" office:value="-1804.25192976477" calcext:value-type="float">
            <text:p>-1804,25192976477</text:p>
          </table:table-cell>
          <table:table-cell table:style-name="ce1" table:formula="of:=[.G9]+h" office:value-type="float" office:value="0.08" calcext:value-type="float">
            <text:p>0,08</text:p>
          </table:table-cell>
          <table:table-cell table:style-name="ce1" table:formula="of:=[.H9]+ h*[.F10]" office:value-type="float" office:value="1845.42303163952" calcext:value-type="float">
            <text:p>1845,4230316395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y(i+1) = Yi + h * Y`i</text:p>
          </table:table-cell>
          <table:table-cell table:number-columns-repeated="2"/>
          <table:table-cell table:style-name="ce1" table:formula="of:=[.G10]" office:value-type="float" office:value="0.08" calcext:value-type="float">
            <text:p>0,08</text:p>
          </table:table-cell>
          <table:table-cell table:style-name="ce1" table:formula="of:=[.H10]" office:value-type="float" office:value="1845.42303163952" calcext:value-type="float">
            <text:p>1845,42303163952</text:p>
          </table:table-cell>
          <table:table-cell table:style-name="ce1" table:formula="of:=-68 - ([.E11]^2/Ao)" office:value-type="float" office:value="-1770.79308285279" calcext:value-type="float">
            <text:p>-1770,79308285279</text:p>
          </table:table-cell>
          <table:table-cell table:style-name="ce1" table:formula="of:=[.G10]+h" office:value-type="float" office:value="0.09" calcext:value-type="float">
            <text:p>0,09</text:p>
          </table:table-cell>
          <table:table-cell table:style-name="ce1" table:formula="of:=[.H10]+ h*[.F11]" office:value-type="float" office:value="1827.71510081099" calcext:value-type="float">
            <text:p>1827,71510081099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1]" office:value-type="float" office:value="0.09" calcext:value-type="float">
            <text:p>0,09</text:p>
          </table:table-cell>
          <table:table-cell table:style-name="ce1" table:formula="of:=[.H11]" office:value-type="float" office:value="1827.71510081099" calcext:value-type="float">
            <text:p>1827,71510081099</text:p>
          </table:table-cell>
          <table:table-cell table:style-name="ce1" table:formula="of:=-68 - ([.E12]^2/Ao)" office:value-type="float" office:value="-1738.27124486626" calcext:value-type="float">
            <text:p>-1738,27124486626</text:p>
          </table:table-cell>
          <table:table-cell table:style-name="ce1" table:formula="of:=[.G11]+h" office:value-type="float" office:value="0.1" calcext:value-type="float">
            <text:p>0,1</text:p>
          </table:table-cell>
          <table:table-cell table:style-name="ce1" table:formula="of:=[.H11]+ h*[.F12]" office:value-type="float" office:value="1810.33238836232" calcext:value-type="float">
            <text:p>1810,33238836232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2]" office:value-type="float" office:value="0.1" calcext:value-type="float">
            <text:p>0,1</text:p>
          </table:table-cell>
          <table:table-cell table:style-name="ce1" table:formula="of:=[.H12]" office:value-type="float" office:value="1810.33238836232" calcext:value-type="float">
            <text:p>1810,33238836232</text:p>
          </table:table-cell>
          <table:table-cell table:style-name="ce1" table:formula="of:=-68 - ([.E13]^2/Ao)" office:value-type="float" office:value="-1706.65167817682" calcext:value-type="float">
            <text:p>-1706,65167817682</text:p>
          </table:table-cell>
          <table:table-cell table:style-name="ce1" table:formula="of:=[.G12]+h" office:value-type="float" office:value="0.11" calcext:value-type="float">
            <text:p>0,11</text:p>
          </table:table-cell>
          <table:table-cell table:style-name="ce1" table:formula="of:=[.H12]+ h*[.F13]" office:value-type="float" office:value="1793.26587158056" calcext:value-type="float">
            <text:p>1793,26587158056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1" table:formula="of:=[.G13]" office:value-type="float" office:value="0.11" calcext:value-type="float">
            <text:p>0,11</text:p>
          </table:table-cell>
          <table:table-cell table:style-name="ce1" table:formula="of:=[.H13]" office:value-type="float" office:value="1793.26587158056" calcext:value-type="float">
            <text:p>1793,26587158056</text:p>
          </table:table-cell>
          <table:table-cell table:style-name="ce1" table:formula="of:=-68 - ([.E14]^2/Ao)" office:value-type="float" office:value="-1675.90124308779" calcext:value-type="float">
            <text:p>-1675,90124308779</text:p>
          </table:table-cell>
          <table:table-cell table:style-name="ce1" table:formula="of:=[.G13]+h" office:value-type="float" office:value="0.12" calcext:value-type="float">
            <text:p>0,12</text:p>
          </table:table-cell>
          <table:table-cell table:style-name="ce1" table:formula="of:=[.H13]+ h*[.F14]" office:value-type="float" office:value="1776.50685914968" calcext:value-type="float">
            <text:p>1776,506859149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]" office:value-type="float" office:value="0.12" calcext:value-type="float">
            <text:p>0,12</text:p>
          </table:table-cell>
          <table:table-cell table:style-name="ce1" table:formula="of:=[.H14]" office:value-type="float" office:value="1776.50685914968" calcext:value-type="float">
            <text:p>1776,50685914968</text:p>
          </table:table-cell>
          <table:table-cell table:style-name="ce1" table:formula="of:=-68 - ([.E15]^2/Ao)" office:value-type="float" office:value="-1645.98831030293" calcext:value-type="float">
            <text:p>-1645,98831030293</text:p>
          </table:table-cell>
          <table:table-cell table:style-name="ce1" table:formula="of:=[.G14]+h" office:value-type="float" office:value="0.13" calcext:value-type="float">
            <text:p>0,13</text:p>
          </table:table-cell>
          <table:table-cell table:style-name="ce1" table:formula="of:=[.H14]+ h*[.F15]" office:value-type="float" office:value="1760.04697604665" calcext:value-type="float">
            <text:p>1760,046976046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]" office:value-type="float" office:value="0.13" calcext:value-type="float">
            <text:p>0,13</text:p>
          </table:table-cell>
          <table:table-cell table:style-name="ce1" table:formula="of:=[.H15]" office:value-type="float" office:value="1760.04697604665" calcext:value-type="float">
            <text:p>1760,04697604665</text:p>
          </table:table-cell>
          <table:table-cell table:style-name="ce1" table:formula="of:=-68 - ([.E16]^2/Ao)" office:value-type="float" office:value="-1616.88267894548" calcext:value-type="float">
            <text:p>-1616,88267894548</text:p>
          </table:table-cell>
          <table:table-cell table:style-name="ce1" table:formula="of:=[.G15]+h" office:value-type="float" office:value="0.14" calcext:value-type="float">
            <text:p>0,14</text:p>
          </table:table-cell>
          <table:table-cell table:style-name="ce1" table:formula="of:=[.H15]+ h*[.F16]" office:value-type="float" office:value="1743.87814925719" calcext:value-type="float">
            <text:p>1743,878149257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]" office:value-type="float" office:value="0.14" calcext:value-type="float">
            <text:p>0,14</text:p>
          </table:table-cell>
          <table:table-cell table:style-name="ce1" table:formula="of:=[.H16]" office:value-type="float" office:value="1743.87814925719" calcext:value-type="float">
            <text:p>1743,87814925719</text:p>
          </table:table-cell>
          <table:table-cell table:style-name="ce1" table:formula="of:=-68 - ([.E17]^2/Ao)" office:value-type="float" office:value="-1588.55549972835" calcext:value-type="float">
            <text:p>-1588,55549972835</text:p>
          </table:table-cell>
          <table:table-cell table:style-name="ce1" table:formula="of:=[.G16]+h" office:value-type="float" office:value="0.15" calcext:value-type="float">
            <text:p>0,15</text:p>
          </table:table-cell>
          <table:table-cell table:style-name="ce1" table:formula="of:=[.H16]+ h*[.F17]" office:value-type="float" office:value="1727.99259425991" calcext:value-type="float">
            <text:p>1727,992594259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]" office:value-type="float" office:value="0.15" calcext:value-type="float">
            <text:p>0,15</text:p>
          </table:table-cell>
          <table:table-cell table:style-name="ce1" table:formula="of:=[.H17]" office:value-type="float" office:value="1727.99259425991" calcext:value-type="float">
            <text:p>1727,99259425991</text:p>
          </table:table-cell>
          <table:table-cell table:style-name="ce1" table:formula="of:=-68 - ([.E18]^2/Ao)" office:value-type="float" office:value="-1560.97920290855" calcext:value-type="float">
            <text:p>-1560,97920290855</text:p>
          </table:table-cell>
          <table:table-cell table:style-name="ce1" table:formula="of:=[.G17]+h" office:value-type="float" office:value="0.16" calcext:value-type="float">
            <text:p>0,16</text:p>
          </table:table-cell>
          <table:table-cell table:style-name="ce1" table:formula="of:=[.H17]+ h*[.F18]" office:value-type="float" office:value="1712.38280223083" calcext:value-type="float">
            <text:p>1712,382802230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]" office:value-type="float" office:value="0.16" calcext:value-type="float">
            <text:p>0,16</text:p>
          </table:table-cell>
          <table:table-cell table:style-name="ce1" table:formula="of:=[.H18]" office:value-type="float" office:value="1712.38280223083" calcext:value-type="float">
            <text:p>1712,38280223083</text:p>
          </table:table-cell>
          <table:table-cell table:style-name="ce1" table:formula="of:=-68 - ([.E19]^2/Ao)" office:value-type="float" office:value="-1534.12743068795" calcext:value-type="float">
            <text:p>-1534,12743068795</text:p>
          </table:table-cell>
          <table:table-cell table:style-name="ce1" table:formula="of:=[.G18]+h" office:value-type="float" office:value="0.17" calcext:value-type="float">
            <text:p>0,17</text:p>
          </table:table-cell>
          <table:table-cell table:style-name="ce1" table:formula="of:=[.H18]+ h*[.F19]" office:value-type="float" office:value="1697.04152792395" calcext:value-type="float">
            <text:p>1697,041527923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]" office:value-type="float" office:value="0.17" calcext:value-type="float">
            <text:p>0,17</text:p>
          </table:table-cell>
          <table:table-cell table:style-name="ce1" table:formula="of:=[.H19]" office:value-type="float" office:value="1697.04152792395" calcext:value-type="float">
            <text:p>1697,04152792395</text:p>
          </table:table-cell>
          <table:table-cell table:style-name="ce1" table:formula="of:=-68 - ([.E20]^2/Ao)" office:value-type="float" office:value="-1507.97497374922" calcext:value-type="float">
            <text:p>-1507,97497374922</text:p>
          </table:table-cell>
          <table:table-cell table:style-name="ce1" table:formula="of:=[.G19]+h" office:value-type="float" office:value="0.18" calcext:value-type="float">
            <text:p>0,18</text:p>
          </table:table-cell>
          <table:table-cell table:style-name="ce1" table:formula="of:=[.H19]+ h*[.F20]" office:value-type="float" office:value="1681.96177818645" calcext:value-type="float">
            <text:p>1681,961778186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]" office:value-type="float" office:value="0.18" calcext:value-type="float">
            <text:p>0,18</text:p>
          </table:table-cell>
          <table:table-cell table:style-name="ce1" table:formula="of:=[.H20]" office:value-type="float" office:value="1681.96177818645" calcext:value-type="float">
            <text:p>1681,96177818645</text:p>
          </table:table-cell>
          <table:table-cell table:style-name="ce1" table:formula="of:=-68 - ([.E21]^2/Ao)" office:value-type="float" office:value="-1482.49771164007" calcext:value-type="float">
            <text:p>-1482,49771164007</text:p>
          </table:table-cell>
          <table:table-cell table:style-name="ce1" table:formula="of:=[.G20]+h" office:value-type="float" office:value="0.19" calcext:value-type="float">
            <text:p>0,19</text:p>
          </table:table-cell>
          <table:table-cell table:style-name="ce1" table:formula="of:=[.H20]+ h*[.F21]" office:value-type="float" office:value="1667.13680107005" calcext:value-type="float">
            <text:p>1667,136801070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]" office:value-type="float" office:value="0.19" calcext:value-type="float">
            <text:p>0,19</text:p>
          </table:table-cell>
          <table:table-cell table:style-name="ce1" table:formula="of:=[.H21]" office:value-type="float" office:value="1667.13680107005" calcext:value-type="float">
            <text:p>1667,13680107005</text:p>
          </table:table-cell>
          <table:table-cell table:style-name="ce1" table:formula="of:=-68 - ([.E22]^2/Ao)" office:value-type="float" office:value="-1457.67255674105" calcext:value-type="float">
            <text:p>-1457,67255674105</text:p>
          </table:table-cell>
          <table:table-cell table:style-name="ce1" table:formula="of:=[.G21]+h" office:value-type="float" office:value="0.2" calcext:value-type="float">
            <text:p>0,2</text:p>
          </table:table-cell>
          <table:table-cell table:style-name="ce1" table:formula="of:=[.H21]+ h*[.F22]" office:value-type="float" office:value="1652.56007550264" calcext:value-type="float">
            <text:p>1652,560075502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]" office:value-type="float" office:value="0.2" calcext:value-type="float">
            <text:p>0,2</text:p>
          </table:table-cell>
          <table:table-cell table:style-name="ce1" table:formula="of:=[.H22]" office:value-type="float" office:value="1652.56007550264" calcext:value-type="float">
            <text:p>1652,56007550264</text:p>
          </table:table-cell>
          <table:table-cell table:style-name="ce1" table:formula="of:=-68 - ([.E23]^2/Ao)" office:value-type="float" office:value="-1433.47740157265" calcext:value-type="float">
            <text:p>-1433,47740157265</text:p>
          </table:table-cell>
          <table:table-cell table:style-name="ce1" table:formula="of:=[.G22]+h" office:value-type="float" office:value="0.21" calcext:value-type="float">
            <text:p>0,21</text:p>
          </table:table-cell>
          <table:table-cell table:style-name="ce1" table:formula="of:=[.H22]+ h*[.F23]" office:value-type="float" office:value="1638.22530148692" calcext:value-type="float">
            <text:p>1638,225301486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]" office:value-type="float" office:value="0.21" calcext:value-type="float">
            <text:p>0,21</text:p>
          </table:table-cell>
          <table:table-cell table:style-name="ce1" table:formula="of:=[.H23]" office:value-type="float" office:value="1638.22530148692" calcext:value-type="float">
            <text:p>1638,22530148692</text:p>
          </table:table-cell>
          <table:table-cell table:style-name="ce1" table:formula="of:=-68 - ([.E24]^2/Ao)" office:value-type="float" office:value="-1409.89106921595" calcext:value-type="float">
            <text:p>-1409,89106921595</text:p>
          </table:table-cell>
          <table:table-cell table:style-name="ce1" table:formula="of:=[.G23]+h" office:value-type="float" office:value="0.22" calcext:value-type="float">
            <text:p>0,22</text:p>
          </table:table-cell>
          <table:table-cell table:style-name="ce1" table:formula="of:=[.H23]+ h*[.F24]" office:value-type="float" office:value="1624.12639079476" calcext:value-type="float">
            <text:p>1624,126390794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]" office:value-type="float" office:value="0.22" calcext:value-type="float">
            <text:p>0,22</text:p>
          </table:table-cell>
          <table:table-cell table:style-name="ce1" table:formula="of:=[.H24]" office:value-type="float" office:value="1624.12639079476" calcext:value-type="float">
            <text:p>1624,12639079476</text:p>
          </table:table-cell>
          <table:table-cell table:style-name="ce1" table:formula="of:=-68 - ([.E25]^2/Ao)" office:value-type="float" office:value="-1386.893266638" calcext:value-type="float">
            <text:p>-1386,893266638</text:p>
          </table:table-cell>
          <table:table-cell table:style-name="ce1" table:formula="of:=[.G24]+h" office:value-type="float" office:value="0.23" calcext:value-type="float">
            <text:p>0,23</text:p>
          </table:table-cell>
          <table:table-cell table:style-name="ce1" table:formula="of:=[.H24]+ h*[.F25]" office:value-type="float" office:value="1610.25745812838" calcext:value-type="float">
            <text:p>1610,257458128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]" office:value-type="float" office:value="0.23" calcext:value-type="float">
            <text:p>0,23</text:p>
          </table:table-cell>
          <table:table-cell table:style-name="ce1" table:formula="of:=[.H25]" office:value-type="float" office:value="1610.25745812838" calcext:value-type="float">
            <text:p>1610,25745812838</text:p>
          </table:table-cell>
          <table:table-cell table:style-name="ce1" table:formula="of:=-68 - ([.E26]^2/Ao)" office:value-type="float" office:value="-1364.46454072903" calcext:value-type="float">
            <text:p>-1364,46454072903</text:p>
          </table:table-cell>
          <table:table-cell table:style-name="ce1" table:formula="of:=[.G25]+h" office:value-type="float" office:value="0.24" calcext:value-type="float">
            <text:p>0,24</text:p>
          </table:table-cell>
          <table:table-cell table:style-name="ce1" table:formula="of:=[.H25]+ h*[.F26]" office:value-type="float" office:value="1596.61281272109" calcext:value-type="float">
            <text:p>1596,612812721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]" office:value-type="float" office:value="0.24" calcext:value-type="float">
            <text:p>0,24</text:p>
          </table:table-cell>
          <table:table-cell table:style-name="ce1" table:formula="of:=[.H26]" office:value-type="float" office:value="1596.61281272109" calcext:value-type="float">
            <text:p>1596,61281272109</text:p>
          </table:table-cell>
          <table:table-cell table:style-name="ce1" table:formula="of:=-68 - ([.E27]^2/Ao)" office:value-type="float" office:value="-1342.58623687257" calcext:value-type="float">
            <text:p>-1342,58623687257</text:p>
          </table:table-cell>
          <table:table-cell table:style-name="ce1" table:formula="of:=[.G26]+h" office:value-type="float" office:value="0.25" calcext:value-type="float">
            <text:p>0,25</text:p>
          </table:table-cell>
          <table:table-cell table:style-name="ce1" table:formula="of:=[.H26]+ h*[.F27]" office:value-type="float" office:value="1583.18695035236" calcext:value-type="float">
            <text:p>1583,186950352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]" office:value-type="float" office:value="0.25" calcext:value-type="float">
            <text:p>0,25</text:p>
          </table:table-cell>
          <table:table-cell table:style-name="ce1" table:formula="of:=[.H27]" office:value-type="float" office:value="1583.18695035236" calcext:value-type="float">
            <text:p>1583,18695035236</text:p>
          </table:table-cell>
          <table:table-cell table:style-name="ce1" table:formula="of:=-68 - ([.E28]^2/Ao)" office:value-type="float" office:value="-1321.240459883" calcext:value-type="float">
            <text:p>-1321,240459883</text:p>
          </table:table-cell>
          <table:table-cell table:style-name="ce1" table:formula="of:=[.G27]+h" office:value-type="float" office:value="0.26" calcext:value-type="float">
            <text:p>0,26</text:p>
          </table:table-cell>
          <table:table-cell table:style-name="ce1" table:formula="of:=[.H27]+ h*[.F28]" office:value-type="float" office:value="1569.97454575353" calcext:value-type="float">
            <text:p>1569,974545753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]" office:value-type="float" office:value="0.26" calcext:value-type="float">
            <text:p>0,26</text:p>
          </table:table-cell>
          <table:table-cell table:style-name="ce1" table:formula="of:=[.H28]" office:value-type="float" office:value="1569.97454575353" calcext:value-type="float">
            <text:p>1569,97454575353</text:p>
          </table:table-cell>
          <table:table-cell table:style-name="ce1" table:formula="of:=-68 - ([.E29]^2/Ao)" office:value-type="float" office:value="-1300.410037157" calcext:value-type="float">
            <text:p>-1300,410037157</text:p>
          </table:table-cell>
          <table:table-cell table:style-name="ce1" table:formula="of:=[.G28]+h" office:value-type="float" office:value="0.27" calcext:value-type="float">
            <text:p>0,27</text:p>
          </table:table-cell>
          <table:table-cell table:style-name="ce1" table:formula="of:=[.H28]+ h*[.F29]" office:value-type="float" office:value="1556.97044538196" calcext:value-type="float">
            <text:p>1556,970445381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]" office:value-type="float" office:value="0.27" calcext:value-type="float">
            <text:p>0,27</text:p>
          </table:table-cell>
          <table:table-cell table:style-name="ce1" table:formula="of:=[.H29]" office:value-type="float" office:value="1556.97044538196" calcext:value-type="float">
            <text:p>1556,97044538196</text:p>
          </table:table-cell>
          <table:table-cell table:style-name="ce1" table:formula="of:=-68 - ([.E30]^2/Ao)" office:value-type="float" office:value="-1280.07848389645" calcext:value-type="float">
            <text:p>-1280,07848389645</text:p>
          </table:table-cell>
          <table:table-cell table:style-name="ce1" table:formula="of:=[.G29]+h" office:value-type="float" office:value="0.28" calcext:value-type="float">
            <text:p>0,28</text:p>
          </table:table-cell>
          <table:table-cell table:style-name="ce1" table:formula="of:=[.H29]+ h*[.F30]" office:value-type="float" office:value="1544.169660543" calcext:value-type="float">
            <text:p>1544,1696605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]" office:value-type="float" office:value="0.28" calcext:value-type="float">
            <text:p>0,28</text:p>
          </table:table-cell>
          <table:table-cell table:style-name="ce1" table:formula="of:=[.H30]" office:value-type="float" office:value="1544.169660543" calcext:value-type="float">
            <text:p>1544,169660543</text:p>
          </table:table-cell>
          <table:table-cell table:style-name="ce1" table:formula="of:=-68 - ([.E31]^2/Ao)" office:value-type="float" office:value="-1260.22997027074" calcext:value-type="float">
            <text:p>-1260,22997027074</text:p>
          </table:table-cell>
          <table:table-cell table:style-name="ce1" table:formula="of:=[.G30]+h" office:value-type="float" office:value="0.29" calcext:value-type="float">
            <text:p>0,29</text:p>
          </table:table-cell>
          <table:table-cell table:style-name="ce1" table:formula="of:=[.H30]+ h*[.F31]" office:value-type="float" office:value="1531.56736084029" calcext:value-type="float">
            <text:p>1531,567360840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]" office:value-type="float" office:value="0.29" calcext:value-type="float">
            <text:p>0,29</text:p>
          </table:table-cell>
          <table:table-cell table:style-name="ce1" table:formula="of:=[.H31]" office:value-type="float" office:value="1531.56736084029" calcext:value-type="float">
            <text:p>1531,56736084029</text:p>
          </table:table-cell>
          <table:table-cell table:style-name="ce1" table:formula="of:=-68 - ([.E32]^2/Ao)" office:value-type="float" office:value="-1240.84929039564" calcext:value-type="float">
            <text:p>-1240,84929039564</text:p>
          </table:table-cell>
          <table:table-cell table:style-name="ce1" table:formula="of:=[.G31]+h" office:value-type="float" office:value="0.3" calcext:value-type="float">
            <text:p>0,3</text:p>
          </table:table-cell>
          <table:table-cell table:style-name="ce1" table:formula="of:=[.H31]+ h*[.F32]" office:value-type="float" office:value="1519.15886793633" calcext:value-type="float">
            <text:p>1519,158867936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]" office:value-type="float" office:value="0.3" calcext:value-type="float">
            <text:p>0,3</text:p>
          </table:table-cell>
          <table:table-cell table:style-name="ce1" table:formula="of:=[.H32]" office:value-type="float" office:value="1519.15886793633" calcext:value-type="float">
            <text:p>1519,15886793633</text:p>
          </table:table-cell>
          <table:table-cell table:style-name="ce1" table:formula="of:=-68 - ([.E33]^2/Ao)" office:value-type="float" office:value="-1221.9218330148" calcext:value-type="float">
            <text:p>-1221,9218330148</text:p>
          </table:table-cell>
          <table:table-cell table:style-name="ce1" table:formula="of:=[.G32]+h" office:value-type="float" office:value="0.31" calcext:value-type="float">
            <text:p>0,31</text:p>
          </table:table-cell>
          <table:table-cell table:style-name="ce1" table:formula="of:=[.H32]+ h*[.F33]" office:value-type="float" office:value="1506.93964960618" calcext:value-type="float">
            <text:p>1506,939649606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]" office:value-type="float" office:value="0.31" calcext:value-type="float">
            <text:p>0,31</text:p>
          </table:table-cell>
          <table:table-cell table:style-name="ce1" table:formula="of:=[.H33]" office:value-type="float" office:value="1506.93964960618" calcext:value-type="float">
            <text:p>1506,93964960618</text:p>
          </table:table-cell>
          <table:table-cell table:style-name="ce1" table:formula="of:=-68 - ([.E34]^2/Ao)" office:value-type="float" office:value="-1203.43355377761" calcext:value-type="float">
            <text:p>-1203,43355377761</text:p>
          </table:table-cell>
          <table:table-cell table:style-name="ce1" table:formula="of:=[.G33]+h" office:value-type="float" office:value="0.32" calcext:value-type="float">
            <text:p>0,32</text:p>
          </table:table-cell>
          <table:table-cell table:style-name="ce1" table:formula="of:=[.H33]+ h*[.F34]" office:value-type="float" office:value="1494.90531406841" calcext:value-type="float">
            <text:p>1494,905314068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]" office:value-type="float" office:value="0.32" calcext:value-type="float">
            <text:p>0,32</text:p>
          </table:table-cell>
          <table:table-cell table:style-name="ce1" table:formula="of:=[.H34]" office:value-type="float" office:value="1494.90531406841" calcext:value-type="float">
            <text:p>1494,90531406841</text:p>
          </table:table-cell>
          <table:table-cell table:style-name="ce1" table:formula="of:=-68 - ([.E35]^2/Ao)" office:value-type="float" office:value="-1185.37094901498" calcext:value-type="float">
            <text:p>-1185,37094901498</text:p>
          </table:table-cell>
          <table:table-cell table:style-name="ce1" table:formula="of:=[.G34]+h" office:value-type="float" office:value="0.33" calcext:value-type="float">
            <text:p>0,33</text:p>
          </table:table-cell>
          <table:table-cell table:style-name="ce1" table:formula="of:=[.H34]+ h*[.F35]" office:value-type="float" office:value="1483.05160457826" calcext:value-type="float">
            <text:p>1483,051604578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]" office:value-type="float" office:value="0.33" calcext:value-type="float">
            <text:p>0,33</text:p>
          </table:table-cell>
          <table:table-cell table:style-name="ce1" table:formula="of:=[.H35]" office:value-type="float" office:value="1483.05160457826" calcext:value-type="float">
            <text:p>1483,05160457826</text:p>
          </table:table-cell>
          <table:table-cell table:style-name="ce1" table:formula="of:=-68 - ([.E36]^2/Ao)" office:value-type="float" office:value="-1167.72103092107" calcext:value-type="float">
            <text:p>-1167,72103092107</text:p>
          </table:table-cell>
          <table:table-cell table:style-name="ce1" table:formula="of:=[.G35]+h" office:value-type="float" office:value="0.34" calcext:value-type="float">
            <text:p>0,34</text:p>
          </table:table-cell>
          <table:table-cell table:style-name="ce1" table:formula="of:=[.H35]+ h*[.F36]" office:value-type="float" office:value="1471.37439426905" calcext:value-type="float">
            <text:p>1471,374394269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]" office:value-type="float" office:value="0.34" calcext:value-type="float">
            <text:p>0,34</text:p>
          </table:table-cell>
          <table:table-cell table:style-name="ce1" table:formula="of:=[.H36]" office:value-type="float" office:value="1471.37439426905" calcext:value-type="float">
            <text:p>1471,37439426905</text:p>
          </table:table-cell>
          <table:table-cell table:style-name="ce1" table:formula="of:=-68 - ([.E37]^2/Ao)" office:value-type="float" office:value="-1150.4713040553" calcext:value-type="float">
            <text:p>-1150,4713040553</text:p>
          </table:table-cell>
          <table:table-cell table:style-name="ce1" table:formula="of:=[.G36]+h" office:value-type="float" office:value="0.35" calcext:value-type="float">
            <text:p>0,35</text:p>
          </table:table-cell>
          <table:table-cell table:style-name="ce1" table:formula="of:=[.H36]+ h*[.F37]" office:value-type="float" office:value="1459.8696812285" calcext:value-type="float">
            <text:p>1459,86968122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]" office:value-type="float" office:value="0.35" calcext:value-type="float">
            <text:p>0,35</text:p>
          </table:table-cell>
          <table:table-cell table:style-name="ce1" table:formula="of:=[.H37]" office:value-type="float" office:value="1459.8696812285" calcext:value-type="float">
            <text:p>1459,8696812285</text:p>
          </table:table-cell>
          <table:table-cell table:style-name="ce1" table:formula="of:=-68 - ([.E38]^2/Ao)" office:value-type="float" office:value="-1133.60974308509" calcext:value-type="float">
            <text:p>-1133,60974308509</text:p>
          </table:table-cell>
          <table:table-cell table:style-name="ce1" table:formula="of:=[.G37]+h" office:value-type="float" office:value="0.36" calcext:value-type="float">
            <text:p>0,36</text:p>
          </table:table-cell>
          <table:table-cell table:style-name="ce1" table:formula="of:=[.H37]+ h*[.F38]" office:value-type="float" office:value="1448.53358379764" calcext:value-type="float">
            <text:p>1448,533583797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]" office:value-type="float" office:value="0.36" calcext:value-type="float">
            <text:p>0,36</text:p>
          </table:table-cell>
          <table:table-cell table:style-name="ce1" table:formula="of:=[.H38]" office:value-type="float" office:value="1448.53358379764" calcext:value-type="float">
            <text:p>1448,53358379764</text:p>
          </table:table-cell>
          <table:table-cell table:style-name="ce1" table:formula="of:=-68 - ([.E39]^2/Ao)" office:value-type="float" office:value="-1117.12477169482" calcext:value-type="float">
            <text:p>-1117,12477169482</text:p>
          </table:table-cell>
          <table:table-cell table:style-name="ce1" table:formula="of:=[.G38]+h" office:value-type="float" office:value="0.37" calcext:value-type="float">
            <text:p>0,37</text:p>
          </table:table-cell>
          <table:table-cell table:style-name="ce1" table:formula="of:=[.H38]+ h*[.F39]" office:value-type="float" office:value="1437.3623360807" calcext:value-type="float">
            <text:p>1437,36233608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]" office:value-type="float" office:value="0.37" calcext:value-type="float">
            <text:p>0,37</text:p>
          </table:table-cell>
          <table:table-cell table:style-name="ce1" table:formula="of:=[.H39]" office:value-type="float" office:value="1437.3623360807" calcext:value-type="float">
            <text:p>1437,3623360807</text:p>
          </table:table-cell>
          <table:table-cell table:style-name="ce1" table:formula="of:=-68 - ([.E40]^2/Ao)" office:value-type="float" office:value="-1101.00524259168" calcext:value-type="float">
            <text:p>-1101,00524259168</text:p>
          </table:table-cell>
          <table:table-cell table:style-name="ce1" table:formula="of:=[.G39]+h" office:value-type="float" office:value="0.38" calcext:value-type="float">
            <text:p>0,38</text:p>
          </table:table-cell>
          <table:table-cell table:style-name="ce1" table:formula="of:=[.H39]+ h*[.F40]" office:value-type="float" office:value="1426.35228365478" calcext:value-type="float">
            <text:p>1426,352283654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]" office:value-type="float" office:value="0.38" calcext:value-type="float">
            <text:p>0,38</text:p>
          </table:table-cell>
          <table:table-cell table:style-name="ce1" table:formula="of:=[.H40]" office:value-type="float" office:value="1426.35228365478" calcext:value-type="float">
            <text:p>1426,35228365478</text:p>
          </table:table-cell>
          <table:table-cell table:style-name="ce1" table:formula="of:=-68 - ([.E41]^2/Ao)" office:value-type="float" office:value="-1085.2404185436" calcext:value-type="float">
            <text:p>-1085,2404185436</text:p>
          </table:table-cell>
          <table:table-cell table:style-name="ce1" table:formula="of:=[.G40]+h" office:value-type="float" office:value="0.39" calcext:value-type="float">
            <text:p>0,39</text:p>
          </table:table-cell>
          <table:table-cell table:style-name="ce1" table:formula="of:=[.H40]+ h*[.F41]" office:value-type="float" office:value="1415.49987946934" calcext:value-type="float">
            <text:p>1415,499879469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]" office:value-type="float" office:value="0.39" calcext:value-type="float">
            <text:p>0,39</text:p>
          </table:table-cell>
          <table:table-cell table:style-name="ce1" table:formula="of:=[.H41]" office:value-type="float" office:value="1415.49987946934" calcext:value-type="float">
            <text:p>1415,49987946934</text:p>
          </table:table-cell>
          <table:table-cell table:style-name="ce1" table:formula="of:=-68 - ([.E42]^2/Ao)" office:value-type="float" office:value="-1069.81995438886" calcext:value-type="float">
            <text:p>-1069,81995438886</text:p>
          </table:table-cell>
          <table:table-cell table:style-name="ce1" table:formula="of:=[.G41]+h" office:value-type="float" office:value="0.4" calcext:value-type="float">
            <text:p>0,4</text:p>
          </table:table-cell>
          <table:table-cell table:style-name="ce1" table:formula="of:=[.H41]+ h*[.F42]" office:value-type="float" office:value="1404.80167992545" calcext:value-type="float">
            <text:p>1404,801679925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]" office:value-type="float" office:value="0.4" calcext:value-type="float">
            <text:p>0,4</text:p>
          </table:table-cell>
          <table:table-cell table:style-name="ce1" table:formula="of:=[.H42]" office:value-type="float" office:value="1404.80167992545" calcext:value-type="float">
            <text:p>1404,80167992545</text:p>
          </table:table-cell>
          <table:table-cell table:style-name="ce1" table:formula="of:=-68 - ([.E43]^2/Ao)" office:value-type="float" office:value="-1054.73387996069" calcext:value-type="float">
            <text:p>-1054,73387996069</text:p>
          </table:table-cell>
          <table:table-cell table:style-name="ce1" table:formula="of:=[.G42]+h" office:value-type="float" office:value="0.41" calcext:value-type="float">
            <text:p>0,41</text:p>
          </table:table-cell>
          <table:table-cell table:style-name="ce1" table:formula="of:=[.H42]+ h*[.F43]" office:value-type="float" office:value="1394.25434112585" calcext:value-type="float">
            <text:p>1394,254341125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]" office:value-type="float" office:value="0.41" calcext:value-type="float">
            <text:p>0,41</text:p>
          </table:table-cell>
          <table:table-cell table:style-name="ce1" table:formula="of:=[.H43]" office:value-type="float" office:value="1394.25434112585" calcext:value-type="float">
            <text:p>1394,25434112585</text:p>
          </table:table-cell>
          <table:table-cell table:style-name="ce1" table:formula="of:=-68 - ([.E44]^2/Ao)" office:value-type="float" office:value="-1039.97258387414" calcext:value-type="float">
            <text:p>-1039,97258387414</text:p>
          </table:table-cell>
          <table:table-cell table:style-name="ce1" table:formula="of:=[.G43]+h" office:value-type="float" office:value="0.42" calcext:value-type="float">
            <text:p>0,42</text:p>
          </table:table-cell>
          <table:table-cell table:style-name="ce1" table:formula="of:=[.H43]+ h*[.F44]" office:value-type="float" office:value="1383.85461528711" calcext:value-type="float">
            <text:p>1383,854615287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]" office:value-type="float" office:value="0.42" calcext:value-type="float">
            <text:p>0,42</text:p>
          </table:table-cell>
          <table:table-cell table:style-name="ce1" table:formula="of:=[.H44]" office:value-type="float" office:value="1383.85461528711" calcext:value-type="float">
            <text:p>1383,85461528711</text:p>
          </table:table-cell>
          <table:table-cell table:style-name="ce1" table:formula="of:=-68 - ([.E45]^2/Ao)" office:value-type="float" office:value="-1025.52679812571" calcext:value-type="float">
            <text:p>-1025,52679812571</text:p>
          </table:table-cell>
          <table:table-cell table:style-name="ce1" table:formula="of:=[.G44]+h" office:value-type="float" office:value="0.43" calcext:value-type="float">
            <text:p>0,43</text:p>
          </table:table-cell>
          <table:table-cell table:style-name="ce1" table:formula="of:=[.H44]+ h*[.F45]" office:value-type="float" office:value="1373.59934730585" calcext:value-type="float">
            <text:p>1373,599347305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]" office:value-type="float" office:value="0.43" calcext:value-type="float">
            <text:p>0,43</text:p>
          </table:table-cell>
          <table:table-cell table:style-name="ce1" table:formula="of:=[.H45]" office:value-type="float" office:value="1373.59934730585" calcext:value-type="float">
            <text:p>1373,59934730585</text:p>
          </table:table-cell>
          <table:table-cell table:style-name="ce1" table:formula="of:=-68 - ([.E46]^2/Ao)" office:value-type="float" office:value="-1011.38758345953" calcext:value-type="float">
            <text:p>-1011,38758345953</text:p>
          </table:table-cell>
          <table:table-cell table:style-name="ce1" table:formula="of:=[.G45]+h" office:value-type="float" office:value="0.44" calcext:value-type="float">
            <text:p>0,44</text:p>
          </table:table-cell>
          <table:table-cell table:style-name="ce1" table:formula="of:=[.H45]+ h*[.F46]" office:value-type="float" office:value="1363.48547147125" calcext:value-type="float">
            <text:p>1363,485471471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]" office:value-type="float" office:value="0.44" calcext:value-type="float">
            <text:p>0,44</text:p>
          </table:table-cell>
          <table:table-cell table:style-name="ce1" table:formula="of:=[.H46]" office:value-type="float" office:value="1363.48547147125" calcext:value-type="float">
            <text:p>1363,48547147125</text:p>
          </table:table-cell>
          <table:table-cell table:style-name="ce1" table:formula="of:=-68 - ([.E47]^2/Ao)" office:value-type="float" office:value="-997.546315456594" calcext:value-type="float">
            <text:p>-997,546315456594</text:p>
          </table:table-cell>
          <table:table-cell table:style-name="ce1" table:formula="of:=[.G46]+h" office:value-type="float" office:value="0.45" calcext:value-type="float">
            <text:p>0,45</text:p>
          </table:table-cell>
          <table:table-cell table:style-name="ce1" table:formula="of:=[.H46]+ h*[.F47]" office:value-type="float" office:value="1353.51000831669" calcext:value-type="float">
            <text:p>1353,510008316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]" office:value-type="float" office:value="0.45" calcext:value-type="float">
            <text:p>0,45</text:p>
          </table:table-cell>
          <table:table-cell table:style-name="ce1" table:formula="of:=[.H47]" office:value-type="float" office:value="1353.51000831669" calcext:value-type="float">
            <text:p>1353,51000831669</text:p>
          </table:table-cell>
          <table:table-cell table:style-name="ce1" table:formula="of:=-68 - ([.E48]^2/Ao)" office:value-type="float" office:value="-983.99467130672" calcext:value-type="float">
            <text:p>-983,99467130672</text:p>
          </table:table-cell>
          <table:table-cell table:style-name="ce1" table:formula="of:=[.G47]+h" office:value-type="float" office:value="0.46" calcext:value-type="float">
            <text:p>0,46</text:p>
          </table:table-cell>
          <table:table-cell table:style-name="ce1" table:formula="of:=[.H47]+ h*[.F48]" office:value-type="float" office:value="1343.67006160362" calcext:value-type="float">
            <text:p>1343,670061603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]" office:value-type="float" office:value="0.46" calcext:value-type="float">
            <text:p>0,46</text:p>
          </table:table-cell>
          <table:table-cell table:style-name="ce1" table:formula="of:=[.H48]" office:value-type="float" office:value="1343.67006160362" calcext:value-type="float">
            <text:p>1343,67006160362</text:p>
          </table:table-cell>
          <table:table-cell table:style-name="ce1" table:formula="of:=-68 - ([.E49]^2/Ao)" office:value-type="float" office:value="-970.724617224939" calcext:value-type="float">
            <text:p>-970,724617224939</text:p>
          </table:table-cell>
          <table:table-cell table:style-name="ce1" table:formula="of:=[.G48]+h" office:value-type="float" office:value="0.47" calcext:value-type="float">
            <text:p>0,47</text:p>
          </table:table-cell>
          <table:table-cell table:style-name="ce1" table:formula="of:=[.H48]+ h*[.F49]" office:value-type="float" office:value="1333.96281543137" calcext:value-type="float">
            <text:p>1333,962815431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]" office:value-type="float" office:value="0.47" calcext:value-type="float">
            <text:p>0,47</text:p>
          </table:table-cell>
          <table:table-cell table:style-name="ce1" table:formula="of:=[.H49]" office:value-type="float" office:value="1333.96281543137" calcext:value-type="float">
            <text:p>1333,96281543137</text:p>
          </table:table-cell>
          <table:table-cell table:style-name="ce1" table:formula="of:=-68 - ([.E50]^2/Ao)" office:value-type="float" office:value="-957.728396476796" calcext:value-type="float">
            <text:p>-957,728396476796</text:p>
          </table:table-cell>
          <table:table-cell table:style-name="ce1" table:formula="of:=[.G49]+h" office:value-type="float" office:value="0.48" calcext:value-type="float">
            <text:p>0,48</text:p>
          </table:table-cell>
          <table:table-cell table:style-name="ce1" table:formula="of:=[.H49]+ h*[.F50]" office:value-type="float" office:value="1324.3855314666" calcext:value-type="float">
            <text:p>1324,38553146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]" office:value-type="float" office:value="0.48" calcext:value-type="float">
            <text:p>0,48</text:p>
          </table:table-cell>
          <table:table-cell table:style-name="ce1" table:formula="of:=[.H50]" office:value-type="float" office:value="1324.3855314666" calcext:value-type="float">
            <text:p>1324,3855314666</text:p>
          </table:table-cell>
          <table:table-cell table:style-name="ce1" table:formula="of:=-68 - ([.E51]^2/Ao)" office:value-type="float" office:value="-944.998517979039" calcext:value-type="float">
            <text:p>-944,998517979039</text:p>
          </table:table-cell>
          <table:table-cell table:style-name="ce1" table:formula="of:=[.G50]+h" office:value-type="float" office:value="0.49" calcext:value-type="float">
            <text:p>0,49</text:p>
          </table:table-cell>
          <table:table-cell table:style-name="ce1" table:formula="of:=[.H50]+ h*[.F51]" office:value-type="float" office:value="1314.93554628681" calcext:value-type="float">
            <text:p>1314,935546286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]" office:value-type="float" office:value="0.49" calcext:value-type="float">
            <text:p>0,49</text:p>
          </table:table-cell>
          <table:table-cell table:style-name="ce1" table:formula="of:=[.H51]" office:value-type="float" office:value="1314.93554628681" calcext:value-type="float">
            <text:p>1314,93554628681</text:p>
          </table:table-cell>
          <table:table-cell table:style-name="ce1" table:formula="of:=-68 - ([.E52]^2/Ao)" office:value-type="float" office:value="-932.5277454443" calcext:value-type="float">
            <text:p>-932,5277454443</text:p>
          </table:table-cell>
          <table:table-cell table:style-name="ce1" table:formula="of:=[.G51]+h" office:value-type="float" office:value="0.5" calcext:value-type="float">
            <text:p>0,5</text:p>
          </table:table-cell>
          <table:table-cell table:style-name="ce1" table:formula="of:=[.H51]+ h*[.F52]" office:value-type="float" office:value="1305.61026883237" calcext:value-type="float">
            <text:p>1305,610268832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]" office:value-type="float" office:value="0.5" calcext:value-type="float">
            <text:p>0,5</text:p>
          </table:table-cell>
          <table:table-cell table:style-name="ce1" table:formula="of:=[.H52]" office:value-type="float" office:value="1305.61026883237" calcext:value-type="float">
            <text:p>1305,61026883237</text:p>
          </table:table-cell>
          <table:table-cell table:style-name="ce1" table:formula="of:=-68 - ([.E53]^2/Ao)" office:value-type="float" office:value="-920.309087040267" calcext:value-type="float">
            <text:p>-920,309087040267</text:p>
          </table:table-cell>
          <table:table-cell table:style-name="ce1" table:formula="of:=[.G52]+h" office:value-type="float" office:value="0.51" calcext:value-type="float">
            <text:p>0,51</text:p>
          </table:table-cell>
          <table:table-cell table:style-name="ce1" table:formula="of:=[.H52]+ h*[.F53]" office:value-type="float" office:value="1296.40717796197" calcext:value-type="float">
            <text:p>1296,407177961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]" office:value-type="float" office:value="0.51" calcext:value-type="float">
            <text:p>0,51</text:p>
          </table:table-cell>
          <table:table-cell table:style-name="ce1" table:formula="of:=[.H53]" office:value-type="float" office:value="1296.40717796197" calcext:value-type="float">
            <text:p>1296,40717796197</text:p>
          </table:table-cell>
          <table:table-cell table:style-name="ce1" table:formula="of:=-68 - ([.E54]^2/Ao)" office:value-type="float" office:value="-908.335785535656" calcext:value-type="float">
            <text:p>-908,335785535656</text:p>
          </table:table-cell>
          <table:table-cell table:style-name="ce1" table:formula="of:=[.G53]+h" office:value-type="float" office:value="0.52" calcext:value-type="float">
            <text:p>0,52</text:p>
          </table:table-cell>
          <table:table-cell table:style-name="ce1" table:formula="of:=[.H53]+ h*[.F54]" office:value-type="float" office:value="1287.32382010661" calcext:value-type="float">
            <text:p>1287,323820106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]" office:value-type="float" office:value="0.52" calcext:value-type="float">
            <text:p>0,52</text:p>
          </table:table-cell>
          <table:table-cell table:style-name="ce1" table:formula="of:=[.H54]" office:value-type="float" office:value="1287.32382010661" calcext:value-type="float">
            <text:p>1287,32382010661</text:p>
          </table:table-cell>
          <table:table-cell table:style-name="ce1" table:formula="of:=-68 - ([.E55]^2/Ao)" office:value-type="float" office:value="-896.601308906939" calcext:value-type="float">
            <text:p>-896,601308906939</text:p>
          </table:table-cell>
          <table:table-cell table:style-name="ce1" table:formula="of:=[.G54]+h" office:value-type="float" office:value="0.53" calcext:value-type="float">
            <text:p>0,53</text:p>
          </table:table-cell>
          <table:table-cell table:style-name="ce1" table:formula="of:=[.H54]+ h*[.F55]" office:value-type="float" office:value="1278.35780701754" calcext:value-type="float">
            <text:p>1278,357807017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]" office:value-type="float" office:value="0.53" calcext:value-type="float">
            <text:p>0,53</text:p>
          </table:table-cell>
          <table:table-cell table:style-name="ce1" table:formula="of:=[.H55]" office:value-type="float" office:value="1278.35780701754" calcext:value-type="float">
            <text:p>1278,35780701754</text:p>
          </table:table-cell>
          <table:table-cell table:style-name="ce1" table:formula="of:=-68 - ([.E56]^2/Ao)" office:value-type="float" office:value="-885.099341381349" calcext:value-type="float">
            <text:p>-885,099341381349</text:p>
          </table:table-cell>
          <table:table-cell table:style-name="ce1" table:formula="of:=[.G55]+h" office:value-type="float" office:value="0.54" calcext:value-type="float">
            <text:p>0,54</text:p>
          </table:table-cell>
          <table:table-cell table:style-name="ce1" table:formula="of:=[.H55]+ h*[.F56]" office:value-type="float" office:value="1269.50681360373" calcext:value-type="float">
            <text:p>1269,506813603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]" office:value-type="float" office:value="0.54" calcext:value-type="float">
            <text:p>0,54</text:p>
          </table:table-cell>
          <table:table-cell table:style-name="ce1" table:formula="of:=[.H56]" office:value-type="float" office:value="1269.50681360373" calcext:value-type="float">
            <text:p>1269,50681360373</text:p>
          </table:table-cell>
          <table:table-cell table:style-name="ce1" table:formula="of:=-68 - ([.E57]^2/Ao)" office:value-type="float" office:value="-873.823774893145" calcext:value-type="float">
            <text:p>-873,823774893145</text:p>
          </table:table-cell>
          <table:table-cell table:style-name="ce1" table:formula="of:=[.G56]+h" office:value-type="float" office:value="0.55" calcext:value-type="float">
            <text:p>0,55</text:p>
          </table:table-cell>
          <table:table-cell table:style-name="ce1" table:formula="of:=[.H56]+ h*[.F57]" office:value-type="float" office:value="1260.7685758548" calcext:value-type="float">
            <text:p>1260,76857585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]" office:value-type="float" office:value="0.55" calcext:value-type="float">
            <text:p>0,55</text:p>
          </table:table-cell>
          <table:table-cell table:style-name="ce1" table:formula="of:=[.H57]" office:value-type="float" office:value="1260.7685758548" calcext:value-type="float">
            <text:p>1260,7685758548</text:p>
          </table:table-cell>
          <table:table-cell table:style-name="ce1" table:formula="of:=-68 - ([.E58]^2/Ao)" office:value-type="float" office:value="-862.768700931466" calcext:value-type="float">
            <text:p>-862,768700931466</text:p>
          </table:table-cell>
          <table:table-cell table:style-name="ce1" table:formula="of:=[.G57]+h" office:value-type="float" office:value="0.56" calcext:value-type="float">
            <text:p>0,56</text:p>
          </table:table-cell>
          <table:table-cell table:style-name="ce1" table:formula="of:=[.H57]+ h*[.F58]" office:value-type="float" office:value="1252.14088884548" calcext:value-type="float">
            <text:p>1252,140888845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]" office:value-type="float" office:value="0.56" calcext:value-type="float">
            <text:p>0,56</text:p>
          </table:table-cell>
          <table:table-cell table:style-name="ce1" table:formula="of:=[.H58]" office:value-type="float" office:value="1252.14088884548" calcext:value-type="float">
            <text:p>1252,14088884548</text:p>
          </table:table-cell>
          <table:table-cell table:style-name="ce1" table:formula="of:=-68 - ([.E59]^2/Ao)" office:value-type="float" office:value="-851.928402759377" calcext:value-type="float">
            <text:p>-851,928402759377</text:p>
          </table:table-cell>
          <table:table-cell table:style-name="ce1" table:formula="of:=[.G58]+h" office:value-type="float" office:value="0.57" calcext:value-type="float">
            <text:p>0,57</text:p>
          </table:table-cell>
          <table:table-cell table:style-name="ce1" table:formula="of:=[.H58]+ h*[.F59]" office:value-type="float" office:value="1243.62160481789" calcext:value-type="float">
            <text:p>1243,621604817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]" office:value-type="float" office:value="0.57" calcext:value-type="float">
            <text:p>0,57</text:p>
          </table:table-cell>
          <table:table-cell table:style-name="ce1" table:formula="of:=[.H59]" office:value-type="float" office:value="1243.62160481789" calcext:value-type="float">
            <text:p>1243,62160481789</text:p>
          </table:table-cell>
          <table:table-cell table:style-name="ce1" table:formula="of:=-68 - ([.E60]^2/Ao)" office:value-type="float" office:value="-841.297347984909" calcext:value-type="float">
            <text:p>-841,297347984909</text:p>
          </table:table-cell>
          <table:table-cell table:style-name="ce1" table:formula="of:=[.G59]+h" office:value-type="float" office:value="0.58" calcext:value-type="float">
            <text:p>0,58</text:p>
          </table:table-cell>
          <table:table-cell table:style-name="ce1" table:formula="of:=[.H59]+ h*[.F60]" office:value-type="float" office:value="1235.20863133804" calcext:value-type="float">
            <text:p>1235,208631338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]" office:value-type="float" office:value="0.58" calcext:value-type="float">
            <text:p>0,58</text:p>
          </table:table-cell>
          <table:table-cell table:style-name="ce1" table:formula="of:=[.H60]" office:value-type="float" office:value="1235.20863133804" calcext:value-type="float">
            <text:p>1235,20863133804</text:p>
          </table:table-cell>
          <table:table-cell table:style-name="ce1" table:formula="of:=-68 - ([.E61]^2/Ao)" office:value-type="float" office:value="-830.870181465995" calcext:value-type="float">
            <text:p>-830,870181465995</text:p>
          </table:table-cell>
          <table:table-cell table:style-name="ce1" table:formula="of:=[.G60]+h" office:value-type="float" office:value="0.59" calcext:value-type="float">
            <text:p>0,59</text:p>
          </table:table-cell>
          <table:table-cell table:style-name="ce1" table:formula="of:=[.H60]+ h*[.F61]" office:value-type="float" office:value="1226.89992952338" calcext:value-type="float">
            <text:p>1226,899929523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]" office:value-type="float" office:value="0.59" calcext:value-type="float">
            <text:p>0,59</text:p>
          </table:table-cell>
          <table:table-cell table:style-name="ce1" table:formula="of:=[.H61]" office:value-type="float" office:value="1226.89992952338" calcext:value-type="float">
            <text:p>1226,89992952338</text:p>
          </table:table-cell>
          <table:table-cell table:style-name="ce1" table:formula="of:=-68 - ([.E62]^2/Ao)" office:value-type="float" office:value="-820.641718532236" calcext:value-type="float">
            <text:p>-820,641718532236</text:p>
          </table:table-cell>
          <table:table-cell table:style-name="ce1" table:formula="of:=[.G61]+h" office:value-type="float" office:value="0.6" calcext:value-type="float">
            <text:p>0,6</text:p>
          </table:table-cell>
          <table:table-cell table:style-name="ce1" table:formula="of:=[.H61]+ h*[.F62]" office:value-type="float" office:value="1218.69351233806" calcext:value-type="float">
            <text:p>1218,693512338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]" office:value-type="float" office:value="0.6" calcext:value-type="float">
            <text:p>0,6</text:p>
          </table:table-cell>
          <table:table-cell table:style-name="ce1" table:formula="of:=[.H62]" office:value-type="float" office:value="1218.69351233806" calcext:value-type="float">
            <text:p>1218,69351233806</text:p>
          </table:table-cell>
          <table:table-cell table:style-name="ce1" table:formula="of:=-68 - ([.E63]^2/Ao)" office:value-type="float" office:value="-810.606938507434" calcext:value-type="float">
            <text:p>-810,606938507434</text:p>
          </table:table-cell>
          <table:table-cell table:style-name="ce1" table:formula="of:=[.G62]+h" office:value-type="float" office:value="0.61" calcext:value-type="float">
            <text:p>0,61</text:p>
          </table:table-cell>
          <table:table-cell table:style-name="ce1" table:formula="of:=[.H62]+ h*[.F63]" office:value-type="float" office:value="1210.58744295298" calcext:value-type="float">
            <text:p>1210,587442952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]" office:value-type="float" office:value="0.61" calcext:value-type="float">
            <text:p>0,61</text:p>
          </table:table-cell>
          <table:table-cell table:style-name="ce1" table:formula="of:=[.H63]" office:value-type="float" office:value="1210.58744295298" calcext:value-type="float">
            <text:p>1210,58744295298</text:p>
          </table:table-cell>
          <table:table-cell table:style-name="ce1" table:formula="of:=-68 - ([.E64]^2/Ao)" office:value-type="float" office:value="-800.76097851772" calcext:value-type="float">
            <text:p>-800,76097851772</text:p>
          </table:table-cell>
          <table:table-cell table:style-name="ce1" table:formula="of:=[.G63]+h" office:value-type="float" office:value="0.62" calcext:value-type="float">
            <text:p>0,62</text:p>
          </table:table-cell>
          <table:table-cell table:style-name="ce1" table:formula="of:=[.H63]+ h*[.F64]" office:value-type="float" office:value="1202.5798331678" calcext:value-type="float">
            <text:p>1202,57983316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]" office:value-type="float" office:value="0.62" calcext:value-type="float">
            <text:p>0,62</text:p>
          </table:table-cell>
          <table:table-cell table:style-name="ce1" table:formula="of:=[.H64]" office:value-type="float" office:value="1202.5798331678" calcext:value-type="float">
            <text:p>1202,5798331678</text:p>
          </table:table-cell>
          <table:table-cell table:style-name="ce1" table:formula="of:=-68 - ([.E65]^2/Ao)" office:value-type="float" office:value="-791.099127570953" calcext:value-type="float">
            <text:p>-791,099127570953</text:p>
          </table:table-cell>
          <table:table-cell table:style-name="ce1" table:formula="of:=[.G64]+h" office:value-type="float" office:value="0.63" calcext:value-type="float">
            <text:p>0,63</text:p>
          </table:table-cell>
          <table:table-cell table:style-name="ce1" table:formula="of:=[.H64]+ h*[.F65]" office:value-type="float" office:value="1194.6688418921" calcext:value-type="float">
            <text:p>1194,66884189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]" office:value-type="float" office:value="0.63" calcext:value-type="float">
            <text:p>0,63</text:p>
          </table:table-cell>
          <table:table-cell table:style-name="ce1" table:formula="of:=[.H65]" office:value-type="float" office:value="1194.6688418921" calcext:value-type="float">
            <text:p>1194,6688418921</text:p>
          </table:table-cell>
          <table:table-cell table:style-name="ce1" table:formula="of:=-68 - ([.E66]^2/Ao)" office:value-type="float" office:value="-781.6168208939" calcext:value-type="float">
            <text:p>-781,6168208939</text:p>
          </table:table-cell>
          <table:table-cell table:style-name="ce1" table:formula="of:=[.G65]+h" office:value-type="float" office:value="0.64" calcext:value-type="float">
            <text:p>0,64</text:p>
          </table:table-cell>
          <table:table-cell table:style-name="ce1" table:formula="of:=[.H65]+ h*[.F66]" office:value-type="float" office:value="1186.85267368316" calcext:value-type="float">
            <text:p>1186,852673683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]" office:value-type="float" office:value="0.64" calcext:value-type="float">
            <text:p>0,64</text:p>
          </table:table-cell>
          <table:table-cell table:style-name="ce1" table:formula="of:=[.H66]" office:value-type="float" office:value="1186.85267368316" calcext:value-type="float">
            <text:p>1186,85267368316</text:p>
          </table:table-cell>
          <table:table-cell table:style-name="ce1" table:formula="of:=-68 - ([.E67]^2/Ao)" office:value-type="float" office:value="-772.309634514429" calcext:value-type="float">
            <text:p>-772,309634514429</text:p>
          </table:table-cell>
          <table:table-cell table:style-name="ce1" table:formula="of:=[.G66]+h" office:value-type="float" office:value="0.65" calcext:value-type="float">
            <text:p>0,65</text:p>
          </table:table-cell>
          <table:table-cell table:style-name="ce1" table:formula="of:=[.H66]+ h*[.F67]" office:value-type="float" office:value="1179.12957733801" calcext:value-type="float">
            <text:p>1179,129577338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]" office:value-type="float" office:value="0.65" calcext:value-type="float">
            <text:p>0,65</text:p>
          </table:table-cell>
          <table:table-cell table:style-name="ce1" table:formula="of:=[.H67]" office:value-type="float" office:value="1179.12957733801" calcext:value-type="float">
            <text:p>1179,12957733801</text:p>
          </table:table-cell>
          <table:table-cell table:style-name="ce1" table:formula="of:=-68 - ([.E68]^2/Ao)" office:value-type="float" office:value="-763.17328007666" calcext:value-type="float">
            <text:p>-763,17328007666</text:p>
          </table:table-cell>
          <table:table-cell table:style-name="ce1" table:formula="of:=[.G67]+h" office:value-type="float" office:value="0.66" calcext:value-type="float">
            <text:p>0,66</text:p>
          </table:table-cell>
          <table:table-cell table:style-name="ce1" table:formula="of:=[.H67]+ h*[.F68]" office:value-type="float" office:value="1171.49784453725" calcext:value-type="float">
            <text:p>1171,497844537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]" office:value-type="float" office:value="0.66" calcext:value-type="float">
            <text:p>0,66</text:p>
          </table:table-cell>
          <table:table-cell table:style-name="ce1" table:formula="of:=[.H68]" office:value-type="float" office:value="1171.49784453725" calcext:value-type="float">
            <text:p>1171,49784453725</text:p>
          </table:table-cell>
          <table:table-cell table:style-name="ce1" table:formula="of:=-68 - ([.E69]^2/Ao)" office:value-type="float" office:value="-754.203599877706" calcext:value-type="float">
            <text:p>-754,203599877706</text:p>
          </table:table-cell>
          <table:table-cell table:style-name="ce1" table:formula="of:=[.G68]+h" office:value-type="float" office:value="0.67" calcext:value-type="float">
            <text:p>0,67</text:p>
          </table:table-cell>
          <table:table-cell table:style-name="ce1" table:formula="of:=[.H68]+ h*[.F69]" office:value-type="float" office:value="1163.95580853847" calcext:value-type="float">
            <text:p>1163,955808538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]" office:value-type="float" office:value="0.67" calcext:value-type="float">
            <text:p>0,67</text:p>
          </table:table-cell>
          <table:table-cell table:style-name="ce1" table:formula="of:=[.H69]" office:value-type="float" office:value="1163.95580853847" calcext:value-type="float">
            <text:p>1163,95580853847</text:p>
          </table:table-cell>
          <table:table-cell table:style-name="ce1" table:formula="of:=-68 - ([.E70]^2/Ao)" office:value-type="float" office:value="-745.39656211522" calcext:value-type="float">
            <text:p>-745,39656211522</text:p>
          </table:table-cell>
          <table:table-cell table:style-name="ce1" table:formula="of:=[.G69]+h" office:value-type="float" office:value="0.68" calcext:value-type="float">
            <text:p>0,68</text:p>
          </table:table-cell>
          <table:table-cell table:style-name="ce1" table:formula="of:=[.H69]+ h*[.F70]" office:value-type="float" office:value="1156.50184291732" calcext:value-type="float">
            <text:p>1156,501842917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]" office:value-type="float" office:value="0.68" calcext:value-type="float">
            <text:p>0,68</text:p>
          </table:table-cell>
          <table:table-cell table:style-name="ce1" table:formula="of:=[.H70]" office:value-type="float" office:value="1156.50184291732" calcext:value-type="float">
            <text:p>1156,50184291732</text:p>
          </table:table-cell>
          <table:table-cell table:style-name="ce1" table:formula="of:=-68 - ([.E71]^2/Ao)" office:value-type="float" office:value="-736.748256335574" calcext:value-type="float">
            <text:p>-736,748256335574</text:p>
          </table:table-cell>
          <table:table-cell table:style-name="ce1" table:formula="of:=[.G70]+h" office:value-type="float" office:value="0.69" calcext:value-type="float">
            <text:p>0,69</text:p>
          </table:table-cell>
          <table:table-cell table:style-name="ce1" table:formula="of:=[.H70]+ h*[.F71]" office:value-type="float" office:value="1149.13436035396" calcext:value-type="float">
            <text:p>1149,134360353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]" office:value-type="float" office:value="0.69" calcext:value-type="float">
            <text:p>0,69</text:p>
          </table:table-cell>
          <table:table-cell table:style-name="ce1" table:formula="of:=[.H71]" office:value-type="float" office:value="1149.13436035396" calcext:value-type="float">
            <text:p>1149,13436035396</text:p>
          </table:table-cell>
          <table:table-cell table:style-name="ce1" table:formula="of:=-68 - ([.E72]^2/Ao)" office:value-type="float" office:value="-728.254889073053" calcext:value-type="float">
            <text:p>-728,254889073053</text:p>
          </table:table-cell>
          <table:table-cell table:style-name="ce1" table:formula="of:=[.G71]+h" office:value-type="float" office:value="0.7" calcext:value-type="float">
            <text:p>0,7</text:p>
          </table:table-cell>
          <table:table-cell table:style-name="ce1" table:formula="of:=[.H71]+ h*[.F72]" office:value-type="float" office:value="1141.85181146323" calcext:value-type="float">
            <text:p>1141,851811463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]" office:value-type="float" office:value="0.7" calcext:value-type="float">
            <text:p>0,7</text:p>
          </table:table-cell>
          <table:table-cell table:style-name="ce1" table:formula="of:=[.H72]" office:value-type="float" office:value="1141.85181146323" calcext:value-type="float">
            <text:p>1141,85181146323</text:p>
          </table:table-cell>
          <table:table-cell table:style-name="ce1" table:formula="of:=-68 - ([.E73]^2/Ao)" office:value-type="float" office:value="-719.91277967093" calcext:value-type="float">
            <text:p>-719,91277967093</text:p>
          </table:table-cell>
          <table:table-cell table:style-name="ce1" table:formula="of:=[.G72]+h" office:value-type="float" office:value="0.71" calcext:value-type="float">
            <text:p>0,71</text:p>
          </table:table-cell>
          <table:table-cell table:style-name="ce1" table:formula="of:=[.H72]+ h*[.F73]" office:value-type="float" office:value="1134.65268366652" calcext:value-type="float">
            <text:p>1134,652683666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]" office:value-type="float" office:value="0.71" calcext:value-type="float">
            <text:p>0,71</text:p>
          </table:table-cell>
          <table:table-cell table:style-name="ce1" table:formula="of:=[.H73]" office:value-type="float" office:value="1134.65268366652" calcext:value-type="float">
            <text:p>1134,65268366652</text:p>
          </table:table-cell>
          <table:table-cell table:style-name="ce1" table:formula="of:=-68 - ([.E74]^2/Ao)" office:value-type="float" office:value="-711.718356275819" calcext:value-type="float">
            <text:p>-711,718356275819</text:p>
          </table:table-cell>
          <table:table-cell table:style-name="ce1" table:formula="of:=[.G73]+h" office:value-type="float" office:value="0.72" calcext:value-type="float">
            <text:p>0,72</text:p>
          </table:table-cell>
          <table:table-cell table:style-name="ce1" table:formula="of:=[.H73]+ h*[.F74]" office:value-type="float" office:value="1127.53550010376" calcext:value-type="float">
            <text:p>1127,535500103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]" office:value-type="float" office:value="0.72" calcext:value-type="float">
            <text:p>0,72</text:p>
          </table:table-cell>
          <table:table-cell table:style-name="ce1" table:formula="of:=[.H74]" office:value-type="float" office:value="1127.53550010376" calcext:value-type="float">
            <text:p>1127,53550010376</text:p>
          </table:table-cell>
          <table:table-cell table:style-name="ce1" table:formula="of:=-68 - ([.E75]^2/Ao)" office:value-type="float" office:value="-703.668151997121" calcext:value-type="float">
            <text:p>-703,668151997121</text:p>
          </table:table-cell>
          <table:table-cell table:style-name="ce1" table:formula="of:=[.G74]+h" office:value-type="float" office:value="0.73" calcext:value-type="float">
            <text:p>0,73</text:p>
          </table:table-cell>
          <table:table-cell table:style-name="ce1" table:formula="of:=[.H74]+ h*[.F75]" office:value-type="float" office:value="1120.49881858379" calcext:value-type="float">
            <text:p>1120,498818583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]" office:value-type="float" office:value="0.73" calcext:value-type="float">
            <text:p>0,73</text:p>
          </table:table-cell>
          <table:table-cell table:style-name="ce1" table:formula="of:=[.H75]" office:value-type="float" office:value="1120.49881858379" calcext:value-type="float">
            <text:p>1120,49881858379</text:p>
          </table:table-cell>
          <table:table-cell table:style-name="ce1" table:formula="of:=-68 - ([.E76]^2/Ao)" office:value-type="float" office:value="-695.758801223836" calcext:value-type="float">
            <text:p>-695,758801223836</text:p>
          </table:table-cell>
          <table:table-cell table:style-name="ce1" table:formula="of:=[.G75]+h" office:value-type="float" office:value="0.74" calcext:value-type="float">
            <text:p>0,74</text:p>
          </table:table-cell>
          <table:table-cell table:style-name="ce1" table:formula="of:=[.H75]+ h*[.F76]" office:value-type="float" office:value="1113.54123057155" calcext:value-type="float">
            <text:p>1113,541230571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6]" office:value-type="float" office:value="0.74" calcext:value-type="float">
            <text:p>0,74</text:p>
          </table:table-cell>
          <table:table-cell table:style-name="ce1" table:formula="of:=[.H76]" office:value-type="float" office:value="1113.54123057155" calcext:value-type="float">
            <text:p>1113,54123057155</text:p>
          </table:table-cell>
          <table:table-cell table:style-name="ce1" table:formula="of:=-68 - ([.E77]^2/Ao)" office:value-type="float" office:value="-687.987036091404" calcext:value-type="float">
            <text:p>-687,987036091404</text:p>
          </table:table-cell>
          <table:table-cell table:style-name="ce1" table:formula="of:=[.G76]+h" office:value-type="float" office:value="0.75" calcext:value-type="float">
            <text:p>0,75</text:p>
          </table:table-cell>
          <table:table-cell table:style-name="ce1" table:formula="of:=[.H76]+ h*[.F77]" office:value-type="float" office:value="1106.66136021064" calcext:value-type="float">
            <text:p>1106,661360210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7]" office:value-type="float" office:value="0.75" calcext:value-type="float">
            <text:p>0,75</text:p>
          </table:table-cell>
          <table:table-cell table:style-name="ce1" table:formula="of:=[.H77]" office:value-type="float" office:value="1106.66136021064" calcext:value-type="float">
            <text:p>1106,66136021064</text:p>
          </table:table-cell>
          <table:table-cell table:style-name="ce1" table:formula="of:=-68 - ([.E78]^2/Ao)" office:value-type="float" office:value="-680.349683091631" calcext:value-type="float">
            <text:p>-680,349683091631</text:p>
          </table:table-cell>
          <table:table-cell table:style-name="ce1" table:formula="of:=[.G77]+h" office:value-type="float" office:value="0.760000000000001" calcext:value-type="float">
            <text:p>0,760000000000001</text:p>
          </table:table-cell>
          <table:table-cell table:style-name="ce1" table:formula="of:=[.H77]+ h*[.F78]" office:value-type="float" office:value="1099.85786337972" calcext:value-type="float">
            <text:p>1099,857863379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8]" office:value-type="float" office:value="0.760000000000001" calcext:value-type="float">
            <text:p>0,760000000000001</text:p>
          </table:table-cell>
          <table:table-cell table:style-name="ce1" table:formula="of:=[.H78]" office:value-type="float" office:value="1099.85786337972" calcext:value-type="float">
            <text:p>1099,85786337972</text:p>
          </table:table-cell>
          <table:table-cell table:style-name="ce1" table:formula="of:=-68 - ([.E79]^2/Ao)" office:value-type="float" office:value="-672.843659819104" calcext:value-type="float">
            <text:p>-672,843659819104</text:p>
          </table:table-cell>
          <table:table-cell table:style-name="ce1" table:formula="of:=[.G78]+h" office:value-type="float" office:value="0.770000000000001" calcext:value-type="float">
            <text:p>0,770000000000001</text:p>
          </table:table-cell>
          <table:table-cell table:style-name="ce1" table:formula="of:=[.H78]+ h*[.F79]" office:value-type="float" office:value="1093.12942678153" calcext:value-type="float">
            <text:p>1093,129426781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9]" office:value-type="float" office:value="0.770000000000001" calcext:value-type="float">
            <text:p>0,770000000000001</text:p>
          </table:table-cell>
          <table:table-cell table:style-name="ce1" table:formula="of:=[.H79]" office:value-type="float" office:value="1093.12942678153" calcext:value-type="float">
            <text:p>1093,12942678153</text:p>
          </table:table-cell>
          <table:table-cell table:style-name="ce1" table:formula="of:=-68 - ([.E80]^2/Ao)" office:value-type="float" office:value="-665.46597184786" calcext:value-type="float">
            <text:p>-665,46597184786</text:p>
          </table:table-cell>
          <table:table-cell table:style-name="ce1" table:formula="of:=[.G79]+h" office:value-type="float" office:value="0.780000000000001" calcext:value-type="float">
            <text:p>0,780000000000001</text:p>
          </table:table-cell>
          <table:table-cell table:style-name="ce1" table:formula="of:=[.H79]+ h*[.F80]" office:value-type="float" office:value="1086.47476706305" calcext:value-type="float">
            <text:p>1086,474767063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0]" office:value-type="float" office:value="0.780000000000001" calcext:value-type="float">
            <text:p>0,780000000000001</text:p>
          </table:table-cell>
          <table:table-cell table:style-name="ce1" table:formula="of:=[.H80]" office:value-type="float" office:value="1086.47476706305" calcext:value-type="float">
            <text:p>1086,47476706305</text:p>
          </table:table-cell>
          <table:table-cell table:style-name="ce1" table:formula="of:=-68 - ([.E81]^2/Ao)" office:value-type="float" office:value="-658.213709732358" calcext:value-type="float">
            <text:p>-658,213709732358</text:p>
          </table:table-cell>
          <table:table-cell table:style-name="ce1" table:formula="of:=[.G80]+h" office:value-type="float" office:value="0.790000000000001" calcext:value-type="float">
            <text:p>0,790000000000001</text:p>
          </table:table-cell>
          <table:table-cell table:style-name="ce1" table:formula="of:=[.H80]+ h*[.F81]" office:value-type="float" office:value="1079.89262996573" calcext:value-type="float">
            <text:p>1079,892629965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1]" office:value-type="float" office:value="0.790000000000001" calcext:value-type="float">
            <text:p>0,790000000000001</text:p>
          </table:table-cell>
          <table:table-cell table:style-name="ce1" table:formula="of:=[.H81]" office:value-type="float" office:value="1079.89262996573" calcext:value-type="float">
            <text:p>1079,89262996573</text:p>
          </table:table-cell>
          <table:table-cell table:style-name="ce1" table:formula="of:=-68 - ([.E82]^2/Ao)" office:value-type="float" office:value="-651.08404612715" calcext:value-type="float">
            <text:p>-651,08404612715</text:p>
          </table:table-cell>
          <table:table-cell table:style-name="ce1" table:formula="of:=[.G81]+h" office:value-type="float" office:value="0.800000000000001" calcext:value-type="float">
            <text:p>0,800000000000001</text:p>
          </table:table-cell>
          <table:table-cell table:style-name="ce1" table:formula="of:=[.H81]+ h*[.F82]" office:value-type="float" office:value="1073.38178950446" calcext:value-type="float">
            <text:p>1073,381789504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2]" office:value-type="float" office:value="0.800000000000001" calcext:value-type="float">
            <text:p>0,800000000000001</text:p>
          </table:table-cell>
          <table:table-cell table:style-name="ce1" table:formula="of:=[.H82]" office:value-type="float" office:value="1073.38178950446" calcext:value-type="float">
            <text:p>1073,38178950446</text:p>
          </table:table-cell>
          <table:table-cell table:style-name="ce1" table:formula="of:=-68 - ([.E83]^2/Ao)" office:value-type="float" office:value="-644.074233019896" calcext:value-type="float">
            <text:p>-644,074233019896</text:p>
          </table:table-cell>
          <table:table-cell table:style-name="ce1" table:formula="of:=[.G82]+h" office:value-type="float" office:value="0.810000000000001" calcext:value-type="float">
            <text:p>0,810000000000001</text:p>
          </table:table-cell>
          <table:table-cell table:style-name="ce1" table:formula="of:=[.H82]+ h*[.F83]" office:value-type="float" office:value="1066.94104717426" calcext:value-type="float">
            <text:p>1066,941047174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3]" office:value-type="float" office:value="0.810000000000001" calcext:value-type="float">
            <text:p>0,810000000000001</text:p>
          </table:table-cell>
          <table:table-cell table:style-name="ce1" table:formula="of:=[.H83]" office:value-type="float" office:value="1066.94104717426" calcext:value-type="float">
            <text:p>1066,94104717426</text:p>
          </table:table-cell>
          <table:table-cell table:style-name="ce1" table:formula="of:=-68 - ([.E84]^2/Ao)" office:value-type="float" office:value="-637.181599072652" calcext:value-type="float">
            <text:p>-637,181599072652</text:p>
          </table:table-cell>
          <table:table-cell table:style-name="ce1" table:formula="of:=[.G83]+h" office:value-type="float" office:value="0.820000000000001" calcext:value-type="float">
            <text:p>0,820000000000001</text:p>
          </table:table-cell>
          <table:table-cell table:style-name="ce1" table:formula="of:=[.H83]+ h*[.F84]" office:value-type="float" office:value="1060.56923118353" calcext:value-type="float">
            <text:p>1060,569231183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4]" office:value-type="float" office:value="0.820000000000001" calcext:value-type="float">
            <text:p>0,820000000000001</text:p>
          </table:table-cell>
          <table:table-cell table:style-name="ce1" table:formula="of:=[.H84]" office:value-type="float" office:value="1060.56923118353" calcext:value-type="float">
            <text:p>1060,56923118353</text:p>
          </table:table-cell>
          <table:table-cell table:style-name="ce1" table:formula="of:=-68 - ([.E85]^2/Ao)" office:value-type="float" office:value="-630.403547066615" calcext:value-type="float">
            <text:p>-630,403547066615</text:p>
          </table:table-cell>
          <table:table-cell table:style-name="ce1" table:formula="of:=[.G84]+h" office:value-type="float" office:value="0.830000000000001" calcext:value-type="float">
            <text:p>0,830000000000001</text:p>
          </table:table-cell>
          <table:table-cell table:style-name="ce1" table:formula="of:=[.H84]+ h*[.F85]" office:value-type="float" office:value="1054.26519571287" calcext:value-type="float">
            <text:p>1054,265195712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5]" office:value-type="float" office:value="0.830000000000001" calcext:value-type="float">
            <text:p>0,830000000000001</text:p>
          </table:table-cell>
          <table:table-cell table:style-name="ce1" table:formula="of:=[.H85]" office:value-type="float" office:value="1054.26519571287" calcext:value-type="float">
            <text:p>1054,26519571287</text:p>
          </table:table-cell>
          <table:table-cell table:style-name="ce1" table:formula="of:=-68 - ([.E86]^2/Ao)" office:value-type="float" office:value="-623.737551445744" calcext:value-type="float">
            <text:p>-623,737551445744</text:p>
          </table:table-cell>
          <table:table-cell table:style-name="ce1" table:formula="of:=[.G85]+h" office:value-type="float" office:value="0.840000000000001" calcext:value-type="float">
            <text:p>0,840000000000001</text:p>
          </table:table-cell>
          <table:table-cell table:style-name="ce1" table:formula="of:=[.H85]+ h*[.F86]" office:value-type="float" office:value="1048.02782019841" calcext:value-type="float">
            <text:p>1048,027820198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6]" office:value-type="float" office:value="0.840000000000001" calcext:value-type="float">
            <text:p>0,840000000000001</text:p>
          </table:table-cell>
          <table:table-cell table:style-name="ce1" table:formula="of:=[.H86]" office:value-type="float" office:value="1048.02782019841" calcext:value-type="float">
            <text:p>1048,02782019841</text:p>
          </table:table-cell>
          <table:table-cell table:style-name="ce1" table:formula="of:=-68 - ([.E87]^2/Ao)" office:value-type="float" office:value="-617.181155954914" calcext:value-type="float">
            <text:p>-617,181155954914</text:p>
          </table:table-cell>
          <table:table-cell table:style-name="ce1" table:formula="of:=[.G86]+h" office:value-type="float" office:value="0.850000000000001" calcext:value-type="float">
            <text:p>0,850000000000001</text:p>
          </table:table-cell>
          <table:table-cell table:style-name="ce1" table:formula="of:=[.H86]+ h*[.F87]" office:value-type="float" office:value="1041.85600863886" calcext:value-type="float">
            <text:p>1041,856008638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7]" office:value-type="float" office:value="0.850000000000001" calcext:value-type="float">
            <text:p>0,850000000000001</text:p>
          </table:table-cell>
          <table:table-cell table:style-name="ce1" table:formula="of:=[.H87]" office:value-type="float" office:value="1041.85600863886" calcext:value-type="float">
            <text:p>1041,85600863886</text:p>
          </table:table-cell>
          <table:table-cell table:style-name="ce1" table:formula="of:=-68 - ([.E88]^2/Ao)" office:value-type="float" office:value="-610.731971368448" calcext:value-type="float">
            <text:p>-610,731971368448</text:p>
          </table:table-cell>
          <table:table-cell table:style-name="ce1" table:formula="of:=[.G87]+h" office:value-type="float" office:value="0.860000000000001" calcext:value-type="float">
            <text:p>0,860000000000001</text:p>
          </table:table-cell>
          <table:table-cell table:style-name="ce1" table:formula="of:=[.H87]+ h*[.F88]" office:value-type="float" office:value="1035.74868892518" calcext:value-type="float">
            <text:p>1035,748688925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8]" office:value-type="float" office:value="0.860000000000001" calcext:value-type="float">
            <text:p>0,860000000000001</text:p>
          </table:table-cell>
          <table:table-cell table:style-name="ce1" table:formula="of:=[.H88]" office:value-type="float" office:value="1035.74868892518" calcext:value-type="float">
            <text:p>1035,74868892518</text:p>
          </table:table-cell>
          <table:table-cell table:style-name="ce1" table:formula="of:=-68 - ([.E89]^2/Ao)" office:value-type="float" office:value="-604.38767330511" calcext:value-type="float">
            <text:p>-604,38767330511</text:p>
          </table:table-cell>
          <table:table-cell table:style-name="ce1" table:formula="of:=[.G88]+h" office:value-type="float" office:value="0.870000000000001" calcext:value-type="float">
            <text:p>0,870000000000001</text:p>
          </table:table-cell>
          <table:table-cell table:style-name="ce1" table:formula="of:=[.H88]+ h*[.F89]" office:value-type="float" office:value="1029.70481219212" calcext:value-type="float">
            <text:p>1029,704812192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89]" office:value-type="float" office:value="0.870000000000001" calcext:value-type="float">
            <text:p>0,870000000000001</text:p>
          </table:table-cell>
          <table:table-cell table:style-name="ce1" table:formula="of:=[.H89]" office:value-type="float" office:value="1029.70481219212" calcext:value-type="float">
            <text:p>1029,70481219212</text:p>
          </table:table-cell>
          <table:table-cell table:style-name="ce1" table:formula="of:=-68 - ([.E90]^2/Ao)" office:value-type="float" office:value="-598.146000125809" calcext:value-type="float">
            <text:p>-598,146000125809</text:p>
          </table:table-cell>
          <table:table-cell table:style-name="ce1" table:formula="of:=[.G89]+h" office:value-type="float" office:value="0.880000000000001" calcext:value-type="float">
            <text:p>0,880000000000001</text:p>
          </table:table-cell>
          <table:table-cell table:style-name="ce1" table:formula="of:=[.H89]+ h*[.F90]" office:value-type="float" office:value="1023.72335219087" calcext:value-type="float">
            <text:p>1023,723352190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0]" office:value-type="float" office:value="0.880000000000001" calcext:value-type="float">
            <text:p>0,880000000000001</text:p>
          </table:table-cell>
          <table:table-cell table:style-name="ce1" table:formula="of:=[.H90]" office:value-type="float" office:value="1023.72335219087" calcext:value-type="float">
            <text:p>1023,72335219087</text:p>
          </table:table-cell>
          <table:table-cell table:style-name="ce1" table:formula="of:=-68 - ([.E91]^2/Ao)" office:value-type="float" office:value="-592.004750910452" calcext:value-type="float">
            <text:p>-592,004750910452</text:p>
          </table:table-cell>
          <table:table-cell table:style-name="ce1" table:formula="of:=[.G90]+h" office:value-type="float" office:value="0.890000000000001" calcext:value-type="float">
            <text:p>0,890000000000001</text:p>
          </table:table-cell>
          <table:table-cell table:style-name="ce1" table:formula="of:=[.H90]+ h*[.F91]" office:value-type="float" office:value="1017.80330468176" calcext:value-type="float">
            <text:p>1017,803304681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1]" office:value-type="float" office:value="0.890000000000001" calcext:value-type="float">
            <text:p>0,890000000000001</text:p>
          </table:table-cell>
          <table:table-cell table:style-name="ce1" table:formula="of:=[.H91]" office:value-type="float" office:value="1017.80330468176" calcext:value-type="float">
            <text:p>1017,80330468176</text:p>
          </table:table-cell>
          <table:table-cell table:style-name="ce1" table:formula="of:=-68 - ([.E92]^2/Ao)" office:value-type="float" office:value="-585.961783510557" calcext:value-type="float">
            <text:p>-585,961783510557</text:p>
          </table:table-cell>
          <table:table-cell table:style-name="ce1" table:formula="of:=[.G91]+h" office:value-type="float" office:value="0.900000000000001" calcext:value-type="float">
            <text:p>0,900000000000001</text:p>
          </table:table-cell>
          <table:table-cell table:style-name="ce1" table:formula="of:=[.H91]+ h*[.F92]" office:value-type="float" office:value="1011.94368684666" calcext:value-type="float">
            <text:p>1011,943686846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2]" office:value-type="float" office:value="0.900000000000001" calcext:value-type="float">
            <text:p>0,900000000000001</text:p>
          </table:table-cell>
          <table:table-cell table:style-name="ce1" table:formula="of:=[.H92]" office:value-type="float" office:value="1011.94368684666" calcext:value-type="float">
            <text:p>1011,94368684666</text:p>
          </table:table-cell>
          <table:table-cell table:style-name="ce1" table:formula="of:=-68 - ([.E93]^2/Ao)" office:value-type="float" office:value="-580.015012674402" calcext:value-type="float">
            <text:p>-580,015012674402</text:p>
          </table:table-cell>
          <table:table-cell table:style-name="ce1" table:formula="of:=[.G92]+h" office:value-type="float" office:value="0.910000000000001" calcext:value-type="float">
            <text:p>0,910000000000001</text:p>
          </table:table-cell>
          <table:table-cell table:style-name="ce1" table:formula="of:=[.H92]+ h*[.F93]" office:value-type="float" office:value="1006.14353671991" calcext:value-type="float">
            <text:p>1006,143536719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3]" office:value-type="float" office:value="0.910000000000001" calcext:value-type="float">
            <text:p>0,910000000000001</text:p>
          </table:table-cell>
          <table:table-cell table:style-name="ce1" table:formula="of:=[.H93]" office:value-type="float" office:value="1006.14353671991" calcext:value-type="float">
            <text:p>1006,14353671991</text:p>
          </table:table-cell>
          <table:table-cell table:style-name="ce1" table:formula="of:=-68 - ([.E94]^2/Ao)" office:value-type="float" office:value="-574.162408241627" calcext:value-type="float">
            <text:p>-574,162408241627</text:p>
          </table:table-cell>
          <table:table-cell table:style-name="ce1" table:formula="of:=[.G93]+h" office:value-type="float" office:value="0.920000000000001" calcext:value-type="float">
            <text:p>0,920000000000001</text:p>
          </table:table-cell>
          <table:table-cell table:style-name="ce1" table:formula="of:=[.H93]+ h*[.F94]" office:value-type="float" office:value="1000.4019126375" calcext:value-type="float">
            <text:p>1000,40191263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4]" office:value-type="float" office:value="0.920000000000001" calcext:value-type="float">
            <text:p>0,920000000000001</text:p>
          </table:table-cell>
          <table:table-cell table:style-name="ce1" table:formula="of:=[.H94]" office:value-type="float" office:value="1000.4019126375" calcext:value-type="float">
            <text:p>1000,4019126375</text:p>
          </table:table-cell>
          <table:table-cell table:style-name="ce1" table:formula="of:=-68 - ([.E95]^2/Ao)" office:value-type="float" office:value="-568.40199340438" calcext:value-type="float">
            <text:p>-568,40199340438</text:p>
          </table:table-cell>
          <table:table-cell table:style-name="ce1" table:formula="of:=[.G94]+h" office:value-type="float" office:value="0.930000000000001" calcext:value-type="float">
            <text:p>0,930000000000001</text:p>
          </table:table-cell>
          <table:table-cell table:style-name="ce1" table:formula="of:=[.H94]+ h*[.F95]" office:value-type="float" office:value="994.717892703452" calcext:value-type="float">
            <text:p>994,7178927034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5]" office:value-type="float" office:value="0.930000000000001" calcext:value-type="float">
            <text:p>0,930000000000001</text:p>
          </table:table-cell>
          <table:table-cell table:style-name="ce1" table:formula="of:=[.H95]" office:value-type="float" office:value="994.717892703452" calcext:value-type="float">
            <text:p>994,717892703452</text:p>
          </table:table-cell>
          <table:table-cell table:style-name="ce1" table:formula="of:=-68 - ([.E96]^2/Ao)" office:value-type="float" office:value="-562.731843032198" calcext:value-type="float">
            <text:p>-562,731843032198</text:p>
          </table:table-cell>
          <table:table-cell table:style-name="ce1" table:formula="of:=[.G95]+h" office:value-type="float" office:value="0.940000000000001" calcext:value-type="float">
            <text:p>0,940000000000001</text:p>
          </table:table-cell>
          <table:table-cell table:style-name="ce1" table:formula="of:=[.H95]+ h*[.F96]" office:value-type="float" office:value="989.09057427313" calcext:value-type="float">
            <text:p>989,090574273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6]" office:value-type="float" office:value="0.940000000000001" calcext:value-type="float">
            <text:p>0,940000000000001</text:p>
          </table:table-cell>
          <table:table-cell table:style-name="ce1" table:formula="of:=[.H96]" office:value-type="float" office:value="989.09057427313" calcext:value-type="float">
            <text:p>989,09057427313</text:p>
          </table:table-cell>
          <table:table-cell table:style-name="ce1" table:formula="of:=-68 - ([.E97]^2/Ao)" office:value-type="float" office:value="-557.150082057975" calcext:value-type="float">
            <text:p>-557,150082057975</text:p>
          </table:table-cell>
          <table:table-cell table:style-name="ce1" table:formula="of:=[.G96]+h" office:value-type="float" office:value="0.950000000000001" calcext:value-type="float">
            <text:p>0,950000000000001</text:p>
          </table:table-cell>
          <table:table-cell table:style-name="ce1" table:formula="of:=[.H96]+ h*[.F97]" office:value-type="float" office:value="983.51907345255" calcext:value-type="float">
            <text:p>983,519073452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7]" office:value-type="float" office:value="0.950000000000001" calcext:value-type="float">
            <text:p>0,950000000000001</text:p>
          </table:table-cell>
          <table:table-cell table:style-name="ce1" table:formula="of:=[.H97]" office:value-type="float" office:value="983.51907345255" calcext:value-type="float">
            <text:p>983,51907345255</text:p>
          </table:table-cell>
          <table:table-cell table:style-name="ce1" table:formula="of:=-68 - ([.E98]^2/Ao)" office:value-type="float" office:value="-551.654883922481" calcext:value-type="float">
            <text:p>-551,654883922481</text:p>
          </table:table-cell>
          <table:table-cell table:style-name="ce1" table:formula="of:=[.G97]+h" office:value-type="float" office:value="0.960000000000001" calcext:value-type="float">
            <text:p>0,960000000000001</text:p>
          </table:table-cell>
          <table:table-cell table:style-name="ce1" table:formula="of:=[.H97]+ h*[.F98]" office:value-type="float" office:value="978.002524613325" calcext:value-type="float">
            <text:p>978,0025246133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8]" office:value-type="float" office:value="0.960000000000001" calcext:value-type="float">
            <text:p>0,960000000000001</text:p>
          </table:table-cell>
          <table:table-cell table:style-name="ce1" table:formula="of:=[.H98]" office:value-type="float" office:value="978.002524613325" calcext:value-type="float">
            <text:p>978,002524613325</text:p>
          </table:table-cell>
          <table:table-cell table:style-name="ce1" table:formula="of:=-68 - ([.E99]^2/Ao)" office:value-type="float" office:value="-546.244469075019" calcext:value-type="float">
            <text:p>-546,244469075019</text:p>
          </table:table-cell>
          <table:table-cell table:style-name="ce1" table:formula="of:=[.G98]+h" office:value-type="float" office:value="0.970000000000001" calcext:value-type="float">
            <text:p>0,970000000000001</text:p>
          </table:table-cell>
          <table:table-cell table:style-name="ce1" table:formula="of:=[.H98]+ h*[.F99]" office:value-type="float" office:value="972.540079922575" calcext:value-type="float">
            <text:p>972,5400799225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99]" office:value-type="float" office:value="0.970000000000001" calcext:value-type="float">
            <text:p>0,970000000000001</text:p>
          </table:table-cell>
          <table:table-cell table:style-name="ce1" table:formula="of:=[.H99]" office:value-type="float" office:value="972.540079922575" calcext:value-type="float">
            <text:p>972,540079922575</text:p>
          </table:table-cell>
          <table:table-cell table:style-name="ce1" table:formula="of:=-68 - ([.E100]^2/Ao)" office:value-type="float" office:value="-540.917103527904" calcext:value-type="float">
            <text:p>-540,917103527904</text:p>
          </table:table-cell>
          <table:table-cell table:style-name="ce1" table:formula="of:=[.G99]+h" office:value-type="float" office:value="0.980000000000001" calcext:value-type="float">
            <text:p>0,980000000000001</text:p>
          </table:table-cell>
          <table:table-cell table:style-name="ce1" table:formula="of:=[.H99]+ h*[.F100]" office:value-type="float" office:value="967.130908887296" calcext:value-type="float">
            <text:p>967,1309088872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0]" office:value-type="float" office:value="0.980000000000001" calcext:value-type="float">
            <text:p>0,980000000000001</text:p>
          </table:table-cell>
          <table:table-cell table:style-name="ce1" table:formula="of:=[.H100]" office:value-type="float" office:value="967.130908887296" calcext:value-type="float">
            <text:p>967,130908887296</text:p>
          </table:table-cell>
          <table:table-cell table:style-name="ce1" table:formula="of:=-68 - ([.E101]^2/Ao)" office:value-type="float" office:value="-535.671097462584" calcext:value-type="float">
            <text:p>-535,671097462584</text:p>
          </table:table-cell>
          <table:table-cell table:style-name="ce1" table:formula="of:=[.G100]+h" office:value-type="float" office:value="0.990000000000001" calcext:value-type="float">
            <text:p>0,990000000000001</text:p>
          </table:table-cell>
          <table:table-cell table:style-name="ce1" table:formula="of:=[.H100]+ h*[.F101]" office:value-type="float" office:value="961.77419791267" calcext:value-type="float">
            <text:p>961,774197912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1]" office:value-type="float" office:value="0.990000000000001" calcext:value-type="float">
            <text:p>0,990000000000001</text:p>
          </table:table-cell>
          <table:table-cell table:style-name="ce1" table:formula="of:=[.H101]" office:value-type="float" office:value="961.77419791267" calcext:value-type="float">
            <text:p>961,77419791267</text:p>
          </table:table-cell>
          <table:table-cell table:style-name="ce1" table:formula="of:=-68 - ([.E102]^2/Ao)" office:value-type="float" office:value="-530.50480388528" calcext:value-type="float">
            <text:p>-530,50480388528</text:p>
          </table:table-cell>
          <table:table-cell table:style-name="ce1" table:formula="of:=[.G101]+h" office:value-type="float" office:value="1" calcext:value-type="float">
            <text:p>1</text:p>
          </table:table-cell>
          <table:table-cell table:style-name="ce1" table:formula="of:=[.H101]+ h*[.F102]" office:value-type="float" office:value="956.469149873818" calcext:value-type="float">
            <text:p>956,4691498738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2]" office:value-type="float" office:value="1" calcext:value-type="float">
            <text:p>1</text:p>
          </table:table-cell>
          <table:table-cell table:style-name="ce1" table:formula="of:=[.H102]" office:value-type="float" office:value="956.469149873818" calcext:value-type="float">
            <text:p>956,469149873818</text:p>
          </table:table-cell>
          <table:table-cell table:style-name="ce1" table:formula="of:=-68 - ([.E103]^2/Ao)" office:value-type="float" office:value="-525.416617330172" calcext:value-type="float">
            <text:p>-525,416617330172</text:p>
          </table:table-cell>
          <table:table-cell table:style-name="ce1" table:formula="of:=[.G102]+h" office:value-type="float" office:value="1.01" calcext:value-type="float">
            <text:p>1,01</text:p>
          </table:table-cell>
          <table:table-cell table:style-name="ce1" table:formula="of:=[.H102]+ h*[.F103]" office:value-type="float" office:value="951.214983700516" calcext:value-type="float">
            <text:p>951,2149837005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3]" office:value-type="float" office:value="1.01" calcext:value-type="float">
            <text:p>1,01</text:p>
          </table:table-cell>
          <table:table-cell table:style-name="ce1" table:formula="of:=[.H103]" office:value-type="float" office:value="951.214983700516" calcext:value-type="float">
            <text:p>951,214983700516</text:p>
          </table:table-cell>
          <table:table-cell table:style-name="ce1" table:formula="of:=-68 - ([.E104]^2/Ao)" office:value-type="float" office:value="-520.404972608186" calcext:value-type="float">
            <text:p>-520,404972608186</text:p>
          </table:table-cell>
          <table:table-cell table:style-name="ce1" table:formula="of:=[.G103]+h" office:value-type="float" office:value="1.02" calcext:value-type="float">
            <text:p>1,02</text:p>
          </table:table-cell>
          <table:table-cell table:style-name="ce1" table:formula="of:=[.H103]+ h*[.F104]" office:value-type="float" office:value="946.010933974434" calcext:value-type="float">
            <text:p>946,0109339744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4]" office:value-type="float" office:value="1.02" calcext:value-type="float">
            <text:p>1,02</text:p>
          </table:table-cell>
          <table:table-cell table:style-name="ce1" table:formula="of:=[.H104]" office:value-type="float" office:value="946.010933974434" calcext:value-type="float">
            <text:p>946,010933974434</text:p>
          </table:table-cell>
          <table:table-cell table:style-name="ce1" table:formula="of:=-68 - ([.E105]^2/Ao)" office:value-type="float" office:value="-515.46834359959" calcext:value-type="float">
            <text:p>-515,46834359959</text:p>
          </table:table-cell>
          <table:table-cell table:style-name="ce1" table:formula="of:=[.G104]+h" office:value-type="float" office:value="1.03" calcext:value-type="float">
            <text:p>1,03</text:p>
          </table:table-cell>
          <table:table-cell table:style-name="ce1" table:formula="of:=[.H104]+ h*[.F105]" office:value-type="float" office:value="940.856250538438" calcext:value-type="float">
            <text:p>940,8562505384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5]" office:value-type="float" office:value="1.03" calcext:value-type="float">
            <text:p>1,03</text:p>
          </table:table-cell>
          <table:table-cell table:style-name="ce1" table:formula="of:=[.H105]" office:value-type="float" office:value="940.856250538438" calcext:value-type="float">
            <text:p>940,856250538438</text:p>
          </table:table-cell>
          <table:table-cell table:style-name="ce1" table:formula="of:=-68 - ([.E106]^2/Ao)" office:value-type="float" office:value="-510.605242088624" calcext:value-type="float">
            <text:p>-510,605242088624</text:p>
          </table:table-cell>
          <table:table-cell table:style-name="ce1" table:formula="of:=[.G105]+h" office:value-type="float" office:value="1.04" calcext:value-type="float">
            <text:p>1,04</text:p>
          </table:table-cell>
          <table:table-cell table:style-name="ce1" table:formula="of:=[.H105]+ h*[.F106]" office:value-type="float" office:value="935.750198117552" calcext:value-type="float">
            <text:p>935,7501981175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6]" office:value-type="float" office:value="1.04" calcext:value-type="float">
            <text:p>1,04</text:p>
          </table:table-cell>
          <table:table-cell table:style-name="ce1" table:formula="of:=[.H106]" office:value-type="float" office:value="935.750198117552" calcext:value-type="float">
            <text:p>935,750198117552</text:p>
          </table:table-cell>
          <table:table-cell table:style-name="ce1" table:formula="of:=-68 - ([.E107]^2/Ao)" office:value-type="float" office:value="-505.814216638519" calcext:value-type="float">
            <text:p>-505,814216638519</text:p>
          </table:table-cell>
          <table:table-cell table:style-name="ce1" table:formula="of:=[.G106]+h" office:value-type="float" office:value="1.05" calcext:value-type="float">
            <text:p>1,05</text:p>
          </table:table-cell>
          <table:table-cell table:style-name="ce1" table:formula="of:=[.H106]+ h*[.F107]" office:value-type="float" office:value="930.692055951167" calcext:value-type="float">
            <text:p>930,6920559511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7]" office:value-type="float" office:value="1.05" calcext:value-type="float">
            <text:p>1,05</text:p>
          </table:table-cell>
          <table:table-cell table:style-name="ce1" table:formula="of:=[.H107]" office:value-type="float" office:value="930.692055951167" calcext:value-type="float">
            <text:p>930,692055951167</text:p>
          </table:table-cell>
          <table:table-cell table:style-name="ce1" table:formula="of:=-68 - ([.E108]^2/Ao)" office:value-type="float" office:value="-501.093851505305" calcext:value-type="float">
            <text:p>-501,093851505305</text:p>
          </table:table-cell>
          <table:table-cell table:style-name="ce1" table:formula="of:=[.G107]+h" office:value-type="float" office:value="1.06" calcext:value-type="float">
            <text:p>1,06</text:p>
          </table:table-cell>
          <table:table-cell table:style-name="ce1" table:formula="of:=[.H107]+ h*[.F108]" office:value-type="float" office:value="925.681117436114" calcext:value-type="float">
            <text:p>925,6811174361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8]" office:value-type="float" office:value="1.06" calcext:value-type="float">
            <text:p>1,06</text:p>
          </table:table-cell>
          <table:table-cell table:style-name="ce1" table:formula="of:=[.H108]" office:value-type="float" office:value="925.681117436114" calcext:value-type="float">
            <text:p>925,681117436114</text:p>
          </table:table-cell>
          <table:table-cell table:style-name="ce1" table:formula="of:=-68 - ([.E109]^2/Ao)" office:value-type="float" office:value="-496.442765588886" calcext:value-type="float">
            <text:p>-496,442765588886</text:p>
          </table:table-cell>
          <table:table-cell table:style-name="ce1" table:formula="of:=[.G108]+h" office:value-type="float" office:value="1.07" calcext:value-type="float">
            <text:p>1,07</text:p>
          </table:table-cell>
          <table:table-cell table:style-name="ce1" table:formula="of:=[.H108]+ h*[.F109]" office:value-type="float" office:value="920.716689780225" calcext:value-type="float">
            <text:p>920,7166897802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09]" office:value-type="float" office:value="1.07" calcext:value-type="float">
            <text:p>1,07</text:p>
          </table:table-cell>
          <table:table-cell table:style-name="ce1" table:formula="of:=[.H109]" office:value-type="float" office:value="920.716689780225" calcext:value-type="float">
            <text:p>920,716689780225</text:p>
          </table:table-cell>
          <table:table-cell table:style-name="ce1" table:formula="of:=-68 - ([.E110]^2/Ao)" office:value-type="float" office:value="-491.859611419927" calcext:value-type="float">
            <text:p>-491,859611419927</text:p>
          </table:table-cell>
          <table:table-cell table:style-name="ce1" table:formula="of:=[.G109]+h" office:value-type="float" office:value="1.08" calcext:value-type="float">
            <text:p>1,08</text:p>
          </table:table-cell>
          <table:table-cell table:style-name="ce1" table:formula="of:=[.H109]+ h*[.F110]" office:value-type="float" office:value="915.798093666025" calcext:value-type="float">
            <text:p>915,7980936660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0]" office:value-type="float" office:value="1.08" calcext:value-type="float">
            <text:p>1,08</text:p>
          </table:table-cell>
          <table:table-cell table:style-name="ce1" table:formula="of:=[.H110]" office:value-type="float" office:value="915.798093666025" calcext:value-type="float">
            <text:p>915,798093666025</text:p>
          </table:table-cell>
          <table:table-cell table:style-name="ce1" table:formula="of:=-68 - ([.E111]^2/Ao)" office:value-type="float" office:value="-487.343074181163" calcext:value-type="float">
            <text:p>-487,343074181163</text:p>
          </table:table-cell>
          <table:table-cell table:style-name="ce1" table:formula="of:=[.G110]+h" office:value-type="float" office:value="1.09" calcext:value-type="float">
            <text:p>1,09</text:p>
          </table:table-cell>
          <table:table-cell table:style-name="ce1" table:formula="of:=[.H110]+ h*[.F111]" office:value-type="float" office:value="910.924662924214" calcext:value-type="float">
            <text:p>910,9246629242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1]" office:value-type="float" office:value="1.09" calcext:value-type="float">
            <text:p>1,09</text:p>
          </table:table-cell>
          <table:table-cell table:style-name="ce1" table:formula="of:=[.H111]" office:value-type="float" office:value="910.924662924214" calcext:value-type="float">
            <text:p>910,924662924214</text:p>
          </table:table-cell>
          <table:table-cell table:style-name="ce1" table:formula="of:=-68 - ([.E112]^2/Ao)" office:value-type="float" office:value="-482.891870761796" calcext:value-type="float">
            <text:p>-482,891870761796</text:p>
          </table:table-cell>
          <table:table-cell table:style-name="ce1" table:formula="of:=[.G111]+h" office:value-type="float" office:value="1.1" calcext:value-type="float">
            <text:p>1,1</text:p>
          </table:table-cell>
          <table:table-cell table:style-name="ce1" table:formula="of:=[.H111]+ h*[.F112]" office:value-type="float" office:value="906.095744216596" calcext:value-type="float">
            <text:p>906,0957442165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2]" office:value-type="float" office:value="1.1" calcext:value-type="float">
            <text:p>1,1</text:p>
          </table:table-cell>
          <table:table-cell table:style-name="ce1" table:formula="of:=[.H112]" office:value-type="float" office:value="906.095744216596" calcext:value-type="float">
            <text:p>906,095744216596</text:p>
          </table:table-cell>
          <table:table-cell table:style-name="ce1" table:formula="of:=-68 - ([.E113]^2/Ao)" office:value-type="float" office:value="-478.504748843713" calcext:value-type="float">
            <text:p>-478,504748843713</text:p>
          </table:table-cell>
          <table:table-cell table:style-name="ce1" table:formula="of:=[.G112]+h" office:value-type="float" office:value="1.11" calcext:value-type="float">
            <text:p>1,11</text:p>
          </table:table-cell>
          <table:table-cell table:style-name="ce1" table:formula="of:=[.H112]+ h*[.F113]" office:value-type="float" office:value="901.310696728159" calcext:value-type="float">
            <text:p>901,3106967281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3]" office:value-type="float" office:value="1.11" calcext:value-type="float">
            <text:p>1,11</text:p>
          </table:table-cell>
          <table:table-cell table:style-name="ce1" table:formula="of:=[.H113]" office:value-type="float" office:value="901.310696728159" calcext:value-type="float">
            <text:p>901,310696728159</text:p>
          </table:table-cell>
          <table:table-cell table:style-name="ce1" table:formula="of:=-68 - ([.E114]^2/Ao)" office:value-type="float" office:value="-474.180486018299" calcext:value-type="float">
            <text:p>-474,180486018299</text:p>
          </table:table-cell>
          <table:table-cell table:style-name="ce1" table:formula="of:=[.G113]+h" office:value-type="float" office:value="1.12" calcext:value-type="float">
            <text:p>1,12</text:p>
          </table:table-cell>
          <table:table-cell table:style-name="ce1" table:formula="of:=[.H113]+ h*[.F114]" office:value-type="float" office:value="896.568891867976" calcext:value-type="float">
            <text:p>896,5688918679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4]" office:value-type="float" office:value="1.12" calcext:value-type="float">
            <text:p>1,12</text:p>
          </table:table-cell>
          <table:table-cell table:style-name="ce1" table:formula="of:=[.H114]" office:value-type="float" office:value="896.568891867976" calcext:value-type="float">
            <text:p>896,568891867976</text:p>
          </table:table-cell>
          <table:table-cell table:style-name="ce1" table:formula="of:=-68 - ([.E115]^2/Ao)" office:value-type="float" office:value="-469.917888932685" calcext:value-type="float">
            <text:p>-469,917888932685</text:p>
          </table:table-cell>
          <table:table-cell table:style-name="ce1" table:formula="of:=[.G114]+h" office:value-type="float" office:value="1.13" calcext:value-type="float">
            <text:p>1,13</text:p>
          </table:table-cell>
          <table:table-cell table:style-name="ce1" table:formula="of:=[.H114]+ h*[.F115]" office:value-type="float" office:value="891.869712978649" calcext:value-type="float">
            <text:p>891,8697129786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5]" office:value-type="float" office:value="1.13" calcext:value-type="float">
            <text:p>1,13</text:p>
          </table:table-cell>
          <table:table-cell table:style-name="ce1" table:formula="of:=[.H115]" office:value-type="float" office:value="891.869712978649" calcext:value-type="float">
            <text:p>891,869712978649</text:p>
          </table:table-cell>
          <table:table-cell table:style-name="ce1" table:formula="of:=-68 - ([.E116]^2/Ao)" office:value-type="float" office:value="-465.715792464309" calcext:value-type="float">
            <text:p>-465,715792464309</text:p>
          </table:table-cell>
          <table:table-cell table:style-name="ce1" table:formula="of:=[.G115]+h" office:value-type="float" office:value="1.14" calcext:value-type="float">
            <text:p>1,14</text:p>
          </table:table-cell>
          <table:table-cell table:style-name="ce1" table:formula="of:=[.H115]+ h*[.F116]" office:value-type="float" office:value="887.212555054006" calcext:value-type="float">
            <text:p>887,2125550540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6]" office:value-type="float" office:value="1.14" calcext:value-type="float">
            <text:p>1,14</text:p>
          </table:table-cell>
          <table:table-cell table:style-name="ce1" table:formula="of:=[.H116]" office:value-type="float" office:value="887.212555054006" calcext:value-type="float">
            <text:p>887,212555054006</text:p>
          </table:table-cell>
          <table:table-cell table:style-name="ce1" table:formula="of:=-68 - ([.E117]^2/Ao)" office:value-type="float" office:value="-461.573058922729" calcext:value-type="float">
            <text:p>-461,573058922729</text:p>
          </table:table-cell>
          <table:table-cell table:style-name="ce1" table:formula="of:=[.G116]+h" office:value-type="float" office:value="1.15" calcext:value-type="float">
            <text:p>1,15</text:p>
          </table:table-cell>
          <table:table-cell table:style-name="ce1" table:formula="of:=[.H116]+ h*[.F117]" office:value-type="float" office:value="882.596824464778" calcext:value-type="float">
            <text:p>882,5968244647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7]" office:value-type="float" office:value="1.15" calcext:value-type="float">
            <text:p>1,15</text:p>
          </table:table-cell>
          <table:table-cell table:style-name="ce1" table:formula="of:=[.H117]" office:value-type="float" office:value="882.596824464778" calcext:value-type="float">
            <text:p>882,596824464778</text:p>
          </table:table-cell>
          <table:table-cell table:style-name="ce1" table:formula="of:=-68 - ([.E118]^2/Ao)" office:value-type="float" office:value="-457.488577277655" calcext:value-type="float">
            <text:p>-457,488577277655</text:p>
          </table:table-cell>
          <table:table-cell table:style-name="ce1" table:formula="of:=[.G117]+h" office:value-type="float" office:value="1.16" calcext:value-type="float">
            <text:p>1,16</text:p>
          </table:table-cell>
          <table:table-cell table:style-name="ce1" table:formula="of:=[.H117]+ h*[.F118]" office:value-type="float" office:value="878.021938692002" calcext:value-type="float">
            <text:p>878,0219386920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8]" office:value-type="float" office:value="1.16" calcext:value-type="float">
            <text:p>1,16</text:p>
          </table:table-cell>
          <table:table-cell table:style-name="ce1" table:formula="of:=[.H118]" office:value-type="float" office:value="878.021938692002" calcext:value-type="float">
            <text:p>878,021938692002</text:p>
          </table:table-cell>
          <table:table-cell table:style-name="ce1" table:formula="of:=-68 - ([.E119]^2/Ao)" office:value-type="float" office:value="-453.461262412231" calcext:value-type="float">
            <text:p>-453,461262412231</text:p>
          </table:table-cell>
          <table:table-cell table:style-name="ce1" table:formula="of:=[.G118]+h" office:value-type="float" office:value="1.17" calcext:value-type="float">
            <text:p>1,17</text:p>
          </table:table-cell>
          <table:table-cell table:style-name="ce1" table:formula="of:=[.H118]+ h*[.F119]" office:value-type="float" office:value="873.48732606788" calcext:value-type="float">
            <text:p>873,487326067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19]" office:value-type="float" office:value="1.17" calcext:value-type="float">
            <text:p>1,17</text:p>
          </table:table-cell>
          <table:table-cell table:style-name="ce1" table:formula="of:=[.H119]" office:value-type="float" office:value="873.48732606788" calcext:value-type="float">
            <text:p>873,48732606788</text:p>
          </table:table-cell>
          <table:table-cell table:style-name="ce1" table:formula="of:=-68 - ([.E120]^2/Ao)" office:value-type="float" office:value="-449.490054400607" calcext:value-type="float">
            <text:p>-449,490054400607</text:p>
          </table:table-cell>
          <table:table-cell table:style-name="ce1" table:formula="of:=[.G119]+h" office:value-type="float" office:value="1.18" calcext:value-type="float">
            <text:p>1,18</text:p>
          </table:table-cell>
          <table:table-cell table:style-name="ce1" table:formula="of:=[.H119]+ h*[.F120]" office:value-type="float" office:value="868.992425523873" calcext:value-type="float">
            <text:p>868,9924255238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0]" office:value-type="float" office:value="1.18" calcext:value-type="float">
            <text:p>1,18</text:p>
          </table:table-cell>
          <table:table-cell table:style-name="ce1" table:formula="of:=[.H120]" office:value-type="float" office:value="868.992425523873" calcext:value-type="float">
            <text:p>868,992425523873</text:p>
          </table:table-cell>
          <table:table-cell table:style-name="ce1" table:formula="of:=-68 - ([.E121]^2/Ao)" office:value-type="float" office:value="-445.573917808932" calcext:value-type="float">
            <text:p>-445,573917808932</text:p>
          </table:table-cell>
          <table:table-cell table:style-name="ce1" table:formula="of:=[.G120]+h" office:value-type="float" office:value="1.19" calcext:value-type="float">
            <text:p>1,19</text:p>
          </table:table-cell>
          <table:table-cell table:style-name="ce1" table:formula="of:=[.H120]+ h*[.F121]" office:value-type="float" office:value="864.536686345784" calcext:value-type="float">
            <text:p>864,5366863457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1]" office:value-type="float" office:value="1.19" calcext:value-type="float">
            <text:p>1,19</text:p>
          </table:table-cell>
          <table:table-cell table:style-name="ce1" table:formula="of:=[.H121]" office:value-type="float" office:value="864.536686345784" calcext:value-type="float">
            <text:p>864,536686345784</text:p>
          </table:table-cell>
          <table:table-cell table:style-name="ce1" table:formula="of:=-68 - ([.E122]^2/Ao)" office:value-type="float" office:value="-441.711841018874" calcext:value-type="float">
            <text:p>-441,711841018874</text:p>
          </table:table-cell>
          <table:table-cell table:style-name="ce1" table:formula="of:=[.G121]+h" office:value-type="float" office:value="1.2" calcext:value-type="float">
            <text:p>1,2</text:p>
          </table:table-cell>
          <table:table-cell table:style-name="ce1" table:formula="of:=[.H121]+ h*[.F122]" office:value-type="float" office:value="860.119567935595" calcext:value-type="float">
            <text:p>860,1195679355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2]" office:value-type="float" office:value="1.2" calcext:value-type="float">
            <text:p>1,2</text:p>
          </table:table-cell>
          <table:table-cell table:style-name="ce1" table:formula="of:=[.H122]" office:value-type="float" office:value="860.119567935595" calcext:value-type="float">
            <text:p>860,119567935595</text:p>
          </table:table-cell>
          <table:table-cell table:style-name="ce1" table:formula="of:=-68 - ([.E123]^2/Ao)" office:value-type="float" office:value="-437.902835572858" calcext:value-type="float">
            <text:p>-437,902835572858</text:p>
          </table:table-cell>
          <table:table-cell table:style-name="ce1" table:formula="of:=[.G122]+h" office:value-type="float" office:value="1.21" calcext:value-type="float">
            <text:p>1,21</text:p>
          </table:table-cell>
          <table:table-cell table:style-name="ce1" table:formula="of:=[.H122]+ h*[.F123]" office:value-type="float" office:value="855.740539579867" calcext:value-type="float">
            <text:p>855,7405395798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3]" office:value-type="float" office:value="1.21" calcext:value-type="float">
            <text:p>1,21</text:p>
          </table:table-cell>
          <table:table-cell table:style-name="ce1" table:formula="of:=[.H123]" office:value-type="float" office:value="855.740539579867" calcext:value-type="float">
            <text:p>855,740539579867</text:p>
          </table:table-cell>
          <table:table-cell table:style-name="ce1" table:formula="of:=-68 - ([.E124]^2/Ao)" office:value-type="float" office:value="-434.145935540221" calcext:value-type="float">
            <text:p>-434,145935540221</text:p>
          </table:table-cell>
          <table:table-cell table:style-name="ce1" table:formula="of:=[.G123]+h" office:value-type="float" office:value="1.22" calcext:value-type="float">
            <text:p>1,22</text:p>
          </table:table-cell>
          <table:table-cell table:style-name="ce1" table:formula="of:=[.H123]+ h*[.F124]" office:value-type="float" office:value="851.399080224465" calcext:value-type="float">
            <text:p>851,3990802244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4]" office:value-type="float" office:value="1.22" calcext:value-type="float">
            <text:p>1,22</text:p>
          </table:table-cell>
          <table:table-cell table:style-name="ce1" table:formula="of:=[.H124]" office:value-type="float" office:value="851.399080224465" calcext:value-type="float">
            <text:p>851,399080224465</text:p>
          </table:table-cell>
          <table:table-cell table:style-name="ce1" table:formula="of:=-68 - ([.E125]^2/Ao)" office:value-type="float" office:value="-430.440196903532" calcext:value-type="float">
            <text:p>-430,440196903532</text:p>
          </table:table-cell>
          <table:table-cell table:style-name="ce1" table:formula="of:=[.G124]+h" office:value-type="float" office:value="1.23" calcext:value-type="float">
            <text:p>1,23</text:p>
          </table:table-cell>
          <table:table-cell table:style-name="ce1" table:formula="of:=[.H124]+ h*[.F125]" office:value-type="float" office:value="847.094678255429" calcext:value-type="float">
            <text:p>847,0946782554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5]" office:value-type="float" office:value="1.23" calcext:value-type="float">
            <text:p>1,23</text:p>
          </table:table-cell>
          <table:table-cell table:style-name="ce1" table:formula="of:=[.H125]" office:value-type="float" office:value="847.094678255429" calcext:value-type="float">
            <text:p>847,094678255429</text:p>
          </table:table-cell>
          <table:table-cell table:style-name="ce1" table:formula="of:=-68 - ([.E126]^2/Ao)" office:value-type="float" office:value="-426.784696964335" calcext:value-type="float">
            <text:p>-426,784696964335</text:p>
          </table:table-cell>
          <table:table-cell table:style-name="ce1" table:formula="of:=[.G125]+h" office:value-type="float" office:value="1.24" calcext:value-type="float">
            <text:p>1,24</text:p>
          </table:table-cell>
          <table:table-cell table:style-name="ce1" table:formula="of:=[.H125]+ h*[.F126]" office:value-type="float" office:value="842.826831285786" calcext:value-type="float">
            <text:p>842,8268312857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6]" office:value-type="float" office:value="1.24" calcext:value-type="float">
            <text:p>1,24</text:p>
          </table:table-cell>
          <table:table-cell table:style-name="ce1" table:formula="of:=[.H126]" office:value-type="float" office:value="842.826831285786" calcext:value-type="float">
            <text:p>842,826831285786</text:p>
          </table:table-cell>
          <table:table-cell table:style-name="ce1" table:formula="of:=-68 - ([.E127]^2/Ao)" office:value-type="float" office:value="-423.178533767619" calcext:value-type="float">
            <text:p>-423,178533767619</text:p>
          </table:table-cell>
          <table:table-cell table:style-name="ce1" table:formula="of:=[.G126]+h" office:value-type="float" office:value="1.25" calcext:value-type="float">
            <text:p>1,25</text:p>
          </table:table-cell>
          <table:table-cell table:style-name="ce1" table:formula="of:=[.H126]+ h*[.F127]" office:value-type="float" office:value="838.59504594811" calcext:value-type="float">
            <text:p>838,595045948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7]" office:value-type="float" office:value="1.25" calcext:value-type="float">
            <text:p>1,25</text:p>
          </table:table-cell>
          <table:table-cell table:style-name="ce1" table:formula="of:=[.H127]" office:value-type="float" office:value="838.59504594811" calcext:value-type="float">
            <text:p>838,59504594811</text:p>
          </table:table-cell>
          <table:table-cell table:style-name="ce1" table:formula="of:=-68 - ([.E128]^2/Ao)" office:value-type="float" office:value="-419.620825544356" calcext:value-type="float">
            <text:p>-419,620825544356</text:p>
          </table:table-cell>
          <table:table-cell table:style-name="ce1" table:formula="of:=[.G127]+h" office:value-type="float" office:value="1.26" calcext:value-type="float">
            <text:p>1,26</text:p>
          </table:table-cell>
          <table:table-cell table:style-name="ce1" table:formula="of:=[.H127]+ h*[.F128]" office:value-type="float" office:value="834.398837692666" calcext:value-type="float">
            <text:p>834,3988376926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8]" office:value-type="float" office:value="1.26" calcext:value-type="float">
            <text:p>1,26</text:p>
          </table:table-cell>
          <table:table-cell table:style-name="ce1" table:formula="of:=[.H128]" office:value-type="float" office:value="834.398837692666" calcext:value-type="float">
            <text:p>834,398837692666</text:p>
          </table:table-cell>
          <table:table-cell table:style-name="ce1" table:formula="of:=-68 - ([.E129]^2/Ao)" office:value-type="float" office:value="-416.110710171436" calcext:value-type="float">
            <text:p>-416,110710171436</text:p>
          </table:table-cell>
          <table:table-cell table:style-name="ce1" table:formula="of:=[.G128]+h" office:value-type="float" office:value="1.27" calcext:value-type="float">
            <text:p>1,27</text:p>
          </table:table-cell>
          <table:table-cell table:style-name="ce1" table:formula="of:=[.H128]+ h*[.F129]" office:value-type="float" office:value="830.237730590952" calcext:value-type="float">
            <text:p>830,2377305909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29]" office:value-type="float" office:value="1.27" calcext:value-type="float">
            <text:p>1,27</text:p>
          </table:table-cell>
          <table:table-cell table:style-name="ce1" table:formula="of:=[.H129]" office:value-type="float" office:value="830.237730590952" calcext:value-type="float">
            <text:p>830,237730590952</text:p>
          </table:table-cell>
          <table:table-cell table:style-name="ce1" table:formula="of:=-68 - ([.E130]^2/Ao)" office:value-type="float" office:value="-412.647344648407" calcext:value-type="float">
            <text:p>-412,647344648407</text:p>
          </table:table-cell>
          <table:table-cell table:style-name="ce1" table:formula="of:=[.G129]+h" office:value-type="float" office:value="1.28" calcext:value-type="float">
            <text:p>1,28</text:p>
          </table:table-cell>
          <table:table-cell table:style-name="ce1" table:formula="of:=[.H129]+ h*[.F130]" office:value-type="float" office:value="826.111257144468" calcext:value-type="float">
            <text:p>826,1112571444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0]" office:value-type="float" office:value="1.28" calcext:value-type="float">
            <text:p>1,28</text:p>
          </table:table-cell>
          <table:table-cell table:style-name="ce1" table:formula="of:=[.H130]" office:value-type="float" office:value="826.111257144468" calcext:value-type="float">
            <text:p>826,111257144468</text:p>
          </table:table-cell>
          <table:table-cell table:style-name="ce1" table:formula="of:=-68 - ([.E131]^2/Ao)" office:value-type="float" office:value="-409.229904590406" calcext:value-type="float">
            <text:p>-409,229904590406</text:p>
          </table:table-cell>
          <table:table-cell table:style-name="ce1" table:formula="of:=[.G130]+h" office:value-type="float" office:value="1.29" calcext:value-type="float">
            <text:p>1,29</text:p>
          </table:table-cell>
          <table:table-cell table:style-name="ce1" table:formula="of:=[.H130]+ h*[.F131]" office:value-type="float" office:value="822.018958098564" calcext:value-type="float">
            <text:p>822,0189580985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1]" office:value-type="float" office:value="1.29" calcext:value-type="float">
            <text:p>1,29</text:p>
          </table:table-cell>
          <table:table-cell table:style-name="ce1" table:formula="of:=[.H131]" office:value-type="float" office:value="822.018958098564" calcext:value-type="float">
            <text:p>822,018958098564</text:p>
          </table:table-cell>
          <table:table-cell table:style-name="ce1" table:formula="of:=-68 - ([.E132]^2/Ao)" office:value-type="float" office:value="-405.857583736724" calcext:value-type="float">
            <text:p>-405,857583736724</text:p>
          </table:table-cell>
          <table:table-cell table:style-name="ce1" table:formula="of:=[.G131]+h" office:value-type="float" office:value="1.3" calcext:value-type="float">
            <text:p>1,3</text:p>
          </table:table-cell>
          <table:table-cell table:style-name="ce1" table:formula="of:=[.H131]+ h*[.F132]" office:value-type="float" office:value="817.960382261196" calcext:value-type="float">
            <text:p>817,9603822611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2]" office:value-type="float" office:value="1.3" calcext:value-type="float">
            <text:p>1,3</text:p>
          </table:table-cell>
          <table:table-cell table:style-name="ce1" table:formula="of:=[.H132]" office:value-type="float" office:value="817.960382261196" calcext:value-type="float">
            <text:p>817,960382261196</text:p>
          </table:table-cell>
          <table:table-cell table:style-name="ce1" table:formula="of:=-68 - ([.E133]^2/Ao)" office:value-type="float" office:value="-402.529593474441" calcext:value-type="float">
            <text:p>-402,529593474441</text:p>
          </table:table-cell>
          <table:table-cell table:style-name="ce1" table:formula="of:=[.G132]+h" office:value-type="float" office:value="1.31" calcext:value-type="float">
            <text:p>1,31</text:p>
          </table:table-cell>
          <table:table-cell table:style-name="ce1" table:formula="of:=[.H132]+ h*[.F133]" office:value-type="float" office:value="813.935086326452" calcext:value-type="float">
            <text:p>813,9350863264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3]" office:value-type="float" office:value="1.31" calcext:value-type="float">
            <text:p>1,31</text:p>
          </table:table-cell>
          <table:table-cell table:style-name="ce1" table:formula="of:=[.H133]" office:value-type="float" office:value="813.935086326452" calcext:value-type="float">
            <text:p>813,935086326452</text:p>
          </table:table-cell>
          <table:table-cell table:style-name="ce1" table:formula="of:=-68 - ([.E134]^2/Ao)" office:value-type="float" office:value="-399.245162376624" calcext:value-type="float">
            <text:p>-399,245162376624</text:p>
          </table:table-cell>
          <table:table-cell table:style-name="ce1" table:formula="of:=[.G133]+h" office:value-type="float" office:value="1.32" calcext:value-type="float">
            <text:p>1,32</text:p>
          </table:table-cell>
          <table:table-cell table:style-name="ce1" table:formula="of:=[.H133]+ h*[.F134]" office:value-type="float" office:value="809.942634702686" calcext:value-type="float">
            <text:p>809,9426347026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4]" office:value-type="float" office:value="1.32" calcext:value-type="float">
            <text:p>1,32</text:p>
          </table:table-cell>
          <table:table-cell table:style-name="ce1" table:formula="of:=[.H134]" office:value-type="float" office:value="809.942634702686" calcext:value-type="float">
            <text:p>809,942634702686</text:p>
          </table:table-cell>
          <table:table-cell table:style-name="ce1" table:formula="of:=-68 - ([.E135]^2/Ao)" office:value-type="float" office:value="-396.003535754564" calcext:value-type="float">
            <text:p>-396,003535754564</text:p>
          </table:table-cell>
          <table:table-cell table:style-name="ce1" table:formula="of:=[.G134]+h" office:value-type="float" office:value="1.33" calcext:value-type="float">
            <text:p>1,33</text:p>
          </table:table-cell>
          <table:table-cell table:style-name="ce1" table:formula="of:=[.H134]+ h*[.F135]" office:value-type="float" office:value="805.98259934514" calcext:value-type="float">
            <text:p>805,982599345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5]" office:value-type="float" office:value="1.33" calcext:value-type="float">
            <text:p>1,33</text:p>
          </table:table-cell>
          <table:table-cell table:style-name="ce1" table:formula="of:=[.H135]" office:value-type="float" office:value="805.98259934514" calcext:value-type="float">
            <text:p>805,98259934514</text:p>
          </table:table-cell>
          <table:table-cell table:style-name="ce1" table:formula="of:=-68 - ([.E136]^2/Ao)" office:value-type="float" office:value="-392.803975223574" calcext:value-type="float">
            <text:p>-392,803975223574</text:p>
          </table:table-cell>
          <table:table-cell table:style-name="ce1" table:formula="of:=[.G135]+h" office:value-type="float" office:value="1.34" calcext:value-type="float">
            <text:p>1,34</text:p>
          </table:table-cell>
          <table:table-cell table:style-name="ce1" table:formula="of:=[.H135]+ h*[.F136]" office:value-type="float" office:value="802.054559592904" calcext:value-type="float">
            <text:p>802,0545595929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6]" office:value-type="float" office:value="1.34" calcext:value-type="float">
            <text:p>1,34</text:p>
          </table:table-cell>
          <table:table-cell table:style-name="ce1" table:formula="of:=[.H136]" office:value-type="float" office:value="802.054559592904" calcext:value-type="float">
            <text:p>802,054559592904</text:p>
          </table:table-cell>
          <table:table-cell table:style-name="ce1" table:formula="of:=-68 - ([.E137]^2/Ao)" office:value-type="float" office:value="-389.645758281884" calcext:value-type="float">
            <text:p>-389,645758281884</text:p>
          </table:table-cell>
          <table:table-cell table:style-name="ce1" table:formula="of:=[.G136]+h" office:value-type="float" office:value="1.35" calcext:value-type="float">
            <text:p>1,35</text:p>
          </table:table-cell>
          <table:table-cell table:style-name="ce1" table:formula="of:=[.H136]+ h*[.F137]" office:value-type="float" office:value="798.158102010086" calcext:value-type="float">
            <text:p>798,1581020100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7]" office:value-type="float" office:value="1.35" calcext:value-type="float">
            <text:p>1,35</text:p>
          </table:table-cell>
          <table:table-cell table:style-name="ce1" table:formula="of:=[.H137]" office:value-type="float" office:value="798.158102010086" calcext:value-type="float">
            <text:p>798,158102010086</text:p>
          </table:table-cell>
          <table:table-cell table:style-name="ce1" table:formula="of:=-68 - ([.E138]^2/Ao)" office:value-type="float" office:value="-386.528177902171" calcext:value-type="float">
            <text:p>-386,528177902171</text:p>
          </table:table-cell>
          <table:table-cell table:style-name="ce1" table:formula="of:=[.G137]+h" office:value-type="float" office:value="1.36" calcext:value-type="float">
            <text:p>1,36</text:p>
          </table:table-cell>
          <table:table-cell table:style-name="ce1" table:formula="of:=[.H137]+ h*[.F138]" office:value-type="float" office:value="794.292820231064" calcext:value-type="float">
            <text:p>794,2928202310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8]" office:value-type="float" office:value="1.36" calcext:value-type="float">
            <text:p>1,36</text:p>
          </table:table-cell>
          <table:table-cell table:style-name="ce1" table:formula="of:=[.H138]" office:value-type="float" office:value="794.292820231064" calcext:value-type="float">
            <text:p>794,292820231064</text:p>
          </table:table-cell>
          <table:table-cell table:style-name="ce1" table:formula="of:=-68 - ([.E139]^2/Ao)" office:value-type="float" office:value="-383.450542135309" calcext:value-type="float">
            <text:p>-383,450542135309</text:p>
          </table:table-cell>
          <table:table-cell table:style-name="ce1" table:formula="of:=[.G138]+h" office:value-type="float" office:value="1.37" calcext:value-type="float">
            <text:p>1,37</text:p>
          </table:table-cell>
          <table:table-cell table:style-name="ce1" table:formula="of:=[.H138]+ h*[.F139]" office:value-type="float" office:value="790.458314809711" calcext:value-type="float">
            <text:p>790,4583148097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39]" office:value-type="float" office:value="1.37" calcext:value-type="float">
            <text:p>1,37</text:p>
          </table:table-cell>
          <table:table-cell table:style-name="ce1" table:formula="of:=[.H139]" office:value-type="float" office:value="790.458314809711" calcext:value-type="float">
            <text:p>790,458314809711</text:p>
          </table:table-cell>
          <table:table-cell table:style-name="ce1" table:formula="of:=-68 - ([.E140]^2/Ao)" office:value-type="float" office:value="-380.412173725904" calcext:value-type="float">
            <text:p>-380,412173725904</text:p>
          </table:table-cell>
          <table:table-cell table:style-name="ce1" table:formula="of:=[.G139]+h" office:value-type="float" office:value="1.38" calcext:value-type="float">
            <text:p>1,38</text:p>
          </table:table-cell>
          <table:table-cell table:style-name="ce1" table:formula="of:=[.H139]+ h*[.F140]" office:value-type="float" office:value="786.654193072452" calcext:value-type="float">
            <text:p>786,6541930724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0]" office:value-type="float" office:value="1.38" calcext:value-type="float">
            <text:p>1,38</text:p>
          </table:table-cell>
          <table:table-cell table:style-name="ce1" table:formula="of:=[.H140]" office:value-type="float" office:value="786.654193072452" calcext:value-type="float">
            <text:p>786,654193072452</text:p>
          </table:table-cell>
          <table:table-cell table:style-name="ce1" table:formula="of:=-68 - ([.E141]^2/Ao)" office:value-type="float" office:value="-377.412409739235" calcext:value-type="float">
            <text:p>-377,412409739235</text:p>
          </table:table-cell>
          <table:table-cell table:style-name="ce1" table:formula="of:=[.G140]+h" office:value-type="float" office:value="1.39" calcext:value-type="float">
            <text:p>1,39</text:p>
          </table:table-cell>
          <table:table-cell table:style-name="ce1" table:formula="of:=[.H140]+ h*[.F141]" office:value-type="float" office:value="782.880068975059" calcext:value-type="float">
            <text:p>782,8800689750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1]" office:value-type="float" office:value="1.39" calcext:value-type="float">
            <text:p>1,39</text:p>
          </table:table-cell>
          <table:table-cell table:style-name="ce1" table:formula="of:=[.H141]" office:value-type="float" office:value="782.880068975059" calcext:value-type="float">
            <text:p>782,880068975059</text:p>
          </table:table-cell>
          <table:table-cell table:style-name="ce1" table:formula="of:=-68 - ([.E142]^2/Ao)" office:value-type="float" office:value="-374.450601199197" calcext:value-type="float">
            <text:p>-374,450601199197</text:p>
          </table:table-cell>
          <table:table-cell table:style-name="ce1" table:formula="of:=[.G141]+h" office:value-type="float" office:value="1.4" calcext:value-type="float">
            <text:p>1,4</text:p>
          </table:table-cell>
          <table:table-cell table:style-name="ce1" table:formula="of:=[.H141]+ h*[.F142]" office:value-type="float" office:value="779.135562963067" calcext:value-type="float">
            <text:p>779,1355629630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2]" office:value-type="float" office:value="1.4" calcext:value-type="float">
            <text:p>1,4</text:p>
          </table:table-cell>
          <table:table-cell table:style-name="ce1" table:formula="of:=[.H142]" office:value-type="float" office:value="779.135562963067" calcext:value-type="float">
            <text:p>779,135562963067</text:p>
          </table:table-cell>
          <table:table-cell table:style-name="ce1" table:formula="of:=-68 - ([.E143]^2/Ao)" office:value-type="float" office:value="-371.526112736888" calcext:value-type="float">
            <text:p>-371,526112736888</text:p>
          </table:table-cell>
          <table:table-cell table:style-name="ce1" table:formula="of:=[.G142]+h" office:value-type="float" office:value="1.41" calcext:value-type="float">
            <text:p>1,41</text:p>
          </table:table-cell>
          <table:table-cell table:style-name="ce1" table:formula="of:=[.H142]+ h*[.F143]" office:value-type="float" office:value="775.420301835699" calcext:value-type="float">
            <text:p>775,4203018356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3]" office:value-type="float" office:value="1.41" calcext:value-type="float">
            <text:p>1,41</text:p>
          </table:table-cell>
          <table:table-cell table:style-name="ce1" table:formula="of:=[.H143]" office:value-type="float" office:value="775.420301835699" calcext:value-type="float">
            <text:p>775,420301835699</text:p>
          </table:table-cell>
          <table:table-cell table:style-name="ce1" table:formula="of:=-68 - ([.E144]^2/Ao)" office:value-type="float" office:value="-368.638322249483" calcext:value-type="float">
            <text:p>-368,638322249483</text:p>
          </table:table-cell>
          <table:table-cell table:style-name="ce1" table:formula="of:=[.G143]+h" office:value-type="float" office:value="1.42" calcext:value-type="float">
            <text:p>1,42</text:p>
          </table:table-cell>
          <table:table-cell table:style-name="ce1" table:formula="of:=[.H143]+ h*[.F144]" office:value-type="float" office:value="771.733918613204" calcext:value-type="float">
            <text:p>771,7339186132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4]" office:value-type="float" office:value="1.42" calcext:value-type="float">
            <text:p>1,42</text:p>
          </table:table-cell>
          <table:table-cell table:style-name="ce1" table:formula="of:=[.H144]" office:value-type="float" office:value="771.733918613204" calcext:value-type="float">
            <text:p>771,733918613204</text:p>
          </table:table-cell>
          <table:table-cell table:style-name="ce1" table:formula="of:=-68 - ([.E145]^2/Ao)" office:value-type="float" office:value="-365.786620569045" calcext:value-type="float">
            <text:p>-365,786620569045</text:p>
          </table:table-cell>
          <table:table-cell table:style-name="ce1" table:formula="of:=[.G144]+h" office:value-type="float" office:value="1.43" calcext:value-type="float">
            <text:p>1,43</text:p>
          </table:table-cell>
          <table:table-cell table:style-name="ce1" table:formula="of:=[.H144]+ h*[.F145]" office:value-type="float" office:value="768.076052407513" calcext:value-type="float">
            <text:p>768,0760524075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5]" office:value-type="float" office:value="1.43" calcext:value-type="float">
            <text:p>1,43</text:p>
          </table:table-cell>
          <table:table-cell table:style-name="ce1" table:formula="of:=[.H145]" office:value-type="float" office:value="768.076052407513" calcext:value-type="float">
            <text:p>768,076052407513</text:p>
          </table:table-cell>
          <table:table-cell table:style-name="ce1" table:formula="of:=-68 - ([.E146]^2/Ao)" office:value-type="float" office:value="-362.970411140955" calcext:value-type="float">
            <text:p>-362,970411140955</text:p>
          </table:table-cell>
          <table:table-cell table:style-name="ce1" table:formula="of:=[.G145]+h" office:value-type="float" office:value="1.44" calcext:value-type="float">
            <text:p>1,44</text:p>
          </table:table-cell>
          <table:table-cell table:style-name="ce1" table:formula="of:=[.H145]+ h*[.F146]" office:value-type="float" office:value="764.446348296104" calcext:value-type="float">
            <text:p>764,4463482961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6]" office:value-type="float" office:value="1.44" calcext:value-type="float">
            <text:p>1,44</text:p>
          </table:table-cell>
          <table:table-cell table:style-name="ce1" table:formula="of:=[.H146]" office:value-type="float" office:value="764.446348296104" calcext:value-type="float">
            <text:p>764,446348296104</text:p>
          </table:table-cell>
          <table:table-cell table:style-name="ce1" table:formula="of:=-68 - ([.E147]^2/Ao)" office:value-type="float" office:value="-360.189109711624" calcext:value-type="float">
            <text:p>-360,189109711624</text:p>
          </table:table-cell>
          <table:table-cell table:style-name="ce1" table:formula="of:=[.G146]+h" office:value-type="float" office:value="1.45" calcext:value-type="float">
            <text:p>1,45</text:p>
          </table:table-cell>
          <table:table-cell table:style-name="ce1" table:formula="of:=[.H146]+ h*[.F147]" office:value-type="float" office:value="760.844457198988" calcext:value-type="float">
            <text:p>760,8444571989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7]" office:value-type="float" office:value="1.45" calcext:value-type="float">
            <text:p>1,45</text:p>
          </table:table-cell>
          <table:table-cell table:style-name="ce1" table:formula="of:=[.H147]" office:value-type="float" office:value="760.844457198988" calcext:value-type="float">
            <text:p>760,844457198988</text:p>
          </table:table-cell>
          <table:table-cell table:style-name="ce1" table:formula="of:=-68 - ([.E148]^2/Ao)" office:value-type="float" office:value="-357.442144025211" calcext:value-type="float">
            <text:p>-357,442144025211</text:p>
          </table:table-cell>
          <table:table-cell table:style-name="ce1" table:formula="of:=[.G147]+h" office:value-type="float" office:value="1.46" calcext:value-type="float">
            <text:p>1,46</text:p>
          </table:table-cell>
          <table:table-cell table:style-name="ce1" table:formula="of:=[.H147]+ h*[.F148]" office:value-type="float" office:value="757.270035758736" calcext:value-type="float">
            <text:p>757,2700357587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8]" office:value-type="float" office:value="1.46" calcext:value-type="float">
            <text:p>1,46</text:p>
          </table:table-cell>
          <table:table-cell table:style-name="ce1" table:formula="of:=[.H148]" office:value-type="float" office:value="757.270035758736" calcext:value-type="float">
            <text:p>757,270035758736</text:p>
          </table:table-cell>
          <table:table-cell table:style-name="ce1" table:formula="of:=-68 - ([.E149]^2/Ao)" office:value-type="float" office:value="-354.728953529018" calcext:value-type="float">
            <text:p>-354,728953529018</text:p>
          </table:table-cell>
          <table:table-cell table:style-name="ce1" table:formula="of:=[.G148]+h" office:value-type="float" office:value="1.47" calcext:value-type="float">
            <text:p>1,47</text:p>
          </table:table-cell>
          <table:table-cell table:style-name="ce1" table:formula="of:=[.H148]+ h*[.F149]" office:value-type="float" office:value="753.722746223445" calcext:value-type="float">
            <text:p>753,7227462234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49]" office:value-type="float" office:value="1.47" calcext:value-type="float">
            <text:p>1,47</text:p>
          </table:table-cell>
          <table:table-cell table:style-name="ce1" table:formula="of:=[.H149]" office:value-type="float" office:value="753.722746223445" calcext:value-type="float">
            <text:p>753,722746223445</text:p>
          </table:table-cell>
          <table:table-cell table:style-name="ce1" table:formula="of:=-68 - ([.E150]^2/Ao)" office:value-type="float" office:value="-352.048989087306" calcext:value-type="float">
            <text:p>-352,048989087306</text:p>
          </table:table-cell>
          <table:table-cell table:style-name="ce1" table:formula="of:=[.G149]+h" office:value-type="float" office:value="1.48" calcext:value-type="float">
            <text:p>1,48</text:p>
          </table:table-cell>
          <table:table-cell table:style-name="ce1" table:formula="of:=[.H149]+ h*[.F150]" office:value-type="float" office:value="750.202256332572" calcext:value-type="float">
            <text:p>750,2022563325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0]" office:value-type="float" office:value="1.48" calcext:value-type="float">
            <text:p>1,48</text:p>
          </table:table-cell>
          <table:table-cell table:style-name="ce1" table:formula="of:=[.H150]" office:value-type="float" office:value="750.202256332572" calcext:value-type="float">
            <text:p>750,202256332572</text:p>
          </table:table-cell>
          <table:table-cell table:style-name="ce1" table:formula="of:=-68 - ([.E151]^2/Ao)" office:value-type="float" office:value="-349.401712703241" calcext:value-type="float">
            <text:p>-349,401712703241</text:p>
          </table:table-cell>
          <table:table-cell table:style-name="ce1" table:formula="of:=[.G150]+h" office:value-type="float" office:value="1.49" calcext:value-type="float">
            <text:p>1,49</text:p>
          </table:table-cell>
          <table:table-cell table:style-name="ce1" table:formula="of:=[.H150]+ h*[.F151]" office:value-type="float" office:value="746.70823920554" calcext:value-type="float">
            <text:p>746,708239205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1]" office:value-type="float" office:value="1.49" calcext:value-type="float">
            <text:p>1,49</text:p>
          </table:table-cell>
          <table:table-cell table:style-name="ce1" table:formula="of:=[.H151]" office:value-type="float" office:value="746.70823920554" calcext:value-type="float">
            <text:p>746,70823920554</text:p>
          </table:table-cell>
          <table:table-cell table:style-name="ce1" table:formula="of:=-68 - ([.E152]^2/Ao)" office:value-type="float" office:value="-346.786597248719" calcext:value-type="float">
            <text:p>-346,786597248719</text:p>
          </table:table-cell>
          <table:table-cell table:style-name="ce1" table:formula="of:=[.G151]+h" office:value-type="float" office:value="1.5" calcext:value-type="float">
            <text:p>1,5</text:p>
          </table:table-cell>
          <table:table-cell table:style-name="ce1" table:formula="of:=[.H151]+ h*[.F152]" office:value-type="float" office:value="743.240373233053" calcext:value-type="float">
            <text:p>743,2403732330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2]" office:value-type="float" office:value="1.5" calcext:value-type="float">
            <text:p>1,5</text:p>
          </table:table-cell>
          <table:table-cell table:style-name="ce1" table:formula="of:=[.H152]" office:value-type="float" office:value="743.240373233053" calcext:value-type="float">
            <text:p>743,240373233053</text:p>
          </table:table-cell>
          <table:table-cell table:style-name="ce1" table:formula="of:=-68 - ([.E153]^2/Ao)" office:value-type="float" office:value="-344.203126201804" calcext:value-type="float">
            <text:p>-344,203126201804</text:p>
          </table:table-cell>
          <table:table-cell table:style-name="ce1" table:formula="of:=[.G152]+h" office:value-type="float" office:value="1.51" calcext:value-type="float">
            <text:p>1,51</text:p>
          </table:table-cell>
          <table:table-cell table:style-name="ce1" table:formula="of:=[.H152]+ h*[.F153]" office:value-type="float" office:value="739.798341971035" calcext:value-type="float">
            <text:p>739,7983419710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3]" office:value-type="float" office:value="1.51" calcext:value-type="float">
            <text:p>1,51</text:p>
          </table:table-cell>
          <table:table-cell table:style-name="ce1" table:formula="of:=[.H153]" office:value-type="float" office:value="739.798341971035" calcext:value-type="float">
            <text:p>739,798341971035</text:p>
          </table:table-cell>
          <table:table-cell table:style-name="ce1" table:formula="of:=-68 - ([.E154]^2/Ao)" office:value-type="float" office:value="-341.650793391546" calcext:value-type="float">
            <text:p>-341,650793391546</text:p>
          </table:table-cell>
          <table:table-cell table:style-name="ce1" table:formula="of:=[.G153]+h" office:value-type="float" office:value="1.52" calcext:value-type="float">
            <text:p>1,52</text:p>
          </table:table-cell>
          <table:table-cell table:style-name="ce1" table:formula="of:=[.H153]+ h*[.F154]" office:value-type="float" office:value="736.381834037119" calcext:value-type="float">
            <text:p>736,3818340371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4]" office:value-type="float" office:value="1.52" calcext:value-type="float">
            <text:p>1,52</text:p>
          </table:table-cell>
          <table:table-cell table:style-name="ce1" table:formula="of:=[.H154]" office:value-type="float" office:value="736.381834037119" calcext:value-type="float">
            <text:p>736,381834037119</text:p>
          </table:table-cell>
          <table:table-cell table:style-name="ce1" table:formula="of:=-68 - ([.E155]^2/Ao)" office:value-type="float" office:value="-339.129102749936" calcext:value-type="float">
            <text:p>-339,129102749936</text:p>
          </table:table-cell>
          <table:table-cell table:style-name="ce1" table:formula="of:=[.G154]+h" office:value-type="float" office:value="1.53" calcext:value-type="float">
            <text:p>1,53</text:p>
          </table:table-cell>
          <table:table-cell table:style-name="ce1" table:formula="of:=[.H154]+ h*[.F155]" office:value-type="float" office:value="732.99054300962" calcext:value-type="float">
            <text:p>732,990543009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5]" office:value-type="float" office:value="1.53" calcext:value-type="float">
            <text:p>1,53</text:p>
          </table:table-cell>
          <table:table-cell table:style-name="ce1" table:formula="of:=[.H155]" office:value-type="float" office:value="732.99054300962" calcext:value-type="float">
            <text:p>732,99054300962</text:p>
          </table:table-cell>
          <table:table-cell table:style-name="ce1" table:formula="of:=-68 - ([.E156]^2/Ao)" office:value-type="float" office:value="-336.637568070769" calcext:value-type="float">
            <text:p>-336,637568070769</text:p>
          </table:table-cell>
          <table:table-cell table:style-name="ce1" table:formula="of:=[.G155]+h" office:value-type="float" office:value="1.54" calcext:value-type="float">
            <text:p>1,54</text:p>
          </table:table-cell>
          <table:table-cell table:style-name="ce1" table:formula="of:=[.H155]+ h*[.F156]" office:value-type="float" office:value="729.624167328912" calcext:value-type="float">
            <text:p>729,6241673289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6]" office:value-type="float" office:value="1.54" calcext:value-type="float">
            <text:p>1,54</text:p>
          </table:table-cell>
          <table:table-cell table:style-name="ce1" table:formula="of:=[.H156]" office:value-type="float" office:value="729.624167328912" calcext:value-type="float">
            <text:p>729,624167328912</text:p>
          </table:table-cell>
          <table:table-cell table:style-name="ce1" table:formula="of:=-68 - ([.E157]^2/Ao)" office:value-type="float" office:value="-334.175712775204" calcext:value-type="float">
            <text:p>-334,175712775204</text:p>
          </table:table-cell>
          <table:table-cell table:style-name="ce1" table:formula="of:=[.G156]+h" office:value-type="float" office:value="1.55" calcext:value-type="float">
            <text:p>1,55</text:p>
          </table:table-cell>
          <table:table-cell table:style-name="ce1" table:formula="of:=[.H156]+ h*[.F157]" office:value-type="float" office:value="726.28241020116" calcext:value-type="float">
            <text:p>726,282410201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7]" office:value-type="float" office:value="1.55" calcext:value-type="float">
            <text:p>1,55</text:p>
          </table:table-cell>
          <table:table-cell table:style-name="ce1" table:formula="of:=[.H157]" office:value-type="float" office:value="726.28241020116" calcext:value-type="float">
            <text:p>726,28241020116</text:p>
          </table:table-cell>
          <table:table-cell table:style-name="ce1" table:formula="of:=-68 - ([.E158]^2/Ao)" office:value-type="float" office:value="-331.743069683803" calcext:value-type="float">
            <text:p>-331,743069683803</text:p>
          </table:table-cell>
          <table:table-cell table:style-name="ce1" table:formula="of:=[.G157]+h" office:value-type="float" office:value="1.56" calcext:value-type="float">
            <text:p>1,56</text:p>
          </table:table-cell>
          <table:table-cell table:style-name="ce1" table:formula="of:=[.H157]+ h*[.F158]" office:value-type="float" office:value="722.964979504322" calcext:value-type="float">
            <text:p>722,9649795043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8]" office:value-type="float" office:value="1.56" calcext:value-type="float">
            <text:p>1,56</text:p>
          </table:table-cell>
          <table:table-cell table:style-name="ce1" table:formula="of:=[.H158]" office:value-type="float" office:value="722.964979504322" calcext:value-type="float">
            <text:p>722,964979504322</text:p>
          </table:table-cell>
          <table:table-cell table:style-name="ce1" table:formula="of:=-68 - ([.E159]^2/Ao)" office:value-type="float" office:value="-329.339180794842" calcext:value-type="float">
            <text:p>-329,339180794842</text:p>
          </table:table-cell>
          <table:table-cell table:style-name="ce1" table:formula="of:=[.G158]+h" office:value-type="float" office:value="1.57" calcext:value-type="float">
            <text:p>1,57</text:p>
          </table:table-cell>
          <table:table-cell table:style-name="ce1" table:formula="of:=[.H158]+ h*[.F159]" office:value-type="float" office:value="719.671587696374" calcext:value-type="float">
            <text:p>719,6715876963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59]" office:value-type="float" office:value="1.57" calcext:value-type="float">
            <text:p>1,57</text:p>
          </table:table-cell>
          <table:table-cell table:style-name="ce1" table:formula="of:=[.H159]" office:value-type="float" office:value="719.671587696374" calcext:value-type="float">
            <text:p>719,671587696374</text:p>
          </table:table-cell>
          <table:table-cell table:style-name="ce1" table:formula="of:=-68 - ([.E160]^2/Ao)" office:value-type="float" office:value="-326.96359706871" calcext:value-type="float">
            <text:p>-326,96359706871</text:p>
          </table:table-cell>
          <table:table-cell table:style-name="ce1" table:formula="of:=[.G159]+h" office:value-type="float" office:value="1.58" calcext:value-type="float">
            <text:p>1,58</text:p>
          </table:table-cell>
          <table:table-cell table:style-name="ce1" table:formula="of:=[.H159]+ h*[.F160]" office:value-type="float" office:value="716.401951725686" calcext:value-type="float">
            <text:p>716,4019517256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0]" office:value-type="float" office:value="1.58" calcext:value-type="float">
            <text:p>1,58</text:p>
          </table:table-cell>
          <table:table-cell table:style-name="ce1" table:formula="of:=[.H160]" office:value-type="float" office:value="716.401951725686" calcext:value-type="float">
            <text:p>716,401951725686</text:p>
          </table:table-cell>
          <table:table-cell table:style-name="ce1" table:formula="of:=-68 - ([.E161]^2/Ao)" office:value-type="float" office:value="-324.615878218186" calcext:value-type="float">
            <text:p>-324,615878218186</text:p>
          </table:table-cell>
          <table:table-cell table:style-name="ce1" table:formula="of:=[.G160]+h" office:value-type="float" office:value="1.59" calcext:value-type="float">
            <text:p>1,59</text:p>
          </table:table-cell>
          <table:table-cell table:style-name="ce1" table:formula="of:=[.H160]+ h*[.F161]" office:value-type="float" office:value="713.155792943505" calcext:value-type="float">
            <text:p>713,1557929435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1]" office:value-type="float" office:value="1.59" calcext:value-type="float">
            <text:p>1,59</text:p>
          </table:table-cell>
          <table:table-cell table:style-name="ce1" table:formula="of:=[.H161]" office:value-type="float" office:value="713.155792943505" calcext:value-type="float">
            <text:p>713,155792943505</text:p>
          </table:table-cell>
          <table:table-cell table:style-name="ce1" table:formula="of:=-68 - ([.E162]^2/Ao)" office:value-type="float" office:value="-322.295592504439" calcext:value-type="float">
            <text:p>-322,295592504439</text:p>
          </table:table-cell>
          <table:table-cell table:style-name="ce1" table:formula="of:=[.G161]+h" office:value-type="float" office:value="1.6" calcext:value-type="float">
            <text:p>1,6</text:p>
          </table:table-cell>
          <table:table-cell table:style-name="ce1" table:formula="of:=[.H161]+ h*[.F162]" office:value-type="float" office:value="709.93283701846" calcext:value-type="float">
            <text:p>709,932837018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2]" office:value-type="float" office:value="1.6" calcext:value-type="float">
            <text:p>1,6</text:p>
          </table:table-cell>
          <table:table-cell table:style-name="ce1" table:formula="of:=[.H162]" office:value-type="float" office:value="709.93283701846" calcext:value-type="float">
            <text:p>709,93283701846</text:p>
          </table:table-cell>
          <table:table-cell table:style-name="ce1" table:formula="of:=-68 - ([.E163]^2/Ao)" office:value-type="float" office:value="-320.00231653854" calcext:value-type="float">
            <text:p>-320,00231653854</text:p>
          </table:table-cell>
          <table:table-cell table:style-name="ce1" table:formula="of:=[.G162]+h" office:value-type="float" office:value="1.61" calcext:value-type="float">
            <text:p>1,61</text:p>
          </table:table-cell>
          <table:table-cell table:style-name="ce1" table:formula="of:=[.H162]+ h*[.F163]" office:value-type="float" office:value="706.732813853075" calcext:value-type="float">
            <text:p>706,7328138530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3]" office:value-type="float" office:value="1.61" calcext:value-type="float">
            <text:p>1,61</text:p>
          </table:table-cell>
          <table:table-cell table:style-name="ce1" table:formula="of:=[.H163]" office:value-type="float" office:value="706.732813853075" calcext:value-type="float">
            <text:p>706,732813853075</text:p>
          </table:table-cell>
          <table:table-cell table:style-name="ce1" table:formula="of:=-68 - ([.E164]^2/Ao)" office:value-type="float" office:value="-317.735635088342" calcext:value-type="float">
            <text:p>-317,735635088342</text:p>
          </table:table-cell>
          <table:table-cell table:style-name="ce1" table:formula="of:=[.G163]+h" office:value-type="float" office:value="1.62" calcext:value-type="float">
            <text:p>1,62</text:p>
          </table:table-cell>
          <table:table-cell table:style-name="ce1" table:formula="of:=[.H163]+ h*[.F164]" office:value-type="float" office:value="703.555457502191" calcext:value-type="float">
            <text:p>703,5554575021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4]" office:value-type="float" office:value="1.62" calcext:value-type="float">
            <text:p>1,62</text:p>
          </table:table-cell>
          <table:table-cell table:style-name="ce1" table:formula="of:=[.H164]" office:value-type="float" office:value="703.555457502191" calcext:value-type="float">
            <text:p>703,555457502191</text:p>
          </table:table-cell>
          <table:table-cell table:style-name="ce1" table:formula="of:=-68 - ([.E165]^2/Ao)" office:value-type="float" office:value="-315.495140890559" calcext:value-type="float">
            <text:p>-315,495140890559</text:p>
          </table:table-cell>
          <table:table-cell table:style-name="ce1" table:formula="of:=[.G164]+h" office:value-type="float" office:value="1.63" calcext:value-type="float">
            <text:p>1,63</text:p>
          </table:table-cell>
          <table:table-cell table:style-name="ce1" table:formula="of:=[.H164]+ h*[.F165]" office:value-type="float" office:value="700.400506093286" calcext:value-type="float">
            <text:p>700,4005060932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5]" office:value-type="float" office:value="1.63" calcext:value-type="float">
            <text:p>1,63</text:p>
          </table:table-cell>
          <table:table-cell table:style-name="ce1" table:formula="of:=[.H165]" office:value-type="float" office:value="700.400506093286" calcext:value-type="float">
            <text:p>700,400506093286</text:p>
          </table:table-cell>
          <table:table-cell table:style-name="ce1" table:formula="of:=-68 - ([.E166]^2/Ao)" office:value-type="float" office:value="-313.280434467865" calcext:value-type="float">
            <text:p>-313,280434467865</text:p>
          </table:table-cell>
          <table:table-cell table:style-name="ce1" table:formula="of:=[.G165]+h" office:value-type="float" office:value="1.64" calcext:value-type="float">
            <text:p>1,64</text:p>
          </table:table-cell>
          <table:table-cell table:style-name="ce1" table:formula="of:=[.H165]+ h*[.F166]" office:value-type="float" office:value="697.267701748607" calcext:value-type="float">
            <text:p>697,2677017486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6]" office:value-type="float" office:value="1.64" calcext:value-type="float">
            <text:p>1,64</text:p>
          </table:table-cell>
          <table:table-cell table:style-name="ce1" table:formula="of:=[.H166]" office:value-type="float" office:value="697.267701748607" calcext:value-type="float">
            <text:p>697,267701748607</text:p>
          </table:table-cell>
          <table:table-cell table:style-name="ce1" table:formula="of:=-68 - ([.E167]^2/Ao)" office:value-type="float" office:value="-311.091123950892" calcext:value-type="float">
            <text:p>-311,091123950892</text:p>
          </table:table-cell>
          <table:table-cell table:style-name="ce1" table:formula="of:=[.G166]+h" office:value-type="float" office:value="1.65" calcext:value-type="float">
            <text:p>1,65</text:p>
          </table:table-cell>
          <table:table-cell table:style-name="ce1" table:formula="of:=[.H166]+ h*[.F167]" office:value-type="float" office:value="694.156790509098" calcext:value-type="float">
            <text:p>694,1567905090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7]" office:value-type="float" office:value="1.65" calcext:value-type="float">
            <text:p>1,65</text:p>
          </table:table-cell>
          <table:table-cell table:style-name="ce1" table:formula="of:=[.H167]" office:value-type="float" office:value="694.156790509098" calcext:value-type="float">
            <text:p>694,156790509098</text:p>
          </table:table-cell>
          <table:table-cell table:style-name="ce1" table:formula="of:=-68 - ([.E168]^2/Ao)" office:value-type="float" office:value="-308.926824904946" calcext:value-type="float">
            <text:p>-308,926824904946</text:p>
          </table:table-cell>
          <table:table-cell table:style-name="ce1" table:formula="of:=[.G167]+h" office:value-type="float" office:value="1.66" calcext:value-type="float">
            <text:p>1,66</text:p>
          </table:table-cell>
          <table:table-cell table:style-name="ce1" table:formula="of:=[.H167]+ h*[.F168]" office:value-type="float" office:value="691.067522260049" calcext:value-type="float">
            <text:p>691,0675222600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8]" office:value-type="float" office:value="1.66" calcext:value-type="float">
            <text:p>1,66</text:p>
          </table:table-cell>
          <table:table-cell table:style-name="ce1" table:formula="of:=[.H168]" office:value-type="float" office:value="691.067522260049" calcext:value-type="float">
            <text:p>691,067522260049</text:p>
          </table:table-cell>
          <table:table-cell table:style-name="ce1" table:formula="of:=-68 - ([.E169]^2/Ao)" office:value-type="float" office:value="-306.787160161322" calcext:value-type="float">
            <text:p>-306,787160161322</text:p>
          </table:table-cell>
          <table:table-cell table:style-name="ce1" table:formula="of:=[.G168]+h" office:value-type="float" office:value="1.67" calcext:value-type="float">
            <text:p>1,67</text:p>
          </table:table-cell>
          <table:table-cell table:style-name="ce1" table:formula="of:=[.H168]+ h*[.F169]" office:value-type="float" office:value="687.999650658436" calcext:value-type="float">
            <text:p>687,9996506584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69]" office:value-type="float" office:value="1.67" calcext:value-type="float">
            <text:p>1,67</text:p>
          </table:table-cell>
          <table:table-cell table:style-name="ce1" table:formula="of:=[.H169]" office:value-type="float" office:value="687.999650658436" calcext:value-type="float">
            <text:p>687,999650658436</text:p>
          </table:table-cell>
          <table:table-cell table:style-name="ce1" table:formula="of:=-68 - ([.E170]^2/Ao)" office:value-type="float" office:value="-304.671759653065" calcext:value-type="float">
            <text:p>-304,671759653065</text:p>
          </table:table-cell>
          <table:table-cell table:style-name="ce1" table:formula="of:=[.G169]+h" office:value-type="float" office:value="1.68" calcext:value-type="float">
            <text:p>1,68</text:p>
          </table:table-cell>
          <table:table-cell table:style-name="ce1" table:formula="of:=[.H169]+ h*[.F170]" office:value-type="float" office:value="684.952933061905" calcext:value-type="float">
            <text:p>684,9529330619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0]" office:value-type="float" office:value="1.68" calcext:value-type="float">
            <text:p>1,68</text:p>
          </table:table-cell>
          <table:table-cell table:style-name="ce1" table:formula="of:=[.H170]" office:value-type="float" office:value="684.952933061905" calcext:value-type="float">
            <text:p>684,952933061905</text:p>
          </table:table-cell>
          <table:table-cell table:style-name="ce1" table:formula="of:=-68 - ([.E171]^2/Ao)" office:value-type="float" office:value="-302.580260255053" calcext:value-type="float">
            <text:p>-302,580260255053</text:p>
          </table:table-cell>
          <table:table-cell table:style-name="ce1" table:formula="of:=[.G170]+h" office:value-type="float" office:value="1.69" calcext:value-type="float">
            <text:p>1,69</text:p>
          </table:table-cell>
          <table:table-cell table:style-name="ce1" table:formula="of:=[.H170]+ h*[.F171]" office:value-type="float" office:value="681.927130459354" calcext:value-type="float">
            <text:p>681,9271304593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1]" office:value-type="float" office:value="1.69" calcext:value-type="float">
            <text:p>1,69</text:p>
          </table:table-cell>
          <table:table-cell table:style-name="ce1" table:formula="of:=[.H171]" office:value-type="float" office:value="681.927130459354" calcext:value-type="float">
            <text:p>681,927130459354</text:p>
          </table:table-cell>
          <table:table-cell table:style-name="ce1" table:formula="of:=-68 - ([.E172]^2/Ao)" office:value-type="float" office:value="-300.512305628265" calcext:value-type="float">
            <text:p>-300,512305628265</text:p>
          </table:table-cell>
          <table:table-cell table:style-name="ce1" table:formula="of:=[.G171]+h" office:value-type="float" office:value="1.7" calcext:value-type="float">
            <text:p>1,7</text:p>
          </table:table-cell>
          <table:table-cell table:style-name="ce1" table:formula="of:=[.H171]+ h*[.F172]" office:value-type="float" office:value="678.922007403072" calcext:value-type="float">
            <text:p>678,9220074030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2]" office:value-type="float" office:value="1.7" calcext:value-type="float">
            <text:p>1,7</text:p>
          </table:table-cell>
          <table:table-cell table:style-name="ce1" table:formula="of:=[.H172]" office:value-type="float" office:value="678.922007403072" calcext:value-type="float">
            <text:p>678,922007403072</text:p>
          </table:table-cell>
          <table:table-cell table:style-name="ce1" table:formula="of:=-68 - ([.E173]^2/Ao)" office:value-type="float" office:value="-298.467546068108" calcext:value-type="float">
            <text:p>-298,467546068108</text:p>
          </table:table-cell>
          <table:table-cell table:style-name="ce1" table:formula="of:=[.G172]+h" office:value-type="float" office:value="1.71" calcext:value-type="float">
            <text:p>1,71</text:p>
          </table:table-cell>
          <table:table-cell table:style-name="ce1" table:formula="of:=[.H172]+ h*[.F173]" office:value-type="float" office:value="675.937331942391" calcext:value-type="float">
            <text:p>675,9373319423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3]" office:value-type="float" office:value="1.71" calcext:value-type="float">
            <text:p>1,71</text:p>
          </table:table-cell>
          <table:table-cell table:style-name="ce1" table:formula="of:=[.H173]" office:value-type="float" office:value="675.937331942391" calcext:value-type="float">
            <text:p>675,937331942391</text:p>
          </table:table-cell>
          <table:table-cell table:style-name="ce1" table:formula="of:=-68 - ([.E174]^2/Ao)" office:value-type="float" office:value="-296.445638356699" calcext:value-type="float">
            <text:p>-296,445638356699</text:p>
          </table:table-cell>
          <table:table-cell table:style-name="ce1" table:formula="of:=[.G173]+h" office:value-type="float" office:value="1.72" calcext:value-type="float">
            <text:p>1,72</text:p>
          </table:table-cell>
          <table:table-cell table:style-name="ce1" table:formula="of:=[.H173]+ h*[.F174]" office:value-type="float" office:value="672.972875558824" calcext:value-type="float">
            <text:p>672,9728755588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4]" office:value-type="float" office:value="1.72" calcext:value-type="float">
            <text:p>1,72</text:p>
          </table:table-cell>
          <table:table-cell table:style-name="ce1" table:formula="of:=[.H174]" office:value-type="float" office:value="672.972875558824" calcext:value-type="float">
            <text:p>672,972875558824</text:p>
          </table:table-cell>
          <table:table-cell table:style-name="ce1" table:formula="of:=-68 - ([.E175]^2/Ao)" office:value-type="float" office:value="-294.446245618956" calcext:value-type="float">
            <text:p>-294,446245618956</text:p>
          </table:table-cell>
          <table:table-cell table:style-name="ce1" table:formula="of:=[.G174]+h" office:value-type="float" office:value="1.73" calcext:value-type="float">
            <text:p>1,73</text:p>
          </table:table-cell>
          <table:table-cell table:style-name="ce1" table:formula="of:=[.H174]+ h*[.F175]" office:value-type="float" office:value="670.028413102634" calcext:value-type="float">
            <text:p>670,0284131026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5]" office:value-type="float" office:value="1.73" calcext:value-type="float">
            <text:p>1,73</text:p>
          </table:table-cell>
          <table:table-cell table:style-name="ce1" table:formula="of:=[.H175]" office:value-type="float" office:value="670.028413102634" calcext:value-type="float">
            <text:p>670,028413102634</text:p>
          </table:table-cell>
          <table:table-cell table:style-name="ce1" table:formula="of:=-68 - ([.E176]^2/Ao)" office:value-type="float" office:value="-292.469037182417" calcext:value-type="float">
            <text:p>-292,469037182417</text:p>
          </table:table-cell>
          <table:table-cell table:style-name="ce1" table:formula="of:=[.G175]+h" office:value-type="float" office:value="1.74" calcext:value-type="float">
            <text:p>1,74</text:p>
          </table:table-cell>
          <table:table-cell table:style-name="ce1" table:formula="of:=[.H175]+ h*[.F176]" office:value-type="float" office:value="667.10372273081" calcext:value-type="float">
            <text:p>667,103722730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6]" office:value-type="float" office:value="1.74" calcext:value-type="float">
            <text:p>1,74</text:p>
          </table:table-cell>
          <table:table-cell table:style-name="ce1" table:formula="of:=[.H176]" office:value-type="float" office:value="667.10372273081" calcext:value-type="float">
            <text:p>667,10372273081</text:p>
          </table:table-cell>
          <table:table-cell table:style-name="ce1" table:formula="of:=-68 - ([.E177]^2/Ao)" office:value-type="float" office:value="-290.513688440653" calcext:value-type="float">
            <text:p>-290,513688440653</text:p>
          </table:table-cell>
          <table:table-cell table:style-name="ce1" table:formula="of:=[.G176]+h" office:value-type="float" office:value="1.75" calcext:value-type="float">
            <text:p>1,75</text:p>
          </table:table-cell>
          <table:table-cell table:style-name="ce1" table:formula="of:=[.H176]+ h*[.F177]" office:value-type="float" office:value="664.198585846403" calcext:value-type="float">
            <text:p>664,1985858464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7]" office:value-type="float" office:value="1.75" calcext:value-type="float">
            <text:p>1,75</text:p>
          </table:table-cell>
          <table:table-cell table:style-name="ce1" table:formula="of:=[.H177]" office:value-type="float" office:value="664.198585846403" calcext:value-type="float">
            <text:p>664,198585846403</text:p>
          </table:table-cell>
          <table:table-cell table:style-name="ce1" table:formula="of:=-68 - ([.E178]^2/Ao)" office:value-type="float" office:value="-288.579880720181" calcext:value-type="float">
            <text:p>-288,579880720181</text:p>
          </table:table-cell>
          <table:table-cell table:style-name="ce1" table:formula="of:=[.G177]+h" office:value-type="float" office:value="1.76" calcext:value-type="float">
            <text:p>1,76</text:p>
          </table:table-cell>
          <table:table-cell table:style-name="ce1" table:formula="of:=[.H177]+ h*[.F178]" office:value-type="float" office:value="661.312787039202" calcext:value-type="float">
            <text:p>661,3127870392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8]" office:value-type="float" office:value="1.76" calcext:value-type="float">
            <text:p>1,76</text:p>
          </table:table-cell>
          <table:table-cell table:style-name="ce1" table:formula="of:=[.H178]" office:value-type="float" office:value="661.312787039202" calcext:value-type="float">
            <text:p>661,312787039202</text:p>
          </table:table-cell>
          <table:table-cell table:style-name="ce1" table:formula="of:=-68 - ([.E179]^2/Ao)" office:value-type="float" office:value="-286.667301150778" calcext:value-type="float">
            <text:p>-286,667301150778</text:p>
          </table:table-cell>
          <table:table-cell table:style-name="ce1" table:formula="of:=[.G178]+h" office:value-type="float" office:value="1.77" calcext:value-type="float">
            <text:p>1,77</text:p>
          </table:table-cell>
          <table:table-cell table:style-name="ce1" table:formula="of:=[.H178]+ h*[.F179]" office:value-type="float" office:value="658.446114027694" calcext:value-type="float">
            <text:p>658,4461140276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79]" office:value-type="float" office:value="1.77" calcext:value-type="float">
            <text:p>1,77</text:p>
          </table:table-cell>
          <table:table-cell table:style-name="ce1" table:formula="of:=[.H179]" office:value-type="float" office:value="658.446114027694" calcext:value-type="float">
            <text:p>658,446114027694</text:p>
          </table:table-cell>
          <table:table-cell table:style-name="ce1" table:formula="of:=-68 - ([.E180]^2/Ao)" office:value-type="float" office:value="-284.775642539085" calcext:value-type="float">
            <text:p>-284,775642539085</text:p>
          </table:table-cell>
          <table:table-cell table:style-name="ce1" table:formula="of:=[.G179]+h" office:value-type="float" office:value="1.78" calcext:value-type="float">
            <text:p>1,78</text:p>
          </table:table-cell>
          <table:table-cell table:style-name="ce1" table:formula="of:=[.H179]+ h*[.F180]" office:value-type="float" office:value="655.598357602303" calcext:value-type="float">
            <text:p>655,5983576023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0]" office:value-type="float" office:value="1.78" calcext:value-type="float">
            <text:p>1,78</text:p>
          </table:table-cell>
          <table:table-cell table:style-name="ce1" table:formula="of:=[.H180]" office:value-type="float" office:value="655.598357602303" calcext:value-type="float">
            <text:p>655,598357602303</text:p>
          </table:table-cell>
          <table:table-cell table:style-name="ce1" table:formula="of:=-68 - ([.E181]^2/Ao)" office:value-type="float" office:value="-282.904603245418" calcext:value-type="float">
            <text:p>-282,904603245418</text:p>
          </table:table-cell>
          <table:table-cell table:style-name="ce1" table:formula="of:=[.G180]+h" office:value-type="float" office:value="1.79" calcext:value-type="float">
            <text:p>1,79</text:p>
          </table:table-cell>
          <table:table-cell table:style-name="ce1" table:formula="of:=[.H180]+ h*[.F181]" office:value-type="float" office:value="652.769311569849" calcext:value-type="float">
            <text:p>652,7693115698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1]" office:value-type="float" office:value="1.79" calcext:value-type="float">
            <text:p>1,79</text:p>
          </table:table-cell>
          <table:table-cell table:style-name="ce1" table:formula="of:=[.H181]" office:value-type="float" office:value="652.769311569849" calcext:value-type="float">
            <text:p>652,769311569849</text:p>
          </table:table-cell>
          <table:table-cell table:style-name="ce1" table:formula="of:=-68 - ([.E182]^2/Ao)" office:value-type="float" office:value="-281.053887063687" calcext:value-type="float">
            <text:p>-281,053887063687</text:p>
          </table:table-cell>
          <table:table-cell table:style-name="ce1" table:formula="of:=[.G181]+h" office:value-type="float" office:value="1.8" calcext:value-type="float">
            <text:p>1,8</text:p>
          </table:table-cell>
          <table:table-cell table:style-name="ce1" table:formula="of:=[.H181]+ h*[.F182]" office:value-type="float" office:value="649.958772699212" calcext:value-type="float">
            <text:p>649,9587726992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2]" office:value-type="float" office:value="1.8" calcext:value-type="float">
            <text:p>1,8</text:p>
          </table:table-cell>
          <table:table-cell table:style-name="ce1" table:formula="of:=[.H182]" office:value-type="float" office:value="649.958772699212" calcext:value-type="float">
            <text:p>649,958772699212</text:p>
          </table:table-cell>
          <table:table-cell table:style-name="ce1" table:formula="of:=-68 - ([.E183]^2/Ao)" office:value-type="float" office:value="-279.223203104333" calcext:value-type="float">
            <text:p>-279,223203104333</text:p>
          </table:table-cell>
          <table:table-cell table:style-name="ce1" table:formula="of:=[.G182]+h" office:value-type="float" office:value="1.81" calcext:value-type="float">
            <text:p>1,81</text:p>
          </table:table-cell>
          <table:table-cell table:style-name="ce1" table:formula="of:=[.H182]+ h*[.F183]" office:value-type="float" office:value="647.166540668169" calcext:value-type="float">
            <text:p>647,1665406681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3]" office:value-type="float" office:value="1.81" calcext:value-type="float">
            <text:p>1,81</text:p>
          </table:table-cell>
          <table:table-cell table:style-name="ce1" table:formula="of:=[.H183]" office:value-type="float" office:value="647.166540668169" calcext:value-type="float">
            <text:p>647,166540668169</text:p>
          </table:table-cell>
          <table:table-cell table:style-name="ce1" table:formula="of:=-68 - ([.E184]^2/Ao)" office:value-type="float" office:value="-277.412265680202" calcext:value-type="float">
            <text:p>-277,412265680202</text:p>
          </table:table-cell>
          <table:table-cell table:style-name="ce1" table:formula="of:=[.G183]+h" office:value-type="float" office:value="1.82" calcext:value-type="float">
            <text:p>1,82</text:p>
          </table:table-cell>
          <table:table-cell table:style-name="ce1" table:formula="of:=[.H183]+ h*[.F184]" office:value-type="float" office:value="644.392418011367" calcext:value-type="float">
            <text:p>644,3924180113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4]" office:value-type="float" office:value="1.82" calcext:value-type="float">
            <text:p>1,82</text:p>
          </table:table-cell>
          <table:table-cell table:style-name="ce1" table:formula="of:=[.H184]" office:value-type="float" office:value="644.392418011367" calcext:value-type="float">
            <text:p>644,392418011367</text:p>
          </table:table-cell>
          <table:table-cell table:style-name="ce1" table:formula="of:=-68 - ([.E185]^2/Ao)" office:value-type="float" office:value="-275.620794195268" calcext:value-type="float">
            <text:p>-275,620794195268</text:p>
          </table:table-cell>
          <table:table-cell table:style-name="ce1" table:formula="of:=[.G184]+h" office:value-type="float" office:value="1.83" calcext:value-type="float">
            <text:p>1,83</text:p>
          </table:table-cell>
          <table:table-cell table:style-name="ce1" table:formula="of:=[.H184]+ h*[.F185]" office:value-type="float" office:value="641.636210069414" calcext:value-type="float">
            <text:p>641,6362100694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5]" office:value-type="float" office:value="1.83" calcext:value-type="float">
            <text:p>1,83</text:p>
          </table:table-cell>
          <table:table-cell table:style-name="ce1" table:formula="of:=[.H185]" office:value-type="float" office:value="641.636210069414" calcext:value-type="float">
            <text:p>641,636210069414</text:p>
          </table:table-cell>
          <table:table-cell table:style-name="ce1" table:formula="of:=-68 - ([.E186]^2/Ao)" office:value-type="float" office:value="-273.848513036121" calcext:value-type="float">
            <text:p>-273,848513036121</text:p>
          </table:table-cell>
          <table:table-cell table:style-name="ce1" table:formula="of:=[.G185]+h" office:value-type="float" office:value="1.84" calcext:value-type="float">
            <text:p>1,84</text:p>
          </table:table-cell>
          <table:table-cell table:style-name="ce1" table:formula="of:=[.H185]+ h*[.F186]" office:value-type="float" office:value="638.897724939053" calcext:value-type="float">
            <text:p>638,8977249390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6]" office:value-type="float" office:value="1.84" calcext:value-type="float">
            <text:p>1,84</text:p>
          </table:table-cell>
          <table:table-cell table:style-name="ce1" table:formula="of:=[.H186]" office:value-type="float" office:value="638.897724939053" calcext:value-type="float">
            <text:p>638,897724939053</text:p>
          </table:table-cell>
          <table:table-cell table:style-name="ce1" table:formula="of:=-68 - ([.E187]^2/Ao)" office:value-type="float" office:value="-272.095151466149" calcext:value-type="float">
            <text:p>-272,095151466149</text:p>
          </table:table-cell>
          <table:table-cell table:style-name="ce1" table:formula="of:=[.G186]+h" office:value-type="float" office:value="1.85" calcext:value-type="float">
            <text:p>1,85</text:p>
          </table:table-cell>
          <table:table-cell table:style-name="ce1" table:formula="of:=[.H186]+ h*[.F187]" office:value-type="float" office:value="636.176773424391" calcext:value-type="float">
            <text:p>636,1767734243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7]" office:value-type="float" office:value="1.85" calcext:value-type="float">
            <text:p>1,85</text:p>
          </table:table-cell>
          <table:table-cell table:style-name="ce1" table:formula="of:=[.H187]" office:value-type="float" office:value="636.176773424391" calcext:value-type="float">
            <text:p>636,176773424391</text:p>
          </table:table-cell>
          <table:table-cell table:style-name="ce1" table:formula="of:=-68 - ([.E188]^2/Ao)" office:value-type="float" office:value="-270.360443522335" calcext:value-type="float">
            <text:p>-270,360443522335</text:p>
          </table:table-cell>
          <table:table-cell table:style-name="ce1" table:formula="of:=[.G187]+h" office:value-type="float" office:value="1.86" calcext:value-type="float">
            <text:p>1,86</text:p>
          </table:table-cell>
          <table:table-cell table:style-name="ce1" table:formula="of:=[.H187]+ h*[.F188]" office:value-type="float" office:value="633.473168989168" calcext:value-type="float">
            <text:p>633,4731689891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8]" office:value-type="float" office:value="1.86" calcext:value-type="float">
            <text:p>1,86</text:p>
          </table:table-cell>
          <table:table-cell table:style-name="ce1" table:formula="of:=[.H188]" office:value-type="float" office:value="633.473168989168" calcext:value-type="float">
            <text:p>633,473168989168</text:p>
          </table:table-cell>
          <table:table-cell table:style-name="ce1" table:formula="of:=-68 - ([.E189]^2/Ao)" office:value-type="float" office:value="-268.644127914589" calcext:value-type="float">
            <text:p>-268,644127914589</text:p>
          </table:table-cell>
          <table:table-cell table:style-name="ce1" table:formula="of:=[.G188]+h" office:value-type="float" office:value="1.87" calcext:value-type="float">
            <text:p>1,87</text:p>
          </table:table-cell>
          <table:table-cell table:style-name="ce1" table:formula="of:=[.H188]+ h*[.F189]" office:value-type="float" office:value="630.786727710022" calcext:value-type="float">
            <text:p>630,7867277100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89]" office:value-type="float" office:value="1.87" calcext:value-type="float">
            <text:p>1,87</text:p>
          </table:table-cell>
          <table:table-cell table:style-name="ce1" table:formula="of:=[.H189]" office:value-type="float" office:value="630.786727710022" calcext:value-type="float">
            <text:p>630,786727710022</text:p>
          </table:table-cell>
          <table:table-cell table:style-name="ce1" table:formula="of:=-68 - ([.E190]^2/Ao)" office:value-type="float" office:value="-266.945947927559" calcext:value-type="float">
            <text:p>-266,945947927559</text:p>
          </table:table-cell>
          <table:table-cell table:style-name="ce1" table:formula="of:=[.G189]+h" office:value-type="float" office:value="1.88" calcext:value-type="float">
            <text:p>1,88</text:p>
          </table:table-cell>
          <table:table-cell table:style-name="ce1" table:formula="of:=[.H189]+ h*[.F190]" office:value-type="float" office:value="628.117268230746" calcext:value-type="float">
            <text:p>628,1172682307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0]" office:value-type="float" office:value="1.88" calcext:value-type="float">
            <text:p>1,88</text:p>
          </table:table-cell>
          <table:table-cell table:style-name="ce1" table:formula="of:=[.H190]" office:value-type="float" office:value="628.117268230746" calcext:value-type="float">
            <text:p>628,117268230746</text:p>
          </table:table-cell>
          <table:table-cell table:style-name="ce1" table:formula="of:=-68 - ([.E191]^2/Ao)" office:value-type="float" office:value="-265.265651324828" calcext:value-type="float">
            <text:p>-265,265651324828</text:p>
          </table:table-cell>
          <table:table-cell table:style-name="ce1" table:formula="of:=[.G190]+h" office:value-type="float" office:value="1.89" calcext:value-type="float">
            <text:p>1,89</text:p>
          </table:table-cell>
          <table:table-cell table:style-name="ce1" table:formula="of:=[.H190]+ h*[.F191]" office:value-type="float" office:value="625.464611717498" calcext:value-type="float">
            <text:p>625,4646117174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1]" office:value-type="float" office:value="1.89" calcext:value-type="float">
            <text:p>1,89</text:p>
          </table:table-cell>
          <table:table-cell table:style-name="ce1" table:formula="of:=[.H191]" office:value-type="float" office:value="625.464611717498" calcext:value-type="float">
            <text:p>625,464611717498</text:p>
          </table:table-cell>
          <table:table-cell table:style-name="ce1" table:formula="of:=-68 - ([.E192]^2/Ao)" office:value-type="float" office:value="-263.60299025546" calcext:value-type="float">
            <text:p>-263,60299025546</text:p>
          </table:table-cell>
          <table:table-cell table:style-name="ce1" table:formula="of:=[.G191]+h" office:value-type="float" office:value="1.9" calcext:value-type="float">
            <text:p>1,9</text:p>
          </table:table-cell>
          <table:table-cell table:style-name="ce1" table:formula="of:=[.H191]+ h*[.F192]" office:value-type="float" office:value="622.828581814943" calcext:value-type="float">
            <text:p>622,8285818149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2]" office:value-type="float" office:value="1.9" calcext:value-type="float">
            <text:p>1,9</text:p>
          </table:table-cell>
          <table:table-cell table:style-name="ce1" table:formula="of:=[.H192]" office:value-type="float" office:value="622.828581814943" calcext:value-type="float">
            <text:p>622,828581814943</text:p>
          </table:table-cell>
          <table:table-cell table:style-name="ce1" table:formula="of:=-68 - ([.E193]^2/Ao)" office:value-type="float" office:value="-261.957721162807" calcext:value-type="float">
            <text:p>-261,957721162807</text:p>
          </table:table-cell>
          <table:table-cell table:style-name="ce1" table:formula="of:=[.G192]+h" office:value-type="float" office:value="1.91" calcext:value-type="float">
            <text:p>1,91</text:p>
          </table:table-cell>
          <table:table-cell table:style-name="ce1" table:formula="of:=[.H192]+ h*[.F193]" office:value-type="float" office:value="620.209004603315" calcext:value-type="float">
            <text:p>620,2090046033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3]" office:value-type="float" office:value="1.91" calcext:value-type="float">
            <text:p>1,91</text:p>
          </table:table-cell>
          <table:table-cell table:style-name="ce1" table:formula="of:=[.H193]" office:value-type="float" office:value="620.209004603315" calcext:value-type="float">
            <text:p>620,209004603315</text:p>
          </table:table-cell>
          <table:table-cell table:style-name="ce1" table:formula="of:=-68 - ([.E194]^2/Ao)" office:value-type="float" office:value="-260.329604695518" calcext:value-type="float">
            <text:p>-260,329604695518</text:p>
          </table:table-cell>
          <table:table-cell table:style-name="ce1" table:formula="of:=[.G193]+h" office:value-type="float" office:value="1.92" calcext:value-type="float">
            <text:p>1,92</text:p>
          </table:table-cell>
          <table:table-cell table:style-name="ce1" table:formula="of:=[.H193]+ h*[.F194]" office:value-type="float" office:value="617.60570855636" calcext:value-type="float">
            <text:p>617,605708556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4]" office:value-type="float" office:value="1.92" calcext:value-type="float">
            <text:p>1,92</text:p>
          </table:table-cell>
          <table:table-cell table:style-name="ce1" table:formula="of:=[.H194]" office:value-type="float" office:value="617.60570855636" calcext:value-type="float">
            <text:p>617,60570855636</text:p>
          </table:table-cell>
          <table:table-cell table:style-name="ce1" table:formula="of:=-68 - ([.E195]^2/Ao)" office:value-type="float" office:value="-258.718405620702" calcext:value-type="float">
            <text:p>-258,718405620702</text:p>
          </table:table-cell>
          <table:table-cell table:style-name="ce1" table:formula="of:=[.G194]+h" office:value-type="float" office:value="1.93" calcext:value-type="float">
            <text:p>1,93</text:p>
          </table:table-cell>
          <table:table-cell table:style-name="ce1" table:formula="of:=[.H194]+ h*[.F195]" office:value-type="float" office:value="615.018524500153" calcext:value-type="float">
            <text:p>615,0185245001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5]" office:value-type="float" office:value="1.93" calcext:value-type="float">
            <text:p>1,93</text:p>
          </table:table-cell>
          <table:table-cell table:style-name="ce1" table:formula="of:=[.H195]" office:value-type="float" office:value="615.018524500153" calcext:value-type="float">
            <text:p>615,018524500153</text:p>
          </table:table-cell>
          <table:table-cell table:style-name="ce1" table:formula="of:=-68 - ([.E196]^2/Ao)" office:value-type="float" office:value="-257.123892739173" calcext:value-type="float">
            <text:p>-257,123892739173</text:p>
          </table:table-cell>
          <table:table-cell table:style-name="ce1" table:formula="of:=[.G195]+h" office:value-type="float" office:value="1.94" calcext:value-type="float">
            <text:p>1,94</text:p>
          </table:table-cell>
          <table:table-cell table:style-name="ce1" table:formula="of:=[.H195]+ h*[.F196]" office:value-type="float" office:value="612.447285572761" calcext:value-type="float">
            <text:p>612,4472855727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6]" office:value-type="float" office:value="1.94" calcext:value-type="float">
            <text:p>1,94</text:p>
          </table:table-cell>
          <table:table-cell table:style-name="ce1" table:formula="of:=[.H196]" office:value-type="float" office:value="612.447285572761" calcext:value-type="float">
            <text:p>612,447285572761</text:p>
          </table:table-cell>
          <table:table-cell table:style-name="ce1" table:formula="of:=-68 - ([.E197]^2/Ao)" office:value-type="float" office:value="-255.545838802722" calcext:value-type="float">
            <text:p>-255,545838802722</text:p>
          </table:table-cell>
          <table:table-cell table:style-name="ce1" table:formula="of:=[.G196]+h" office:value-type="float" office:value="1.95" calcext:value-type="float">
            <text:p>1,95</text:p>
          </table:table-cell>
          <table:table-cell table:style-name="ce1" table:formula="of:=[.H196]+ h*[.F197]" office:value-type="float" office:value="609.891827184734" calcext:value-type="float">
            <text:p>609,8918271847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7]" office:value-type="float" office:value="1.95" calcext:value-type="float">
            <text:p>1,95</text:p>
          </table:table-cell>
          <table:table-cell table:style-name="ce1" table:formula="of:=[.H197]" office:value-type="float" office:value="609.891827184734" calcext:value-type="float">
            <text:p>609,891827184734</text:p>
          </table:table-cell>
          <table:table-cell table:style-name="ce1" table:formula="of:=-68 - ([.E198]^2/Ao)" office:value-type="float" office:value="-253.984020433367" calcext:value-type="float">
            <text:p>-253,984020433367</text:p>
          </table:table-cell>
          <table:table-cell table:style-name="ce1" table:formula="of:=[.G197]+h" office:value-type="float" office:value="1.96" calcext:value-type="float">
            <text:p>1,96</text:p>
          </table:table-cell>
          <table:table-cell table:style-name="ce1" table:formula="of:=[.H197]+ h*[.F198]" office:value-type="float" office:value="607.351986980401" calcext:value-type="float">
            <text:p>607,3519869804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8]" office:value-type="float" office:value="1.96" calcext:value-type="float">
            <text:p>1,96</text:p>
          </table:table-cell>
          <table:table-cell table:style-name="ce1" table:formula="of:=[.H198]" office:value-type="float" office:value="607.351986980401" calcext:value-type="float">
            <text:p>607,351986980401</text:p>
          </table:table-cell>
          <table:table-cell table:style-name="ce1" table:formula="of:=-68 - ([.E199]^2/Ao)" office:value-type="float" office:value="-252.43821804452" calcext:value-type="float">
            <text:p>-252,43821804452</text:p>
          </table:table-cell>
          <table:table-cell table:style-name="ce1" table:formula="of:=[.G198]+h" office:value-type="float" office:value="1.97" calcext:value-type="float">
            <text:p>1,97</text:p>
          </table:table-cell>
          <table:table-cell table:style-name="ce1" table:formula="of:=[.H198]+ h*[.F199]" office:value-type="float" office:value="604.827604799955" calcext:value-type="float">
            <text:p>604,8276047999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199]" office:value-type="float" office:value="1.97" calcext:value-type="float">
            <text:p>1,97</text:p>
          </table:table-cell>
          <table:table-cell table:style-name="ce1" table:formula="of:=[.H199]" office:value-type="float" office:value="604.827604799955" calcext:value-type="float">
            <text:p>604,827604799955</text:p>
          </table:table-cell>
          <table:table-cell table:style-name="ce1" table:formula="of:=-68 - ([.E200]^2/Ao)" office:value-type="float" office:value="-250.908215764026" calcext:value-type="float">
            <text:p>-250,908215764026</text:p>
          </table:table-cell>
          <table:table-cell table:style-name="ce1" table:formula="of:=[.G199]+h" office:value-type="float" office:value="1.98" calcext:value-type="float">
            <text:p>1,98</text:p>
          </table:table-cell>
          <table:table-cell table:style-name="ce1" table:formula="of:=[.H199]+ h*[.F200]" office:value-type="float" office:value="602.318522642315" calcext:value-type="float">
            <text:p>602,3185226423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0]" office:value-type="float" office:value="1.98" calcext:value-type="float">
            <text:p>1,98</text:p>
          </table:table-cell>
          <table:table-cell table:style-name="ce1" table:formula="of:=[.H200]" office:value-type="float" office:value="602.318522642315" calcext:value-type="float">
            <text:p>602,318522642315</text:p>
          </table:table-cell>
          <table:table-cell table:style-name="ce1" table:formula="of:=-68 - ([.E201]^2/Ao)" office:value-type="float" office:value="-249.393801359011" calcext:value-type="float">
            <text:p>-249,393801359011</text:p>
          </table:table-cell>
          <table:table-cell table:style-name="ce1" table:formula="of:=[.G200]+h" office:value-type="float" office:value="1.99" calcext:value-type="float">
            <text:p>1,99</text:p>
          </table:table-cell>
          <table:table-cell table:style-name="ce1" table:formula="of:=[.H200]+ h*[.F201]" office:value-type="float" office:value="599.824584628725" calcext:value-type="float">
            <text:p>599,8245846287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1]" office:value-type="float" office:value="1.99" calcext:value-type="float">
            <text:p>1,99</text:p>
          </table:table-cell>
          <table:table-cell table:style-name="ce1" table:formula="of:=[.H201]" office:value-type="float" office:value="599.824584628725" calcext:value-type="float">
            <text:p>599,824584628725</text:p>
          </table:table-cell>
          <table:table-cell table:style-name="ce1" table:formula="of:=-68 - ([.E202]^2/Ao)" office:value-type="float" office:value="-247.894766162511" calcext:value-type="float">
            <text:p>-247,894766162511</text:p>
          </table:table-cell>
          <table:table-cell table:style-name="ce1" table:formula="of:=[.G201]+h" office:value-type="float" office:value="2" calcext:value-type="float">
            <text:p>2</text:p>
          </table:table-cell>
          <table:table-cell table:style-name="ce1" table:formula="of:=[.H201]+ h*[.F202]" office:value-type="float" office:value="597.3456369671" calcext:value-type="float">
            <text:p>597,34563696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2]" office:value-type="float" office:value="2" calcext:value-type="float">
            <text:p>2</text:p>
          </table:table-cell>
          <table:table-cell table:style-name="ce1" table:formula="of:=[.H202]" office:value-type="float" office:value="597.3456369671" calcext:value-type="float">
            <text:p>597,3456369671</text:p>
          </table:table-cell>
          <table:table-cell table:style-name="ce1" table:formula="of:=-68 - ([.E203]^2/Ao)" office:value-type="float" office:value="-246.410905001815" calcext:value-type="float">
            <text:p>-246,410905001815</text:p>
          </table:table-cell>
          <table:table-cell table:style-name="ce1" table:formula="of:=[.G202]+h" office:value-type="float" office:value="2.01" calcext:value-type="float">
            <text:p>2,01</text:p>
          </table:table-cell>
          <table:table-cell table:style-name="ce1" table:formula="of:=[.H202]+ h*[.F203]" office:value-type="float" office:value="594.881527917082" calcext:value-type="float">
            <text:p>594,8815279170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3]" office:value-type="float" office:value="2.01" calcext:value-type="float">
            <text:p>2,01</text:p>
          </table:table-cell>
          <table:table-cell table:style-name="ce1" table:formula="of:=[.H203]" office:value-type="float" office:value="594.881527917082" calcext:value-type="float">
            <text:p>594,881527917082</text:p>
          </table:table-cell>
          <table:table-cell table:style-name="ce1" table:formula="of:=-68 - ([.E204]^2/Ao)" office:value-type="float" office:value="-244.942016128481" calcext:value-type="float">
            <text:p>-244,942016128481</text:p>
          </table:table-cell>
          <table:table-cell table:style-name="ce1" table:formula="of:=[.G203]+h" office:value-type="float" office:value="2.02" calcext:value-type="float">
            <text:p>2,02</text:p>
          </table:table-cell>
          <table:table-cell table:style-name="ce1" table:formula="of:=[.H203]+ h*[.F204]" office:value-type="float" office:value="592.432107755797" calcext:value-type="float">
            <text:p>592,4321077557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4]" office:value-type="float" office:value="2.02" calcext:value-type="float">
            <text:p>2,02</text:p>
          </table:table-cell>
          <table:table-cell table:style-name="ce1" table:formula="of:=[.H204]" office:value-type="float" office:value="592.432107755797" calcext:value-type="float">
            <text:p>592,432107755797</text:p>
          </table:table-cell>
          <table:table-cell table:style-name="ce1" table:formula="of:=-68 - ([.E205]^2/Ao)" office:value-type="float" office:value="-243.487901149988" calcext:value-type="float">
            <text:p>-243,487901149988</text:p>
          </table:table-cell>
          <table:table-cell table:style-name="ce1" table:formula="of:=[.G204]+h" office:value-type="float" office:value="2.03" calcext:value-type="float">
            <text:p>2,03</text:p>
          </table:table-cell>
          <table:table-cell table:style-name="ce1" table:formula="of:=[.H204]+ h*[.F205]" office:value-type="float" office:value="589.997228744297" calcext:value-type="float">
            <text:p>589,9972287442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5]" office:value-type="float" office:value="2.03" calcext:value-type="float">
            <text:p>2,03</text:p>
          </table:table-cell>
          <table:table-cell table:style-name="ce1" table:formula="of:=[.H205]" office:value-type="float" office:value="589.997228744297" calcext:value-type="float">
            <text:p>589,997228744297</text:p>
          </table:table-cell>
          <table:table-cell table:style-name="ce1" table:formula="of:=-68 - ([.E206]^2/Ao)" office:value-type="float" office:value="-242.048364962975" calcext:value-type="float">
            <text:p>-242,048364962975</text:p>
          </table:table-cell>
          <table:table-cell table:style-name="ce1" table:formula="of:=[.G205]+h" office:value-type="float" office:value="2.04" calcext:value-type="float">
            <text:p>2,04</text:p>
          </table:table-cell>
          <table:table-cell table:style-name="ce1" table:formula="of:=[.H205]+ h*[.F206]" office:value-type="float" office:value="587.576745094667" calcext:value-type="float">
            <text:p>587,5767450946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6]" office:value-type="float" office:value="2.04" calcext:value-type="float">
            <text:p>2,04</text:p>
          </table:table-cell>
          <table:table-cell table:style-name="ce1" table:formula="of:=[.H206]" office:value-type="float" office:value="587.576745094667" calcext:value-type="float">
            <text:p>587,576745094667</text:p>
          </table:table-cell>
          <table:table-cell table:style-name="ce1" table:formula="of:=-68 - ([.E207]^2/Ao)" office:value-type="float" office:value="-240.623215688022" calcext:value-type="float">
            <text:p>-240,623215688022</text:p>
          </table:table-cell>
          <table:table-cell table:style-name="ce1" table:formula="of:=[.G206]+h" office:value-type="float" office:value="2.05" calcext:value-type="float">
            <text:p>2,05</text:p>
          </table:table-cell>
          <table:table-cell table:style-name="ce1" table:formula="of:=[.H206]+ h*[.F207]" office:value-type="float" office:value="585.170512937787" calcext:value-type="float">
            <text:p>585,1705129377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7]" office:value-type="float" office:value="2.05" calcext:value-type="float">
            <text:p>2,05</text:p>
          </table:table-cell>
          <table:table-cell table:style-name="ce1" table:formula="of:=[.H207]" office:value-type="float" office:value="585.170512937787" calcext:value-type="float">
            <text:p>585,170512937787</text:p>
          </table:table-cell>
          <table:table-cell table:style-name="ce1" table:formula="of:=-68 - ([.E208]^2/Ao)" office:value-type="float" office:value="-239.212264605936" calcext:value-type="float">
            <text:p>-239,212264605936</text:p>
          </table:table-cell>
          <table:table-cell table:style-name="ce1" table:formula="of:=[.G207]+h" office:value-type="float" office:value="2.06" calcext:value-type="float">
            <text:p>2,06</text:p>
          </table:table-cell>
          <table:table-cell table:style-name="ce1" table:formula="of:=[.H207]+ h*[.F208]" office:value-type="float" office:value="582.778390291728" calcext:value-type="float">
            <text:p>582,7783902917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8]" office:value-type="float" office:value="2.06" calcext:value-type="float">
            <text:p>2,06</text:p>
          </table:table-cell>
          <table:table-cell table:style-name="ce1" table:formula="of:=[.H208]" office:value-type="float" office:value="582.778390291728" calcext:value-type="float">
            <text:p>582,778390291728</text:p>
          </table:table-cell>
          <table:table-cell table:style-name="ce1" table:formula="of:=-68 - ([.E209]^2/Ao)" office:value-type="float" office:value="-237.815326095509" calcext:value-type="float">
            <text:p>-237,815326095509</text:p>
          </table:table-cell>
          <table:table-cell table:style-name="ce1" table:formula="of:=[.G208]+h" office:value-type="float" office:value="2.07" calcext:value-type="float">
            <text:p>2,07</text:p>
          </table:table-cell>
          <table:table-cell table:style-name="ce1" table:formula="of:=[.H208]+ h*[.F209]" office:value-type="float" office:value="580.400237030773" calcext:value-type="float">
            <text:p>580,4002370307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09]" office:value-type="float" office:value="2.07" calcext:value-type="float">
            <text:p>2,07</text:p>
          </table:table-cell>
          <table:table-cell table:style-name="ce1" table:formula="of:=[.H209]" office:value-type="float" office:value="580.400237030773" calcext:value-type="float">
            <text:p>580,400237030773</text:p>
          </table:table-cell>
          <table:table-cell table:style-name="ce1" table:formula="of:=-68 - ([.E210]^2/Ao)" office:value-type="float" office:value="-236.432217572689" calcext:value-type="float">
            <text:p>-236,432217572689</text:p>
          </table:table-cell>
          <table:table-cell table:style-name="ce1" table:formula="of:=[.G209]+h" office:value-type="float" office:value="2.08" calcext:value-type="float">
            <text:p>2,08</text:p>
          </table:table-cell>
          <table:table-cell table:style-name="ce1" table:formula="of:=[.H209]+ h*[.F210]" office:value-type="float" office:value="578.035914855046" calcext:value-type="float">
            <text:p>578,0359148550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0]" office:value-type="float" office:value="2.08" calcext:value-type="float">
            <text:p>2,08</text:p>
          </table:table-cell>
          <table:table-cell table:style-name="ce1" table:formula="of:=[.H210]" office:value-type="float" office:value="578.035914855046" calcext:value-type="float">
            <text:p>578,035914855046</text:p>
          </table:table-cell>
          <table:table-cell table:style-name="ce1" table:formula="of:=-68 - ([.E211]^2/Ao)" office:value-type="float" office:value="-235.062759431155" calcext:value-type="float">
            <text:p>-235,062759431155</text:p>
          </table:table-cell>
          <table:table-cell table:style-name="ce1" table:formula="of:=[.G210]+h" office:value-type="float" office:value="2.09" calcext:value-type="float">
            <text:p>2,09</text:p>
          </table:table-cell>
          <table:table-cell table:style-name="ce1" table:formula="of:=[.H210]+ h*[.F211]" office:value-type="float" office:value="575.685287260734" calcext:value-type="float">
            <text:p>575,6852872607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1]" office:value-type="float" office:value="2.09" calcext:value-type="float">
            <text:p>2,09</text:p>
          </table:table-cell>
          <table:table-cell table:style-name="ce1" table:formula="of:=[.H211]" office:value-type="float" office:value="575.685287260734" calcext:value-type="float">
            <text:p>575,685287260734</text:p>
          </table:table-cell>
          <table:table-cell table:style-name="ce1" table:formula="of:=-68 - ([.E212]^2/Ao)" office:value-type="float" office:value="-233.706774984237" calcext:value-type="float">
            <text:p>-233,706774984237</text:p>
          </table:table-cell>
          <table:table-cell table:style-name="ce1" table:formula="of:=[.G211]+h" office:value-type="float" office:value="2.1" calcext:value-type="float">
            <text:p>2,1</text:p>
          </table:table-cell>
          <table:table-cell table:style-name="ce1" table:formula="of:=[.H211]+ h*[.F212]" office:value-type="float" office:value="573.348219510892" calcext:value-type="float">
            <text:p>573,3482195108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2]" office:value-type="float" office:value="2.1" calcext:value-type="float">
            <text:p>2,1</text:p>
          </table:table-cell>
          <table:table-cell table:style-name="ce1" table:formula="of:=[.H212]" office:value-type="float" office:value="573.348219510892" calcext:value-type="float">
            <text:p>573,348219510892</text:p>
          </table:table-cell>
          <table:table-cell table:style-name="ce1" table:formula="of:=-68 - ([.E213]^2/Ao)" office:value-type="float" office:value="-232.364090408155" calcext:value-type="float">
            <text:p>-232,364090408155</text:p>
          </table:table-cell>
          <table:table-cell table:style-name="ce1" table:formula="of:=[.G212]+h" office:value-type="float" office:value="2.11" calcext:value-type="float">
            <text:p>2,11</text:p>
          </table:table-cell>
          <table:table-cell table:style-name="ce1" table:formula="of:=[.H212]+ h*[.F213]" office:value-type="float" office:value="571.02457860681" calcext:value-type="float">
            <text:p>571,024578606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3]" office:value-type="float" office:value="2.11" calcext:value-type="float">
            <text:p>2,11</text:p>
          </table:table-cell>
          <table:table-cell table:style-name="ce1" table:formula="of:=[.H213]" office:value-type="float" office:value="571.02457860681" calcext:value-type="float">
            <text:p>571,02457860681</text:p>
          </table:table-cell>
          <table:table-cell table:style-name="ce1" table:formula="of:=-68 - ([.E214]^2/Ao)" office:value-type="float" office:value="-231.034534686543" calcext:value-type="float">
            <text:p>-231,034534686543</text:p>
          </table:table-cell>
          <table:table-cell table:style-name="ce1" table:formula="of:=[.G213]+h" office:value-type="float" office:value="2.12" calcext:value-type="float">
            <text:p>2,12</text:p>
          </table:table-cell>
          <table:table-cell table:style-name="ce1" table:formula="of:=[.H213]+ h*[.F214]" office:value-type="float" office:value="568.714233259945" calcext:value-type="float">
            <text:p>568,7142332599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4]" office:value-type="float" office:value="2.12" calcext:value-type="float">
            <text:p>2,12</text:p>
          </table:table-cell>
          <table:table-cell table:style-name="ce1" table:formula="of:=[.H214]" office:value-type="float" office:value="568.714233259945" calcext:value-type="float">
            <text:p>568,714233259945</text:p>
          </table:table-cell>
          <table:table-cell table:style-name="ce1" table:formula="of:=-68 - ([.E215]^2/Ao)" office:value-type="float" office:value="-229.717939556223" calcext:value-type="float">
            <text:p>-229,717939556223</text:p>
          </table:table-cell>
          <table:table-cell table:style-name="ce1" table:formula="of:=[.G214]+h" office:value-type="float" office:value="2.13" calcext:value-type="float">
            <text:p>2,13</text:p>
          </table:table-cell>
          <table:table-cell table:style-name="ce1" table:formula="of:=[.H214]+ h*[.F215]" office:value-type="float" office:value="566.417053864383" calcext:value-type="float">
            <text:p>566,4170538643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5]" office:value-type="float" office:value="2.13" calcext:value-type="float">
            <text:p>2,13</text:p>
          </table:table-cell>
          <table:table-cell table:style-name="ce1" table:formula="of:=[.H215]" office:value-type="float" office:value="566.417053864383" calcext:value-type="float">
            <text:p>566,417053864383</text:p>
          </table:table-cell>
          <table:table-cell table:style-name="ce1" table:formula="of:=-68 - ([.E216]^2/Ao)" office:value-type="float" office:value="-228.414139454203" calcext:value-type="float">
            <text:p>-228,414139454203</text:p>
          </table:table-cell>
          <table:table-cell table:style-name="ce1" table:formula="of:=[.G215]+h" office:value-type="float" office:value="2.14" calcext:value-type="float">
            <text:p>2,14</text:p>
          </table:table-cell>
          <table:table-cell table:style-name="ce1" table:formula="of:=[.H215]+ h*[.F216]" office:value-type="float" office:value="564.13291246984" calcext:value-type="float">
            <text:p>564,132912469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6]" office:value-type="float" office:value="2.14" calcext:value-type="float">
            <text:p>2,14</text:p>
          </table:table-cell>
          <table:table-cell table:style-name="ce1" table:formula="of:=[.H216]" office:value-type="float" office:value="564.13291246984" calcext:value-type="float">
            <text:p>564,13291246984</text:p>
          </table:table-cell>
          <table:table-cell table:style-name="ce1" table:formula="of:=-68 - ([.E217]^2/Ao)" office:value-type="float" office:value="-227.122971465852" calcext:value-type="float">
            <text:p>-227,122971465852</text:p>
          </table:table-cell>
          <table:table-cell table:style-name="ce1" table:formula="of:=[.G216]+h" office:value-type="float" office:value="2.15" calcext:value-type="float">
            <text:p>2,15</text:p>
          </table:table-cell>
          <table:table-cell table:style-name="ce1" table:formula="of:=[.H216]+ h*[.F217]" office:value-type="float" office:value="561.861682755182" calcext:value-type="float">
            <text:p>561,8616827551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7]" office:value-type="float" office:value="2.15" calcext:value-type="float">
            <text:p>2,15</text:p>
          </table:table-cell>
          <table:table-cell table:style-name="ce1" table:formula="of:=[.H217]" office:value-type="float" office:value="561.861682755182" calcext:value-type="float">
            <text:p>561,861682755182</text:p>
          </table:table-cell>
          <table:table-cell table:style-name="ce1" table:formula="of:=-68 - ([.E218]^2/Ao)" office:value-type="float" office:value="-225.844275274242" calcext:value-type="float">
            <text:p>-225,844275274242</text:p>
          </table:table-cell>
          <table:table-cell table:style-name="ce1" table:formula="of:=[.G217]+h" office:value-type="float" office:value="2.16" calcext:value-type="float">
            <text:p>2,16</text:p>
          </table:table-cell>
          <table:table-cell table:style-name="ce1" table:formula="of:=[.H217]+ h*[.F218]" office:value-type="float" office:value="559.60324000244" calcext:value-type="float">
            <text:p>559,603240002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8]" office:value-type="float" office:value="2.16" calcext:value-type="float">
            <text:p>2,16</text:p>
          </table:table-cell>
          <table:table-cell table:style-name="ce1" table:formula="of:=[.H218]" office:value-type="float" office:value="559.60324000244" calcext:value-type="float">
            <text:p>559,60324000244</text:p>
          </table:table-cell>
          <table:table-cell table:style-name="ce1" table:formula="of:=-68 - ([.E219]^2/Ao)" office:value-type="float" office:value="-224.577893110614" calcext:value-type="float">
            <text:p>-224,577893110614</text:p>
          </table:table-cell>
          <table:table-cell table:style-name="ce1" table:formula="of:=[.G218]+h" office:value-type="float" office:value="2.17" calcext:value-type="float">
            <text:p>2,17</text:p>
          </table:table-cell>
          <table:table-cell table:style-name="ce1" table:formula="of:=[.H218]+ h*[.F219]" office:value-type="float" office:value="557.357461071333" calcext:value-type="float">
            <text:p>557,3574610713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19]" office:value-type="float" office:value="2.17" calcext:value-type="float">
            <text:p>2,17</text:p>
          </table:table-cell>
          <table:table-cell table:style-name="ce1" table:formula="of:=[.H219]" office:value-type="float" office:value="557.357461071333" calcext:value-type="float">
            <text:p>557,357461071333</text:p>
          </table:table-cell>
          <table:table-cell table:style-name="ce1" table:formula="of:=-68 - ([.E220]^2/Ao)" office:value-type="float" office:value="-223.323669705941" calcext:value-type="float">
            <text:p>-223,323669705941</text:p>
          </table:table-cell>
          <table:table-cell table:style-name="ce1" table:formula="of:=[.G219]+h" office:value-type="float" office:value="2.18" calcext:value-type="float">
            <text:p>2,18</text:p>
          </table:table-cell>
          <table:table-cell table:style-name="ce1" table:formula="of:=[.H219]+ h*[.F220]" office:value-type="float" office:value="555.124224374274" calcext:value-type="float">
            <text:p>555,1242243742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0]" office:value-type="float" office:value="2.18" calcext:value-type="float">
            <text:p>2,18</text:p>
          </table:table-cell>
          <table:table-cell table:style-name="ce1" table:formula="of:=[.H220]" office:value-type="float" office:value="555.124224374274" calcext:value-type="float">
            <text:p>555,124224374274</text:p>
          </table:table-cell>
          <table:table-cell table:style-name="ce1" table:formula="of:=-68 - ([.E221]^2/Ao)" office:value-type="float" office:value="-222.08145224357" calcext:value-type="float">
            <text:p>-222,08145224357</text:p>
          </table:table-cell>
          <table:table-cell table:style-name="ce1" table:formula="of:=[.G220]+h" office:value-type="float" office:value="2.19" calcext:value-type="float">
            <text:p>2,19</text:p>
          </table:table-cell>
          <table:table-cell table:style-name="ce1" table:formula="of:=[.H220]+ h*[.F221]" office:value-type="float" office:value="552.903409851838" calcext:value-type="float">
            <text:p>552,9034098518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1]" office:value-type="float" office:value="2.19" calcext:value-type="float">
            <text:p>2,19</text:p>
          </table:table-cell>
          <table:table-cell table:style-name="ce1" table:formula="of:=[.H221]" office:value-type="float" office:value="552.903409851838" calcext:value-type="float">
            <text:p>552,903409851838</text:p>
          </table:table-cell>
          <table:table-cell table:style-name="ce1" table:formula="of:=-68 - ([.E222]^2/Ao)" office:value-type="float" office:value="-220.851090312895" calcext:value-type="float">
            <text:p>-220,851090312895</text:p>
          </table:table-cell>
          <table:table-cell table:style-name="ce1" table:formula="of:=[.G221]+h" office:value-type="float" office:value="2.2" calcext:value-type="float">
            <text:p>2,2</text:p>
          </table:table-cell>
          <table:table-cell table:style-name="ce1" table:formula="of:=[.H221]+ h*[.F222]" office:value-type="float" office:value="550.694898948709" calcext:value-type="float">
            <text:p>550,6948989487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2]" office:value-type="float" office:value="2.2" calcext:value-type="float">
            <text:p>2,2</text:p>
          </table:table-cell>
          <table:table-cell table:style-name="ce1" table:formula="of:=[.H222]" office:value-type="float" office:value="550.694898948709" calcext:value-type="float">
            <text:p>550,694898948709</text:p>
          </table:table-cell>
          <table:table-cell table:style-name="ce1" table:formula="of:=-68 - ([.E223]^2/Ao)" office:value-type="float" office:value="-219.632435864065" calcext:value-type="float">
            <text:p>-219,632435864065</text:p>
          </table:table-cell>
          <table:table-cell table:style-name="ce1" table:formula="of:=[.G222]+h" office:value-type="float" office:value="2.21" calcext:value-type="float">
            <text:p>2,21</text:p>
          </table:table-cell>
          <table:table-cell table:style-name="ce1" table:formula="of:=[.H222]+ h*[.F223]" office:value-type="float" office:value="548.498574590069" calcext:value-type="float">
            <text:p>548,4985745900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3]" office:value-type="float" office:value="2.21" calcext:value-type="float">
            <text:p>2,21</text:p>
          </table:table-cell>
          <table:table-cell table:style-name="ce1" table:formula="of:=[.H223]" office:value-type="float" office:value="548.498574590069" calcext:value-type="float">
            <text:p>548,498574590069</text:p>
          </table:table-cell>
          <table:table-cell table:style-name="ce1" table:formula="of:=-68 - ([.E224]^2/Ao)" office:value-type="float" office:value="-218.425343163669" calcext:value-type="float">
            <text:p>-218,425343163669</text:p>
          </table:table-cell>
          <table:table-cell table:style-name="ce1" table:formula="of:=[.G223]+h" office:value-type="float" office:value="2.22" calcext:value-type="float">
            <text:p>2,22</text:p>
          </table:table-cell>
          <table:table-cell table:style-name="ce1" table:formula="of:=[.H223]+ h*[.F224]" office:value-type="float" office:value="546.314321158432" calcext:value-type="float">
            <text:p>546,3143211584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4]" office:value-type="float" office:value="2.22" calcext:value-type="float">
            <text:p>2,22</text:p>
          </table:table-cell>
          <table:table-cell table:style-name="ce1" table:formula="of:=[.H224]" office:value-type="float" office:value="546.314321158432" calcext:value-type="float">
            <text:p>546,314321158432</text:p>
          </table:table-cell>
          <table:table-cell table:style-name="ce1" table:formula="of:=-68 - ([.E225]^2/Ao)" office:value-type="float" office:value="-217.229668751399" calcext:value-type="float">
            <text:p>-217,229668751399</text:p>
          </table:table-cell>
          <table:table-cell table:style-name="ce1" table:formula="of:=[.G224]+h" office:value-type="float" office:value="2.23" calcext:value-type="float">
            <text:p>2,23</text:p>
          </table:table-cell>
          <table:table-cell table:style-name="ce1" table:formula="of:=[.H224]+ h*[.F225]" office:value-type="float" office:value="544.142024470918" calcext:value-type="float">
            <text:p>544,1420244709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5]" office:value-type="float" office:value="2.23" calcext:value-type="float">
            <text:p>2,23</text:p>
          </table:table-cell>
          <table:table-cell table:style-name="ce1" table:formula="of:=[.H225]" office:value-type="float" office:value="544.142024470918" calcext:value-type="float">
            <text:p>544,142024470918</text:p>
          </table:table-cell>
          <table:table-cell table:style-name="ce1" table:formula="of:=-68 - ([.E226]^2/Ao)" office:value-type="float" office:value="-216.045271397655" calcext:value-type="float">
            <text:p>-216,045271397655</text:p>
          </table:table-cell>
          <table:table-cell table:style-name="ce1" table:formula="of:=[.G225]+h" office:value-type="float" office:value="2.24" calcext:value-type="float">
            <text:p>2,24</text:p>
          </table:table-cell>
          <table:table-cell table:style-name="ce1" table:formula="of:=[.H225]+ h*[.F226]" office:value-type="float" office:value="541.981571756942" calcext:value-type="float">
            <text:p>541,9815717569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6]" office:value-type="float" office:value="2.24" calcext:value-type="float">
            <text:p>2,24</text:p>
          </table:table-cell>
          <table:table-cell table:style-name="ce1" table:formula="of:=[.H226]" office:value-type="float" office:value="541.981571756942" calcext:value-type="float">
            <text:p>541,981571756942</text:p>
          </table:table-cell>
          <table:table-cell table:style-name="ce1" table:formula="of:=-68 - ([.E227]^2/Ao)" office:value-type="float" office:value="-214.872012062062" calcext:value-type="float">
            <text:p>-214,872012062062</text:p>
          </table:table-cell>
          <table:table-cell table:style-name="ce1" table:formula="of:=[.G226]+h" office:value-type="float" office:value="2.25" calcext:value-type="float">
            <text:p>2,25</text:p>
          </table:table-cell>
          <table:table-cell table:style-name="ce1" table:formula="of:=[.H226]+ h*[.F227]" office:value-type="float" office:value="539.832851636321" calcext:value-type="float">
            <text:p>539,8328516363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7]" office:value-type="float" office:value="2.25" calcext:value-type="float">
            <text:p>2,25</text:p>
          </table:table-cell>
          <table:table-cell table:style-name="ce1" table:formula="of:=[.H227]" office:value-type="float" office:value="539.832851636321" calcext:value-type="float">
            <text:p>539,832851636321</text:p>
          </table:table-cell>
          <table:table-cell table:style-name="ce1" table:formula="of:=-68 - ([.E228]^2/Ao)" office:value-type="float" office:value="-213.709753852901" calcext:value-type="float">
            <text:p>-213,709753852901</text:p>
          </table:table-cell>
          <table:table-cell table:style-name="ce1" table:formula="of:=[.G227]+h" office:value-type="float" office:value="2.26" calcext:value-type="float">
            <text:p>2,26</text:p>
          </table:table-cell>
          <table:table-cell table:style-name="ce1" table:formula="of:=[.H227]+ h*[.F228]" office:value-type="float" office:value="537.695754097792" calcext:value-type="float">
            <text:p>537,6957540977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8]" office:value-type="float" office:value="2.26" calcext:value-type="float">
            <text:p>2,26</text:p>
          </table:table-cell>
          <table:table-cell table:style-name="ce1" table:formula="of:=[.H228]" office:value-type="float" office:value="537.695754097792" calcext:value-type="float">
            <text:p>537,695754097792</text:p>
          </table:table-cell>
          <table:table-cell table:style-name="ce1" table:formula="of:=-68 - ([.E229]^2/Ao)" office:value-type="float" office:value="-212.558361987397" calcext:value-type="float">
            <text:p>-212,558361987397</text:p>
          </table:table-cell>
          <table:table-cell table:style-name="ce1" table:formula="of:=[.G228]+h" office:value-type="float" office:value="2.27" calcext:value-type="float">
            <text:p>2,27</text:p>
          </table:table-cell>
          <table:table-cell table:style-name="ce1" table:formula="of:=[.H228]+ h*[.F229]" office:value-type="float" office:value="535.570170477918" calcext:value-type="float">
            <text:p>535,5701704779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29]" office:value-type="float" office:value="2.27" calcext:value-type="float">
            <text:p>2,27</text:p>
          </table:table-cell>
          <table:table-cell table:style-name="ce1" table:formula="of:=[.H229]" office:value-type="float" office:value="535.570170477918" calcext:value-type="float">
            <text:p>535,570170477918</text:p>
          </table:table-cell>
          <table:table-cell table:style-name="ce1" table:formula="of:=-68 - ([.E230]^2/Ao)" office:value-type="float" office:value="-211.417703752873" calcext:value-type="float">
            <text:p>-211,417703752873</text:p>
          </table:table-cell>
          <table:table-cell table:style-name="ce1" table:formula="of:=[.G229]+h" office:value-type="float" office:value="2.28" calcext:value-type="float">
            <text:p>2,28</text:p>
          </table:table-cell>
          <table:table-cell table:style-name="ce1" table:formula="of:=[.H229]+ h*[.F230]" office:value-type="float" office:value="533.455993440389" calcext:value-type="float">
            <text:p>533,4559934403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0]" office:value-type="float" office:value="2.28" calcext:value-type="float">
            <text:p>2,28</text:p>
          </table:table-cell>
          <table:table-cell table:style-name="ce1" table:formula="of:=[.H230]" office:value-type="float" office:value="533.455993440389" calcext:value-type="float">
            <text:p>533,455993440389</text:p>
          </table:table-cell>
          <table:table-cell table:style-name="ce1" table:formula="of:=-68 - ([.E231]^2/Ao)" office:value-type="float" office:value="-210.287648468736" calcext:value-type="float">
            <text:p>-210,287648468736</text:p>
          </table:table-cell>
          <table:table-cell table:style-name="ce1" table:formula="of:=[.G230]+h" office:value-type="float" office:value="2.29" calcext:value-type="float">
            <text:p>2,29</text:p>
          </table:table-cell>
          <table:table-cell table:style-name="ce1" table:formula="of:=[.H230]+ h*[.F231]" office:value-type="float" office:value="531.353116955702" calcext:value-type="float">
            <text:p>531,3531169557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1]" office:value-type="float" office:value="2.29" calcext:value-type="float">
            <text:p>2,29</text:p>
          </table:table-cell>
          <table:table-cell table:style-name="ce1" table:formula="of:=[.H231]" office:value-type="float" office:value="531.353116955702" calcext:value-type="float">
            <text:p>531,353116955702</text:p>
          </table:table-cell>
          <table:table-cell table:style-name="ce1" table:formula="of:=-68 - ([.E232]^2/Ao)" office:value-type="float" office:value="-209.16806744927" calcext:value-type="float">
            <text:p>-209,16806744927</text:p>
          </table:table-cell>
          <table:table-cell table:style-name="ce1" table:formula="of:=[.G231]+h" office:value-type="float" office:value="2.3" calcext:value-type="float">
            <text:p>2,3</text:p>
          </table:table-cell>
          <table:table-cell table:style-name="ce1" table:formula="of:=[.H231]+ h*[.F232]" office:value-type="float" office:value="529.261436281209" calcext:value-type="float">
            <text:p>529,2614362812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2]" office:value-type="float" office:value="2.3" calcext:value-type="float">
            <text:p>2,3</text:p>
          </table:table-cell>
          <table:table-cell table:style-name="ce1" table:formula="of:=[.H232]" office:value-type="float" office:value="529.261436281209" calcext:value-type="float">
            <text:p>529,261436281209</text:p>
          </table:table-cell>
          <table:table-cell table:style-name="ce1" table:formula="of:=-68 - ([.E233]^2/Ao)" office:value-type="float" office:value="-208.058833967224" calcext:value-type="float">
            <text:p>-208,058833967224</text:p>
          </table:table-cell>
          <table:table-cell table:style-name="ce1" table:formula="of:=[.G232]+h" office:value-type="float" office:value="2.30999999999999" calcext:value-type="float">
            <text:p>2,30999999999999</text:p>
          </table:table-cell>
          <table:table-cell table:style-name="ce1" table:formula="of:=[.H232]+ h*[.F233]" office:value-type="float" office:value="527.180847941537" calcext:value-type="float">
            <text:p>527,1808479415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3]" office:value-type="float" office:value="2.30999999999999" calcext:value-type="float">
            <text:p>2,30999999999999</text:p>
          </table:table-cell>
          <table:table-cell table:style-name="ce1" table:formula="of:=[.H233]" office:value-type="float" office:value="527.180847941537" calcext:value-type="float">
            <text:p>527,180847941537</text:p>
          </table:table-cell>
          <table:table-cell table:style-name="ce1" table:formula="of:=-68 - ([.E234]^2/Ao)" office:value-type="float" office:value="-206.959823218179" calcext:value-type="float">
            <text:p>-206,959823218179</text:p>
          </table:table-cell>
          <table:table-cell table:style-name="ce1" table:formula="of:=[.G233]+h" office:value-type="float" office:value="2.31999999999999" calcext:value-type="float">
            <text:p>2,31999999999999</text:p>
          </table:table-cell>
          <table:table-cell table:style-name="ce1" table:formula="of:=[.H233]+ h*[.F234]" office:value-type="float" office:value="525.111249709355" calcext:value-type="float">
            <text:p>525,1112497093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4]" office:value-type="float" office:value="2.31999999999999" calcext:value-type="float">
            <text:p>2,31999999999999</text:p>
          </table:table-cell>
          <table:table-cell table:style-name="ce1" table:formula="of:=[.H234]" office:value-type="float" office:value="525.111249709355" calcext:value-type="float">
            <text:p>525,111249709355</text:p>
          </table:table-cell>
          <table:table-cell table:style-name="ce1" table:formula="of:=-68 - ([.E235]^2/Ao)" office:value-type="float" office:value="-205.87091228566" calcext:value-type="float">
            <text:p>-205,87091228566</text:p>
          </table:table-cell>
          <table:table-cell table:style-name="ce1" table:formula="of:=[.G234]+h" office:value-type="float" office:value="2.32999999999999" calcext:value-type="float">
            <text:p>2,32999999999999</text:p>
          </table:table-cell>
          <table:table-cell table:style-name="ce1" table:formula="of:=[.H234]+ h*[.F235]" office:value-type="float" office:value="523.052540586499" calcext:value-type="float">
            <text:p>523,0525405864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5]" office:value-type="float" office:value="2.32999999999999" calcext:value-type="float">
            <text:p>2,32999999999999</text:p>
          </table:table-cell>
          <table:table-cell table:style-name="ce1" table:formula="of:=[.H235]" office:value-type="float" office:value="523.052540586499" calcext:value-type="float">
            <text:p>523,052540586499</text:p>
          </table:table-cell>
          <table:table-cell table:style-name="ce1" table:formula="of:=-68 - ([.E236]^2/Ao)" office:value-type="float" office:value="-204.791980106995" calcext:value-type="float">
            <text:p>-204,791980106995</text:p>
          </table:table-cell>
          <table:table-cell table:style-name="ce1" table:formula="of:=[.G235]+h" office:value-type="float" office:value="2.33999999999999" calcext:value-type="float">
            <text:p>2,33999999999999</text:p>
          </table:table-cell>
          <table:table-cell table:style-name="ce1" table:formula="of:=[.H235]+ h*[.F236]" office:value-type="float" office:value="521.004620785429" calcext:value-type="float">
            <text:p>521,0046207854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6]" office:value-type="float" office:value="2.33999999999999" calcext:value-type="float">
            <text:p>2,33999999999999</text:p>
          </table:table-cell>
          <table:table-cell table:style-name="ce1" table:formula="of:=[.H236]" office:value-type="float" office:value="521.004620785429" calcext:value-type="float">
            <text:p>521,004620785429</text:p>
          </table:table-cell>
          <table:table-cell table:style-name="ce1" table:formula="of:=-68 - ([.E237]^2/Ao)" office:value-type="float" office:value="-203.722907439884" calcext:value-type="float">
            <text:p>-203,722907439884</text:p>
          </table:table-cell>
          <table:table-cell table:style-name="ce1" table:formula="of:=[.G236]+h" office:value-type="float" office:value="2.34999999999999" calcext:value-type="float">
            <text:p>2,34999999999999</text:p>
          </table:table-cell>
          <table:table-cell table:style-name="ce1" table:formula="of:=[.H236]+ h*[.F237]" office:value-type="float" office:value="518.96739171103" calcext:value-type="float">
            <text:p>518,967391711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7]" office:value-type="float" office:value="2.34999999999999" calcext:value-type="float">
            <text:p>2,34999999999999</text:p>
          </table:table-cell>
          <table:table-cell table:style-name="ce1" table:formula="of:=[.H237]" office:value-type="float" office:value="518.96739171103" calcext:value-type="float">
            <text:p>518,96739171103</text:p>
          </table:table-cell>
          <table:table-cell table:style-name="ce1" table:formula="of:=-68 - ([.E238]^2/Ao)" office:value-type="float" office:value="-202.663576829675" calcext:value-type="float">
            <text:p>-202,663576829675</text:p>
          </table:table-cell>
          <table:table-cell table:style-name="ce1" table:formula="of:=[.G237]+h" office:value-type="float" office:value="2.35999999999999" calcext:value-type="float">
            <text:p>2,35999999999999</text:p>
          </table:table-cell>
          <table:table-cell table:style-name="ce1" table:formula="of:=[.H237]+ h*[.F238]" office:value-type="float" office:value="516.940755942733" calcext:value-type="float">
            <text:p>516,9407559427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8]" office:value-type="float" office:value="2.35999999999999" calcext:value-type="float">
            <text:p>2,35999999999999</text:p>
          </table:table-cell>
          <table:table-cell table:style-name="ce1" table:formula="of:=[.H238]" office:value-type="float" office:value="516.940755942733" calcext:value-type="float">
            <text:p>516,940755942733</text:p>
          </table:table-cell>
          <table:table-cell table:style-name="ce1" table:formula="of:=-68 - ([.E239]^2/Ao)" office:value-type="float" office:value="-201.613872577322" calcext:value-type="float">
            <text:p>-201,613872577322</text:p>
          </table:table-cell>
          <table:table-cell table:style-name="ce1" table:formula="of:=[.G238]+h" office:value-type="float" office:value="2.36999999999999" calcext:value-type="float">
            <text:p>2,36999999999999</text:p>
          </table:table-cell>
          <table:table-cell table:style-name="ce1" table:formula="of:=[.H238]+ h*[.F239]" office:value-type="float" office:value="514.92461721696" calcext:value-type="float">
            <text:p>514,924617216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39]" office:value-type="float" office:value="2.36999999999999" calcext:value-type="float">
            <text:p>2,36999999999999</text:p>
          </table:table-cell>
          <table:table-cell table:style-name="ce1" table:formula="of:=[.H239]" office:value-type="float" office:value="514.92461721696" calcext:value-type="float">
            <text:p>514,92461721696</text:p>
          </table:table-cell>
          <table:table-cell table:style-name="ce1" table:formula="of:=-68 - ([.E240]^2/Ao)" office:value-type="float" office:value="-200.573680708016" calcext:value-type="float">
            <text:p>-200,573680708016</text:p>
          </table:table-cell>
          <table:table-cell table:style-name="ce1" table:formula="of:=[.G239]+h" office:value-type="float" office:value="2.37999999999999" calcext:value-type="float">
            <text:p>2,37999999999999</text:p>
          </table:table-cell>
          <table:table-cell table:style-name="ce1" table:formula="of:=[.H239]+ h*[.F240]" office:value-type="float" office:value="512.91888040988" calcext:value-type="float">
            <text:p>512,918880409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0]" office:value-type="float" office:value="2.37999999999999" calcext:value-type="float">
            <text:p>2,37999999999999</text:p>
          </table:table-cell>
          <table:table-cell table:style-name="ce1" table:formula="of:=[.H240]" office:value-type="float" office:value="512.91888040988" calcext:value-type="float">
            <text:p>512,91888040988</text:p>
          </table:table-cell>
          <table:table-cell table:style-name="ce1" table:formula="of:=-68 - ([.E241]^2/Ao)" office:value-type="float" office:value="-199.542888940462" calcext:value-type="float">
            <text:p>-199,542888940462</text:p>
          </table:table-cell>
          <table:table-cell table:style-name="ce1" table:formula="of:=[.G240]+h" office:value-type="float" office:value="2.38999999999999" calcext:value-type="float">
            <text:p>2,38999999999999</text:p>
          </table:table-cell>
          <table:table-cell table:style-name="ce1" table:formula="of:=[.H240]+ h*[.F241]" office:value-type="float" office:value="510.923451520475" calcext:value-type="float">
            <text:p>510,9234515204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1]" office:value-type="float" office:value="2.38999999999999" calcext:value-type="float">
            <text:p>2,38999999999999</text:p>
          </table:table-cell>
          <table:table-cell table:style-name="ce1" table:formula="of:=[.H241]" office:value-type="float" office:value="510.923451520475" calcext:value-type="float">
            <text:p>510,923451520475</text:p>
          </table:table-cell>
          <table:table-cell table:style-name="ce1" table:formula="of:=-68 - ([.E242]^2/Ao)" office:value-type="float" office:value="-198.521386656798" calcext:value-type="float">
            <text:p>-198,521386656798</text:p>
          </table:table-cell>
          <table:table-cell table:style-name="ce1" table:formula="of:=[.G241]+h" office:value-type="float" office:value="2.39999999999999" calcext:value-type="float">
            <text:p>2,39999999999999</text:p>
          </table:table-cell>
          <table:table-cell table:style-name="ce1" table:formula="of:=[.H241]+ h*[.F242]" office:value-type="float" office:value="508.938237653907" calcext:value-type="float">
            <text:p>508,9382376539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2]" office:value-type="float" office:value="2.39999999999999" calcext:value-type="float">
            <text:p>2,39999999999999</text:p>
          </table:table-cell>
          <table:table-cell table:style-name="ce1" table:formula="of:=[.H242]" office:value-type="float" office:value="508.938237653907" calcext:value-type="float">
            <text:p>508,938237653907</text:p>
          </table:table-cell>
          <table:table-cell table:style-name="ce1" table:formula="of:=-68 - ([.E243]^2/Ao)" office:value-type="float" office:value="-197.509064873132" calcext:value-type="float">
            <text:p>-197,509064873132</text:p>
          </table:table-cell>
          <table:table-cell table:style-name="ce1" table:formula="of:=[.G242]+h" office:value-type="float" office:value="2.40999999999999" calcext:value-type="float">
            <text:p>2,40999999999999</text:p>
          </table:table-cell>
          <table:table-cell table:style-name="ce1" table:formula="of:=[.H242]+ h*[.F243]" office:value-type="float" office:value="506.963147005176" calcext:value-type="float">
            <text:p>506,9631470051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3]" office:value-type="float" office:value="2.40999999999999" calcext:value-type="float">
            <text:p>2,40999999999999</text:p>
          </table:table-cell>
          <table:table-cell table:style-name="ce1" table:formula="of:=[.H243]" office:value-type="float" office:value="506.963147005176" calcext:value-type="float">
            <text:p>506,963147005176</text:p>
          </table:table-cell>
          <table:table-cell table:style-name="ce1" table:formula="of:=-68 - ([.E244]^2/Ao)" office:value-type="float" office:value="-196.505816210696" calcext:value-type="float">
            <text:p>-196,505816210696</text:p>
          </table:table-cell>
          <table:table-cell table:style-name="ce1" table:formula="of:=[.G243]+h" office:value-type="float" office:value="2.41999999999999" calcext:value-type="float">
            <text:p>2,41999999999999</text:p>
          </table:table-cell>
          <table:table-cell table:style-name="ce1" table:formula="of:=[.H243]+ h*[.F244]" office:value-type="float" office:value="504.998088843069" calcext:value-type="float">
            <text:p>504,9980888430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4]" office:value-type="float" office:value="2.41999999999999" calcext:value-type="float">
            <text:p>2,41999999999999</text:p>
          </table:table-cell>
          <table:table-cell table:style-name="ce1" table:formula="of:=[.H244]" office:value-type="float" office:value="504.998088843069" calcext:value-type="float">
            <text:p>504,998088843069</text:p>
          </table:table-cell>
          <table:table-cell table:style-name="ce1" table:formula="of:=-68 - ([.E245]^2/Ao)" office:value-type="float" office:value="-195.511534867576" calcext:value-type="float">
            <text:p>-195,511534867576</text:p>
          </table:table-cell>
          <table:table-cell table:style-name="ce1" table:formula="of:=[.G244]+h" office:value-type="float" office:value="2.42999999999999" calcext:value-type="float">
            <text:p>2,42999999999999</text:p>
          </table:table-cell>
          <table:table-cell table:style-name="ce1" table:formula="of:=[.H244]+ h*[.F245]" office:value-type="float" office:value="503.042973494393" calcext:value-type="float">
            <text:p>503,0429734943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5]" office:value-type="float" office:value="2.42999999999999" calcext:value-type="float">
            <text:p>2,42999999999999</text:p>
          </table:table-cell>
          <table:table-cell table:style-name="ce1" table:formula="of:=[.H245]" office:value-type="float" office:value="503.042973494393" calcext:value-type="float">
            <text:p>503,042973494393</text:p>
          </table:table-cell>
          <table:table-cell table:style-name="ce1" table:formula="of:=-68 - ([.E246]^2/Ao)" office:value-type="float" office:value="-194.52611659104" calcext:value-type="float">
            <text:p>-194,52611659104</text:p>
          </table:table-cell>
          <table:table-cell table:style-name="ce1" table:formula="of:=[.G245]+h" office:value-type="float" office:value="2.43999999999999" calcext:value-type="float">
            <text:p>2,43999999999999</text:p>
          </table:table-cell>
          <table:table-cell table:style-name="ce1" table:formula="of:=[.H245]+ h*[.F246]" office:value-type="float" office:value="501.097712328483" calcext:value-type="float">
            <text:p>501,0977123284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6]" office:value-type="float" office:value="2.43999999999999" calcext:value-type="float">
            <text:p>2,43999999999999</text:p>
          </table:table-cell>
          <table:table-cell table:style-name="ce1" table:formula="of:=[.H246]" office:value-type="float" office:value="501.097712328483" calcext:value-type="float">
            <text:p>501,097712328483</text:p>
          </table:table-cell>
          <table:table-cell table:style-name="ce1" table:formula="of:=-68 - ([.E247]^2/Ao)" office:value-type="float" office:value="-193.549458650419" calcext:value-type="float">
            <text:p>-193,549458650419</text:p>
          </table:table-cell>
          <table:table-cell table:style-name="ce1" table:formula="of:=[.G246]+h" office:value-type="float" office:value="2.44999999999999" calcext:value-type="float">
            <text:p>2,44999999999999</text:p>
          </table:table-cell>
          <table:table-cell table:style-name="ce1" table:formula="of:=[.H246]+ h*[.F247]" office:value-type="float" office:value="499.162217741978" calcext:value-type="float">
            <text:p>499,1622177419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7]" office:value-type="float" office:value="2.44999999999999" calcext:value-type="float">
            <text:p>2,44999999999999</text:p>
          </table:table-cell>
          <table:table-cell table:style-name="ce1" table:formula="of:=[.H247]" office:value-type="float" office:value="499.162217741978" calcext:value-type="float">
            <text:p>499,162217741978</text:p>
          </table:table-cell>
          <table:table-cell table:style-name="ce1" table:formula="of:=-68 - ([.E248]^2/Ao)" office:value-type="float" office:value="-192.581459810545" calcext:value-type="float">
            <text:p>-192,581459810545</text:p>
          </table:table-cell>
          <table:table-cell table:style-name="ce1" table:formula="of:=[.G247]+h" office:value-type="float" office:value="2.45999999999999" calcext:value-type="float">
            <text:p>2,45999999999999</text:p>
          </table:table-cell>
          <table:table-cell table:style-name="ce1" table:formula="of:=[.H247]+ h*[.F248]" office:value-type="float" office:value="497.236403143873" calcext:value-type="float">
            <text:p>497,2364031438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8]" office:value-type="float" office:value="2.45999999999999" calcext:value-type="float">
            <text:p>2,45999999999999</text:p>
          </table:table-cell>
          <table:table-cell table:style-name="ce1" table:formula="of:=[.H248]" office:value-type="float" office:value="497.236403143873" calcext:value-type="float">
            <text:p>497,236403143873</text:p>
          </table:table-cell>
          <table:table-cell table:style-name="ce1" table:formula="of:=-68 - ([.E249]^2/Ao)" office:value-type="float" office:value="-191.622020305728" calcext:value-type="float">
            <text:p>-191,622020305728</text:p>
          </table:table-cell>
          <table:table-cell table:style-name="ce1" table:formula="of:=[.G248]+h" office:value-type="float" office:value="2.46999999999999" calcext:value-type="float">
            <text:p>2,46999999999999</text:p>
          </table:table-cell>
          <table:table-cell table:style-name="ce1" table:formula="of:=[.H248]+ h*[.F249]" office:value-type="float" office:value="495.320182940816" calcext:value-type="float">
            <text:p>495,3201829408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49]" office:value-type="float" office:value="2.46999999999999" calcext:value-type="float">
            <text:p>2,46999999999999</text:p>
          </table:table-cell>
          <table:table-cell table:style-name="ce1" table:formula="of:=[.H249]" office:value-type="float" office:value="495.320182940816" calcext:value-type="float">
            <text:p>495,320182940816</text:p>
          </table:table-cell>
          <table:table-cell table:style-name="ce1" table:formula="of:=-68 - ([.E250]^2/Ao)" office:value-type="float" office:value="-190.671041814262" calcext:value-type="float">
            <text:p>-190,671041814262</text:p>
          </table:table-cell>
          <table:table-cell table:style-name="ce1" table:formula="of:=[.G249]+h" office:value-type="float" office:value="2.47999999999999" calcext:value-type="float">
            <text:p>2,47999999999999</text:p>
          </table:table-cell>
          <table:table-cell table:style-name="ce1" table:formula="of:=[.H249]+ h*[.F250]" office:value-type="float" office:value="493.413472522673" calcext:value-type="float">
            <text:p>493,4134725226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0]" office:value-type="float" office:value="2.47999999999999" calcext:value-type="float">
            <text:p>2,47999999999999</text:p>
          </table:table-cell>
          <table:table-cell table:style-name="ce1" table:formula="of:=[.H250]" office:value-type="float" office:value="493.413472522673" calcext:value-type="float">
            <text:p>493,413472522673</text:p>
          </table:table-cell>
          <table:table-cell table:style-name="ce1" table:formula="of:=-68 - ([.E251]^2/Ao)" office:value-type="float" office:value="-189.728427433441" calcext:value-type="float">
            <text:p>-189,728427433441</text:p>
          </table:table-cell>
          <table:table-cell table:style-name="ce1" table:formula="of:=[.G250]+h" office:value-type="float" office:value="2.48999999999999" calcext:value-type="float">
            <text:p>2,48999999999999</text:p>
          </table:table-cell>
          <table:table-cell table:style-name="ce1" table:formula="of:=[.H250]+ h*[.F251]" office:value-type="float" office:value="491.516188248339" calcext:value-type="float">
            <text:p>491,5161882483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1]" office:value-type="float" office:value="2.48999999999999" calcext:value-type="float">
            <text:p>2,48999999999999</text:p>
          </table:table-cell>
          <table:table-cell table:style-name="ce1" table:formula="of:=[.H251]" office:value-type="float" office:value="491.516188248339" calcext:value-type="float">
            <text:p>491,516188248339</text:p>
          </table:table-cell>
          <table:table-cell table:style-name="ce1" table:formula="of:=-68 - ([.E252]^2/Ao)" office:value-type="float" office:value="-188.794081655088" calcext:value-type="float">
            <text:p>-188,794081655088</text:p>
          </table:table-cell>
          <table:table-cell table:style-name="ce1" table:formula="of:=[.G251]+h" office:value-type="float" office:value="2.49999999999999" calcext:value-type="float">
            <text:p>2,49999999999999</text:p>
          </table:table-cell>
          <table:table-cell table:style-name="ce1" table:formula="of:=[.H251]+ h*[.F252]" office:value-type="float" office:value="489.628247431788" calcext:value-type="float">
            <text:p>489,6282474317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2]" office:value-type="float" office:value="2.49999999999999" calcext:value-type="float">
            <text:p>2,49999999999999</text:p>
          </table:table-cell>
          <table:table-cell table:style-name="ce1" table:formula="of:=[.H252]" office:value-type="float" office:value="489.628247431788" calcext:value-type="float">
            <text:p>489,628247431788</text:p>
          </table:table-cell>
          <table:table-cell table:style-name="ce1" table:formula="of:=-68 - ([.E253]^2/Ao)" office:value-type="float" office:value="-187.867910341562" calcext:value-type="float">
            <text:p>-187,867910341562</text:p>
          </table:table-cell>
          <table:table-cell table:style-name="ce1" table:formula="of:=[.G252]+h" office:value-type="float" office:value="2.50999999999999" calcext:value-type="float">
            <text:p>2,50999999999999</text:p>
          </table:table-cell>
          <table:table-cell table:style-name="ce1" table:formula="of:=[.H252]+ h*[.F253]" office:value-type="float" office:value="487.749568328372" calcext:value-type="float">
            <text:p>487,7495683283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3]" office:value-type="float" office:value="2.50999999999999" calcext:value-type="float">
            <text:p>2,50999999999999</text:p>
          </table:table-cell>
          <table:table-cell table:style-name="ce1" table:formula="of:=[.H253]" office:value-type="float" office:value="487.749568328372" calcext:value-type="float">
            <text:p>487,749568328372</text:p>
          </table:table-cell>
          <table:table-cell table:style-name="ce1" table:formula="of:=-68 - ([.E254]^2/Ao)" office:value-type="float" office:value="-186.949820702257" calcext:value-type="float">
            <text:p>-186,949820702257</text:p>
          </table:table-cell>
          <table:table-cell table:style-name="ce1" table:formula="of:=[.G253]+h" office:value-type="float" office:value="2.51999999999999" calcext:value-type="float">
            <text:p>2,51999999999999</text:p>
          </table:table-cell>
          <table:table-cell table:style-name="ce1" table:formula="of:=[.H253]+ h*[.F254]" office:value-type="float" office:value="485.88007012135" calcext:value-type="float">
            <text:p>485,880070121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4]" office:value-type="float" office:value="2.51999999999999" calcext:value-type="float">
            <text:p>2,51999999999999</text:p>
          </table:table-cell>
          <table:table-cell table:style-name="ce1" table:formula="of:=[.H254]" office:value-type="float" office:value="485.88007012135" calcext:value-type="float">
            <text:p>485,88007012135</text:p>
          </table:table-cell>
          <table:table-cell table:style-name="ce1" table:formula="of:=-68 - ([.E255]^2/Ao)" office:value-type="float" office:value="-186.039721270564" calcext:value-type="float">
            <text:p>-186,039721270564</text:p>
          </table:table-cell>
          <table:table-cell table:style-name="ce1" table:formula="of:=[.G254]+h" office:value-type="float" office:value="2.52999999999999" calcext:value-type="float">
            <text:p>2,52999999999999</text:p>
          </table:table-cell>
          <table:table-cell table:style-name="ce1" table:formula="of:=[.H254]+ h*[.F255]" office:value-type="float" office:value="484.019672908644" calcext:value-type="float">
            <text:p>484,0196729086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5]" office:value-type="float" office:value="2.52999999999999" calcext:value-type="float">
            <text:p>2,52999999999999</text:p>
          </table:table-cell>
          <table:table-cell table:style-name="ce1" table:formula="of:=[.H255]" office:value-type="float" office:value="484.019672908644" calcext:value-type="float">
            <text:p>484,019672908644</text:p>
          </table:table-cell>
          <table:table-cell table:style-name="ce1" table:formula="of:=-68 - ([.E256]^2/Ao)" office:value-type="float" office:value="-185.137521881295" calcext:value-type="float">
            <text:p>-185,137521881295</text:p>
          </table:table-cell>
          <table:table-cell table:style-name="ce1" table:formula="of:=[.G255]+h" office:value-type="float" office:value="2.53999999999999" calcext:value-type="float">
            <text:p>2,53999999999999</text:p>
          </table:table-cell>
          <table:table-cell table:style-name="ce1" table:formula="of:=[.H255]+ h*[.F256]" office:value-type="float" office:value="482.168297689831" calcext:value-type="float">
            <text:p>482,1682976898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6]" office:value-type="float" office:value="2.53999999999999" calcext:value-type="float">
            <text:p>2,53999999999999</text:p>
          </table:table-cell>
          <table:table-cell table:style-name="ce1" table:formula="of:=[.H256]" office:value-type="float" office:value="482.168297689831" calcext:value-type="float">
            <text:p>482,168297689831</text:p>
          </table:table-cell>
          <table:table-cell table:style-name="ce1" table:formula="of:=-68 - ([.E257]^2/Ao)" office:value-type="float" office:value="-184.243133648555" calcext:value-type="float">
            <text:p>-184,243133648555</text:p>
          </table:table-cell>
          <table:table-cell table:style-name="ce1" table:formula="of:=[.G256]+h" office:value-type="float" office:value="2.54999999999999" calcext:value-type="float">
            <text:p>2,54999999999999</text:p>
          </table:table-cell>
          <table:table-cell table:style-name="ce1" table:formula="of:=[.H256]+ h*[.F257]" office:value-type="float" office:value="480.325866353345" calcext:value-type="float">
            <text:p>480,3258663533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7]" office:value-type="float" office:value="2.54999999999999" calcext:value-type="float">
            <text:p>2,54999999999999</text:p>
          </table:table-cell>
          <table:table-cell table:style-name="ce1" table:formula="of:=[.H257]" office:value-type="float" office:value="480.325866353345" calcext:value-type="float">
            <text:p>480,325866353345</text:p>
          </table:table-cell>
          <table:table-cell table:style-name="ce1" table:formula="of:=-68 - ([.E258]^2/Ao)" office:value-type="float" office:value="-183.356468944046" calcext:value-type="float">
            <text:p>-183,356468944046</text:p>
          </table:table-cell>
          <table:table-cell table:style-name="ce1" table:formula="of:=[.G257]+h" office:value-type="float" office:value="2.55999999999999" calcext:value-type="float">
            <text:p>2,55999999999999</text:p>
          </table:table-cell>
          <table:table-cell table:style-name="ce1" table:formula="of:=[.H257]+ h*[.F258]" office:value-type="float" office:value="478.492301663905" calcext:value-type="float">
            <text:p>478,4923016639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8]" office:value-type="float" office:value="2.55999999999999" calcext:value-type="float">
            <text:p>2,55999999999999</text:p>
          </table:table-cell>
          <table:table-cell table:style-name="ce1" table:formula="of:=[.H258]" office:value-type="float" office:value="478.492301663905" calcext:value-type="float">
            <text:p>478,492301663905</text:p>
          </table:table-cell>
          <table:table-cell table:style-name="ce1" table:formula="of:=-68 - ([.E259]^2/Ao)" office:value-type="float" office:value="-182.477441375811" calcext:value-type="float">
            <text:p>-182,477441375811</text:p>
          </table:table-cell>
          <table:table-cell table:style-name="ce1" table:formula="of:=[.G258]+h" office:value-type="float" office:value="2.56999999999999" calcext:value-type="float">
            <text:p>2,56999999999999</text:p>
          </table:table-cell>
          <table:table-cell table:style-name="ce1" table:formula="of:=[.H258]+ h*[.F259]" office:value-type="float" office:value="476.667527250147" calcext:value-type="float">
            <text:p>476,6675272501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59]" office:value-type="float" office:value="2.56999999999999" calcext:value-type="float">
            <text:p>2,56999999999999</text:p>
          </table:table-cell>
          <table:table-cell table:style-name="ce1" table:formula="of:=[.H259]" office:value-type="float" office:value="476.667527250147" calcext:value-type="float">
            <text:p>476,667527250147</text:p>
          </table:table-cell>
          <table:table-cell table:style-name="ce1" table:formula="of:=-68 - ([.E260]^2/Ao)" office:value-type="float" office:value="-181.605965767385" calcext:value-type="float">
            <text:p>-181,605965767385</text:p>
          </table:table-cell>
          <table:table-cell table:style-name="ce1" table:formula="of:=[.G259]+h" office:value-type="float" office:value="2.57999999999999" calcext:value-type="float">
            <text:p>2,57999999999999</text:p>
          </table:table-cell>
          <table:table-cell table:style-name="ce1" table:formula="of:=[.H259]+ h*[.F260]" office:value-type="float" office:value="474.851467592473" calcext:value-type="float">
            <text:p>474,8514675924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0]" office:value-type="float" office:value="2.57999999999999" calcext:value-type="float">
            <text:p>2,57999999999999</text:p>
          </table:table-cell>
          <table:table-cell table:style-name="ce1" table:formula="of:=[.H260]" office:value-type="float" office:value="474.851467592473" calcext:value-type="float">
            <text:p>474,851467592473</text:p>
          </table:table-cell>
          <table:table-cell table:style-name="ce1" table:formula="of:=-68 - ([.E261]^2/Ao)" office:value-type="float" office:value="-180.741958137363" calcext:value-type="float">
            <text:p>-180,741958137363</text:p>
          </table:table-cell>
          <table:table-cell table:style-name="ce1" table:formula="of:=[.G260]+h" office:value-type="float" office:value="2.58999999999999" calcext:value-type="float">
            <text:p>2,58999999999999</text:p>
          </table:table-cell>
          <table:table-cell table:style-name="ce1" table:formula="of:=[.H260]+ h*[.F261]" office:value-type="float" office:value="473.044048011099" calcext:value-type="float">
            <text:p>473,0440480110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1]" office:value-type="float" office:value="2.58999999999999" calcext:value-type="float">
            <text:p>2,58999999999999</text:p>
          </table:table-cell>
          <table:table-cell table:style-name="ce1" table:formula="of:=[.H261]" office:value-type="float" office:value="473.044048011099" calcext:value-type="float">
            <text:p>473,044048011099</text:p>
          </table:table-cell>
          <table:table-cell table:style-name="ce1" table:formula="of:=-68 - ([.E262]^2/Ao)" office:value-type="float" office:value="-179.885335679364" calcext:value-type="float">
            <text:p>-179,885335679364</text:p>
          </table:table-cell>
          <table:table-cell table:style-name="ce1" table:formula="of:=[.G261]+h" office:value-type="float" office:value="2.59999999999999" calcext:value-type="float">
            <text:p>2,59999999999999</text:p>
          </table:table-cell>
          <table:table-cell table:style-name="ce1" table:formula="of:=[.H261]+ h*[.F262]" office:value-type="float" office:value="471.245194654306" calcext:value-type="float">
            <text:p>471,2451946543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2]" office:value-type="float" office:value="2.59999999999999" calcext:value-type="float">
            <text:p>2,59999999999999</text:p>
          </table:table-cell>
          <table:table-cell table:style-name="ce1" table:formula="of:=[.H262]" office:value-type="float" office:value="471.245194654306" calcext:value-type="float">
            <text:p>471,245194654306</text:p>
          </table:table-cell>
          <table:table-cell table:style-name="ce1" table:formula="of:=-68 - ([.E263]^2/Ao)" office:value-type="float" office:value="-179.036016742387" calcext:value-type="float">
            <text:p>-179,036016742387</text:p>
          </table:table-cell>
          <table:table-cell table:style-name="ce1" table:formula="of:=[.G262]+h" office:value-type="float" office:value="2.60999999999999" calcext:value-type="float">
            <text:p>2,60999999999999</text:p>
          </table:table-cell>
          <table:table-cell table:style-name="ce1" table:formula="of:=[.H262]+ h*[.F263]" office:value-type="float" office:value="469.454834486882" calcext:value-type="float">
            <text:p>469,4548344868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3]" office:value-type="float" office:value="2.60999999999999" calcext:value-type="float">
            <text:p>2,60999999999999</text:p>
          </table:table-cell>
          <table:table-cell table:style-name="ce1" table:formula="of:=[.H263]" office:value-type="float" office:value="469.454834486882" calcext:value-type="float">
            <text:p>469,454834486882</text:p>
          </table:table-cell>
          <table:table-cell table:style-name="ce1" table:formula="of:=-68 - ([.E264]^2/Ao)" office:value-type="float" office:value="-178.193920811553" calcext:value-type="float">
            <text:p>-178,193920811553</text:p>
          </table:table-cell>
          <table:table-cell table:style-name="ce1" table:formula="of:=[.G263]+h" office:value-type="float" office:value="2.61999999999999" calcext:value-type="float">
            <text:p>2,61999999999999</text:p>
          </table:table-cell>
          <table:table-cell table:style-name="ce1" table:formula="of:=[.H263]+ h*[.F264]" office:value-type="float" office:value="467.672895278766" calcext:value-type="float">
            <text:p>467,6728952787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4]" office:value-type="float" office:value="2.61999999999999" calcext:value-type="float">
            <text:p>2,61999999999999</text:p>
          </table:table-cell>
          <table:table-cell table:style-name="ce1" table:formula="of:=[.H264]" office:value-type="float" office:value="467.672895278766" calcext:value-type="float">
            <text:p>467,672895278766</text:p>
          </table:table-cell>
          <table:table-cell table:style-name="ce1" table:formula="of:=-68 - ([.E265]^2/Ao)" office:value-type="float" office:value="-177.358968489212" calcext:value-type="float">
            <text:p>-177,358968489212</text:p>
          </table:table-cell>
          <table:table-cell table:style-name="ce1" table:formula="of:=[.G264]+h" office:value-type="float" office:value="2.62999999999999" calcext:value-type="float">
            <text:p>2,62999999999999</text:p>
          </table:table-cell>
          <table:table-cell table:style-name="ce1" table:formula="of:=[.H264]+ h*[.F265]" office:value-type="float" office:value="465.899305593874" calcext:value-type="float">
            <text:p>465,8993055938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5]" office:value-type="float" office:value="2.62999999999999" calcext:value-type="float">
            <text:p>2,62999999999999</text:p>
          </table:table-cell>
          <table:table-cell table:style-name="ce1" table:formula="of:=[.H265]" office:value-type="float" office:value="465.899305593874" calcext:value-type="float">
            <text:p>465,899305593874</text:p>
          </table:table-cell>
          <table:table-cell table:style-name="ce1" table:formula="of:=-68 - ([.E266]^2/Ao)" office:value-type="float" office:value="-176.531081476427" calcext:value-type="float">
            <text:p>-176,531081476427</text:p>
          </table:table-cell>
          <table:table-cell table:style-name="ce1" table:formula="of:=[.G265]+h" office:value-type="float" office:value="2.63999999999999" calcext:value-type="float">
            <text:p>2,63999999999999</text:p>
          </table:table-cell>
          <table:table-cell table:style-name="ce1" table:formula="of:=[.H265]+ h*[.F266]" office:value-type="float" office:value="464.13399477911" calcext:value-type="float">
            <text:p>464,133994779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6]" office:value-type="float" office:value="2.63999999999999" calcext:value-type="float">
            <text:p>2,63999999999999</text:p>
          </table:table-cell>
          <table:table-cell table:style-name="ce1" table:formula="of:=[.H266]" office:value-type="float" office:value="464.13399477911" calcext:value-type="float">
            <text:p>464,13399477911</text:p>
          </table:table-cell>
          <table:table-cell table:style-name="ce1" table:formula="of:=-68 - ([.E267]^2/Ao)" office:value-type="float" office:value="-175.710182554807" calcext:value-type="float">
            <text:p>-175,710182554807</text:p>
          </table:table-cell>
          <table:table-cell table:style-name="ce1" table:formula="of:=[.G266]+h" office:value-type="float" office:value="2.64999999999999" calcext:value-type="float">
            <text:p>2,64999999999999</text:p>
          </table:table-cell>
          <table:table-cell table:style-name="ce1" table:formula="of:=[.H266]+ h*[.F267]" office:value-type="float" office:value="462.376892953562" calcext:value-type="float">
            <text:p>462,3768929535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7]" office:value-type="float" office:value="2.64999999999999" calcext:value-type="float">
            <text:p>2,64999999999999</text:p>
          </table:table-cell>
          <table:table-cell table:style-name="ce1" table:formula="of:=[.H267]" office:value-type="float" office:value="462.376892953562" calcext:value-type="float">
            <text:p>462,376892953562</text:p>
          </table:table-cell>
          <table:table-cell table:style-name="ce1" table:formula="of:=-68 - ([.E268]^2/Ao)" office:value-type="float" office:value="-174.896195568695" calcext:value-type="float">
            <text:p>-174,896195568695</text:p>
          </table:table-cell>
          <table:table-cell table:style-name="ce1" table:formula="of:=[.G267]+h" office:value-type="float" office:value="2.65999999999999" calcext:value-type="float">
            <text:p>2,65999999999999</text:p>
          </table:table-cell>
          <table:table-cell table:style-name="ce1" table:formula="of:=[.H267]+ h*[.F268]" office:value-type="float" office:value="460.627930997875" calcext:value-type="float">
            <text:p>460,6279309978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8]" office:value-type="float" office:value="2.65999999999999" calcext:value-type="float">
            <text:p>2,65999999999999</text:p>
          </table:table-cell>
          <table:table-cell table:style-name="ce1" table:formula="of:=[.H268]" office:value-type="float" office:value="460.627930997875" calcext:value-type="float">
            <text:p>460,627930997875</text:p>
          </table:table-cell>
          <table:table-cell table:style-name="ce1" table:formula="of:=-68 - ([.E269]^2/Ao)" office:value-type="float" office:value="-174.089045407692" calcext:value-type="float">
            <text:p>-174,089045407692</text:p>
          </table:table-cell>
          <table:table-cell table:style-name="ce1" table:formula="of:=[.G268]+h" office:value-type="float" office:value="2.66999999999999" calcext:value-type="float">
            <text:p>2,66999999999999</text:p>
          </table:table-cell>
          <table:table-cell table:style-name="ce1" table:formula="of:=[.H268]+ h*[.F269]" office:value-type="float" office:value="458.887040543798" calcext:value-type="float">
            <text:p>458,8870405437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69]" office:value-type="float" office:value="2.66999999999999" calcext:value-type="float">
            <text:p>2,66999999999999</text:p>
          </table:table-cell>
          <table:table-cell table:style-name="ce1" table:formula="of:=[.H269]" office:value-type="float" office:value="458.887040543798" calcext:value-type="float">
            <text:p>458,887040543798</text:p>
          </table:table-cell>
          <table:table-cell table:style-name="ce1" table:formula="of:=-68 - ([.E270]^2/Ao)" office:value-type="float" office:value="-173.288657989523" calcext:value-type="float">
            <text:p>-173,288657989523</text:p>
          </table:table-cell>
          <table:table-cell table:style-name="ce1" table:formula="of:=[.G269]+h" office:value-type="float" office:value="2.67999999999999" calcext:value-type="float">
            <text:p>2,67999999999999</text:p>
          </table:table-cell>
          <table:table-cell table:style-name="ce1" table:formula="of:=[.H269]+ h*[.F270]" office:value-type="float" office:value="457.154153963903" calcext:value-type="float">
            <text:p>457,1541539639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0]" office:value-type="float" office:value="2.67999999999999" calcext:value-type="float">
            <text:p>2,67999999999999</text:p>
          </table:table-cell>
          <table:table-cell table:style-name="ce1" table:formula="of:=[.H270]" office:value-type="float" office:value="457.154153963903" calcext:value-type="float">
            <text:p>457,154153963903</text:p>
          </table:table-cell>
          <table:table-cell table:style-name="ce1" table:formula="of:=-68 - ([.E271]^2/Ao)" office:value-type="float" office:value="-172.494960243226" calcext:value-type="float">
            <text:p>-172,494960243226</text:p>
          </table:table-cell>
          <table:table-cell table:style-name="ce1" table:formula="of:=[.G270]+h" office:value-type="float" office:value="2.68999999999999" calcext:value-type="float">
            <text:p>2,68999999999999</text:p>
          </table:table-cell>
          <table:table-cell table:style-name="ce1" table:formula="of:=[.H270]+ h*[.F271]" office:value-type="float" office:value="455.42920436147" calcext:value-type="float">
            <text:p>455,429204361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1]" office:value-type="float" office:value="2.68999999999999" calcext:value-type="float">
            <text:p>2,68999999999999</text:p>
          </table:table-cell>
          <table:table-cell table:style-name="ce1" table:formula="of:=[.H271]" office:value-type="float" office:value="455.42920436147" calcext:value-type="float">
            <text:p>455,42920436147</text:p>
          </table:table-cell>
          <table:table-cell table:style-name="ce1" table:formula="of:=-68 - ([.E272]^2/Ao)" office:value-type="float" office:value="-171.707880092661" calcext:value-type="float">
            <text:p>-171,707880092661</text:p>
          </table:table-cell>
          <table:table-cell table:style-name="ce1" table:formula="of:=[.G271]+h" office:value-type="float" office:value="2.69999999999999" calcext:value-type="float">
            <text:p>2,69999999999999</text:p>
          </table:table-cell>
          <table:table-cell table:style-name="ce1" table:formula="of:=[.H271]+ h*[.F272]" office:value-type="float" office:value="453.712125560544" calcext:value-type="float">
            <text:p>453,7121255605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2]" office:value-type="float" office:value="2.69999999999999" calcext:value-type="float">
            <text:p>2,69999999999999</text:p>
          </table:table-cell>
          <table:table-cell table:style-name="ce1" table:formula="of:=[.H272]" office:value-type="float" office:value="453.712125560544" calcext:value-type="float">
            <text:p>453,712125560544</text:p>
          </table:table-cell>
          <table:table-cell table:style-name="ce1" table:formula="of:=-68 - ([.E273]^2/Ao)" office:value-type="float" office:value="-170.927346440333" calcext:value-type="float">
            <text:p>-170,927346440333</text:p>
          </table:table-cell>
          <table:table-cell table:style-name="ce1" table:formula="of:=[.G272]+h" office:value-type="float" office:value="2.70999999999999" calcext:value-type="float">
            <text:p>2,70999999999999</text:p>
          </table:table-cell>
          <table:table-cell table:style-name="ce1" table:formula="of:=[.H272]+ h*[.F273]" office:value-type="float" office:value="452.002852096141" calcext:value-type="float">
            <text:p>452,0028520961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3]" office:value-type="float" office:value="2.70999999999999" calcext:value-type="float">
            <text:p>2,70999999999999</text:p>
          </table:table-cell>
          <table:table-cell table:style-name="ce1" table:formula="of:=[.H273]" office:value-type="float" office:value="452.002852096141" calcext:value-type="float">
            <text:p>452,002852096141</text:p>
          </table:table-cell>
          <table:table-cell table:style-name="ce1" table:formula="of:=-68 - ([.E274]^2/Ao)" office:value-type="float" office:value="-170.153289151523" calcext:value-type="float">
            <text:p>-170,153289151523</text:p>
          </table:table-cell>
          <table:table-cell table:style-name="ce1" table:formula="of:=[.G273]+h" office:value-type="float" office:value="2.71999999999999" calcext:value-type="float">
            <text:p>2,71999999999999</text:p>
          </table:table-cell>
          <table:table-cell table:style-name="ce1" table:formula="of:=[.H273]+ h*[.F274]" office:value-type="float" office:value="450.301319204625" calcext:value-type="float">
            <text:p>450,3013192046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4]" office:value-type="float" office:value="2.71999999999999" calcext:value-type="float">
            <text:p>2,71999999999999</text:p>
          </table:table-cell>
          <table:table-cell table:style-name="ce1" table:formula="of:=[.H274]" office:value-type="float" office:value="450.301319204625" calcext:value-type="float">
            <text:p>450,301319204625</text:p>
          </table:table-cell>
          <table:table-cell table:style-name="ce1" table:formula="of:=-68 - ([.E275]^2/Ao)" office:value-type="float" office:value="-169.385639038713" calcext:value-type="float">
            <text:p>-169,385639038713</text:p>
          </table:table-cell>
          <table:table-cell table:style-name="ce1" table:formula="of:=[.G274]+h" office:value-type="float" office:value="2.72999999999999" calcext:value-type="float">
            <text:p>2,72999999999999</text:p>
          </table:table-cell>
          <table:table-cell table:style-name="ce1" table:formula="of:=[.H274]+ h*[.F275]" office:value-type="float" office:value="448.607462814238" calcext:value-type="float">
            <text:p>448,6074628142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5]" office:value-type="float" office:value="2.72999999999999" calcext:value-type="float">
            <text:p>2,72999999999999</text:p>
          </table:table-cell>
          <table:table-cell table:style-name="ce1" table:formula="of:=[.H275]" office:value-type="float" office:value="448.607462814238" calcext:value-type="float">
            <text:p>448,607462814238</text:p>
          </table:table-cell>
          <table:table-cell table:style-name="ce1" table:formula="of:=-68 - ([.E276]^2/Ao)" office:value-type="float" office:value="-168.624327846314" calcext:value-type="float">
            <text:p>-168,624327846314</text:p>
          </table:table-cell>
          <table:table-cell table:style-name="ce1" table:formula="of:=[.G275]+h" office:value-type="float" office:value="2.73999999999999" calcext:value-type="float">
            <text:p>2,73999999999999</text:p>
          </table:table-cell>
          <table:table-cell table:style-name="ce1" table:formula="of:=[.H275]+ h*[.F276]" office:value-type="float" office:value="446.921219535775" calcext:value-type="float">
            <text:p>446,9212195357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6]" office:value-type="float" office:value="2.73999999999999" calcext:value-type="float">
            <text:p>2,73999999999999</text:p>
          </table:table-cell>
          <table:table-cell table:style-name="ce1" table:formula="of:=[.H276]" office:value-type="float" office:value="446.921219535775" calcext:value-type="float">
            <text:p>446,921219535775</text:p>
          </table:table-cell>
          <table:table-cell table:style-name="ce1" table:formula="of:=-68 - ([.E277]^2/Ao)" office:value-type="float" office:value="-167.869288235672" calcext:value-type="float">
            <text:p>-167,869288235672</text:p>
          </table:table-cell>
          <table:table-cell table:style-name="ce1" table:formula="of:=[.G276]+h" office:value-type="float" office:value="2.74999999999999" calcext:value-type="float">
            <text:p>2,74999999999999</text:p>
          </table:table-cell>
          <table:table-cell table:style-name="ce1" table:formula="of:=[.H276]+ h*[.F277]" office:value-type="float" office:value="445.242526653418" calcext:value-type="float">
            <text:p>445,2425266534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7]" office:value-type="float" office:value="2.74999999999999" calcext:value-type="float">
            <text:p>2,74999999999999</text:p>
          </table:table-cell>
          <table:table-cell table:style-name="ce1" table:formula="of:=[.H277]" office:value-type="float" office:value="445.242526653418" calcext:value-type="float">
            <text:p>445,242526653418</text:p>
          </table:table-cell>
          <table:table-cell table:style-name="ce1" table:formula="of:=-68 - ([.E278]^2/Ao)" office:value-type="float" office:value="-167.12045377036" calcext:value-type="float">
            <text:p>-167,12045377036</text:p>
          </table:table-cell>
          <table:table-cell table:style-name="ce1" table:formula="of:=[.G277]+h" office:value-type="float" office:value="2.75999999999999" calcext:value-type="float">
            <text:p>2,75999999999999</text:p>
          </table:table-cell>
          <table:table-cell table:style-name="ce1" table:formula="of:=[.H277]+ h*[.F278]" office:value-type="float" office:value="443.571322115715" calcext:value-type="float">
            <text:p>443,5713221157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8]" office:value-type="float" office:value="2.75999999999999" calcext:value-type="float">
            <text:p>2,75999999999999</text:p>
          </table:table-cell>
          <table:table-cell table:style-name="ce1" table:formula="of:=[.H278]" office:value-type="float" office:value="443.571322115715" calcext:value-type="float">
            <text:p>443,571322115715</text:p>
          </table:table-cell>
          <table:table-cell table:style-name="ce1" table:formula="of:=-68 - ([.E279]^2/Ao)" office:value-type="float" office:value="-166.377758901742" calcext:value-type="float">
            <text:p>-166,377758901742</text:p>
          </table:table-cell>
          <table:table-cell table:style-name="ce1" table:formula="of:=[.G278]+h" office:value-type="float" office:value="2.76999999999999" calcext:value-type="float">
            <text:p>2,76999999999999</text:p>
          </table:table-cell>
          <table:table-cell table:style-name="ce1" table:formula="of:=[.H278]+ h*[.F279]" office:value-type="float" office:value="441.907544526697" calcext:value-type="float">
            <text:p>441,9075445266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79]" office:value-type="float" office:value="2.76999999999999" calcext:value-type="float">
            <text:p>2,76999999999999</text:p>
          </table:table-cell>
          <table:table-cell table:style-name="ce1" table:formula="of:=[.H279]" office:value-type="float" office:value="441.907544526697" calcext:value-type="float">
            <text:p>441,907544526697</text:p>
          </table:table-cell>
          <table:table-cell table:style-name="ce1" table:formula="of:=-68 - ([.E280]^2/Ao)" office:value-type="float" office:value="-165.641138954807" calcext:value-type="float">
            <text:p>-165,641138954807</text:p>
          </table:table-cell>
          <table:table-cell table:style-name="ce1" table:formula="of:=[.G279]+h" office:value-type="float" office:value="2.77999999999998" calcext:value-type="float">
            <text:p>2,77999999999998</text:p>
          </table:table-cell>
          <table:table-cell table:style-name="ce1" table:formula="of:=[.H279]+ h*[.F280]" office:value-type="float" office:value="440.251133137149" calcext:value-type="float">
            <text:p>440,2511331371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0]" office:value-type="float" office:value="2.77999999999998" calcext:value-type="float">
            <text:p>2,77999999999998</text:p>
          </table:table-cell>
          <table:table-cell table:style-name="ce1" table:formula="of:=[.H280]" office:value-type="float" office:value="440.251133137149" calcext:value-type="float">
            <text:p>440,251133137149</text:p>
          </table:table-cell>
          <table:table-cell table:style-name="ce1" table:formula="of:=-68 - ([.E281]^2/Ao)" office:value-type="float" office:value="-164.910530114272" calcext:value-type="float">
            <text:p>-164,910530114272</text:p>
          </table:table-cell>
          <table:table-cell table:style-name="ce1" table:formula="of:=[.G280]+h" office:value-type="float" office:value="2.78999999999998" calcext:value-type="float">
            <text:p>2,78999999999998</text:p>
          </table:table-cell>
          <table:table-cell table:style-name="ce1" table:formula="of:=[.H280]+ h*[.F281]" office:value-type="float" office:value="438.602027836007" calcext:value-type="float">
            <text:p>438,6020278360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1]" office:value-type="float" office:value="2.78999999999998" calcext:value-type="float">
            <text:p>2,78999999999998</text:p>
          </table:table-cell>
          <table:table-cell table:style-name="ce1" table:formula="of:=[.H281]" office:value-type="float" office:value="438.602027836007" calcext:value-type="float">
            <text:p>438,602027836007</text:p>
          </table:table-cell>
          <table:table-cell table:style-name="ce1" table:formula="of:=-68 - ([.E282]^2/Ao)" office:value-type="float" office:value="-164.185869410929" calcext:value-type="float">
            <text:p>-164,185869410929</text:p>
          </table:table-cell>
          <table:table-cell table:style-name="ce1" table:formula="of:=[.G281]+h" office:value-type="float" office:value="2.79999999999998" calcext:value-type="float">
            <text:p>2,79999999999998</text:p>
          </table:table-cell>
          <table:table-cell table:style-name="ce1" table:formula="of:=[.H281]+ h*[.F282]" office:value-type="float" office:value="436.960169141897" calcext:value-type="float">
            <text:p>436,9601691418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2]" office:value-type="float" office:value="2.79999999999998" calcext:value-type="float">
            <text:p>2,79999999999998</text:p>
          </table:table-cell>
          <table:table-cell table:style-name="ce1" table:formula="of:=[.H282]" office:value-type="float" office:value="436.960169141897" calcext:value-type="float">
            <text:p>436,960169141897</text:p>
          </table:table-cell>
          <table:table-cell table:style-name="ce1" table:formula="of:=-68 - ([.E283]^2/Ao)" office:value-type="float" office:value="-163.467094708258" calcext:value-type="float">
            <text:p>-163,467094708258</text:p>
          </table:table-cell>
          <table:table-cell table:style-name="ce1" table:formula="of:=[.G282]+h" office:value-type="float" office:value="2.80999999999998" calcext:value-type="float">
            <text:p>2,80999999999998</text:p>
          </table:table-cell>
          <table:table-cell table:style-name="ce1" table:formula="of:=[.H282]+ h*[.F283]" office:value-type="float" office:value="435.325498194815" calcext:value-type="float">
            <text:p>435,3254981948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3]" office:value-type="float" office:value="2.80999999999998" calcext:value-type="float">
            <text:p>2,80999999999998</text:p>
          </table:table-cell>
          <table:table-cell table:style-name="ce1" table:formula="of:=[.H283]" office:value-type="float" office:value="435.325498194815" calcext:value-type="float">
            <text:p>435,325498194815</text:p>
          </table:table-cell>
          <table:table-cell table:style-name="ce1" table:formula="of:=-68 - ([.E284]^2/Ao)" office:value-type="float" office:value="-162.754144689282" calcext:value-type="float">
            <text:p>-162,754144689282</text:p>
          </table:table-cell>
          <table:table-cell table:style-name="ce1" table:formula="of:=[.G283]+h" office:value-type="float" office:value="2.81999999999998" calcext:value-type="float">
            <text:p>2,81999999999998</text:p>
          </table:table-cell>
          <table:table-cell table:style-name="ce1" table:formula="of:=[.H283]+ h*[.F284]" office:value-type="float" office:value="433.697956747922" calcext:value-type="float">
            <text:p>433,6979567479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4]" office:value-type="float" office:value="2.81999999999998" calcext:value-type="float">
            <text:p>2,81999999999998</text:p>
          </table:table-cell>
          <table:table-cell table:style-name="ce1" table:formula="of:=[.H284]" office:value-type="float" office:value="433.697956747922" calcext:value-type="float">
            <text:p>433,697956747922</text:p>
          </table:table-cell>
          <table:table-cell table:style-name="ce1" table:formula="of:=-68 - ([.E285]^2/Ao)" office:value-type="float" office:value="-162.046958843661" calcext:value-type="float">
            <text:p>-162,046958843661</text:p>
          </table:table-cell>
          <table:table-cell table:style-name="ce1" table:formula="of:=[.G284]+h" office:value-type="float" office:value="2.82999999999998" calcext:value-type="float">
            <text:p>2,82999999999998</text:p>
          </table:table-cell>
          <table:table-cell table:style-name="ce1" table:formula="of:=[.H284]+ h*[.F285]" office:value-type="float" office:value="432.077487159485" calcext:value-type="float">
            <text:p>432,0774871594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5]" office:value-type="float" office:value="2.82999999999998" calcext:value-type="float">
            <text:p>2,82999999999998</text:p>
          </table:table-cell>
          <table:table-cell table:style-name="ce1" table:formula="of:=[.H285]" office:value-type="float" office:value="432.077487159485" calcext:value-type="float">
            <text:p>432,077487159485</text:p>
          </table:table-cell>
          <table:table-cell table:style-name="ce1" table:formula="of:=-68 - ([.E286]^2/Ao)" office:value-type="float" office:value="-161.345477455028" calcext:value-type="float">
            <text:p>-161,345477455028</text:p>
          </table:table-cell>
          <table:table-cell table:style-name="ce1" table:formula="of:=[.G285]+h" office:value-type="float" office:value="2.83999999999998" calcext:value-type="float">
            <text:p>2,83999999999998</text:p>
          </table:table-cell>
          <table:table-cell table:style-name="ce1" table:formula="of:=[.H285]+ h*[.F286]" office:value-type="float" office:value="430.464032384935" calcext:value-type="float">
            <text:p>430,4640323849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6]" office:value-type="float" office:value="2.83999999999998" calcext:value-type="float">
            <text:p>2,83999999999998</text:p>
          </table:table-cell>
          <table:table-cell table:style-name="ce1" table:formula="of:=[.H286]" office:value-type="float" office:value="430.464032384935" calcext:value-type="float">
            <text:p>430,464032384935</text:p>
          </table:table-cell>
          <table:table-cell table:style-name="ce1" table:formula="of:=-68 - ([.E287]^2/Ao)" office:value-type="float" office:value="-160.649641588549" calcext:value-type="float">
            <text:p>-160,649641588549</text:p>
          </table:table-cell>
          <table:table-cell table:style-name="ce1" table:formula="of:=[.G286]+h" office:value-type="float" office:value="2.84999999999998" calcext:value-type="float">
            <text:p>2,84999999999998</text:p>
          </table:table-cell>
          <table:table-cell table:style-name="ce1" table:formula="of:=[.H286]+ h*[.F287]" office:value-type="float" office:value="428.85753596905" calcext:value-type="float">
            <text:p>428,857535969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7]" office:value-type="float" office:value="2.84999999999998" calcext:value-type="float">
            <text:p>2,84999999999998</text:p>
          </table:table-cell>
          <table:table-cell table:style-name="ce1" table:formula="of:=[.H287]" office:value-type="float" office:value="428.85753596905" calcext:value-type="float">
            <text:p>428,85753596905</text:p>
          </table:table-cell>
          <table:table-cell table:style-name="ce1" table:formula="of:=-68 - ([.E288]^2/Ao)" office:value-type="float" office:value="-159.959393078722" calcext:value-type="float">
            <text:p>-159,959393078722</text:p>
          </table:table-cell>
          <table:table-cell table:style-name="ce1" table:formula="of:=[.G287]+h" office:value-type="float" office:value="2.85999999999998" calcext:value-type="float">
            <text:p>2,85999999999998</text:p>
          </table:table-cell>
          <table:table-cell table:style-name="ce1" table:formula="of:=[.H287]+ h*[.F288]" office:value-type="float" office:value="427.257942038262" calcext:value-type="float">
            <text:p>427,2579420382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8]" office:value-type="float" office:value="2.85999999999998" calcext:value-type="float">
            <text:p>2,85999999999998</text:p>
          </table:table-cell>
          <table:table-cell table:style-name="ce1" table:formula="of:=[.H288]" office:value-type="float" office:value="427.257942038262" calcext:value-type="float">
            <text:p>427,257942038262</text:p>
          </table:table-cell>
          <table:table-cell table:style-name="ce1" table:formula="of:=-68 - ([.E289]^2/Ao)" office:value-type="float" office:value="-159.274674517386" calcext:value-type="float">
            <text:p>-159,274674517386</text:p>
          </table:table-cell>
          <table:table-cell table:style-name="ce1" table:formula="of:=[.G288]+h" office:value-type="float" office:value="2.86999999999998" calcext:value-type="float">
            <text:p>2,86999999999998</text:p>
          </table:table-cell>
          <table:table-cell table:style-name="ce1" table:formula="of:=[.H288]+ h*[.F289]" office:value-type="float" office:value="425.665195293088" calcext:value-type="float">
            <text:p>425,6651952930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89]" office:value-type="float" office:value="2.86999999999998" calcext:value-type="float">
            <text:p>2,86999999999998</text:p>
          </table:table-cell>
          <table:table-cell table:style-name="ce1" table:formula="of:=[.H289]" office:value-type="float" office:value="425.665195293088" calcext:value-type="float">
            <text:p>425,665195293088</text:p>
          </table:table-cell>
          <table:table-cell table:style-name="ce1" table:formula="of:=-68 - ([.E290]^2/Ao)" office:value-type="float" office:value="-158.595429241952" calcext:value-type="float">
            <text:p>-158,595429241952</text:p>
          </table:table-cell>
          <table:table-cell table:style-name="ce1" table:formula="of:=[.G289]+h" office:value-type="float" office:value="2.87999999999998" calcext:value-type="float">
            <text:p>2,87999999999998</text:p>
          </table:table-cell>
          <table:table-cell table:style-name="ce1" table:formula="of:=[.H289]+ h*[.F290]" office:value-type="float" office:value="424.079241000669" calcext:value-type="float">
            <text:p>424,0792410006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0]" office:value-type="float" office:value="2.87999999999998" calcext:value-type="float">
            <text:p>2,87999999999998</text:p>
          </table:table-cell>
          <table:table-cell table:style-name="ce1" table:formula="of:=[.H290]" office:value-type="float" office:value="424.079241000669" calcext:value-type="float">
            <text:p>424,079241000669</text:p>
          </table:table-cell>
          <table:table-cell table:style-name="ce1" table:formula="of:=-68 - ([.E291]^2/Ao)" office:value-type="float" office:value="-157.921601323852" calcext:value-type="float">
            <text:p>-157,921601323852</text:p>
          </table:table-cell>
          <table:table-cell table:style-name="ce1" table:formula="of:=[.G290]+h" office:value-type="float" office:value="2.88999999999998" calcext:value-type="float">
            <text:p>2,88999999999998</text:p>
          </table:table-cell>
          <table:table-cell table:style-name="ce1" table:formula="of:=[.H290]+ h*[.F291]" office:value-type="float" office:value="422.50002498743" calcext:value-type="float">
            <text:p>422,500024987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1]" office:value-type="float" office:value="2.88999999999998" calcext:value-type="float">
            <text:p>2,88999999999998</text:p>
          </table:table-cell>
          <table:table-cell table:style-name="ce1" table:formula="of:=[.H291]" office:value-type="float" office:value="422.50002498743" calcext:value-type="float">
            <text:p>422,50002498743</text:p>
          </table:table-cell>
          <table:table-cell table:style-name="ce1" table:formula="of:=-68 - ([.E292]^2/Ao)" office:value-type="float" office:value="-157.25313555719" calcext:value-type="float">
            <text:p>-157,25313555719</text:p>
          </table:table-cell>
          <table:table-cell table:style-name="ce1" table:formula="of:=[.G291]+h" office:value-type="float" office:value="2.89999999999998" calcext:value-type="float">
            <text:p>2,89999999999998</text:p>
          </table:table-cell>
          <table:table-cell table:style-name="ce1" table:formula="of:=[.H291]+ h*[.F292]" office:value-type="float" office:value="420.927493631859" calcext:value-type="float">
            <text:p>420,9274936318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2]" office:value-type="float" office:value="2.89999999999998" calcext:value-type="float">
            <text:p>2,89999999999998</text:p>
          </table:table-cell>
          <table:table-cell table:style-name="ce1" table:formula="of:=[.H292]" office:value-type="float" office:value="420.927493631859" calcext:value-type="float">
            <text:p>420,927493631859</text:p>
          </table:table-cell>
          <table:table-cell table:style-name="ce1" table:formula="of:=-68 - ([.E293]^2/Ao)" office:value-type="float" office:value="-156.589977447599" calcext:value-type="float">
            <text:p>-156,589977447599</text:p>
          </table:table-cell>
          <table:table-cell table:style-name="ce1" table:formula="of:=[.G292]+h" office:value-type="float" office:value="2.90999999999998" calcext:value-type="float">
            <text:p>2,90999999999998</text:p>
          </table:table-cell>
          <table:table-cell table:style-name="ce1" table:formula="of:=[.H292]+ h*[.F293]" office:value-type="float" office:value="419.361593857383" calcext:value-type="float">
            <text:p>419,3615938573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3]" office:value-type="float" office:value="2.90999999999998" calcext:value-type="float">
            <text:p>2,90999999999998</text:p>
          </table:table-cell>
          <table:table-cell table:style-name="ce1" table:formula="of:=[.H293]" office:value-type="float" office:value="419.361593857383" calcext:value-type="float">
            <text:p>419,361593857383</text:p>
          </table:table-cell>
          <table:table-cell table:style-name="ce1" table:formula="of:=-68 - ([.E294]^2/Ao)" office:value-type="float" office:value="-155.932073201302" calcext:value-type="float">
            <text:p>-155,932073201302</text:p>
          </table:table-cell>
          <table:table-cell table:style-name="ce1" table:formula="of:=[.G293]+h" office:value-type="float" office:value="2.91999999999998" calcext:value-type="float">
            <text:p>2,91999999999998</text:p>
          </table:table-cell>
          <table:table-cell table:style-name="ce1" table:formula="of:=[.H293]+ h*[.F294]" office:value-type="float" office:value="417.80227312537" calcext:value-type="float">
            <text:p>417,802273125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4]" office:value-type="float" office:value="2.91999999999998" calcext:value-type="float">
            <text:p>2,91999999999998</text:p>
          </table:table-cell>
          <table:table-cell table:style-name="ce1" table:formula="of:=[.H294]" office:value-type="float" office:value="417.80227312537" calcext:value-type="float">
            <text:p>417,80227312537</text:p>
          </table:table-cell>
          <table:table-cell table:style-name="ce1" table:formula="of:=-68 - ([.E295]^2/Ao)" office:value-type="float" office:value="-155.279369714363" calcext:value-type="float">
            <text:p>-155,279369714363</text:p>
          </table:table-cell>
          <table:table-cell table:style-name="ce1" table:formula="of:=[.G294]+h" office:value-type="float" office:value="2.92999999999998" calcext:value-type="float">
            <text:p>2,92999999999998</text:p>
          </table:table-cell>
          <table:table-cell table:style-name="ce1" table:formula="of:=[.H294]+ h*[.F295]" office:value-type="float" office:value="416.249479428226" calcext:value-type="float">
            <text:p>416,2494794282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5]" office:value-type="float" office:value="2.92999999999998" calcext:value-type="float">
            <text:p>2,92999999999998</text:p>
          </table:table-cell>
          <table:table-cell table:style-name="ce1" table:formula="of:=[.H295]" office:value-type="float" office:value="416.249479428226" calcext:value-type="float">
            <text:p>416,249479428226</text:p>
          </table:table-cell>
          <table:table-cell table:style-name="ce1" table:formula="of:=-68 - ([.E296]^2/Ao)" office:value-type="float" office:value="-154.631814562135" calcext:value-type="float">
            <text:p>-154,631814562135</text:p>
          </table:table-cell>
          <table:table-cell table:style-name="ce1" table:formula="of:=[.G295]+h" office:value-type="float" office:value="2.93999999999998" calcext:value-type="float">
            <text:p>2,93999999999998</text:p>
          </table:table-cell>
          <table:table-cell table:style-name="ce1" table:formula="of:=[.H295]+ h*[.F296]" office:value-type="float" office:value="414.703161282605" calcext:value-type="float">
            <text:p>414,7031612826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6]" office:value-type="float" office:value="2.93999999999998" calcext:value-type="float">
            <text:p>2,93999999999998</text:p>
          </table:table-cell>
          <table:table-cell table:style-name="ce1" table:formula="of:=[.H296]" office:value-type="float" office:value="414.703161282605" calcext:value-type="float">
            <text:p>414,703161282605</text:p>
          </table:table-cell>
          <table:table-cell table:style-name="ce1" table:formula="of:=-68 - ([.E297]^2/Ao)" office:value-type="float" office:value="-153.989355988893" calcext:value-type="float">
            <text:p>-153,989355988893</text:p>
          </table:table-cell>
          <table:table-cell table:style-name="ce1" table:formula="of:=[.G296]+h" office:value-type="float" office:value="2.94999999999998" calcext:value-type="float">
            <text:p>2,94999999999998</text:p>
          </table:table-cell>
          <table:table-cell table:style-name="ce1" table:formula="of:=[.H296]+ h*[.F297]" office:value-type="float" office:value="413.163267722716" calcext:value-type="float">
            <text:p>413,1632677227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7]" office:value-type="float" office:value="2.94999999999998" calcext:value-type="float">
            <text:p>2,94999999999998</text:p>
          </table:table-cell>
          <table:table-cell table:style-name="ce1" table:formula="of:=[.H297]" office:value-type="float" office:value="413.163267722716" calcext:value-type="float">
            <text:p>413,163267722716</text:p>
          </table:table-cell>
          <table:table-cell table:style-name="ce1" table:formula="of:=-68 - ([.E298]^2/Ao)" office:value-type="float" office:value="-153.351942897656" calcext:value-type="float">
            <text:p>-153,351942897656</text:p>
          </table:table-cell>
          <table:table-cell table:style-name="ce1" table:formula="of:=[.G297]+h" office:value-type="float" office:value="2.95999999999998" calcext:value-type="float">
            <text:p>2,95999999999998</text:p>
          </table:table-cell>
          <table:table-cell table:style-name="ce1" table:formula="of:=[.H297]+ h*[.F298]" office:value-type="float" office:value="411.629748293739" calcext:value-type="float">
            <text:p>411,6297482937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8]" office:value-type="float" office:value="2.95999999999998" calcext:value-type="float">
            <text:p>2,95999999999998</text:p>
          </table:table-cell>
          <table:table-cell table:style-name="ce1" table:formula="of:=[.H298]" office:value-type="float" office:value="411.629748293739" calcext:value-type="float">
            <text:p>411,629748293739</text:p>
          </table:table-cell>
          <table:table-cell table:style-name="ce1" table:formula="of:=-68 - ([.E299]^2/Ao)" office:value-type="float" office:value="-152.719524840183" calcext:value-type="float">
            <text:p>-152,719524840183</text:p>
          </table:table-cell>
          <table:table-cell table:style-name="ce1" table:formula="of:=[.G298]+h" office:value-type="float" office:value="2.96999999999998" calcext:value-type="float">
            <text:p>2,96999999999998</text:p>
          </table:table-cell>
          <table:table-cell table:style-name="ce1" table:formula="of:=[.H298]+ h*[.F299]" office:value-type="float" office:value="410.102553045337" calcext:value-type="float">
            <text:p>410,1025530453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299]" office:value-type="float" office:value="2.96999999999998" calcext:value-type="float">
            <text:p>2,96999999999998</text:p>
          </table:table-cell>
          <table:table-cell table:style-name="ce1" table:formula="of:=[.H299]" office:value-type="float" office:value="410.102553045337" calcext:value-type="float">
            <text:p>410,102553045337</text:p>
          </table:table-cell>
          <table:table-cell table:style-name="ce1" table:formula="of:=-68 - ([.E300]^2/Ao)" office:value-type="float" office:value="-152.092052007152" calcext:value-type="float">
            <text:p>-152,092052007152</text:p>
          </table:table-cell>
          <table:table-cell table:style-name="ce1" table:formula="of:=[.G299]+h" office:value-type="float" office:value="2.97999999999998" calcext:value-type="float">
            <text:p>2,97999999999998</text:p>
          </table:table-cell>
          <table:table-cell table:style-name="ce1" table:formula="of:=[.H299]+ h*[.F300]" office:value-type="float" office:value="408.581632525266" calcext:value-type="float">
            <text:p>408,5816325252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0]" office:value-type="float" office:value="2.97999999999998" calcext:value-type="float">
            <text:p>2,97999999999998</text:p>
          </table:table-cell>
          <table:table-cell table:style-name="ce1" table:formula="of:=[.H300]" office:value-type="float" office:value="408.581632525266" calcext:value-type="float">
            <text:p>408,581632525266</text:p>
          </table:table-cell>
          <table:table-cell table:style-name="ce1" table:formula="of:=-68 - ([.E301]^2/Ao)" office:value-type="float" office:value="-151.469475218506" calcext:value-type="float">
            <text:p>-151,469475218506</text:p>
          </table:table-cell>
          <table:table-cell table:style-name="ce1" table:formula="of:=[.G300]+h" office:value-type="float" office:value="2.98999999999998" calcext:value-type="float">
            <text:p>2,98999999999998</text:p>
          </table:table-cell>
          <table:table-cell table:style-name="ce1" table:formula="of:=[.H300]+ h*[.F301]" office:value-type="float" office:value="407.066937773081" calcext:value-type="float">
            <text:p>407,0669377730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1]" office:value-type="float" office:value="2.98999999999998" calcext:value-type="float">
            <text:p>2,98999999999998</text:p>
          </table:table-cell>
          <table:table-cell table:style-name="ce1" table:formula="of:=[.H301]" office:value-type="float" office:value="407.066937773081" calcext:value-type="float">
            <text:p>407,066937773081</text:p>
          </table:table-cell>
          <table:table-cell table:style-name="ce1" table:formula="of:=-68 - ([.E302]^2/Ao)" office:value-type="float" office:value="-150.851745913977" calcext:value-type="float">
            <text:p>-150,851745913977</text:p>
          </table:table-cell>
          <table:table-cell table:style-name="ce1" table:formula="of:=[.G301]+h" office:value-type="float" office:value="2.99999999999998" calcext:value-type="float">
            <text:p>2,99999999999998</text:p>
          </table:table-cell>
          <table:table-cell table:style-name="ce1" table:formula="of:=[.H301]+ h*[.F302]" office:value-type="float" office:value="405.558420313941" calcext:value-type="float">
            <text:p>405,5584203139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2]" office:value-type="float" office:value="2.99999999999998" calcext:value-type="float">
            <text:p>2,99999999999998</text:p>
          </table:table-cell>
          <table:table-cell table:style-name="ce1" table:formula="of:=[.H302]" office:value-type="float" office:value="405.558420313941" calcext:value-type="float">
            <text:p>405,558420313941</text:p>
          </table:table-cell>
          <table:table-cell table:style-name="ce1" table:formula="of:=-68 - ([.E303]^2/Ao)" office:value-type="float" office:value="-150.23881614377" calcext:value-type="float">
            <text:p>-150,23881614377</text:p>
          </table:table-cell>
          <table:table-cell table:style-name="ce1" table:formula="of:=[.G302]+h" office:value-type="float" office:value="3.00999999999998" calcext:value-type="float">
            <text:p>3,00999999999998</text:p>
          </table:table-cell>
          <table:table-cell table:style-name="ce1" table:formula="of:=[.H302]+ h*[.F303]" office:value-type="float" office:value="404.056032152503" calcext:value-type="float">
            <text:p>404,0560321525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3]" office:value-type="float" office:value="3.00999999999998" calcext:value-type="float">
            <text:p>3,00999999999998</text:p>
          </table:table-cell>
          <table:table-cell table:style-name="ce1" table:formula="of:=[.H303]" office:value-type="float" office:value="404.056032152503" calcext:value-type="float">
            <text:p>404,056032152503</text:p>
          </table:table-cell>
          <table:table-cell table:style-name="ce1" table:formula="of:=-68 - ([.E304]^2/Ao)" office:value-type="float" office:value="-149.630638559412" calcext:value-type="float">
            <text:p>-149,630638559412</text:p>
          </table:table-cell>
          <table:table-cell table:style-name="ce1" table:formula="of:=[.G303]+h" office:value-type="float" office:value="3.01999999999998" calcext:value-type="float">
            <text:p>3,01999999999998</text:p>
          </table:table-cell>
          <table:table-cell table:style-name="ce1" table:formula="of:=[.H303]+ h*[.F304]" office:value-type="float" office:value="402.559725766909" calcext:value-type="float">
            <text:p>402,5597257669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4]" office:value-type="float" office:value="3.01999999999998" calcext:value-type="float">
            <text:p>3,01999999999998</text:p>
          </table:table-cell>
          <table:table-cell table:style-name="ce1" table:formula="of:=[.H304]" office:value-type="float" office:value="402.559725766909" calcext:value-type="float">
            <text:p>402,559725766909</text:p>
          </table:table-cell>
          <table:table-cell table:style-name="ce1" table:formula="of:=-68 - ([.E305]^2/Ao)" office:value-type="float" office:value="-149.027166404765" calcext:value-type="float">
            <text:p>-149,027166404765</text:p>
          </table:table-cell>
          <table:table-cell table:style-name="ce1" table:formula="of:=[.G304]+h" office:value-type="float" office:value="3.02999999999998" calcext:value-type="float">
            <text:p>3,02999999999998</text:p>
          </table:table-cell>
          <table:table-cell table:style-name="ce1" table:formula="of:=[.H304]+ h*[.F305]" office:value-type="float" office:value="401.069454102861" calcext:value-type="float">
            <text:p>401,0694541028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5]" office:value-type="float" office:value="3.02999999999998" calcext:value-type="float">
            <text:p>3,02999999999998</text:p>
          </table:table-cell>
          <table:table-cell table:style-name="ce1" table:formula="of:=[.H305]" office:value-type="float" office:value="401.069454102861" calcext:value-type="float">
            <text:p>401,069454102861</text:p>
          </table:table-cell>
          <table:table-cell table:style-name="ce1" table:formula="of:=-68 - ([.E306]^2/Ao)" office:value-type="float" office:value="-148.428353507184" calcext:value-type="float">
            <text:p>-148,428353507184</text:p>
          </table:table-cell>
          <table:table-cell table:style-name="ce1" table:formula="of:=[.G305]+h" office:value-type="float" office:value="3.03999999999998" calcext:value-type="float">
            <text:p>3,03999999999998</text:p>
          </table:table-cell>
          <table:table-cell table:style-name="ce1" table:formula="of:=[.H305]+ h*[.F306]" office:value-type="float" office:value="399.58517056779" calcext:value-type="float">
            <text:p>399,585170567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6]" office:value-type="float" office:value="3.03999999999998" calcext:value-type="float">
            <text:p>3,03999999999998</text:p>
          </table:table-cell>
          <table:table-cell table:style-name="ce1" table:formula="of:=[.H306]" office:value-type="float" office:value="399.58517056779" calcext:value-type="float">
            <text:p>399,58517056779</text:p>
          </table:table-cell>
          <table:table-cell table:style-name="ce1" table:formula="of:=-68 - ([.E307]^2/Ao)" office:value-type="float" office:value="-147.834154268845" calcext:value-type="float">
            <text:p>-147,834154268845</text:p>
          </table:table-cell>
          <table:table-cell table:style-name="ce1" table:formula="of:=[.G306]+h" office:value-type="float" office:value="3.04999999999998" calcext:value-type="float">
            <text:p>3,04999999999998</text:p>
          </table:table-cell>
          <table:table-cell table:style-name="ce1" table:formula="of:=[.H306]+ h*[.F307]" office:value-type="float" office:value="398.106829025101" calcext:value-type="float">
            <text:p>398,1068290251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7]" office:value-type="float" office:value="3.04999999999998" calcext:value-type="float">
            <text:p>3,04999999999998</text:p>
          </table:table-cell>
          <table:table-cell table:style-name="ce1" table:formula="of:=[.H307]" office:value-type="float" office:value="398.106829025101" calcext:value-type="float">
            <text:p>398,106829025101</text:p>
          </table:table-cell>
          <table:table-cell table:style-name="ce1" table:formula="of:=-68 - ([.E308]^2/Ao)" office:value-type="float" office:value="-147.244523658211" calcext:value-type="float">
            <text:p>-147,244523658211</text:p>
          </table:table-cell>
          <table:table-cell table:style-name="ce1" table:formula="of:=[.G307]+h" office:value-type="float" office:value="3.05999999999998" calcext:value-type="float">
            <text:p>3,05999999999998</text:p>
          </table:table-cell>
          <table:table-cell table:style-name="ce1" table:formula="of:=[.H307]+ h*[.F308]" office:value-type="float" office:value="396.634383788519" calcext:value-type="float">
            <text:p>396,6343837885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8]" office:value-type="float" office:value="3.05999999999998" calcext:value-type="float">
            <text:p>3,05999999999998</text:p>
          </table:table-cell>
          <table:table-cell table:style-name="ce1" table:formula="of:=[.H308]" office:value-type="float" office:value="396.634383788519" calcext:value-type="float">
            <text:p>396,634383788519</text:p>
          </table:table-cell>
          <table:table-cell table:style-name="ce1" table:formula="of:=-68 - ([.E309]^2/Ao)" office:value-type="float" office:value="-146.659417201649" calcext:value-type="float">
            <text:p>-146,659417201649</text:p>
          </table:table-cell>
          <table:table-cell table:style-name="ce1" table:formula="of:=[.G308]+h" office:value-type="float" office:value="3.06999999999998" calcext:value-type="float">
            <text:p>3,06999999999998</text:p>
          </table:table-cell>
          <table:table-cell table:style-name="ce1" table:formula="of:=[.H308]+ h*[.F309]" office:value-type="float" office:value="395.167789616503" calcext:value-type="float">
            <text:p>395,1677896165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09]" office:value-type="float" office:value="3.06999999999998" calcext:value-type="float">
            <text:p>3,06999999999998</text:p>
          </table:table-cell>
          <table:table-cell table:style-name="ce1" table:formula="of:=[.H309]" office:value-type="float" office:value="395.167789616503" calcext:value-type="float">
            <text:p>395,167789616503</text:p>
          </table:table-cell>
          <table:table-cell table:style-name="ce1" table:formula="of:=-68 - ([.E310]^2/Ao)" office:value-type="float" office:value="-146.078790975196" calcext:value-type="float">
            <text:p>-146,078790975196</text:p>
          </table:table-cell>
          <table:table-cell table:style-name="ce1" table:formula="of:=[.G309]+h" office:value-type="float" office:value="3.07999999999998" calcext:value-type="float">
            <text:p>3,07999999999998</text:p>
          </table:table-cell>
          <table:table-cell table:style-name="ce1" table:formula="of:=[.H309]+ h*[.F310]" office:value-type="float" office:value="393.707001706751" calcext:value-type="float">
            <text:p>393,7070017067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0]" office:value-type="float" office:value="3.07999999999998" calcext:value-type="float">
            <text:p>3,07999999999998</text:p>
          </table:table-cell>
          <table:table-cell table:style-name="ce1" table:formula="of:=[.H310]" office:value-type="float" office:value="393.707001706751" calcext:value-type="float">
            <text:p>393,707001706751</text:p>
          </table:table-cell>
          <table:table-cell table:style-name="ce1" table:formula="of:=-68 - ([.E311]^2/Ao)" office:value-type="float" office:value="-145.50260159646" calcext:value-type="float">
            <text:p>-145,50260159646</text:p>
          </table:table-cell>
          <table:table-cell table:style-name="ce1" table:formula="of:=[.G310]+h" office:value-type="float" office:value="3.08999999999998" calcext:value-type="float">
            <text:p>3,08999999999998</text:p>
          </table:table-cell>
          <table:table-cell table:style-name="ce1" table:formula="of:=[.H310]+ h*[.F311]" office:value-type="float" office:value="392.251975690786" calcext:value-type="float">
            <text:p>392,2519756907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1]" office:value-type="float" office:value="3.08999999999998" calcext:value-type="float">
            <text:p>3,08999999999998</text:p>
          </table:table-cell>
          <table:table-cell table:style-name="ce1" table:formula="of:=[.H311]" office:value-type="float" office:value="392.251975690786" calcext:value-type="float">
            <text:p>392,251975690786</text:p>
          </table:table-cell>
          <table:table-cell table:style-name="ce1" table:formula="of:=-68 - ([.E312]^2/Ao)" office:value-type="float" office:value="-144.930806216663" calcext:value-type="float">
            <text:p>-144,930806216663</text:p>
          </table:table-cell>
          <table:table-cell table:style-name="ce1" table:formula="of:=[.G311]+h" office:value-type="float" office:value="3.09999999999998" calcext:value-type="float">
            <text:p>3,09999999999998</text:p>
          </table:table-cell>
          <table:table-cell table:style-name="ce1" table:formula="of:=[.H311]+ h*[.F312]" office:value-type="float" office:value="390.802667628619" calcext:value-type="float">
            <text:p>390,8026676286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2]" office:value-type="float" office:value="3.09999999999998" calcext:value-type="float">
            <text:p>3,09999999999998</text:p>
          </table:table-cell>
          <table:table-cell table:style-name="ce1" table:formula="of:=[.H312]" office:value-type="float" office:value="390.802667628619" calcext:value-type="float">
            <text:p>390,802667628619</text:p>
          </table:table-cell>
          <table:table-cell table:style-name="ce1" table:formula="of:=-68 - ([.E313]^2/Ao)" office:value-type="float" office:value="-144.363362512823" calcext:value-type="float">
            <text:p>-144,363362512823</text:p>
          </table:table-cell>
          <table:table-cell table:style-name="ce1" table:formula="of:=[.G312]+h" office:value-type="float" office:value="3.10999999999998" calcext:value-type="float">
            <text:p>3,10999999999998</text:p>
          </table:table-cell>
          <table:table-cell table:style-name="ce1" table:formula="of:=[.H312]+ h*[.F313]" office:value-type="float" office:value="389.359034003491" calcext:value-type="float">
            <text:p>389,3590340034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3]" office:value-type="float" office:value="3.10999999999998" calcext:value-type="float">
            <text:p>3,10999999999998</text:p>
          </table:table-cell>
          <table:table-cell table:style-name="ce1" table:formula="of:=[.H313]" office:value-type="float" office:value="389.359034003491" calcext:value-type="float">
            <text:p>389,359034003491</text:p>
          </table:table-cell>
          <table:table-cell table:style-name="ce1" table:formula="of:=-68 - ([.E314]^2/Ao)" office:value-type="float" office:value="-143.800228680066" calcext:value-type="float">
            <text:p>-143,800228680066</text:p>
          </table:table-cell>
          <table:table-cell table:style-name="ce1" table:formula="of:=[.G313]+h" office:value-type="float" office:value="3.11999999999998" calcext:value-type="float">
            <text:p>3,11999999999998</text:p>
          </table:table-cell>
          <table:table-cell table:style-name="ce1" table:formula="of:=[.H313]+ h*[.F314]" office:value-type="float" office:value="387.921031716691" calcext:value-type="float">
            <text:p>387,9210317166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4]" office:value-type="float" office:value="3.11999999999998" calcext:value-type="float">
            <text:p>3,11999999999998</text:p>
          </table:table-cell>
          <table:table-cell table:style-name="ce1" table:formula="of:=[.H314]" office:value-type="float" office:value="387.921031716691" calcext:value-type="float">
            <text:p>387,921031716691</text:p>
          </table:table-cell>
          <table:table-cell table:style-name="ce1" table:formula="of:=-68 - ([.E315]^2/Ao)" office:value-type="float" office:value="-143.241363424071" calcext:value-type="float">
            <text:p>-143,241363424071</text:p>
          </table:table-cell>
          <table:table-cell table:style-name="ce1" table:formula="of:=[.G314]+h" office:value-type="float" office:value="3.12999999999998" calcext:value-type="float">
            <text:p>3,12999999999998</text:p>
          </table:table-cell>
          <table:table-cell table:style-name="ce1" table:formula="of:=[.H314]+ h*[.F315]" office:value-type="float" office:value="386.48861808245" calcext:value-type="float">
            <text:p>386,488618082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5]" office:value-type="float" office:value="3.12999999999998" calcext:value-type="float">
            <text:p>3,12999999999998</text:p>
          </table:table-cell>
          <table:table-cell table:style-name="ce1" table:formula="of:=[.H315]" office:value-type="float" office:value="386.48861808245" calcext:value-type="float">
            <text:p>386,48861808245</text:p>
          </table:table-cell>
          <table:table-cell table:style-name="ce1" table:formula="of:=-68 - ([.E316]^2/Ao)" office:value-type="float" office:value="-142.686725953641" calcext:value-type="float">
            <text:p>-142,686725953641</text:p>
          </table:table-cell>
          <table:table-cell table:style-name="ce1" table:formula="of:=[.G315]+h" office:value-type="float" office:value="3.13999999999998" calcext:value-type="float">
            <text:p>3,13999999999998</text:p>
          </table:table-cell>
          <table:table-cell table:style-name="ce1" table:formula="of:=[.H315]+ h*[.F316]" office:value-type="float" office:value="385.061750822913" calcext:value-type="float">
            <text:p>385,0617508229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6]" office:value-type="float" office:value="3.13999999999998" calcext:value-type="float">
            <text:p>3,13999999999998</text:p>
          </table:table-cell>
          <table:table-cell table:style-name="ce1" table:formula="of:=[.H316]" office:value-type="float" office:value="385.061750822913" calcext:value-type="float">
            <text:p>385,061750822913</text:p>
          </table:table-cell>
          <table:table-cell table:style-name="ce1" table:formula="of:=-68 - ([.E317]^2/Ao)" office:value-type="float" office:value="-142.136275973404" calcext:value-type="float">
            <text:p>-142,136275973404</text:p>
          </table:table-cell>
          <table:table-cell table:style-name="ce1" table:formula="of:=[.G316]+h" office:value-type="float" office:value="3.14999999999998" calcext:value-type="float">
            <text:p>3,14999999999998</text:p>
          </table:table-cell>
          <table:table-cell table:style-name="ce1" table:formula="of:=[.H316]+ h*[.F317]" office:value-type="float" office:value="383.640388063179" calcext:value-type="float">
            <text:p>383,6403880631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7]" office:value-type="float" office:value="3.14999999999998" calcext:value-type="float">
            <text:p>3,14999999999998</text:p>
          </table:table-cell>
          <table:table-cell table:style-name="ce1" table:formula="of:=[.H317]" office:value-type="float" office:value="383.640388063179" calcext:value-type="float">
            <text:p>383,640388063179</text:p>
          </table:table-cell>
          <table:table-cell table:style-name="ce1" table:formula="of:=-68 - ([.E318]^2/Ao)" office:value-type="float" office:value="-141.589973676633" calcext:value-type="float">
            <text:p>-141,589973676633</text:p>
          </table:table-cell>
          <table:table-cell table:style-name="ce1" table:formula="of:=[.G317]+h" office:value-type="float" office:value="3.15999999999998" calcext:value-type="float">
            <text:p>3,15999999999998</text:p>
          </table:table-cell>
          <table:table-cell table:style-name="ce1" table:formula="of:=[.H317]+ h*[.F318]" office:value-type="float" office:value="382.224488326413" calcext:value-type="float">
            <text:p>382,2244883264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8]" office:value-type="float" office:value="3.15999999999998" calcext:value-type="float">
            <text:p>3,15999999999998</text:p>
          </table:table-cell>
          <table:table-cell table:style-name="ce1" table:formula="of:=[.H318]" office:value-type="float" office:value="382.224488326413" calcext:value-type="float">
            <text:p>382,224488326413</text:p>
          </table:table-cell>
          <table:table-cell table:style-name="ce1" table:formula="of:=-68 - ([.E319]^2/Ao)" office:value-type="float" office:value="-141.047779738194" calcext:value-type="float">
            <text:p>-141,047779738194</text:p>
          </table:table-cell>
          <table:table-cell table:style-name="ce1" table:formula="of:=[.G318]+h" office:value-type="float" office:value="3.16999999999998" calcext:value-type="float">
            <text:p>3,16999999999998</text:p>
          </table:table-cell>
          <table:table-cell table:style-name="ce1" table:formula="of:=[.H318]+ h*[.F319]" office:value-type="float" office:value="380.814010529031" calcext:value-type="float">
            <text:p>380,8140105290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19]" office:value-type="float" office:value="3.16999999999998" calcext:value-type="float">
            <text:p>3,16999999999998</text:p>
          </table:table-cell>
          <table:table-cell table:style-name="ce1" table:formula="of:=[.H319]" office:value-type="float" office:value="380.814010529031" calcext:value-type="float">
            <text:p>380,814010529031</text:p>
          </table:table-cell>
          <table:table-cell table:style-name="ce1" table:formula="of:=-68 - ([.E320]^2/Ao)" office:value-type="float" office:value="-140.509655307603" calcext:value-type="float">
            <text:p>-140,509655307603</text:p>
          </table:table-cell>
          <table:table-cell table:style-name="ce1" table:formula="of:=[.G319]+h" office:value-type="float" office:value="3.17999999999998" calcext:value-type="float">
            <text:p>3,17999999999998</text:p>
          </table:table-cell>
          <table:table-cell table:style-name="ce1" table:formula="of:=[.H319]+ h*[.F320]" office:value-type="float" office:value="379.408913975955" calcext:value-type="float">
            <text:p>379,4089139759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0]" office:value-type="float" office:value="3.17999999999998" calcext:value-type="float">
            <text:p>3,17999999999998</text:p>
          </table:table-cell>
          <table:table-cell table:style-name="ce1" table:formula="of:=[.H320]" office:value-type="float" office:value="379.408913975955" calcext:value-type="float">
            <text:p>379,408913975955</text:p>
          </table:table-cell>
          <table:table-cell table:style-name="ce1" table:formula="of:=-68 - ([.E321]^2/Ao)" office:value-type="float" office:value="-139.975562002207" calcext:value-type="float">
            <text:p>-139,975562002207</text:p>
          </table:table-cell>
          <table:table-cell table:style-name="ce1" table:formula="of:=[.G320]+h" office:value-type="float" office:value="3.18999999999998" calcext:value-type="float">
            <text:p>3,18999999999998</text:p>
          </table:table-cell>
          <table:table-cell table:style-name="ce1" table:formula="of:=[.H320]+ h*[.F321]" office:value-type="float" office:value="378.009158355933" calcext:value-type="float">
            <text:p>378,0091583559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1]" office:value-type="float" office:value="3.18999999999998" calcext:value-type="float">
            <text:p>3,18999999999998</text:p>
          </table:table-cell>
          <table:table-cell table:style-name="ce1" table:formula="of:=[.H321]" office:value-type="float" office:value="378.009158355933" calcext:value-type="float">
            <text:p>378,009158355933</text:p>
          </table:table-cell>
          <table:table-cell table:style-name="ce1" table:formula="of:=-68 - ([.E322]^2/Ao)" office:value-type="float" office:value="-139.44546190048" calcext:value-type="float">
            <text:p>-139,44546190048</text:p>
          </table:table-cell>
          <table:table-cell table:style-name="ce1" table:formula="of:=[.G321]+h" office:value-type="float" office:value="3.19999999999998" calcext:value-type="float">
            <text:p>3,19999999999998</text:p>
          </table:table-cell>
          <table:table-cell table:style-name="ce1" table:formula="of:=[.H321]+ h*[.F322]" office:value-type="float" office:value="376.614703736928" calcext:value-type="float">
            <text:p>376,6147037369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2]" office:value-type="float" office:value="3.19999999999998" calcext:value-type="float">
            <text:p>3,19999999999998</text:p>
          </table:table-cell>
          <table:table-cell table:style-name="ce1" table:formula="of:=[.H322]" office:value-type="float" office:value="376.614703736928" calcext:value-type="float">
            <text:p>376,614703736928</text:p>
          </table:table-cell>
          <table:table-cell table:style-name="ce1" table:formula="of:=-68 - ([.E323]^2/Ao)" office:value-type="float" office:value="-138.919317535427" calcext:value-type="float">
            <text:p>-138,919317535427</text:p>
          </table:table-cell>
          <table:table-cell table:style-name="ce1" table:formula="of:=[.G322]+h" office:value-type="float" office:value="3.20999999999998" calcext:value-type="float">
            <text:p>3,20999999999998</text:p>
          </table:table-cell>
          <table:table-cell table:style-name="ce1" table:formula="of:=[.H322]+ h*[.F323]" office:value-type="float" office:value="375.225510561574" calcext:value-type="float">
            <text:p>375,2255105615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3]" office:value-type="float" office:value="3.20999999999998" calcext:value-type="float">
            <text:p>3,20999999999998</text:p>
          </table:table-cell>
          <table:table-cell table:style-name="ce1" table:formula="of:=[.H323]" office:value-type="float" office:value="375.225510561574" calcext:value-type="float">
            <text:p>375,225510561574</text:p>
          </table:table-cell>
          <table:table-cell table:style-name="ce1" table:formula="of:=-68 - ([.E324]^2/Ao)" office:value-type="float" office:value="-138.397091888097" calcext:value-type="float">
            <text:p>-138,397091888097</text:p>
          </table:table-cell>
          <table:table-cell table:style-name="ce1" table:formula="of:=[.G323]+h" office:value-type="float" office:value="3.21999999999998" calcext:value-type="float">
            <text:p>3,21999999999998</text:p>
          </table:table-cell>
          <table:table-cell table:style-name="ce1" table:formula="of:=[.H323]+ h*[.F324]" office:value-type="float" office:value="373.841539642693" calcext:value-type="float">
            <text:p>373,8415396426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4]" office:value-type="float" office:value="3.21999999999998" calcext:value-type="float">
            <text:p>3,21999999999998</text:p>
          </table:table-cell>
          <table:table-cell table:style-name="ce1" table:formula="of:=[.H324]" office:value-type="float" office:value="373.841539642693" calcext:value-type="float">
            <text:p>373,841539642693</text:p>
          </table:table-cell>
          <table:table-cell table:style-name="ce1" table:formula="of:=-68 - ([.E325]^2/Ao)" office:value-type="float" office:value="-137.87874838121" calcext:value-type="float">
            <text:p>-137,87874838121</text:p>
          </table:table-cell>
          <table:table-cell table:style-name="ce1" table:formula="of:=[.G324]+h" office:value-type="float" office:value="3.22999999999998" calcext:value-type="float">
            <text:p>3,22999999999998</text:p>
          </table:table-cell>
          <table:table-cell table:style-name="ce1" table:formula="of:=[.H324]+ h*[.F325]" office:value-type="float" office:value="372.462752158881" calcext:value-type="float">
            <text:p>372,4627521588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5]" office:value-type="float" office:value="3.22999999999998" calcext:value-type="float">
            <text:p>3,22999999999998</text:p>
          </table:table-cell>
          <table:table-cell table:style-name="ce1" table:formula="of:=[.H325]" office:value-type="float" office:value="372.462752158881" calcext:value-type="float">
            <text:p>372,462752158881</text:p>
          </table:table-cell>
          <table:table-cell table:style-name="ce1" table:formula="of:=-68 - ([.E326]^2/Ao)" office:value-type="float" office:value="-137.364250872884" calcext:value-type="float">
            <text:p>-137,364250872884</text:p>
          </table:table-cell>
          <table:table-cell table:style-name="ce1" table:formula="of:=[.G325]+h" office:value-type="float" office:value="3.23999999999998" calcext:value-type="float">
            <text:p>3,23999999999998</text:p>
          </table:table-cell>
          <table:table-cell table:style-name="ce1" table:formula="of:=[.H325]+ h*[.F326]" office:value-type="float" office:value="371.089109650152" calcext:value-type="float">
            <text:p>371,0891096501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6]" office:value-type="float" office:value="3.23999999999998" calcext:value-type="float">
            <text:p>3,23999999999998</text:p>
          </table:table-cell>
          <table:table-cell table:style-name="ce1" table:formula="of:=[.H326]" office:value-type="float" office:value="371.089109650152" calcext:value-type="float">
            <text:p>371,089109650152</text:p>
          </table:table-cell>
          <table:table-cell table:style-name="ce1" table:formula="of:=-68 - ([.E327]^2/Ao)" office:value-type="float" office:value="-136.853563650471" calcext:value-type="float">
            <text:p>-136,853563650471</text:p>
          </table:table-cell>
          <table:table-cell table:style-name="ce1" table:formula="of:=[.G326]+h" office:value-type="float" office:value="3.24999999999997" calcext:value-type="float">
            <text:p>3,24999999999997</text:p>
          </table:table-cell>
          <table:table-cell table:style-name="ce1" table:formula="of:=[.H326]+ h*[.F327]" office:value-type="float" office:value="369.720574013647" calcext:value-type="float">
            <text:p>369,7205740136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7]" office:value-type="float" office:value="3.24999999999997" calcext:value-type="float">
            <text:p>3,24999999999997</text:p>
          </table:table-cell>
          <table:table-cell table:style-name="ce1" table:formula="of:=[.H327]" office:value-type="float" office:value="369.720574013647" calcext:value-type="float">
            <text:p>369,720574013647</text:p>
          </table:table-cell>
          <table:table-cell table:style-name="ce1" table:formula="of:=-68 - ([.E328]^2/Ao)" office:value-type="float" office:value="-136.34665142449" calcext:value-type="float">
            <text:p>-136,34665142449</text:p>
          </table:table-cell>
          <table:table-cell table:style-name="ce1" table:formula="of:=[.G327]+h" office:value-type="float" office:value="3.25999999999997" calcext:value-type="float">
            <text:p>3,25999999999997</text:p>
          </table:table-cell>
          <table:table-cell table:style-name="ce1" table:formula="of:=[.H327]+ h*[.F328]" office:value-type="float" office:value="368.357107499402" calcext:value-type="float">
            <text:p>368,3571074994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8]" office:value-type="float" office:value="3.25999999999997" calcext:value-type="float">
            <text:p>3,25999999999997</text:p>
          </table:table-cell>
          <table:table-cell table:style-name="ce1" table:formula="of:=[.H328]" office:value-type="float" office:value="368.357107499402" calcext:value-type="float">
            <text:p>368,357107499402</text:p>
          </table:table-cell>
          <table:table-cell table:style-name="ce1" table:formula="of:=-68 - ([.E329]^2/Ao)" office:value-type="float" office:value="-135.843479322663" calcext:value-type="float">
            <text:p>-135,843479322663</text:p>
          </table:table-cell>
          <table:table-cell table:style-name="ce1" table:formula="of:=[.G328]+h" office:value-type="float" office:value="3.26999999999997" calcext:value-type="float">
            <text:p>3,26999999999997</text:p>
          </table:table-cell>
          <table:table-cell table:style-name="ce1" table:formula="of:=[.H328]+ h*[.F329]" office:value-type="float" office:value="366.998672706176" calcext:value-type="float">
            <text:p>366,9986727061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29]" office:value-type="float" office:value="3.26999999999997" calcext:value-type="float">
            <text:p>3,26999999999997</text:p>
          </table:table-cell>
          <table:table-cell table:style-name="ce1" table:formula="of:=[.H329]" office:value-type="float" office:value="366.998672706176" calcext:value-type="float">
            <text:p>366,998672706176</text:p>
          </table:table-cell>
          <table:table-cell table:style-name="ce1" table:formula="of:=-68 - ([.E330]^2/Ao)" office:value-type="float" office:value="-135.344012884047" calcext:value-type="float">
            <text:p>-135,344012884047</text:p>
          </table:table-cell>
          <table:table-cell table:style-name="ce1" table:formula="of:=[.G329]+h" office:value-type="float" office:value="3.27999999999997" calcext:value-type="float">
            <text:p>3,27999999999997</text:p>
          </table:table-cell>
          <table:table-cell table:style-name="ce1" table:formula="of:=[.H329]+ h*[.F330]" office:value-type="float" office:value="365.645232577335" calcext:value-type="float">
            <text:p>365,6452325773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0]" office:value-type="float" office:value="3.27999999999997" calcext:value-type="float">
            <text:p>3,27999999999997</text:p>
          </table:table-cell>
          <table:table-cell table:style-name="ce1" table:formula="of:=[.H330]" office:value-type="float" office:value="365.645232577335" calcext:value-type="float">
            <text:p>365,645232577335</text:p>
          </table:table-cell>
          <table:table-cell table:style-name="ce1" table:formula="of:=-68 - ([.E331]^2/Ao)" office:value-type="float" office:value="-134.848218053267" calcext:value-type="float">
            <text:p>-134,848218053267</text:p>
          </table:table-cell>
          <table:table-cell table:style-name="ce1" table:formula="of:=[.G330]+h" office:value-type="float" office:value="3.28999999999997" calcext:value-type="float">
            <text:p>3,28999999999997</text:p>
          </table:table-cell>
          <table:table-cell table:style-name="ce1" table:formula="of:=[.H330]+ h*[.F331]" office:value-type="float" office:value="364.296750396803" calcext:value-type="float">
            <text:p>364,2967503968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1]" office:value-type="float" office:value="3.28999999999997" calcext:value-type="float">
            <text:p>3,28999999999997</text:p>
          </table:table-cell>
          <table:table-cell table:style-name="ce1" table:formula="of:=[.H331]" office:value-type="float" office:value="364.296750396803" calcext:value-type="float">
            <text:p>364,296750396803</text:p>
          </table:table-cell>
          <table:table-cell table:style-name="ce1" table:formula="of:=-68 - ([.E332]^2/Ao)" office:value-type="float" office:value="-134.356061174835" calcext:value-type="float">
            <text:p>-134,356061174835</text:p>
          </table:table-cell>
          <table:table-cell table:style-name="ce1" table:formula="of:=[.G331]+h" office:value-type="float" office:value="3.29999999999997" calcext:value-type="float">
            <text:p>3,29999999999997</text:p>
          </table:table-cell>
          <table:table-cell table:style-name="ce1" table:formula="of:=[.H331]+ h*[.F332]" office:value-type="float" office:value="362.953189785054" calcext:value-type="float">
            <text:p>362,9531897850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2]" office:value-type="float" office:value="3.29999999999997" calcext:value-type="float">
            <text:p>3,29999999999997</text:p>
          </table:table-cell>
          <table:table-cell table:style-name="ce1" table:formula="of:=[.H332]" office:value-type="float" office:value="362.953189785054" calcext:value-type="float">
            <text:p>362,953189785054</text:p>
          </table:table-cell>
          <table:table-cell table:style-name="ce1" table:formula="of:=-68 - ([.E333]^2/Ao)" office:value-type="float" office:value="-133.867508987573" calcext:value-type="float">
            <text:p>-133,867508987573</text:p>
          </table:table-cell>
          <table:table-cell table:style-name="ce1" table:formula="of:=[.G332]+h" office:value-type="float" office:value="3.30999999999997" calcext:value-type="float">
            <text:p>3,30999999999997</text:p>
          </table:table-cell>
          <table:table-cell table:style-name="ce1" table:formula="of:=[.H332]+ h*[.F333]" office:value-type="float" office:value="361.614514695179" calcext:value-type="float">
            <text:p>361,6145146951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3]" office:value-type="float" office:value="3.30999999999997" calcext:value-type="float">
            <text:p>3,30999999999997</text:p>
          </table:table-cell>
          <table:table-cell table:style-name="ce1" table:formula="of:=[.H333]" office:value-type="float" office:value="361.614514695179" calcext:value-type="float">
            <text:p>361,614514695179</text:p>
          </table:table-cell>
          <table:table-cell table:style-name="ce1" table:formula="of:=-68 - ([.E334]^2/Ao)" office:value-type="float" office:value="-133.382528619115" calcext:value-type="float">
            <text:p>-133,382528619115</text:p>
          </table:table-cell>
          <table:table-cell table:style-name="ce1" table:formula="of:=[.G333]+h" office:value-type="float" office:value="3.31999999999997" calcext:value-type="float">
            <text:p>3,31999999999997</text:p>
          </table:table-cell>
          <table:table-cell table:style-name="ce1" table:formula="of:=[.H333]+ h*[.F334]" office:value-type="float" office:value="360.280689408987" calcext:value-type="float">
            <text:p>360,2806894089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4]" office:value-type="float" office:value="3.31999999999997" calcext:value-type="float">
            <text:p>3,31999999999997</text:p>
          </table:table-cell>
          <table:table-cell table:style-name="ce1" table:formula="of:=[.H334]" office:value-type="float" office:value="360.280689408987" calcext:value-type="float">
            <text:p>360,280689408987</text:p>
          </table:table-cell>
          <table:table-cell table:style-name="ce1" table:formula="of:=-68 - ([.E335]^2/Ao)" office:value-type="float" office:value="-132.901087580508" calcext:value-type="float">
            <text:p>-132,901087580508</text:p>
          </table:table-cell>
          <table:table-cell table:style-name="ce1" table:formula="of:=[.G334]+h" office:value-type="float" office:value="3.32999999999997" calcext:value-type="float">
            <text:p>3,32999999999997</text:p>
          </table:table-cell>
          <table:table-cell table:style-name="ce1" table:formula="of:=[.H334]+ h*[.F335]" office:value-type="float" office:value="358.951678533182" calcext:value-type="float">
            <text:p>358,9516785331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5]" office:value-type="float" office:value="3.32999999999997" calcext:value-type="float">
            <text:p>3,32999999999997</text:p>
          </table:table-cell>
          <table:table-cell table:style-name="ce1" table:formula="of:=[.H335]" office:value-type="float" office:value="358.951678533182" calcext:value-type="float">
            <text:p>358,951678533182</text:p>
          </table:table-cell>
          <table:table-cell table:style-name="ce1" table:formula="of:=-68 - ([.E336]^2/Ao)" office:value-type="float" office:value="-132.423153760895" calcext:value-type="float">
            <text:p>-132,423153760895</text:p>
          </table:table-cell>
          <table:table-cell table:style-name="ce1" table:formula="of:=[.G335]+h" office:value-type="float" office:value="3.33999999999997" calcext:value-type="float">
            <text:p>3,33999999999997</text:p>
          </table:table-cell>
          <table:table-cell table:style-name="ce1" table:formula="of:=[.H335]+ h*[.F336]" office:value-type="float" office:value="357.627446995573" calcext:value-type="float">
            <text:p>357,6274469955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6]" office:value-type="float" office:value="3.33999999999997" calcext:value-type="float">
            <text:p>3,33999999999997</text:p>
          </table:table-cell>
          <table:table-cell table:style-name="ce1" table:formula="of:=[.H336]" office:value-type="float" office:value="357.627446995573" calcext:value-type="float">
            <text:p>357,627446995573</text:p>
          </table:table-cell>
          <table:table-cell table:style-name="ce1" table:formula="of:=-68 - ([.E337]^2/Ao)" office:value-type="float" office:value="-131.948695422286" calcext:value-type="float">
            <text:p>-131,948695422286</text:p>
          </table:table-cell>
          <table:table-cell table:style-name="ce1" table:formula="of:=[.G336]+h" office:value-type="float" office:value="3.34999999999997" calcext:value-type="float">
            <text:p>3,34999999999997</text:p>
          </table:table-cell>
          <table:table-cell table:style-name="ce1" table:formula="of:=[.H336]+ h*[.F337]" office:value-type="float" office:value="356.307960041351" calcext:value-type="float">
            <text:p>356,3079600413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7]" office:value-type="float" office:value="3.34999999999997" calcext:value-type="float">
            <text:p>3,34999999999997</text:p>
          </table:table-cell>
          <table:table-cell table:style-name="ce1" table:formula="of:=[.H337]" office:value-type="float" office:value="356.307960041351" calcext:value-type="float">
            <text:p>356,307960041351</text:p>
          </table:table-cell>
          <table:table-cell table:style-name="ce1" table:formula="of:=-68 - ([.E338]^2/Ao)" office:value-type="float" office:value="-131.477681194414" calcext:value-type="float">
            <text:p>-131,477681194414</text:p>
          </table:table-cell>
          <table:table-cell table:style-name="ce1" table:formula="of:=[.G337]+h" office:value-type="float" office:value="3.35999999999997" calcext:value-type="float">
            <text:p>3,35999999999997</text:p>
          </table:table-cell>
          <table:table-cell table:style-name="ce1" table:formula="of:=[.H337]+ h*[.F338]" office:value-type="float" office:value="354.993183229406" calcext:value-type="float">
            <text:p>354,9931832294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8]" office:value-type="float" office:value="3.35999999999997" calcext:value-type="float">
            <text:p>3,35999999999997</text:p>
          </table:table-cell>
          <table:table-cell table:style-name="ce1" table:formula="of:=[.H338]" office:value-type="float" office:value="354.993183229406" calcext:value-type="float">
            <text:p>354,993183229406</text:p>
          </table:table-cell>
          <table:table-cell table:style-name="ce1" table:formula="of:=-68 - ([.E339]^2/Ao)" office:value-type="float" office:value="-131.010080069673" calcext:value-type="float">
            <text:p>-131,010080069673</text:p>
          </table:table-cell>
          <table:table-cell table:style-name="ce1" table:formula="of:=[.G338]+h" office:value-type="float" office:value="3.36999999999997" calcext:value-type="float">
            <text:p>3,36999999999997</text:p>
          </table:table-cell>
          <table:table-cell table:style-name="ce1" table:formula="of:=[.H338]+ h*[.F339]" office:value-type="float" office:value="353.68308242871" calcext:value-type="float">
            <text:p>353,683082428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39]" office:value-type="float" office:value="3.36999999999997" calcext:value-type="float">
            <text:p>3,36999999999997</text:p>
          </table:table-cell>
          <table:table-cell table:style-name="ce1" table:formula="of:=[.H339]" office:value-type="float" office:value="353.68308242871" calcext:value-type="float">
            <text:p>353,68308242871</text:p>
          </table:table-cell>
          <table:table-cell table:style-name="ce1" table:formula="of:=-68 - ([.E340]^2/Ao)" office:value-type="float" office:value="-130.545861398137" calcext:value-type="float">
            <text:p>-130,545861398137</text:p>
          </table:table-cell>
          <table:table-cell table:style-name="ce1" table:formula="of:=[.G339]+h" office:value-type="float" office:value="3.37999999999997" calcext:value-type="float">
            <text:p>3,37999999999997</text:p>
          </table:table-cell>
          <table:table-cell table:style-name="ce1" table:formula="of:=[.H339]+ h*[.F340]" office:value-type="float" office:value="352.377623814728" calcext:value-type="float">
            <text:p>352,3776238147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0]" office:value-type="float" office:value="3.37999999999997" calcext:value-type="float">
            <text:p>3,37999999999997</text:p>
          </table:table-cell>
          <table:table-cell table:style-name="ce1" table:formula="of:=[.H340]" office:value-type="float" office:value="352.377623814728" calcext:value-type="float">
            <text:p>352,377623814728</text:p>
          </table:table-cell>
          <table:table-cell table:style-name="ce1" table:formula="of:=-68 - ([.E341]^2/Ao)" office:value-type="float" office:value="-130.084994882657" calcext:value-type="float">
            <text:p>-130,084994882657</text:p>
          </table:table-cell>
          <table:table-cell table:style-name="ce1" table:formula="of:=[.G340]+h" office:value-type="float" office:value="3.38999999999997" calcext:value-type="float">
            <text:p>3,38999999999997</text:p>
          </table:table-cell>
          <table:table-cell table:style-name="ce1" table:formula="of:=[.H340]+ h*[.F341]" office:value-type="float" office:value="351.076773865902" calcext:value-type="float">
            <text:p>351,0767738659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1]" office:value-type="float" office:value="3.38999999999997" calcext:value-type="float">
            <text:p>3,38999999999997</text:p>
          </table:table-cell>
          <table:table-cell table:style-name="ce1" table:formula="of:=[.H341]" office:value-type="float" office:value="351.076773865902" calcext:value-type="float">
            <text:p>351,076773865902</text:p>
          </table:table-cell>
          <table:table-cell table:style-name="ce1" table:formula="of:=-68 - ([.E342]^2/Ao)" office:value-type="float" office:value="-129.627450574045" calcext:value-type="float">
            <text:p>-129,627450574045</text:p>
          </table:table-cell>
          <table:table-cell table:style-name="ce1" table:formula="of:=[.G341]+h" office:value-type="float" office:value="3.39999999999997" calcext:value-type="float">
            <text:p>3,39999999999997</text:p>
          </table:table-cell>
          <table:table-cell table:style-name="ce1" table:formula="of:=[.H341]+ h*[.F342]" office:value-type="float" office:value="349.780499360161" calcext:value-type="float">
            <text:p>349,7804993601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2]" office:value-type="float" office:value="3.39999999999997" calcext:value-type="float">
            <text:p>3,39999999999997</text:p>
          </table:table-cell>
          <table:table-cell table:style-name="ce1" table:formula="of:=[.H342]" office:value-type="float" office:value="349.780499360161" calcext:value-type="float">
            <text:p>349,780499360161</text:p>
          </table:table-cell>
          <table:table-cell table:style-name="ce1" table:formula="of:=-68 - ([.E343]^2/Ao)" office:value-type="float" office:value="-129.173198866322" calcext:value-type="float">
            <text:p>-129,173198866322</text:p>
          </table:table-cell>
          <table:table-cell table:style-name="ce1" table:formula="of:=[.G342]+h" office:value-type="float" office:value="3.40999999999997" calcext:value-type="float">
            <text:p>3,40999999999997</text:p>
          </table:table-cell>
          <table:table-cell table:style-name="ce1" table:formula="of:=[.H342]+ h*[.F343]" office:value-type="float" office:value="348.488767371498" calcext:value-type="float">
            <text:p>348,4887673714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3]" office:value-type="float" office:value="3.40999999999997" calcext:value-type="float">
            <text:p>3,40999999999997</text:p>
          </table:table-cell>
          <table:table-cell table:style-name="ce1" table:formula="of:=[.H343]" office:value-type="float" office:value="348.488767371498" calcext:value-type="float">
            <text:p>348,488767371498</text:p>
          </table:table-cell>
          <table:table-cell table:style-name="ce1" table:formula="of:=-68 - ([.E344]^2/Ao)" office:value-type="float" office:value="-128.722210492053" calcext:value-type="float">
            <text:p>-128,722210492053</text:p>
          </table:table-cell>
          <table:table-cell table:style-name="ce1" table:formula="of:=[.G343]+h" office:value-type="float" office:value="3.41999999999997" calcext:value-type="float">
            <text:p>3,41999999999997</text:p>
          </table:table-cell>
          <table:table-cell table:style-name="ce1" table:formula="of:=[.H343]+ h*[.F344]" office:value-type="float" office:value="347.201545266578" calcext:value-type="float">
            <text:p>347,2015452665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4]" office:value-type="float" office:value="3.41999999999997" calcext:value-type="float">
            <text:p>3,41999999999997</text:p>
          </table:table-cell>
          <table:table-cell table:style-name="ce1" table:formula="of:=[.H344]" office:value-type="float" office:value="347.201545266578" calcext:value-type="float">
            <text:p>347,201545266578</text:p>
          </table:table-cell>
          <table:table-cell table:style-name="ce1" table:formula="of:=-68 - ([.E345]^2/Ao)" office:value-type="float" office:value="-128.27445651775" calcext:value-type="float">
            <text:p>-128,27445651775</text:p>
          </table:table-cell>
          <table:table-cell table:style-name="ce1" table:formula="of:=[.G344]+h" office:value-type="float" office:value="3.42999999999997" calcext:value-type="float">
            <text:p>3,42999999999997</text:p>
          </table:table-cell>
          <table:table-cell table:style-name="ce1" table:formula="of:=[.H344]+ h*[.F345]" office:value-type="float" office:value="345.9188007014" calcext:value-type="float">
            <text:p>345,91880070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5]" office:value-type="float" office:value="3.42999999999997" calcext:value-type="float">
            <text:p>3,42999999999997</text:p>
          </table:table-cell>
          <table:table-cell table:style-name="ce1" table:formula="of:=[.H345]" office:value-type="float" office:value="345.9188007014" calcext:value-type="float">
            <text:p>345,9188007014</text:p>
          </table:table-cell>
          <table:table-cell table:style-name="ce1" table:formula="of:=-68 - ([.E346]^2/Ao)" office:value-type="float" office:value="-127.829908339347" calcext:value-type="float">
            <text:p>-127,829908339347</text:p>
          </table:table-cell>
          <table:table-cell table:style-name="ce1" table:formula="of:=[.G345]+h" office:value-type="float" office:value="3.43999999999997" calcext:value-type="float">
            <text:p>3,43999999999997</text:p>
          </table:table-cell>
          <table:table-cell table:style-name="ce1" table:formula="of:=[.H345]+ h*[.F346]" office:value-type="float" office:value="344.640501618007" calcext:value-type="float">
            <text:p>344,6405016180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6]" office:value-type="float" office:value="3.43999999999997" calcext:value-type="float">
            <text:p>3,43999999999997</text:p>
          </table:table-cell>
          <table:table-cell table:style-name="ce1" table:formula="of:=[.H346]" office:value-type="float" office:value="344.640501618007" calcext:value-type="float">
            <text:p>344,640501618007</text:p>
          </table:table-cell>
          <table:table-cell table:style-name="ce1" table:formula="of:=-68 - ([.E347]^2/Ao)" office:value-type="float" office:value="-127.388537677756" calcext:value-type="float">
            <text:p>-127,388537677756</text:p>
          </table:table-cell>
          <table:table-cell table:style-name="ce1" table:formula="of:=[.G346]+h" office:value-type="float" office:value="3.44999999999997" calcext:value-type="float">
            <text:p>3,44999999999997</text:p>
          </table:table-cell>
          <table:table-cell table:style-name="ce1" table:formula="of:=[.H346]+ h*[.F347]" office:value-type="float" office:value="343.366616241229" calcext:value-type="float">
            <text:p>343,3666162412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7]" office:value-type="float" office:value="3.44999999999997" calcext:value-type="float">
            <text:p>3,44999999999997</text:p>
          </table:table-cell>
          <table:table-cell table:style-name="ce1" table:formula="of:=[.H347]" office:value-type="float" office:value="343.366616241229" calcext:value-type="float">
            <text:p>343,366616241229</text:p>
          </table:table-cell>
          <table:table-cell table:style-name="ce1" table:formula="of:=-68 - ([.E348]^2/Ao)" office:value-type="float" office:value="-126.950316574476" calcext:value-type="float">
            <text:p>-126,950316574476</text:p>
          </table:table-cell>
          <table:table-cell table:style-name="ce1" table:formula="of:=[.G347]+h" office:value-type="float" office:value="3.45999999999997" calcext:value-type="float">
            <text:p>3,45999999999997</text:p>
          </table:table-cell>
          <table:table-cell table:style-name="ce1" table:formula="of:=[.H347]+ h*[.F348]" office:value-type="float" office:value="342.097113075484" calcext:value-type="float">
            <text:p>342,0971130754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8]" office:value-type="float" office:value="3.45999999999997" calcext:value-type="float">
            <text:p>3,45999999999997</text:p>
          </table:table-cell>
          <table:table-cell table:style-name="ce1" table:formula="of:=[.H348]" office:value-type="float" office:value="342.097113075484" calcext:value-type="float">
            <text:p>342,097113075484</text:p>
          </table:table-cell>
          <table:table-cell table:style-name="ce1" table:formula="of:=-68 - ([.E349]^2/Ao)" office:value-type="float" office:value="-126.51521738729" calcext:value-type="float">
            <text:p>-126,51521738729</text:p>
          </table:table-cell>
          <table:table-cell table:style-name="ce1" table:formula="of:=[.G348]+h" office:value-type="float" office:value="3.46999999999997" calcext:value-type="float">
            <text:p>3,46999999999997</text:p>
          </table:table-cell>
          <table:table-cell table:style-name="ce1" table:formula="of:=[.H348]+ h*[.F349]" office:value-type="float" office:value="340.831960901611" calcext:value-type="float">
            <text:p>340,8319609016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49]" office:value-type="float" office:value="3.46999999999997" calcext:value-type="float">
            <text:p>3,46999999999997</text:p>
          </table:table-cell>
          <table:table-cell table:style-name="ce1" table:formula="of:=[.H349]" office:value-type="float" office:value="340.831960901611" calcext:value-type="float">
            <text:p>340,831960901611</text:p>
          </table:table-cell>
          <table:table-cell table:style-name="ce1" table:formula="of:=-68 - ([.E350]^2/Ao)" office:value-type="float" office:value="-126.083212786019" calcext:value-type="float">
            <text:p>-126,083212786019</text:p>
          </table:table-cell>
          <table:table-cell table:style-name="ce1" table:formula="of:=[.G349]+h" office:value-type="float" office:value="3.47999999999997" calcext:value-type="float">
            <text:p>3,47999999999997</text:p>
          </table:table-cell>
          <table:table-cell table:style-name="ce1" table:formula="of:=[.H349]+ h*[.F350]" office:value-type="float" office:value="339.571128773751" calcext:value-type="float">
            <text:p>339,5711287737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0]" office:value-type="float" office:value="3.47999999999997" calcext:value-type="float">
            <text:p>3,47999999999997</text:p>
          </table:table-cell>
          <table:table-cell table:style-name="ce1" table:formula="of:=[.H350]" office:value-type="float" office:value="339.571128773751" calcext:value-type="float">
            <text:p>339,571128773751</text:p>
          </table:table-cell>
          <table:table-cell table:style-name="ce1" table:formula="of:=-68 - ([.E351]^2/Ao)" office:value-type="float" office:value="-125.65427574834" calcext:value-type="float">
            <text:p>-125,65427574834</text:p>
          </table:table-cell>
          <table:table-cell table:style-name="ce1" table:formula="of:=[.G350]+h" office:value-type="float" office:value="3.48999999999997" calcext:value-type="float">
            <text:p>3,48999999999997</text:p>
          </table:table-cell>
          <table:table-cell table:style-name="ce1" table:formula="of:=[.H350]+ h*[.F351]" office:value-type="float" office:value="338.314586016268" calcext:value-type="float">
            <text:p>338,3145860162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1]" office:value-type="float" office:value="3.48999999999997" calcext:value-type="float">
            <text:p>3,48999999999997</text:p>
          </table:table-cell>
          <table:table-cell table:style-name="ce1" table:formula="of:=[.H351]" office:value-type="float" office:value="338.314586016268" calcext:value-type="float">
            <text:p>338,314586016268</text:p>
          </table:table-cell>
          <table:table-cell table:style-name="ce1" table:formula="of:=-68 - ([.E352]^2/Ao)" office:value-type="float" office:value="-125.228379555679" calcext:value-type="float">
            <text:p>-125,228379555679</text:p>
          </table:table-cell>
          <table:table-cell table:style-name="ce1" table:formula="of:=[.G351]+h" office:value-type="float" office:value="3.49999999999997" calcext:value-type="float">
            <text:p>3,49999999999997</text:p>
          </table:table-cell>
          <table:table-cell table:style-name="ce1" table:formula="of:=[.H351]+ h*[.F352]" office:value-type="float" office:value="337.062302220711" calcext:value-type="float">
            <text:p>337,0623022207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2]" office:value-type="float" office:value="3.49999999999997" calcext:value-type="float">
            <text:p>3,49999999999997</text:p>
          </table:table-cell>
          <table:table-cell table:style-name="ce1" table:formula="of:=[.H352]" office:value-type="float" office:value="337.062302220711" calcext:value-type="float">
            <text:p>337,062302220711</text:p>
          </table:table-cell>
          <table:table-cell table:style-name="ce1" table:formula="of:=-68 - ([.E353]^2/Ao)" office:value-type="float" office:value="-124.805497789163" calcext:value-type="float">
            <text:p>-124,805497789163</text:p>
          </table:table-cell>
          <table:table-cell table:style-name="ce1" table:formula="of:=[.G352]+h" office:value-type="float" office:value="3.50999999999997" calcext:value-type="float">
            <text:p>3,50999999999997</text:p>
          </table:table-cell>
          <table:table-cell table:style-name="ce1" table:formula="of:=[.H352]+ h*[.F353]" office:value-type="float" office:value="335.814247242819" calcext:value-type="float">
            <text:p>335,8142472428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3]" office:value-type="float" office:value="3.50999999999997" calcext:value-type="float">
            <text:p>3,50999999999997</text:p>
          </table:table-cell>
          <table:table-cell table:style-name="ce1" table:formula="of:=[.H353]" office:value-type="float" office:value="335.814247242819" calcext:value-type="float">
            <text:p>335,814247242819</text:p>
          </table:table-cell>
          <table:table-cell table:style-name="ce1" table:formula="of:=-68 - ([.E354]^2/Ao)" office:value-type="float" office:value="-124.385604325631" calcext:value-type="float">
            <text:p>-124,385604325631</text:p>
          </table:table-cell>
          <table:table-cell table:style-name="ce1" table:formula="of:=[.G353]+h" office:value-type="float" office:value="3.51999999999997" calcext:value-type="float">
            <text:p>3,51999999999997</text:p>
          </table:table-cell>
          <table:table-cell table:style-name="ce1" table:formula="of:=[.H353]+ h*[.F354]" office:value-type="float" office:value="334.570391199563" calcext:value-type="float">
            <text:p>334,5703911995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4]" office:value-type="float" office:value="3.51999999999997" calcext:value-type="float">
            <text:p>3,51999999999997</text:p>
          </table:table-cell>
          <table:table-cell table:style-name="ce1" table:formula="of:=[.H354]" office:value-type="float" office:value="334.570391199563" calcext:value-type="float">
            <text:p>334,570391199563</text:p>
          </table:table-cell>
          <table:table-cell table:style-name="ce1" table:formula="of:=-68 - ([.E355]^2/Ao)" office:value-type="float" office:value="-123.968673333714" calcext:value-type="float">
            <text:p>-123,968673333714</text:p>
          </table:table-cell>
          <table:table-cell table:style-name="ce1" table:formula="of:=[.G354]+h" office:value-type="float" office:value="3.52999999999997" calcext:value-type="float">
            <text:p>3,52999999999997</text:p>
          </table:table-cell>
          <table:table-cell table:style-name="ce1" table:formula="of:=[.H354]+ h*[.F355]" office:value-type="float" office:value="333.330704466226" calcext:value-type="float">
            <text:p>333,3307044662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5]" office:value-type="float" office:value="3.52999999999997" calcext:value-type="float">
            <text:p>3,52999999999997</text:p>
          </table:table-cell>
          <table:table-cell table:style-name="ce1" table:formula="of:=[.H355]" office:value-type="float" office:value="333.330704466226" calcext:value-type="float">
            <text:p>333,330704466226</text:p>
          </table:table-cell>
          <table:table-cell table:style-name="ce1" table:formula="of:=-68 - ([.E356]^2/Ao)" office:value-type="float" office:value="-123.554679269975" calcext:value-type="float">
            <text:p>-123,554679269975</text:p>
          </table:table-cell>
          <table:table-cell table:style-name="ce1" table:formula="of:=[.G355]+h" office:value-type="float" office:value="3.53999999999997" calcext:value-type="float">
            <text:p>3,53999999999997</text:p>
          </table:table-cell>
          <table:table-cell table:style-name="ce1" table:formula="of:=[.H355]+ h*[.F356]" office:value-type="float" office:value="332.095157673526" calcext:value-type="float">
            <text:p>332,0951576735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6]" office:value-type="float" office:value="3.53999999999997" calcext:value-type="float">
            <text:p>3,53999999999997</text:p>
          </table:table-cell>
          <table:table-cell table:style-name="ce1" table:formula="of:=[.H356]" office:value-type="float" office:value="332.095157673526" calcext:value-type="float">
            <text:p>332,095157673526</text:p>
          </table:table-cell>
          <table:table-cell table:style-name="ce1" table:formula="of:=-68 - ([.E357]^2/Ao)" office:value-type="float" office:value="-123.143596875102" calcext:value-type="float">
            <text:p>-123,143596875102</text:p>
          </table:table-cell>
          <table:table-cell table:style-name="ce1" table:formula="of:=[.G356]+h" office:value-type="float" office:value="3.54999999999997" calcext:value-type="float">
            <text:p>3,54999999999997</text:p>
          </table:table-cell>
          <table:table-cell table:style-name="ce1" table:formula="of:=[.H356]+ h*[.F357]" office:value-type="float" office:value="330.863721704775" calcext:value-type="float">
            <text:p>330,8637217047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7]" office:value-type="float" office:value="3.54999999999997" calcext:value-type="float">
            <text:p>3,54999999999997</text:p>
          </table:table-cell>
          <table:table-cell table:style-name="ce1" table:formula="of:=[.H357]" office:value-type="float" office:value="330.863721704775" calcext:value-type="float">
            <text:p>330,863721704775</text:p>
          </table:table-cell>
          <table:table-cell table:style-name="ce1" table:formula="of:=-68 - ([.E358]^2/Ao)" office:value-type="float" office:value="-122.735401170167" calcext:value-type="float">
            <text:p>-122,735401170167</text:p>
          </table:table-cell>
          <table:table-cell table:style-name="ce1" table:formula="of:=[.G357]+h" office:value-type="float" office:value="3.55999999999997" calcext:value-type="float">
            <text:p>3,55999999999997</text:p>
          </table:table-cell>
          <table:table-cell table:style-name="ce1" table:formula="of:=[.H357]+ h*[.F358]" office:value-type="float" office:value="329.636367693073" calcext:value-type="float">
            <text:p>329,6363676930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8]" office:value-type="float" office:value="3.55999999999997" calcext:value-type="float">
            <text:p>3,55999999999997</text:p>
          </table:table-cell>
          <table:table-cell table:style-name="ce1" table:formula="of:=[.H358]" office:value-type="float" office:value="329.636367693073" calcext:value-type="float">
            <text:p>329,636367693073</text:p>
          </table:table-cell>
          <table:table-cell table:style-name="ce1" table:formula="of:=-68 - ([.E359]^2/Ao)" office:value-type="float" office:value="-122.330067452942" calcext:value-type="float">
            <text:p>-122,330067452942</text:p>
          </table:table-cell>
          <table:table-cell table:style-name="ce1" table:formula="of:=[.G358]+h" office:value-type="float" office:value="3.56999999999997" calcext:value-type="float">
            <text:p>3,56999999999997</text:p>
          </table:table-cell>
          <table:table-cell table:style-name="ce1" table:formula="of:=[.H358]+ h*[.F359]" office:value-type="float" office:value="328.413067018544" calcext:value-type="float">
            <text:p>328,4130670185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59]" office:value-type="float" office:value="3.56999999999997" calcext:value-type="float">
            <text:p>3,56999999999997</text:p>
          </table:table-cell>
          <table:table-cell table:style-name="ce1" table:formula="of:=[.H359]" office:value-type="float" office:value="328.413067018544" calcext:value-type="float">
            <text:p>328,413067018544</text:p>
          </table:table-cell>
          <table:table-cell table:style-name="ce1" table:formula="of:=-68 - ([.E360]^2/Ao)" office:value-type="float" office:value="-121.927571294263" calcext:value-type="float">
            <text:p>-121,927571294263</text:p>
          </table:table-cell>
          <table:table-cell table:style-name="ce1" table:formula="of:=[.G359]+h" office:value-type="float" office:value="3.57999999999997" calcext:value-type="float">
            <text:p>3,57999999999997</text:p>
          </table:table-cell>
          <table:table-cell table:style-name="ce1" table:formula="of:=[.H359]+ h*[.F360]" office:value-type="float" office:value="327.193791305601" calcext:value-type="float">
            <text:p>327,1937913056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0]" office:value-type="float" office:value="3.57999999999997" calcext:value-type="float">
            <text:p>3,57999999999997</text:p>
          </table:table-cell>
          <table:table-cell table:style-name="ce1" table:formula="of:=[.H360]" office:value-type="float" office:value="327.193791305601" calcext:value-type="float">
            <text:p>327,193791305601</text:p>
          </table:table-cell>
          <table:table-cell table:style-name="ce1" table:formula="of:=-68 - ([.E361]^2/Ao)" office:value-type="float" office:value="-121.527888534467" calcext:value-type="float">
            <text:p>-121,527888534467</text:p>
          </table:table-cell>
          <table:table-cell table:style-name="ce1" table:formula="of:=[.G360]+h" office:value-type="float" office:value="3.58999999999997" calcext:value-type="float">
            <text:p>3,58999999999997</text:p>
          </table:table-cell>
          <table:table-cell table:style-name="ce1" table:formula="of:=[.H360]+ h*[.F361]" office:value-type="float" office:value="325.978512420257" calcext:value-type="float">
            <text:p>325,9785124202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1]" office:value-type="float" office:value="3.58999999999997" calcext:value-type="float">
            <text:p>3,58999999999997</text:p>
          </table:table-cell>
          <table:table-cell table:style-name="ce1" table:formula="of:=[.H361]" office:value-type="float" office:value="325.978512420257" calcext:value-type="float">
            <text:p>325,978512420257</text:p>
          </table:table-cell>
          <table:table-cell table:style-name="ce1" table:formula="of:=-68 - ([.E362]^2/Ao)" office:value-type="float" office:value="-121.130995279862" calcext:value-type="float">
            <text:p>-121,130995279862</text:p>
          </table:table-cell>
          <table:table-cell table:style-name="ce1" table:formula="of:=[.G361]+h" office:value-type="float" office:value="3.59999999999997" calcext:value-type="float">
            <text:p>3,59999999999997</text:p>
          </table:table-cell>
          <table:table-cell table:style-name="ce1" table:formula="of:=[.H361]+ h*[.F362]" office:value-type="float" office:value="324.767202467458" calcext:value-type="float">
            <text:p>324,7672024674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2]" office:value-type="float" office:value="3.59999999999997" calcext:value-type="float">
            <text:p>3,59999999999997</text:p>
          </table:table-cell>
          <table:table-cell table:style-name="ce1" table:formula="of:=[.H362]" office:value-type="float" office:value="324.767202467458" calcext:value-type="float">
            <text:p>324,767202467458</text:p>
          </table:table-cell>
          <table:table-cell table:style-name="ce1" table:formula="of:=-68 - ([.E363]^2/Ao)" office:value-type="float" office:value="-120.736867899269" calcext:value-type="float">
            <text:p>-120,736867899269</text:p>
          </table:table-cell>
          <table:table-cell table:style-name="ce1" table:formula="of:=[.G362]+h" office:value-type="float" office:value="3.60999999999997" calcext:value-type="float">
            <text:p>3,60999999999997</text:p>
          </table:table-cell>
          <table:table-cell table:style-name="ce1" table:formula="of:=[.H362]+ h*[.F363]" office:value-type="float" office:value="323.559833788465" calcext:value-type="float">
            <text:p>323,5598337884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3]" office:value-type="float" office:value="3.60999999999997" calcext:value-type="float">
            <text:p>3,60999999999997</text:p>
          </table:table-cell>
          <table:table-cell table:style-name="ce1" table:formula="of:=[.H363]" office:value-type="float" office:value="323.559833788465" calcext:value-type="float">
            <text:p>323,559833788465</text:p>
          </table:table-cell>
          <table:table-cell table:style-name="ce1" table:formula="of:=-68 - ([.E364]^2/Ao)" office:value-type="float" office:value="-120.34548302061" calcext:value-type="float">
            <text:p>-120,34548302061</text:p>
          </table:table-cell>
          <table:table-cell table:style-name="ce1" table:formula="of:=[.G363]+h" office:value-type="float" office:value="3.61999999999997" calcext:value-type="float">
            <text:p>3,61999999999997</text:p>
          </table:table-cell>
          <table:table-cell table:style-name="ce1" table:formula="of:=[.H363]+ h*[.F364]" office:value-type="float" office:value="322.356378958259" calcext:value-type="float">
            <text:p>322,3563789582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4]" office:value-type="float" office:value="3.61999999999997" calcext:value-type="float">
            <text:p>3,61999999999997</text:p>
          </table:table-cell>
          <table:table-cell table:style-name="ce1" table:formula="of:=[.H364]" office:value-type="float" office:value="322.356378958259" calcext:value-type="float">
            <text:p>322,356378958259</text:p>
          </table:table-cell>
          <table:table-cell table:style-name="ce1" table:formula="of:=-68 - ([.E365]^2/Ao)" office:value-type="float" office:value="-119.95681752754" calcext:value-type="float">
            <text:p>-119,95681752754</text:p>
          </table:table-cell>
          <table:table-cell table:style-name="ce1" table:formula="of:=[.G364]+h" office:value-type="float" office:value="3.62999999999997" calcext:value-type="float">
            <text:p>3,62999999999997</text:p>
          </table:table-cell>
          <table:table-cell table:style-name="ce1" table:formula="of:=[.H364]+ h*[.F365]" office:value-type="float" office:value="321.156810782984" calcext:value-type="float">
            <text:p>321,1568107829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5]" office:value-type="float" office:value="3.62999999999997" calcext:value-type="float">
            <text:p>3,62999999999997</text:p>
          </table:table-cell>
          <table:table-cell table:style-name="ce1" table:formula="of:=[.H365]" office:value-type="float" office:value="321.156810782984" calcext:value-type="float">
            <text:p>321,156810782984</text:p>
          </table:table-cell>
          <table:table-cell table:style-name="ce1" table:formula="of:=-68 - ([.E366]^2/Ao)" office:value-type="float" office:value="-119.570848556149" calcext:value-type="float">
            <text:p>-119,570848556149</text:p>
          </table:table-cell>
          <table:table-cell table:style-name="ce1" table:formula="of:=[.G365]+h" office:value-type="float" office:value="3.63999999999997" calcext:value-type="float">
            <text:p>3,63999999999997</text:p>
          </table:table-cell>
          <table:table-cell table:style-name="ce1" table:formula="of:=[.H365]+ h*[.F366]" office:value-type="float" office:value="319.961102297422" calcext:value-type="float">
            <text:p>319,9611022974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6]" office:value-type="float" office:value="3.63999999999997" calcext:value-type="float">
            <text:p>3,63999999999997</text:p>
          </table:table-cell>
          <table:table-cell table:style-name="ce1" table:formula="of:=[.H366]" office:value-type="float" office:value="319.961102297422" calcext:value-type="float">
            <text:p>319,961102297422</text:p>
          </table:table-cell>
          <table:table-cell table:style-name="ce1" table:formula="of:=-68 - ([.E367]^2/Ao)" office:value-type="float" office:value="-119.187553491691" calcext:value-type="float">
            <text:p>-119,187553491691</text:p>
          </table:table-cell>
          <table:table-cell table:style-name="ce1" table:formula="of:=[.G366]+h" office:value-type="float" office:value="3.64999999999997" calcext:value-type="float">
            <text:p>3,64999999999997</text:p>
          </table:table-cell>
          <table:table-cell table:style-name="ce1" table:formula="of:=[.H366]+ h*[.F367]" office:value-type="float" office:value="318.769226762505" calcext:value-type="float">
            <text:p>318,7692267625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7]" office:value-type="float" office:value="3.64999999999997" calcext:value-type="float">
            <text:p>3,64999999999997</text:p>
          </table:table-cell>
          <table:table-cell table:style-name="ce1" table:formula="of:=[.H367]" office:value-type="float" office:value="318.769226762505" calcext:value-type="float">
            <text:p>318,769226762505</text:p>
          </table:table-cell>
          <table:table-cell table:style-name="ce1" table:formula="of:=-68 - ([.E368]^2/Ao)" office:value-type="float" office:value="-118.806909965383" calcext:value-type="float">
            <text:p>-118,806909965383</text:p>
          </table:table-cell>
          <table:table-cell table:style-name="ce1" table:formula="of:=[.G367]+h" office:value-type="float" office:value="3.65999999999997" calcext:value-type="float">
            <text:p>3,65999999999997</text:p>
          </table:table-cell>
          <table:table-cell table:style-name="ce1" table:formula="of:=[.H367]+ h*[.F368]" office:value-type="float" office:value="317.581157662852" calcext:value-type="float">
            <text:p>317,5811576628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8]" office:value-type="float" office:value="3.65999999999997" calcext:value-type="float">
            <text:p>3,65999999999997</text:p>
          </table:table-cell>
          <table:table-cell table:style-name="ce1" table:formula="of:=[.H368]" office:value-type="float" office:value="317.581157662852" calcext:value-type="float">
            <text:p>317,581157662852</text:p>
          </table:table-cell>
          <table:table-cell table:style-name="ce1" table:formula="of:=-68 - ([.E369]^2/Ao)" office:value-type="float" office:value="-118.428895851239" calcext:value-type="float">
            <text:p>-118,428895851239</text:p>
          </table:table-cell>
          <table:table-cell table:style-name="ce1" table:formula="of:=[.G368]+h" office:value-type="float" office:value="3.66999999999997" calcext:value-type="float">
            <text:p>3,66999999999997</text:p>
          </table:table-cell>
          <table:table-cell table:style-name="ce1" table:formula="of:=[.H368]+ h*[.F369]" office:value-type="float" office:value="316.396868704339" calcext:value-type="float">
            <text:p>316,3968687043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69]" office:value-type="float" office:value="3.66999999999997" calcext:value-type="float">
            <text:p>3,66999999999997</text:p>
          </table:table-cell>
          <table:table-cell table:style-name="ce1" table:formula="of:=[.H369]" office:value-type="float" office:value="316.396868704339" calcext:value-type="float">
            <text:p>316,396868704339</text:p>
          </table:table-cell>
          <table:table-cell table:style-name="ce1" table:formula="of:=-68 - ([.E370]^2/Ao)" office:value-type="float" office:value="-118.053489262955" calcext:value-type="float">
            <text:p>-118,053489262955</text:p>
          </table:table-cell>
          <table:table-cell table:style-name="ce1" table:formula="of:=[.G369]+h" office:value-type="float" office:value="3.67999999999997" calcext:value-type="float">
            <text:p>3,67999999999997</text:p>
          </table:table-cell>
          <table:table-cell table:style-name="ce1" table:formula="of:=[.H369]+ h*[.F370]" office:value-type="float" office:value="315.21633381171" calcext:value-type="float">
            <text:p>315,216333811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0]" office:value-type="float" office:value="3.67999999999997" calcext:value-type="float">
            <text:p>3,67999999999997</text:p>
          </table:table-cell>
          <table:table-cell table:style-name="ce1" table:formula="of:=[.H370]" office:value-type="float" office:value="315.21633381171" calcext:value-type="float">
            <text:p>315,21633381171</text:p>
          </table:table-cell>
          <table:table-cell table:style-name="ce1" table:formula="of:=-68 - ([.E371]^2/Ao)" office:value-type="float" office:value="-117.680668550848" calcext:value-type="float">
            <text:p>-117,680668550848</text:p>
          </table:table-cell>
          <table:table-cell table:style-name="ce1" table:formula="of:=[.G370]+h" office:value-type="float" office:value="3.68999999999997" calcext:value-type="float">
            <text:p>3,68999999999997</text:p>
          </table:table-cell>
          <table:table-cell table:style-name="ce1" table:formula="of:=[.H370]+ h*[.F371]" office:value-type="float" office:value="314.039527126201" calcext:value-type="float">
            <text:p>314,0395271262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1]" office:value-type="float" office:value="3.68999999999997" calcext:value-type="float">
            <text:p>3,68999999999997</text:p>
          </table:table-cell>
          <table:table-cell table:style-name="ce1" table:formula="of:=[.H371]" office:value-type="float" office:value="314.039527126201" calcext:value-type="float">
            <text:p>314,039527126201</text:p>
          </table:table-cell>
          <table:table-cell table:style-name="ce1" table:formula="of:=-68 - ([.E372]^2/Ao)" office:value-type="float" office:value="-117.310412298824" calcext:value-type="float">
            <text:p>-117,310412298824</text:p>
          </table:table-cell>
          <table:table-cell table:style-name="ce1" table:formula="of:=[.G371]+h" office:value-type="float" office:value="3.69999999999997" calcext:value-type="float">
            <text:p>3,69999999999997</text:p>
          </table:table-cell>
          <table:table-cell table:style-name="ce1" table:formula="of:=[.H371]+ h*[.F372]" office:value-type="float" office:value="312.866423003213" calcext:value-type="float">
            <text:p>312,8664230032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2]" office:value-type="float" office:value="3.69999999999997" calcext:value-type="float">
            <text:p>3,69999999999997</text:p>
          </table:table-cell>
          <table:table-cell table:style-name="ce1" table:formula="of:=[.H372]" office:value-type="float" office:value="312.866423003213" calcext:value-type="float">
            <text:p>312,866423003213</text:p>
          </table:table-cell>
          <table:table-cell table:style-name="ce1" table:formula="of:=-68 - ([.E373]^2/Ao)" office:value-type="float" office:value="-116.942699321413" calcext:value-type="float">
            <text:p>-116,942699321413</text:p>
          </table:table-cell>
          <table:table-cell table:style-name="ce1" table:formula="of:=[.G372]+h" office:value-type="float" office:value="3.70999999999997" calcext:value-type="float">
            <text:p>3,70999999999997</text:p>
          </table:table-cell>
          <table:table-cell table:style-name="ce1" table:formula="of:=[.H372]+ h*[.F373]" office:value-type="float" office:value="311.696996009999" calcext:value-type="float">
            <text:p>311,6969960099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3]" office:value-type="float" office:value="3.70999999999997" calcext:value-type="float">
            <text:p>3,70999999999997</text:p>
          </table:table-cell>
          <table:table-cell table:style-name="ce1" table:formula="of:=[.H373]" office:value-type="float" office:value="311.696996009999" calcext:value-type="float">
            <text:p>311,696996009999</text:p>
          </table:table-cell>
          <table:table-cell table:style-name="ce1" table:formula="of:=-68 - ([.E374]^2/Ao)" office:value-type="float" office:value="-116.577508660829" calcext:value-type="float">
            <text:p>-116,577508660829</text:p>
          </table:table-cell>
          <table:table-cell table:style-name="ce1" table:formula="of:=[.G373]+h" office:value-type="float" office:value="3.71999999999996" calcext:value-type="float">
            <text:p>3,71999999999996</text:p>
          </table:table-cell>
          <table:table-cell table:style-name="ce1" table:formula="of:=[.H373]+ h*[.F374]" office:value-type="float" office:value="310.531220923391" calcext:value-type="float">
            <text:p>310,5312209233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4]" office:value-type="float" office:value="3.71999999999996" calcext:value-type="float">
            <text:p>3,71999999999996</text:p>
          </table:table-cell>
          <table:table-cell table:style-name="ce1" table:formula="of:=[.H374]" office:value-type="float" office:value="310.531220923391" calcext:value-type="float">
            <text:p>310,531220923391</text:p>
          </table:table-cell>
          <table:table-cell table:style-name="ce1" table:formula="of:=-68 - ([.E375]^2/Ao)" office:value-type="float" office:value="-116.214819584086" calcext:value-type="float">
            <text:p>-116,214819584086</text:p>
          </table:table-cell>
          <table:table-cell table:style-name="ce1" table:formula="of:=[.G374]+h" office:value-type="float" office:value="3.72999999999996" calcext:value-type="float">
            <text:p>3,72999999999996</text:p>
          </table:table-cell>
          <table:table-cell table:style-name="ce1" table:formula="of:=[.H374]+ h*[.F375]" office:value-type="float" office:value="309.36907272755" calcext:value-type="float">
            <text:p>309,369072727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5]" office:value-type="float" office:value="3.72999999999996" calcext:value-type="float">
            <text:p>3,72999999999996</text:p>
          </table:table-cell>
          <table:table-cell table:style-name="ce1" table:formula="of:=[.H375]" office:value-type="float" office:value="309.36907272755" calcext:value-type="float">
            <text:p>309,36907272755</text:p>
          </table:table-cell>
          <table:table-cell table:style-name="ce1" table:formula="of:=-68 - ([.E376]^2/Ao)" office:value-type="float" office:value="-115.854611580152" calcext:value-type="float">
            <text:p>-115,854611580152</text:p>
          </table:table-cell>
          <table:table-cell table:style-name="ce1" table:formula="of:=[.G375]+h" office:value-type="float" office:value="3.73999999999996" calcext:value-type="float">
            <text:p>3,73999999999996</text:p>
          </table:table-cell>
          <table:table-cell table:style-name="ce1" table:formula="of:=[.H375]+ h*[.F376]" office:value-type="float" office:value="308.210526611748" calcext:value-type="float">
            <text:p>308,2105266117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6]" office:value-type="float" office:value="3.73999999999996" calcext:value-type="float">
            <text:p>3,73999999999996</text:p>
          </table:table-cell>
          <table:table-cell table:style-name="ce1" table:formula="of:=[.H376]" office:value-type="float" office:value="308.210526611748" calcext:value-type="float">
            <text:p>308,210526611748</text:p>
          </table:table-cell>
          <table:table-cell table:style-name="ce1" table:formula="of:=-68 - ([.E377]^2/Ao)" office:value-type="float" office:value="-115.496864357146" calcext:value-type="float">
            <text:p>-115,496864357146</text:p>
          </table:table-cell>
          <table:table-cell table:style-name="ce1" table:formula="of:=[.G376]+h" office:value-type="float" office:value="3.74999999999996" calcext:value-type="float">
            <text:p>3,74999999999996</text:p>
          </table:table-cell>
          <table:table-cell table:style-name="ce1" table:formula="of:=[.H376]+ h*[.F377]" office:value-type="float" office:value="307.055557968177" calcext:value-type="float">
            <text:p>307,0555579681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7]" office:value-type="float" office:value="3.74999999999996" calcext:value-type="float">
            <text:p>3,74999999999996</text:p>
          </table:table-cell>
          <table:table-cell table:style-name="ce1" table:formula="of:=[.H377]" office:value-type="float" office:value="307.055557968177" calcext:value-type="float">
            <text:p>307,055557968177</text:p>
          </table:table-cell>
          <table:table-cell table:style-name="ce1" table:formula="of:=-68 - ([.E378]^2/Ao)" office:value-type="float" office:value="-115.141557839574" calcext:value-type="float">
            <text:p>-115,141557839574</text:p>
          </table:table-cell>
          <table:table-cell table:style-name="ce1" table:formula="of:=[.G377]+h" office:value-type="float" office:value="3.75999999999996" calcext:value-type="float">
            <text:p>3,75999999999996</text:p>
          </table:table-cell>
          <table:table-cell table:style-name="ce1" table:formula="of:=[.H377]+ h*[.F378]" office:value-type="float" office:value="305.904142389781" calcext:value-type="float">
            <text:p>305,9041423897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8]" office:value-type="float" office:value="3.75999999999996" calcext:value-type="float">
            <text:p>3,75999999999996</text:p>
          </table:table-cell>
          <table:table-cell table:style-name="ce1" table:formula="of:=[.H378]" office:value-type="float" office:value="305.904142389781" calcext:value-type="float">
            <text:p>305,904142389781</text:p>
          </table:table-cell>
          <table:table-cell table:style-name="ce1" table:formula="of:=-68 - ([.E379]^2/Ao)" office:value-type="float" office:value="-114.788672165614" calcext:value-type="float">
            <text:p>-114,788672165614</text:p>
          </table:table-cell>
          <table:table-cell table:style-name="ce1" table:formula="of:=[.G378]+h" office:value-type="float" office:value="3.76999999999996" calcext:value-type="float">
            <text:p>3,76999999999996</text:p>
          </table:table-cell>
          <table:table-cell table:style-name="ce1" table:formula="of:=[.H378]+ h*[.F379]" office:value-type="float" office:value="304.756255668125" calcext:value-type="float">
            <text:p>304,7562556681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79]" office:value-type="float" office:value="3.76999999999996" calcext:value-type="float">
            <text:p>3,76999999999996</text:p>
          </table:table-cell>
          <table:table-cell table:style-name="ce1" table:formula="of:=[.H379]" office:value-type="float" office:value="304.756255668125" calcext:value-type="float">
            <text:p>304,756255668125</text:p>
          </table:table-cell>
          <table:table-cell table:style-name="ce1" table:formula="of:=-68 - ([.E380]^2/Ao)" office:value-type="float" office:value="-114.438187684428" calcext:value-type="float">
            <text:p>-114,438187684428</text:p>
          </table:table-cell>
          <table:table-cell table:style-name="ce1" table:formula="of:=[.G379]+h" office:value-type="float" office:value="3.77999999999996" calcext:value-type="float">
            <text:p>3,77999999999996</text:p>
          </table:table-cell>
          <table:table-cell table:style-name="ce1" table:formula="of:=[.H379]+ h*[.F380]" office:value-type="float" office:value="303.61187379128" calcext:value-type="float">
            <text:p>303,611873791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0]" office:value-type="float" office:value="3.77999999999996" calcext:value-type="float">
            <text:p>3,77999999999996</text:p>
          </table:table-cell>
          <table:table-cell table:style-name="ce1" table:formula="of:=[.H380]" office:value-type="float" office:value="303.61187379128" calcext:value-type="float">
            <text:p>303,61187379128</text:p>
          </table:table-cell>
          <table:table-cell table:style-name="ce1" table:formula="of:=-68 - ([.E381]^2/Ao)" office:value-type="float" office:value="-114.090084953526" calcext:value-type="float">
            <text:p>-114,090084953526</text:p>
          </table:table-cell>
          <table:table-cell table:style-name="ce1" table:formula="of:=[.G380]+h" office:value-type="float" office:value="3.78999999999996" calcext:value-type="float">
            <text:p>3,78999999999996</text:p>
          </table:table-cell>
          <table:table-cell table:style-name="ce1" table:formula="of:=[.H380]+ h*[.F381]" office:value-type="float" office:value="302.470972941745" calcext:value-type="float">
            <text:p>302,4709729417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1]" office:value-type="float" office:value="3.78999999999996" calcext:value-type="float">
            <text:p>3,78999999999996</text:p>
          </table:table-cell>
          <table:table-cell table:style-name="ce1" table:formula="of:=[.H381]" office:value-type="float" office:value="302.470972941745" calcext:value-type="float">
            <text:p>302,470972941745</text:p>
          </table:table-cell>
          <table:table-cell table:style-name="ce1" table:formula="of:=-68 - ([.E382]^2/Ao)" office:value-type="float" office:value="-113.744344736163" calcext:value-type="float">
            <text:p>-113,744344736163</text:p>
          </table:table-cell>
          <table:table-cell table:style-name="ce1" table:formula="of:=[.G381]+h" office:value-type="float" office:value="3.79999999999996" calcext:value-type="float">
            <text:p>3,79999999999996</text:p>
          </table:table-cell>
          <table:table-cell table:style-name="ce1" table:formula="of:=[.H381]+ h*[.F382]" office:value-type="float" office:value="301.333529494384" calcext:value-type="float">
            <text:p>301,3335294943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2]" office:value-type="float" office:value="3.79999999999996" calcext:value-type="float">
            <text:p>3,79999999999996</text:p>
          </table:table-cell>
          <table:table-cell table:style-name="ce1" table:formula="of:=[.H382]" office:value-type="float" office:value="301.333529494384" calcext:value-type="float">
            <text:p>301,333529494384</text:p>
          </table:table-cell>
          <table:table-cell table:style-name="ce1" table:formula="of:=-68 - ([.E383]^2/Ao)" office:value-type="float" office:value="-113.400947998771" calcext:value-type="float">
            <text:p>-113,400947998771</text:p>
          </table:table-cell>
          <table:table-cell table:style-name="ce1" table:formula="of:=[.G382]+h" office:value-type="float" office:value="3.80999999999996" calcext:value-type="float">
            <text:p>3,80999999999996</text:p>
          </table:table-cell>
          <table:table-cell table:style-name="ce1" table:formula="of:=[.H382]+ h*[.F383]" office:value-type="float" office:value="300.199520014396" calcext:value-type="float">
            <text:p>300,1995200143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3]" office:value-type="float" office:value="3.80999999999996" calcext:value-type="float">
            <text:p>3,80999999999996</text:p>
          </table:table-cell>
          <table:table-cell table:style-name="ce1" table:formula="of:=[.H383]" office:value-type="float" office:value="300.199520014396" calcext:value-type="float">
            <text:p>300,199520014396</text:p>
          </table:table-cell>
          <table:table-cell table:style-name="ce1" table:formula="of:=-68 - ([.E384]^2/Ao)" office:value-type="float" office:value="-113.059875908437" calcext:value-type="float">
            <text:p>-113,059875908437</text:p>
          </table:table-cell>
          <table:table-cell table:style-name="ce1" table:formula="of:=[.G383]+h" office:value-type="float" office:value="3.81999999999996" calcext:value-type="float">
            <text:p>3,81999999999996</text:p>
          </table:table-cell>
          <table:table-cell table:style-name="ce1" table:formula="of:=[.H383]+ h*[.F384]" office:value-type="float" office:value="299.068921255311" calcext:value-type="float">
            <text:p>299,0689212553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4]" office:value-type="float" office:value="3.81999999999996" calcext:value-type="float">
            <text:p>3,81999999999996</text:p>
          </table:table-cell>
          <table:table-cell table:style-name="ce1" table:formula="of:=[.H384]" office:value-type="float" office:value="299.068921255311" calcext:value-type="float">
            <text:p>299,068921255311</text:p>
          </table:table-cell>
          <table:table-cell table:style-name="ce1" table:formula="of:=-68 - ([.E385]^2/Ao)" office:value-type="float" office:value="-112.721109830408" calcext:value-type="float">
            <text:p>-112,721109830408</text:p>
          </table:table-cell>
          <table:table-cell table:style-name="ce1" table:formula="of:=[.G384]+h" office:value-type="float" office:value="3.82999999999996" calcext:value-type="float">
            <text:p>3,82999999999996</text:p>
          </table:table-cell>
          <table:table-cell table:style-name="ce1" table:formula="of:=[.H384]+ h*[.F385]" office:value-type="float" office:value="297.941710157007" calcext:value-type="float">
            <text:p>297,9417101570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5]" office:value-type="float" office:value="3.82999999999996" calcext:value-type="float">
            <text:p>3,82999999999996</text:p>
          </table:table-cell>
          <table:table-cell table:style-name="ce1" table:formula="of:=[.H385]" office:value-type="float" office:value="297.941710157007" calcext:value-type="float">
            <text:p>297,941710157007</text:p>
          </table:table-cell>
          <table:table-cell table:style-name="ce1" table:formula="of:=-68 - ([.E386]^2/Ao)" office:value-type="float" office:value="-112.384631325641" calcext:value-type="float">
            <text:p>-112,384631325641</text:p>
          </table:table-cell>
          <table:table-cell table:style-name="ce1" table:formula="of:=[.G385]+h" office:value-type="float" office:value="3.83999999999996" calcext:value-type="float">
            <text:p>3,83999999999996</text:p>
          </table:table-cell>
          <table:table-cell table:style-name="ce1" table:formula="of:=[.H385]+ h*[.F386]" office:value-type="float" office:value="296.817863843751" calcext:value-type="float">
            <text:p>296,8178638437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6]" office:value-type="float" office:value="3.83999999999996" calcext:value-type="float">
            <text:p>3,83999999999996</text:p>
          </table:table-cell>
          <table:table-cell table:style-name="ce1" table:formula="of:=[.H386]" office:value-type="float" office:value="296.817863843751" calcext:value-type="float">
            <text:p>296,817863843751</text:p>
          </table:table-cell>
          <table:table-cell table:style-name="ce1" table:formula="of:=-68 - ([.E387]^2/Ao)" office:value-type="float" office:value="-112.050422148384" calcext:value-type="float">
            <text:p>-112,050422148384</text:p>
          </table:table-cell>
          <table:table-cell table:style-name="ce1" table:formula="of:=[.G386]+h" office:value-type="float" office:value="3.84999999999996" calcext:value-type="float">
            <text:p>3,84999999999996</text:p>
          </table:table-cell>
          <table:table-cell table:style-name="ce1" table:formula="of:=[.H386]+ h*[.F387]" office:value-type="float" office:value="295.697359622267" calcext:value-type="float">
            <text:p>295,6973596222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7]" office:value-type="float" office:value="3.84999999999996" calcext:value-type="float">
            <text:p>3,84999999999996</text:p>
          </table:table-cell>
          <table:table-cell table:style-name="ce1" table:formula="of:=[.H387]" office:value-type="float" office:value="295.697359622267" calcext:value-type="float">
            <text:p>295,697359622267</text:p>
          </table:table-cell>
          <table:table-cell table:style-name="ce1" table:formula="of:=-68 - ([.E388]^2/Ao)" office:value-type="float" office:value="-111.71846424379" calcext:value-type="float">
            <text:p>-111,71846424379</text:p>
          </table:table-cell>
          <table:table-cell table:style-name="ce1" table:formula="of:=[.G387]+h" office:value-type="float" office:value="3.85999999999996" calcext:value-type="float">
            <text:p>3,85999999999996</text:p>
          </table:table-cell>
          <table:table-cell table:style-name="ce1" table:formula="of:=[.H387]+ h*[.F388]" office:value-type="float" office:value="294.580174979829" calcext:value-type="float">
            <text:p>294,5801749798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8]" office:value-type="float" office:value="3.85999999999996" calcext:value-type="float">
            <text:p>3,85999999999996</text:p>
          </table:table-cell>
          <table:table-cell table:style-name="ce1" table:formula="of:=[.H388]" office:value-type="float" office:value="294.580174979829" calcext:value-type="float">
            <text:p>294,580174979829</text:p>
          </table:table-cell>
          <table:table-cell table:style-name="ce1" table:formula="of:=-68 - ([.E389]^2/Ao)" office:value-type="float" office:value="-111.388739745573" calcext:value-type="float">
            <text:p>-111,388739745573</text:p>
          </table:table-cell>
          <table:table-cell table:style-name="ce1" table:formula="of:=[.G388]+h" office:value-type="float" office:value="3.86999999999996" calcext:value-type="float">
            <text:p>3,86999999999996</text:p>
          </table:table-cell>
          <table:table-cell table:style-name="ce1" table:formula="of:=[.H388]+ h*[.F389]" office:value-type="float" office:value="293.466287582373" calcext:value-type="float">
            <text:p>293,4662875823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89]" office:value-type="float" office:value="3.86999999999996" calcext:value-type="float">
            <text:p>3,86999999999996</text:p>
          </table:table-cell>
          <table:table-cell table:style-name="ce1" table:formula="of:=[.H389]" office:value-type="float" office:value="293.466287582373" calcext:value-type="float">
            <text:p>293,466287582373</text:p>
          </table:table-cell>
          <table:table-cell table:style-name="ce1" table:formula="of:=-68 - ([.E390]^2/Ao)" office:value-type="float" office:value="-111.06123097369" calcext:value-type="float">
            <text:p>-111,06123097369</text:p>
          </table:table-cell>
          <table:table-cell table:style-name="ce1" table:formula="of:=[.G389]+h" office:value-type="float" office:value="3.87999999999996" calcext:value-type="float">
            <text:p>3,87999999999996</text:p>
          </table:table-cell>
          <table:table-cell table:style-name="ce1" table:formula="of:=[.H389]+ h*[.F390]" office:value-type="float" office:value="292.355675272637" calcext:value-type="float">
            <text:p>292,3556752726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0]" office:value-type="float" office:value="3.87999999999996" calcext:value-type="float">
            <text:p>3,87999999999996</text:p>
          </table:table-cell>
          <table:table-cell table:style-name="ce1" table:formula="of:=[.H390]" office:value-type="float" office:value="292.355675272637" calcext:value-type="float">
            <text:p>292,355675272637</text:p>
          </table:table-cell>
          <table:table-cell table:style-name="ce1" table:formula="of:=-68 - ([.E391]^2/Ao)" office:value-type="float" office:value="-110.73592043206" calcext:value-type="float">
            <text:p>-110,73592043206</text:p>
          </table:table-cell>
          <table:table-cell table:style-name="ce1" table:formula="of:=[.G390]+h" office:value-type="float" office:value="3.88999999999996" calcext:value-type="float">
            <text:p>3,88999999999996</text:p>
          </table:table-cell>
          <table:table-cell table:style-name="ce1" table:formula="of:=[.H390]+ h*[.F391]" office:value-type="float" office:value="291.248316068316" calcext:value-type="float">
            <text:p>291,2483160683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1]" office:value-type="float" office:value="3.88999999999996" calcext:value-type="float">
            <text:p>3,88999999999996</text:p>
          </table:table-cell>
          <table:table-cell table:style-name="ce1" table:formula="of:=[.H391]" office:value-type="float" office:value="291.248316068316" calcext:value-type="float">
            <text:p>291,248316068316</text:p>
          </table:table-cell>
          <table:table-cell table:style-name="ce1" table:formula="of:=-68 - ([.E392]^2/Ao)" office:value-type="float" office:value="-110.412790806315" calcext:value-type="float">
            <text:p>-110,412790806315</text:p>
          </table:table-cell>
          <table:table-cell table:style-name="ce1" table:formula="of:=[.G391]+h" office:value-type="float" office:value="3.89999999999996" calcext:value-type="float">
            <text:p>3,89999999999996</text:p>
          </table:table-cell>
          <table:table-cell table:style-name="ce1" table:formula="of:=[.H391]+ h*[.F392]" office:value-type="float" office:value="290.144188160253" calcext:value-type="float">
            <text:p>290,1441881602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2]" office:value-type="float" office:value="3.89999999999996" calcext:value-type="float">
            <text:p>3,89999999999996</text:p>
          </table:table-cell>
          <table:table-cell table:style-name="ce1" table:formula="of:=[.H392]" office:value-type="float" office:value="290.144188160253" calcext:value-type="float">
            <text:p>290,144188160253</text:p>
          </table:table-cell>
          <table:table-cell table:style-name="ce1" table:formula="of:=-68 - ([.E393]^2/Ao)" office:value-type="float" office:value="-110.091824961586" calcext:value-type="float">
            <text:p>-110,091824961586</text:p>
          </table:table-cell>
          <table:table-cell table:style-name="ce1" table:formula="of:=[.G392]+h" office:value-type="float" office:value="3.90999999999996" calcext:value-type="float">
            <text:p>3,90999999999996</text:p>
          </table:table-cell>
          <table:table-cell table:style-name="ce1" table:formula="of:=[.H392]+ h*[.F393]" office:value-type="float" office:value="289.043269910637" calcext:value-type="float">
            <text:p>289,0432699106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3]" office:value-type="float" office:value="3.90999999999996" calcext:value-type="float">
            <text:p>3,90999999999996</text:p>
          </table:table-cell>
          <table:table-cell table:style-name="ce1" table:formula="of:=[.H393]" office:value-type="float" office:value="289.043269910637" calcext:value-type="float">
            <text:p>289,043269910637</text:p>
          </table:table-cell>
          <table:table-cell table:style-name="ce1" table:formula="of:=-68 - ([.E394]^2/Ao)" office:value-type="float" office:value="-109.773005940317" calcext:value-type="float">
            <text:p>-109,773005940317</text:p>
          </table:table-cell>
          <table:table-cell table:style-name="ce1" table:formula="of:=[.G393]+h" office:value-type="float" office:value="3.91999999999996" calcext:value-type="float">
            <text:p>3,91999999999996</text:p>
          </table:table-cell>
          <table:table-cell table:style-name="ce1" table:formula="of:=[.H393]+ h*[.F394]" office:value-type="float" office:value="287.945539851234" calcext:value-type="float">
            <text:p>287,9455398512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4]" office:value-type="float" office:value="3.91999999999996" calcext:value-type="float">
            <text:p>3,91999999999996</text:p>
          </table:table-cell>
          <table:table-cell table:style-name="ce1" table:formula="of:=[.H394]" office:value-type="float" office:value="287.945539851234" calcext:value-type="float">
            <text:p>287,945539851234</text:p>
          </table:table-cell>
          <table:table-cell table:style-name="ce1" table:formula="of:=-68 - ([.E395]^2/Ao)" office:value-type="float" office:value="-109.456316960109" calcext:value-type="float">
            <text:p>-109,456316960109</text:p>
          </table:table-cell>
          <table:table-cell table:style-name="ce1" table:formula="of:=[.G394]+h" office:value-type="float" office:value="3.92999999999996" calcext:value-type="float">
            <text:p>3,92999999999996</text:p>
          </table:table-cell>
          <table:table-cell table:style-name="ce1" table:formula="of:=[.H394]+ h*[.F395]" office:value-type="float" office:value="286.850976681633" calcext:value-type="float">
            <text:p>286,8509766816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5]" office:value-type="float" office:value="3.92999999999996" calcext:value-type="float">
            <text:p>3,92999999999996</text:p>
          </table:table-cell>
          <table:table-cell table:style-name="ce1" table:formula="of:=[.H395]" office:value-type="float" office:value="286.850976681633" calcext:value-type="float">
            <text:p>286,850976681633</text:p>
          </table:table-cell>
          <table:table-cell table:style-name="ce1" table:formula="of:=-68 - ([.E396]^2/Ao)" office:value-type="float" office:value="-109.141741411603" calcext:value-type="float">
            <text:p>-109,141741411603</text:p>
          </table:table-cell>
          <table:table-cell table:style-name="ce1" table:formula="of:=[.G395]+h" office:value-type="float" office:value="3.93999999999996" calcext:value-type="float">
            <text:p>3,93999999999996</text:p>
          </table:table-cell>
          <table:table-cell table:style-name="ce1" table:formula="of:=[.H395]+ h*[.F396]" office:value-type="float" office:value="285.759559267517" calcext:value-type="float">
            <text:p>285,7595592675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6]" office:value-type="float" office:value="3.93999999999996" calcext:value-type="float">
            <text:p>3,93999999999996</text:p>
          </table:table-cell>
          <table:table-cell table:style-name="ce1" table:formula="of:=[.H396]" office:value-type="float" office:value="285.759559267517" calcext:value-type="float">
            <text:p>285,759559267517</text:p>
          </table:table-cell>
          <table:table-cell table:style-name="ce1" table:formula="of:=-68 - ([.E397]^2/Ao)" office:value-type="float" office:value="-108.829262856383" calcext:value-type="float">
            <text:p>-108,829262856383</text:p>
          </table:table-cell>
          <table:table-cell table:style-name="ce1" table:formula="of:=[.G396]+h" office:value-type="float" office:value="3.94999999999996" calcext:value-type="float">
            <text:p>3,94999999999996</text:p>
          </table:table-cell>
          <table:table-cell table:style-name="ce1" table:formula="of:=[.H396]+ h*[.F397]" office:value-type="float" office:value="284.671266638953" calcext:value-type="float">
            <text:p>284,671266638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7]" office:value-type="float" office:value="3.94999999999996" calcext:value-type="float">
            <text:p>3,94999999999996</text:p>
          </table:table-cell>
          <table:table-cell table:style-name="ce1" table:formula="of:=[.H397]" office:value-type="float" office:value="284.671266638953" calcext:value-type="float">
            <text:p>284,671266638953</text:p>
          </table:table-cell>
          <table:table-cell table:style-name="ce1" table:formula="of:=-68 - ([.E398]^2/Ao)" office:value-type="float" office:value="-108.518865024913" calcext:value-type="float">
            <text:p>-108,518865024913</text:p>
          </table:table-cell>
          <table:table-cell table:style-name="ce1" table:formula="of:=[.G397]+h" office:value-type="float" office:value="3.95999999999996" calcext:value-type="float">
            <text:p>3,95999999999996</text:p>
          </table:table-cell>
          <table:table-cell table:style-name="ce1" table:formula="of:=[.H397]+ h*[.F398]" office:value-type="float" office:value="283.586077988704" calcext:value-type="float">
            <text:p>283,5860779887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8]" office:value-type="float" office:value="3.95999999999996" calcext:value-type="float">
            <text:p>3,95999999999996</text:p>
          </table:table-cell>
          <table:table-cell table:style-name="ce1" table:formula="of:=[.H398]" office:value-type="float" office:value="283.586077988704" calcext:value-type="float">
            <text:p>283,586077988704</text:p>
          </table:table-cell>
          <table:table-cell table:style-name="ce1" table:formula="of:=-68 - ([.E399]^2/Ao)" office:value-type="float" office:value="-108.210531814508" calcext:value-type="float">
            <text:p>-108,210531814508</text:p>
          </table:table-cell>
          <table:table-cell table:style-name="ce1" table:formula="of:=[.G398]+h" office:value-type="float" office:value="3.96999999999996" calcext:value-type="float">
            <text:p>3,96999999999996</text:p>
          </table:table-cell>
          <table:table-cell table:style-name="ce1" table:formula="of:=[.H398]+ h*[.F399]" office:value-type="float" office:value="282.503972670559" calcext:value-type="float">
            <text:p>282,5039726705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399]" office:value-type="float" office:value="3.96999999999996" calcext:value-type="float">
            <text:p>3,96999999999996</text:p>
          </table:table-cell>
          <table:table-cell table:style-name="ce1" table:formula="of:=[.H399]" office:value-type="float" office:value="282.503972670559" calcext:value-type="float">
            <text:p>282,503972670559</text:p>
          </table:table-cell>
          <table:table-cell table:style-name="ce1" table:formula="of:=-68 - ([.E400]^2/Ao)" office:value-type="float" office:value="-107.904247287324" calcext:value-type="float">
            <text:p>-107,904247287324</text:p>
          </table:table-cell>
          <table:table-cell table:style-name="ce1" table:formula="of:=[.G399]+h" office:value-type="float" office:value="3.97999999999996" calcext:value-type="float">
            <text:p>3,97999999999996</text:p>
          </table:table-cell>
          <table:table-cell table:style-name="ce1" table:formula="of:=[.H399]+ h*[.F400]" office:value-type="float" office:value="281.424930197685" calcext:value-type="float">
            <text:p>281,4249301976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0]" office:value-type="float" office:value="3.97999999999996" calcext:value-type="float">
            <text:p>3,97999999999996</text:p>
          </table:table-cell>
          <table:table-cell table:style-name="ce1" table:formula="of:=[.H400]" office:value-type="float" office:value="281.424930197685" calcext:value-type="float">
            <text:p>281,424930197685</text:p>
          </table:table-cell>
          <table:table-cell table:style-name="ce1" table:formula="of:=-68 - ([.E401]^2/Ao)" office:value-type="float" office:value="-107.599995668386" calcext:value-type="float">
            <text:p>-107,599995668386</text:p>
          </table:table-cell>
          <table:table-cell table:style-name="ce1" table:formula="of:=[.G400]+h" office:value-type="float" office:value="3.98999999999996" calcext:value-type="float">
            <text:p>3,98999999999996</text:p>
          </table:table-cell>
          <table:table-cell table:style-name="ce1" table:formula="of:=[.H400]+ h*[.F401]" office:value-type="float" office:value="280.348930241002" calcext:value-type="float">
            <text:p>280,3489302410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1]" office:value-type="float" office:value="3.98999999999996" calcext:value-type="float">
            <text:p>3,98999999999996</text:p>
          </table:table-cell>
          <table:table-cell table:style-name="ce1" table:formula="of:=[.H401]" office:value-type="float" office:value="280.348930241002" calcext:value-type="float">
            <text:p>280,348930241002</text:p>
          </table:table-cell>
          <table:table-cell table:style-name="ce1" table:formula="of:=-68 - ([.E402]^2/Ao)" office:value-type="float" office:value="-107.297761343637" calcext:value-type="float">
            <text:p>-107,297761343637</text:p>
          </table:table-cell>
          <table:table-cell table:style-name="ce1" table:formula="of:=[.G401]+h" office:value-type="float" office:value="3.99999999999996" calcext:value-type="float">
            <text:p>3,99999999999996</text:p>
          </table:table-cell>
          <table:table-cell table:style-name="ce1" table:formula="of:=[.H401]+ h*[.F402]" office:value-type="float" office:value="279.275952627565" calcext:value-type="float">
            <text:p>279,2759526275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2]" office:value-type="float" office:value="3.99999999999996" calcext:value-type="float">
            <text:p>3,99999999999996</text:p>
          </table:table-cell>
          <table:table-cell table:style-name="ce1" table:formula="of:=[.H402]" office:value-type="float" office:value="279.275952627565" calcext:value-type="float">
            <text:p>279,275952627565</text:p>
          </table:table-cell>
          <table:table-cell table:style-name="ce1" table:formula="of:=-68 - ([.E403]^2/Ao)" office:value-type="float" office:value="-106.997528858017" calcext:value-type="float">
            <text:p>-106,997528858017</text:p>
          </table:table-cell>
          <table:table-cell table:style-name="ce1" table:formula="of:=[.G402]+h" office:value-type="float" office:value="4.00999999999996" calcext:value-type="float">
            <text:p>4,00999999999996</text:p>
          </table:table-cell>
          <table:table-cell table:style-name="ce1" table:formula="of:=[.H402]+ h*[.F403]" office:value-type="float" office:value="278.205977338985" calcext:value-type="float">
            <text:p>278,2059773389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3]" office:value-type="float" office:value="4.00999999999996" calcext:value-type="float">
            <text:p>4,00999999999996</text:p>
          </table:table-cell>
          <table:table-cell table:style-name="ce1" table:formula="of:=[.H403]" office:value-type="float" office:value="278.205977338985" calcext:value-type="float">
            <text:p>278,205977338985</text:p>
          </table:table-cell>
          <table:table-cell table:style-name="ce1" table:formula="of:=-68 - ([.E404]^2/Ao)" office:value-type="float" office:value="-106.69928291357" calcext:value-type="float">
            <text:p>-106,69928291357</text:p>
          </table:table-cell>
          <table:table-cell table:style-name="ce1" table:formula="of:=[.G403]+h" office:value-type="float" office:value="4.01999999999996" calcext:value-type="float">
            <text:p>4,01999999999996</text:p>
          </table:table-cell>
          <table:table-cell table:style-name="ce1" table:formula="of:=[.H403]+ h*[.F404]" office:value-type="float" office:value="277.138984509849" calcext:value-type="float">
            <text:p>277,1389845098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4]" office:value-type="float" office:value="4.01999999999996" calcext:value-type="float">
            <text:p>4,01999999999996</text:p>
          </table:table-cell>
          <table:table-cell table:style-name="ce1" table:formula="of:=[.H404]" office:value-type="float" office:value="277.138984509849" calcext:value-type="float">
            <text:p>277,138984509849</text:p>
          </table:table-cell>
          <table:table-cell table:style-name="ce1" table:formula="of:=-68 - ([.E405]^2/Ao)" office:value-type="float" office:value="-106.403008367575" calcext:value-type="float">
            <text:p>-106,403008367575</text:p>
          </table:table-cell>
          <table:table-cell table:style-name="ce1" table:formula="of:=[.G404]+h" office:value-type="float" office:value="4.02999999999996" calcext:value-type="float">
            <text:p>4,02999999999996</text:p>
          </table:table-cell>
          <table:table-cell table:style-name="ce1" table:formula="of:=[.H404]+ h*[.F405]" office:value-type="float" office:value="276.074954426174" calcext:value-type="float">
            <text:p>276,0749544261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5]" office:value-type="float" office:value="4.02999999999996" calcext:value-type="float">
            <text:p>4,02999999999996</text:p>
          </table:table-cell>
          <table:table-cell table:style-name="ce1" table:formula="of:=[.H405]" office:value-type="float" office:value="276.074954426174" calcext:value-type="float">
            <text:p>276,074954426174</text:p>
          </table:table-cell>
          <table:table-cell table:style-name="ce1" table:formula="of:=-68 - ([.E406]^2/Ao)" office:value-type="float" office:value="-106.108690230707" calcext:value-type="float">
            <text:p>-106,108690230707</text:p>
          </table:table-cell>
          <table:table-cell table:style-name="ce1" table:formula="of:=[.G405]+h" office:value-type="float" office:value="4.03999999999996" calcext:value-type="float">
            <text:p>4,03999999999996</text:p>
          </table:table-cell>
          <table:table-cell table:style-name="ce1" table:formula="of:=[.H405]+ h*[.F406]" office:value-type="float" office:value="275.013867523867" calcext:value-type="float">
            <text:p>275,0138675238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6]" office:value-type="float" office:value="4.03999999999996" calcext:value-type="float">
            <text:p>4,03999999999996</text:p>
          </table:table-cell>
          <table:table-cell table:style-name="ce1" table:formula="of:=[.H406]" office:value-type="float" office:value="275.013867523867" calcext:value-type="float">
            <text:p>275,013867523867</text:p>
          </table:table-cell>
          <table:table-cell table:style-name="ce1" table:formula="of:=-68 - ([.E407]^2/Ao)" office:value-type="float" office:value="-105.816313665217" calcext:value-type="float">
            <text:p>-105,816313665217</text:p>
          </table:table-cell>
          <table:table-cell table:style-name="ce1" table:formula="of:=[.G406]+h" office:value-type="float" office:value="4.04999999999996" calcext:value-type="float">
            <text:p>4,04999999999996</text:p>
          </table:table-cell>
          <table:table-cell table:style-name="ce1" table:formula="of:=[.H406]+ h*[.F407]" office:value-type="float" office:value="273.955704387214" calcext:value-type="float">
            <text:p>273,9557043872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7]" office:value-type="float" office:value="4.04999999999996" calcext:value-type="float">
            <text:p>4,04999999999996</text:p>
          </table:table-cell>
          <table:table-cell table:style-name="ce1" table:formula="of:=[.H407]" office:value-type="float" office:value="273.955704387214" calcext:value-type="float">
            <text:p>273,955704387214</text:p>
          </table:table-cell>
          <table:table-cell table:style-name="ce1" table:formula="of:=-68 - ([.E408]^2/Ao)" office:value-type="float" office:value="-105.525863983147" calcext:value-type="float">
            <text:p>-105,525863983147</text:p>
          </table:table-cell>
          <table:table-cell table:style-name="ce1" table:formula="of:=[.G407]+h" office:value-type="float" office:value="4.05999999999996" calcext:value-type="float">
            <text:p>4,05999999999996</text:p>
          </table:table-cell>
          <table:table-cell table:style-name="ce1" table:formula="of:=[.H407]+ h*[.F408]" office:value-type="float" office:value="272.900445747383" calcext:value-type="float">
            <text:p>272,9004457473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8]" office:value-type="float" office:value="4.05999999999996" calcext:value-type="float">
            <text:p>4,05999999999996</text:p>
          </table:table-cell>
          <table:table-cell table:style-name="ce1" table:formula="of:=[.H408]" office:value-type="float" office:value="272.900445747383" calcext:value-type="float">
            <text:p>272,900445747383</text:p>
          </table:table-cell>
          <table:table-cell table:style-name="ce1" table:formula="of:=-68 - ([.E409]^2/Ao)" office:value-type="float" office:value="-105.23732664456" calcext:value-type="float">
            <text:p>-105,23732664456</text:p>
          </table:table-cell>
          <table:table-cell table:style-name="ce1" table:formula="of:=[.G408]+h" office:value-type="float" office:value="4.06999999999996" calcext:value-type="float">
            <text:p>4,06999999999996</text:p>
          </table:table-cell>
          <table:table-cell table:style-name="ce1" table:formula="of:=[.H408]+ h*[.F409]" office:value-type="float" office:value="271.848072480937" calcext:value-type="float">
            <text:p>271,8480724809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09]" office:value-type="float" office:value="4.06999999999996" calcext:value-type="float">
            <text:p>4,06999999999996</text:p>
          </table:table-cell>
          <table:table-cell table:style-name="ce1" table:formula="of:=[.H409]" office:value-type="float" office:value="271.848072480937" calcext:value-type="float">
            <text:p>271,848072480937</text:p>
          </table:table-cell>
          <table:table-cell table:style-name="ce1" table:formula="of:=-68 - ([.E410]^2/Ao)" office:value-type="float" office:value="-104.9506872558" calcext:value-type="float">
            <text:p>-104,9506872558</text:p>
          </table:table-cell>
          <table:table-cell table:style-name="ce1" table:formula="of:=[.G409]+h" office:value-type="float" office:value="4.07999999999996" calcext:value-type="float">
            <text:p>4,07999999999996</text:p>
          </table:table-cell>
          <table:table-cell table:style-name="ce1" table:formula="of:=[.H409]+ h*[.F410]" office:value-type="float" office:value="270.798565608379" calcext:value-type="float">
            <text:p>270,7985656083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0]" office:value-type="float" office:value="4.07999999999996" calcext:value-type="float">
            <text:p>4,07999999999996</text:p>
          </table:table-cell>
          <table:table-cell table:style-name="ce1" table:formula="of:=[.H410]" office:value-type="float" office:value="270.798565608379" calcext:value-type="float">
            <text:p>270,798565608379</text:p>
          </table:table-cell>
          <table:table-cell table:style-name="ce1" table:formula="of:=-68 - ([.E411]^2/Ao)" office:value-type="float" office:value="-104.665931567778" calcext:value-type="float">
            <text:p>-104,665931567778</text:p>
          </table:table-cell>
          <table:table-cell table:style-name="ce1" table:formula="of:=[.G410]+h" office:value-type="float" office:value="4.08999999999996" calcext:value-type="float">
            <text:p>4,08999999999996</text:p>
          </table:table-cell>
          <table:table-cell table:style-name="ce1" table:formula="of:=[.H410]+ h*[.F411]" office:value-type="float" office:value="269.751906292701" calcext:value-type="float">
            <text:p>269,7519062927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1]" office:value-type="float" office:value="4.08999999999996" calcext:value-type="float">
            <text:p>4,08999999999996</text:p>
          </table:table-cell>
          <table:table-cell table:style-name="ce1" table:formula="of:=[.H411]" office:value-type="float" office:value="269.751906292701" calcext:value-type="float">
            <text:p>269,751906292701</text:p>
          </table:table-cell>
          <table:table-cell table:style-name="ce1" table:formula="of:=-68 - ([.E412]^2/Ao)" office:value-type="float" office:value="-104.383045474273" calcext:value-type="float">
            <text:p>-104,383045474273</text:p>
          </table:table-cell>
          <table:table-cell table:style-name="ce1" table:formula="of:=[.G411]+h" office:value-type="float" office:value="4.09999999999996" calcext:value-type="float">
            <text:p>4,09999999999996</text:p>
          </table:table-cell>
          <table:table-cell table:style-name="ce1" table:formula="of:=[.H411]+ h*[.F412]" office:value-type="float" office:value="268.708075837959" calcext:value-type="float">
            <text:p>268,7080758379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2]" office:value-type="float" office:value="4.09999999999996" calcext:value-type="float">
            <text:p>4,09999999999996</text:p>
          </table:table-cell>
          <table:table-cell table:style-name="ce1" table:formula="of:=[.H412]" office:value-type="float" office:value="268.708075837959" calcext:value-type="float">
            <text:p>268,708075837959</text:p>
          </table:table-cell>
          <table:table-cell table:style-name="ce1" table:formula="of:=-68 - ([.E413]^2/Ao)" office:value-type="float" office:value="-104.102015010269" calcext:value-type="float">
            <text:p>-104,102015010269</text:p>
          </table:table-cell>
          <table:table-cell table:style-name="ce1" table:formula="of:=[.G412]+h" office:value-type="float" office:value="4.10999999999996" calcext:value-type="float">
            <text:p>4,10999999999996</text:p>
          </table:table-cell>
          <table:table-cell table:style-name="ce1" table:formula="of:=[.H412]+ h*[.F413]" office:value-type="float" office:value="267.667055687856" calcext:value-type="float">
            <text:p>267,6670556878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3]" office:value-type="float" office:value="4.10999999999996" calcext:value-type="float">
            <text:p>4,10999999999996</text:p>
          </table:table-cell>
          <table:table-cell table:style-name="ce1" table:formula="of:=[.H413]" office:value-type="float" office:value="267.667055687856" calcext:value-type="float">
            <text:p>267,667055687856</text:p>
          </table:table-cell>
          <table:table-cell table:style-name="ce1" table:formula="of:=-68 - ([.E414]^2/Ao)" office:value-type="float" office:value="-103.822826350303" calcext:value-type="float">
            <text:p>-103,822826350303</text:p>
          </table:table-cell>
          <table:table-cell table:style-name="ce1" table:formula="of:=[.G413]+h" office:value-type="float" office:value="4.11999999999996" calcext:value-type="float">
            <text:p>4,11999999999996</text:p>
          </table:table-cell>
          <table:table-cell table:style-name="ce1" table:formula="of:=[.H413]+ h*[.F414]" office:value-type="float" office:value="266.628827424353" calcext:value-type="float">
            <text:p>266,6288274243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4]" office:value-type="float" office:value="4.11999999999996" calcext:value-type="float">
            <text:p>4,11999999999996</text:p>
          </table:table-cell>
          <table:table-cell table:style-name="ce1" table:formula="of:=[.H414]" office:value-type="float" office:value="266.628827424353" calcext:value-type="float">
            <text:p>266,628827424353</text:p>
          </table:table-cell>
          <table:table-cell table:style-name="ce1" table:formula="of:=-68 - ([.E415]^2/Ao)" office:value-type="float" office:value="-103.545465806843" calcext:value-type="float">
            <text:p>-103,545465806843</text:p>
          </table:table-cell>
          <table:table-cell table:style-name="ce1" table:formula="of:=[.G414]+h" office:value-type="float" office:value="4.12999999999996" calcext:value-type="float">
            <text:p>4,12999999999996</text:p>
          </table:table-cell>
          <table:table-cell table:style-name="ce1" table:formula="of:=[.H414]+ h*[.F415]" office:value-type="float" office:value="265.593372766285" calcext:value-type="float">
            <text:p>265,5933727662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5]" office:value-type="float" office:value="4.12999999999996" calcext:value-type="float">
            <text:p>4,12999999999996</text:p>
          </table:table-cell>
          <table:table-cell table:style-name="ce1" table:formula="of:=[.H415]" office:value-type="float" office:value="265.593372766285" calcext:value-type="float">
            <text:p>265,593372766285</text:p>
          </table:table-cell>
          <table:table-cell table:style-name="ce1" table:formula="of:=-68 - ([.E416]^2/Ao)" office:value-type="float" office:value="-103.269919828685" calcext:value-type="float">
            <text:p>-103,269919828685</text:p>
          </table:table-cell>
          <table:table-cell table:style-name="ce1" table:formula="of:=[.G415]+h" office:value-type="float" office:value="4.13999999999996" calcext:value-type="float">
            <text:p>4,13999999999996</text:p>
          </table:table-cell>
          <table:table-cell table:style-name="ce1" table:formula="of:=[.H415]+ h*[.F416]" office:value-type="float" office:value="264.560673567998" calcext:value-type="float">
            <text:p>264,5606735679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6]" office:value-type="float" office:value="4.13999999999996" calcext:value-type="float">
            <text:p>4,13999999999996</text:p>
          </table:table-cell>
          <table:table-cell table:style-name="ce1" table:formula="of:=[.H416]" office:value-type="float" office:value="264.560673567998" calcext:value-type="float">
            <text:p>264,560673567998</text:p>
          </table:table-cell>
          <table:table-cell table:style-name="ce1" table:formula="of:=-68 - ([.E417]^2/Ao)" office:value-type="float" office:value="-102.996174999376" calcext:value-type="float">
            <text:p>-102,996174999376</text:p>
          </table:table-cell>
          <table:table-cell table:style-name="ce1" table:formula="of:=[.G416]+h" office:value-type="float" office:value="4.14999999999996" calcext:value-type="float">
            <text:p>4,14999999999996</text:p>
          </table:table-cell>
          <table:table-cell table:style-name="ce1" table:formula="of:=[.H416]+ h*[.F417]" office:value-type="float" office:value="263.530711818004" calcext:value-type="float">
            <text:p>263,5307118180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7]" office:value-type="float" office:value="4.14999999999996" calcext:value-type="float">
            <text:p>4,14999999999996</text:p>
          </table:table-cell>
          <table:table-cell table:style-name="ce1" table:formula="of:=[.H417]" office:value-type="float" office:value="263.530711818004" calcext:value-type="float">
            <text:p>263,530711818004</text:p>
          </table:table-cell>
          <table:table-cell table:style-name="ce1" table:formula="of:=-68 - ([.E418]^2/Ao)" office:value-type="float" office:value="-102.724218035652" calcext:value-type="float">
            <text:p>-102,724218035652</text:p>
          </table:table-cell>
          <table:table-cell table:style-name="ce1" table:formula="of:=[.G417]+h" office:value-type="float" office:value="4.15999999999996" calcext:value-type="float">
            <text:p>4,15999999999996</text:p>
          </table:table-cell>
          <table:table-cell table:style-name="ce1" table:formula="of:=[.H417]+ h*[.F418]" office:value-type="float" office:value="262.503469637647" calcext:value-type="float">
            <text:p>262,5034696376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8]" office:value-type="float" office:value="4.15999999999996" calcext:value-type="float">
            <text:p>4,15999999999996</text:p>
          </table:table-cell>
          <table:table-cell table:style-name="ce1" table:formula="of:=[.H418]" office:value-type="float" office:value="262.503469637647" calcext:value-type="float">
            <text:p>262,503469637647</text:p>
          </table:table-cell>
          <table:table-cell table:style-name="ce1" table:formula="of:=-68 - ([.E419]^2/Ao)" office:value-type="float" office:value="-102.454035785902" calcext:value-type="float">
            <text:p>-102,454035785902</text:p>
          </table:table-cell>
          <table:table-cell table:style-name="ce1" table:formula="of:=[.G418]+h" office:value-type="float" office:value="4.16999999999996" calcext:value-type="float">
            <text:p>4,16999999999996</text:p>
          </table:table-cell>
          <table:table-cell table:style-name="ce1" table:formula="of:=[.H418]+ h*[.F419]" office:value-type="float" office:value="261.478929279789" calcext:value-type="float">
            <text:p>261,4789292797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19]" office:value-type="float" office:value="4.16999999999996" calcext:value-type="float">
            <text:p>4,16999999999996</text:p>
          </table:table-cell>
          <table:table-cell table:style-name="ce1" table:formula="of:=[.H419]" office:value-type="float" office:value="261.478929279789" calcext:value-type="float">
            <text:p>261,478929279789</text:p>
          </table:table-cell>
          <table:table-cell table:style-name="ce1" table:formula="of:=-68 - ([.E420]^2/Ao)" office:value-type="float" office:value="-102.185615228652" calcext:value-type="float">
            <text:p>-102,185615228652</text:p>
          </table:table-cell>
          <table:table-cell table:style-name="ce1" table:formula="of:=[.G419]+h" office:value-type="float" office:value="4.17999999999996" calcext:value-type="float">
            <text:p>4,17999999999996</text:p>
          </table:table-cell>
          <table:table-cell table:style-name="ce1" table:formula="of:=[.H419]+ h*[.F420]" office:value-type="float" office:value="260.457073127502" calcext:value-type="float">
            <text:p>260,4570731275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0]" office:value-type="float" office:value="4.17999999999996" calcext:value-type="float">
            <text:p>4,17999999999996</text:p>
          </table:table-cell>
          <table:table-cell table:style-name="ce1" table:formula="of:=[.H420]" office:value-type="float" office:value="260.457073127502" calcext:value-type="float">
            <text:p>260,457073127502</text:p>
          </table:table-cell>
          <table:table-cell table:style-name="ce1" table:formula="of:=-68 - ([.E421]^2/Ao)" office:value-type="float" office:value="-101.918943471072" calcext:value-type="float">
            <text:p>-101,918943471072</text:p>
          </table:table-cell>
          <table:table-cell table:style-name="ce1" table:formula="of:=[.G420]+h" office:value-type="float" office:value="4.18999999999996" calcext:value-type="float">
            <text:p>4,18999999999996</text:p>
          </table:table-cell>
          <table:table-cell table:style-name="ce1" table:formula="of:=[.H420]+ h*[.F421]" office:value-type="float" office:value="259.437883692791" calcext:value-type="float">
            <text:p>259,4378836927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1]" office:value-type="float" office:value="4.18999999999996" calcext:value-type="float">
            <text:p>4,18999999999996</text:p>
          </table:table-cell>
          <table:table-cell table:style-name="ce1" table:formula="of:=[.H421]" office:value-type="float" office:value="259.437883692791" calcext:value-type="float">
            <text:p>259,437883692791</text:p>
          </table:table-cell>
          <table:table-cell table:style-name="ce1" table:formula="of:=-68 - ([.E422]^2/Ao)" office:value-type="float" office:value="-101.654007747497" calcext:value-type="float">
            <text:p>-101,654007747497</text:p>
          </table:table-cell>
          <table:table-cell table:style-name="ce1" table:formula="of:=[.G421]+h" office:value-type="float" office:value="4.19999999999996" calcext:value-type="float">
            <text:p>4,19999999999996</text:p>
          </table:table-cell>
          <table:table-cell table:style-name="ce1" table:formula="of:=[.H421]+ h*[.F422]" office:value-type="float" office:value="258.421343615316" calcext:value-type="float">
            <text:p>258,4213436153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2]" office:value-type="float" office:value="4.19999999999996" calcext:value-type="float">
            <text:p>4,19999999999996</text:p>
          </table:table-cell>
          <table:table-cell table:style-name="ce1" table:formula="of:=[.H422]" office:value-type="float" office:value="258.421343615316" calcext:value-type="float">
            <text:p>258,421343615316</text:p>
          </table:table-cell>
          <table:table-cell table:style-name="ce1" table:formula="of:=-68 - ([.E423]^2/Ao)" office:value-type="float" office:value="-101.390795417973" calcext:value-type="float">
            <text:p>-101,390795417973</text:p>
          </table:table-cell>
          <table:table-cell table:style-name="ce1" table:formula="of:=[.G422]+h" office:value-type="float" office:value="4.20999999999996" calcext:value-type="float">
            <text:p>4,20999999999996</text:p>
          </table:table-cell>
          <table:table-cell table:style-name="ce1" table:formula="of:=[.H422]+ h*[.F423]" office:value-type="float" office:value="257.407435661137" calcext:value-type="float">
            <text:p>257,4074356611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3]" office:value-type="float" office:value="4.20999999999996" calcext:value-type="float">
            <text:p>4,20999999999996</text:p>
          </table:table-cell>
          <table:table-cell table:style-name="ce1" table:formula="of:=[.H423]" office:value-type="float" office:value="257.407435661137" calcext:value-type="float">
            <text:p>257,407435661137</text:p>
          </table:table-cell>
          <table:table-cell table:style-name="ce1" table:formula="of:=-68 - ([.E424]^2/Ao)" office:value-type="float" office:value="-101.129293966821" calcext:value-type="float">
            <text:p>-101,129293966821</text:p>
          </table:table-cell>
          <table:table-cell table:style-name="ce1" table:formula="of:=[.G423]+h" office:value-type="float" office:value="4.21999999999995" calcext:value-type="float">
            <text:p>4,21999999999995</text:p>
          </table:table-cell>
          <table:table-cell table:style-name="ce1" table:formula="of:=[.H423]+ h*[.F424]" office:value-type="float" office:value="256.396142721468" calcext:value-type="float">
            <text:p>256,3961427214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4]" office:value-type="float" office:value="4.21999999999995" calcext:value-type="float">
            <text:p>4,21999999999995</text:p>
          </table:table-cell>
          <table:table-cell table:style-name="ce1" table:formula="of:=[.H424]" office:value-type="float" office:value="256.396142721468" calcext:value-type="float">
            <text:p>256,396142721468</text:p>
          </table:table-cell>
          <table:table-cell table:style-name="ce1" table:formula="of:=-68 - ([.E425]^2/Ao)" office:value-type="float" office:value="-100.869491001224" calcext:value-type="float">
            <text:p>-100,869491001224</text:p>
          </table:table-cell>
          <table:table-cell table:style-name="ce1" table:formula="of:=[.G424]+h" office:value-type="float" office:value="4.22999999999995" calcext:value-type="float">
            <text:p>4,22999999999995</text:p>
          </table:table-cell>
          <table:table-cell table:style-name="ce1" table:formula="of:=[.H424]+ h*[.F425]" office:value-type="float" office:value="255.387447811456" calcext:value-type="float">
            <text:p>255,3874478114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5]" office:value-type="float" office:value="4.22999999999995" calcext:value-type="float">
            <text:p>4,22999999999995</text:p>
          </table:table-cell>
          <table:table-cell table:style-name="ce1" table:formula="of:=[.H425]" office:value-type="float" office:value="255.387447811456" calcext:value-type="float">
            <text:p>255,387447811456</text:p>
          </table:table-cell>
          <table:table-cell table:style-name="ce1" table:formula="of:=-68 - ([.E426]^2/Ao)" office:value-type="float" office:value="-100.611374249825" calcext:value-type="float">
            <text:p>-100,611374249825</text:p>
          </table:table-cell>
          <table:table-cell table:style-name="ce1" table:formula="of:=[.G425]+h" office:value-type="float" office:value="4.23999999999995" calcext:value-type="float">
            <text:p>4,23999999999995</text:p>
          </table:table-cell>
          <table:table-cell table:style-name="ce1" table:formula="of:=[.H425]+ h*[.F426]" office:value-type="float" office:value="254.381334068958" calcext:value-type="float">
            <text:p>254,3813340689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6]" office:value-type="float" office:value="4.23999999999995" calcext:value-type="float">
            <text:p>4,23999999999995</text:p>
          </table:table-cell>
          <table:table-cell table:style-name="ce1" table:formula="of:=[.H426]" office:value-type="float" office:value="254.381334068958" calcext:value-type="float">
            <text:p>254,381334068958</text:p>
          </table:table-cell>
          <table:table-cell table:style-name="ce1" table:formula="of:=-68 - ([.E427]^2/Ao)" office:value-type="float" office:value="-100.354931561351" calcext:value-type="float">
            <text:p>-100,354931561351</text:p>
          </table:table-cell>
          <table:table-cell table:style-name="ce1" table:formula="of:=[.G426]+h" office:value-type="float" office:value="4.24999999999995" calcext:value-type="float">
            <text:p>4,24999999999995</text:p>
          </table:table-cell>
          <table:table-cell table:style-name="ce1" table:formula="of:=[.H426]+ h*[.F427]" office:value-type="float" office:value="253.377784753344" calcext:value-type="float">
            <text:p>253,3777847533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7]" office:value-type="float" office:value="4.24999999999995" calcext:value-type="float">
            <text:p>4,24999999999995</text:p>
          </table:table-cell>
          <table:table-cell table:style-name="ce1" table:formula="of:=[.H427]" office:value-type="float" office:value="253.377784753344" calcext:value-type="float">
            <text:p>253,377784753344</text:p>
          </table:table-cell>
          <table:table-cell table:style-name="ce1" table:formula="of:=-68 - ([.E428]^2/Ao)" office:value-type="float" office:value="-100.100150903256" calcext:value-type="float">
            <text:p>-100,100150903256</text:p>
          </table:table-cell>
          <table:table-cell table:style-name="ce1" table:formula="of:=[.G427]+h" office:value-type="float" office:value="4.25999999999995" calcext:value-type="float">
            <text:p>4,25999999999995</text:p>
          </table:table-cell>
          <table:table-cell table:style-name="ce1" table:formula="of:=[.H427]+ h*[.F428]" office:value-type="float" office:value="252.376783244312" calcext:value-type="float">
            <text:p>252,3767832443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8]" office:value-type="float" office:value="4.25999999999995" calcext:value-type="float">
            <text:p>4,25999999999995</text:p>
          </table:table-cell>
          <table:table-cell table:style-name="ce1" table:formula="of:=[.H428]" office:value-type="float" office:value="252.376783244312" calcext:value-type="float">
            <text:p>252,376783244312</text:p>
          </table:table-cell>
          <table:table-cell table:style-name="ce1" table:formula="of:=-68 - ([.E429]^2/Ao)" office:value-type="float" office:value="-99.8470203603732" calcext:value-type="float">
            <text:p>-99,8470203603732</text:p>
          </table:table-cell>
          <table:table-cell table:style-name="ce1" table:formula="of:=[.G428]+h" office:value-type="float" office:value="4.26999999999995" calcext:value-type="float">
            <text:p>4,26999999999995</text:p>
          </table:table-cell>
          <table:table-cell table:style-name="ce1" table:formula="of:=[.H428]+ h*[.F429]" office:value-type="float" office:value="251.378313040708" calcext:value-type="float">
            <text:p>251,3783130407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29]" office:value-type="float" office:value="4.26999999999995" calcext:value-type="float">
            <text:p>4,26999999999995</text:p>
          </table:table-cell>
          <table:table-cell table:style-name="ce1" table:formula="of:=[.H429]" office:value-type="float" office:value="251.378313040708" calcext:value-type="float">
            <text:p>251,378313040708</text:p>
          </table:table-cell>
          <table:table-cell table:style-name="ce1" table:formula="of:=-68 - ([.E430]^2/Ao)" office:value-type="float" office:value="-99.5955281335961" calcext:value-type="float">
            <text:p>-99,5955281335961</text:p>
          </table:table-cell>
          <table:table-cell table:style-name="ce1" table:formula="of:=[.G429]+h" office:value-type="float" office:value="4.27999999999995" calcext:value-type="float">
            <text:p>4,27999999999995</text:p>
          </table:table-cell>
          <table:table-cell table:style-name="ce1" table:formula="of:=[.H429]+ h*[.F430]" office:value-type="float" office:value="250.382357759372" calcext:value-type="float">
            <text:p>250,3823577593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0]" office:value-type="float" office:value="4.27999999999995" calcext:value-type="float">
            <text:p>4,27999999999995</text:p>
          </table:table-cell>
          <table:table-cell table:style-name="ce1" table:formula="of:=[.H430]" office:value-type="float" office:value="250.382357759372" calcext:value-type="float">
            <text:p>250,382357759372</text:p>
          </table:table-cell>
          <table:table-cell table:style-name="ce1" table:formula="of:=-68 - ([.E431]^2/Ao)" office:value-type="float" office:value="-99.3456625385711" calcext:value-type="float">
            <text:p>-99,3456625385711</text:p>
          </table:table-cell>
          <table:table-cell table:style-name="ce1" table:formula="of:=[.G430]+h" office:value-type="float" office:value="4.28999999999995" calcext:value-type="float">
            <text:p>4,28999999999995</text:p>
          </table:table-cell>
          <table:table-cell table:style-name="ce1" table:formula="of:=[.H430]+ h*[.F431]" office:value-type="float" office:value="249.388901133986" calcext:value-type="float">
            <text:p>249,3889011339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1]" office:value-type="float" office:value="4.28999999999995" calcext:value-type="float">
            <text:p>4,28999999999995</text:p>
          </table:table-cell>
          <table:table-cell table:style-name="ce1" table:formula="of:=[.H431]" office:value-type="float" office:value="249.388901133986" calcext:value-type="float">
            <text:p>249,388901133986</text:p>
          </table:table-cell>
          <table:table-cell table:style-name="ce1" table:formula="of:=-68 - ([.E432]^2/Ao)" office:value-type="float" office:value="-99.0974120044086" calcext:value-type="float">
            <text:p>-99,0974120044086</text:p>
          </table:table-cell>
          <table:table-cell table:style-name="ce1" table:formula="of:=[.G431]+h" office:value-type="float" office:value="4.29999999999995" calcext:value-type="float">
            <text:p>4,29999999999995</text:p>
          </table:table-cell>
          <table:table-cell table:style-name="ce1" table:formula="of:=[.H431]+ h*[.F432]" office:value-type="float" office:value="248.397927013942" calcext:value-type="float">
            <text:p>248,3979270139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2]" office:value-type="float" office:value="4.29999999999995" calcext:value-type="float">
            <text:p>4,29999999999995</text:p>
          </table:table-cell>
          <table:table-cell table:style-name="ce1" table:formula="of:=[.H432]" office:value-type="float" office:value="248.397927013942" calcext:value-type="float">
            <text:p>248,397927013942</text:p>
          </table:table-cell>
          <table:table-cell table:style-name="ce1" table:formula="of:=-68 - ([.E433]^2/Ao)" office:value-type="float" office:value="-98.8507650724119" calcext:value-type="float">
            <text:p>-98,8507650724119</text:p>
          </table:table-cell>
          <table:table-cell table:style-name="ce1" table:formula="of:=[.G432]+h" office:value-type="float" office:value="4.30999999999995" calcext:value-type="float">
            <text:p>4,30999999999995</text:p>
          </table:table-cell>
          <table:table-cell table:style-name="ce1" table:formula="of:=[.H432]+ h*[.F433]" office:value-type="float" office:value="247.409419363218" calcext:value-type="float">
            <text:p>247,4094193632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3]" office:value-type="float" office:value="4.30999999999995" calcext:value-type="float">
            <text:p>4,30999999999995</text:p>
          </table:table-cell>
          <table:table-cell table:style-name="ce1" table:formula="of:=[.H433]" office:value-type="float" office:value="247.409419363218" calcext:value-type="float">
            <text:p>247,409419363218</text:p>
          </table:table-cell>
          <table:table-cell table:style-name="ce1" table:formula="of:=-68 - ([.E434]^2/Ao)" office:value-type="float" office:value="-98.6057103948224" calcext:value-type="float">
            <text:p>-98,6057103948224</text:p>
          </table:table-cell>
          <table:table-cell table:style-name="ce1" table:formula="of:=[.G433]+h" office:value-type="float" office:value="4.31999999999995" calcext:value-type="float">
            <text:p>4,31999999999995</text:p>
          </table:table-cell>
          <table:table-cell table:style-name="ce1" table:formula="of:=[.H433]+ h*[.F434]" office:value-type="float" office:value="246.42336225927" calcext:value-type="float">
            <text:p>246,423362259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4]" office:value-type="float" office:value="4.31999999999995" calcext:value-type="float">
            <text:p>4,31999999999995</text:p>
          </table:table-cell>
          <table:table-cell table:style-name="ce1" table:formula="of:=[.H434]" office:value-type="float" office:value="246.42336225927" calcext:value-type="float">
            <text:p>246,42336225927</text:p>
          </table:table-cell>
          <table:table-cell table:style-name="ce1" table:formula="of:=-68 - ([.E435]^2/Ao)" office:value-type="float" office:value="-98.3622367335817" calcext:value-type="float">
            <text:p>-98,3622367335817</text:p>
          </table:table-cell>
          <table:table-cell table:style-name="ce1" table:formula="of:=[.G434]+h" office:value-type="float" office:value="4.32999999999995" calcext:value-type="float">
            <text:p>4,32999999999995</text:p>
          </table:table-cell>
          <table:table-cell table:style-name="ce1" table:formula="of:=[.H434]+ h*[.F435]" office:value-type="float" office:value="245.439739891934" calcext:value-type="float">
            <text:p>245,4397398919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5]" office:value-type="float" office:value="4.32999999999995" calcext:value-type="float">
            <text:p>4,32999999999995</text:p>
          </table:table-cell>
          <table:table-cell table:style-name="ce1" table:formula="of:=[.H435]" office:value-type="float" office:value="245.439739891934" calcext:value-type="float">
            <text:p>245,439739891934</text:p>
          </table:table-cell>
          <table:table-cell table:style-name="ce1" table:formula="of:=-68 - ([.E436]^2/Ao)" office:value-type="float" office:value="-98.1203329591101" calcext:value-type="float">
            <text:p>-98,1203329591101</text:p>
          </table:table-cell>
          <table:table-cell table:style-name="ce1" table:formula="of:=[.G435]+h" office:value-type="float" office:value="4.33999999999995" calcext:value-type="float">
            <text:p>4,33999999999995</text:p>
          </table:table-cell>
          <table:table-cell table:style-name="ce1" table:formula="of:=[.H435]+ h*[.F436]" office:value-type="float" office:value="244.458536562343" calcext:value-type="float">
            <text:p>244,4585365623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6]" office:value-type="float" office:value="4.33999999999995" calcext:value-type="float">
            <text:p>4,33999999999995</text:p>
          </table:table-cell>
          <table:table-cell table:style-name="ce1" table:formula="of:=[.H436]" office:value-type="float" office:value="244.458536562343" calcext:value-type="float">
            <text:p>244,458536562343</text:p>
          </table:table-cell>
          <table:table-cell table:style-name="ce1" table:formula="of:=-68 - ([.E437]^2/Ao)" office:value-type="float" office:value="-97.8799880491012" calcext:value-type="float">
            <text:p>-97,8799880491012</text:p>
          </table:table-cell>
          <table:table-cell table:style-name="ce1" table:formula="of:=[.G436]+h" office:value-type="float" office:value="4.34999999999995" calcext:value-type="float">
            <text:p>4,34999999999995</text:p>
          </table:table-cell>
          <table:table-cell table:style-name="ce1" table:formula="of:=[.H436]+ h*[.F437]" office:value-type="float" office:value="243.479736681852" calcext:value-type="float">
            <text:p>243,4797366818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7]" office:value-type="float" office:value="4.34999999999995" calcext:value-type="float">
            <text:p>4,34999999999995</text:p>
          </table:table-cell>
          <table:table-cell table:style-name="ce1" table:formula="of:=[.H437]" office:value-type="float" office:value="243.479736681852" calcext:value-type="float">
            <text:p>243,479736681852</text:p>
          </table:table-cell>
          <table:table-cell table:style-name="ce1" table:formula="of:=-68 - ([.E438]^2/Ao)" office:value-type="float" office:value="-97.641191087332" calcext:value-type="float">
            <text:p>-97,641191087332</text:p>
          </table:table-cell>
          <table:table-cell table:style-name="ce1" table:formula="of:=[.G437]+h" office:value-type="float" office:value="4.35999999999995" calcext:value-type="float">
            <text:p>4,35999999999995</text:p>
          </table:table-cell>
          <table:table-cell table:style-name="ce1" table:formula="of:=[.H437]+ h*[.F438]" office:value-type="float" office:value="242.503324770979" calcext:value-type="float">
            <text:p>242,5033247709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8]" office:value-type="float" office:value="4.35999999999995" calcext:value-type="float">
            <text:p>4,35999999999995</text:p>
          </table:table-cell>
          <table:table-cell table:style-name="ce1" table:formula="of:=[.H438]" office:value-type="float" office:value="242.503324770979" calcext:value-type="float">
            <text:p>242,503324770979</text:p>
          </table:table-cell>
          <table:table-cell table:style-name="ce1" table:formula="of:=-68 - ([.E439]^2/Ao)" office:value-type="float" office:value="-97.4039312624894" calcext:value-type="float">
            <text:p>-97,4039312624894</text:p>
          </table:table-cell>
          <table:table-cell table:style-name="ce1" table:formula="of:=[.G438]+h" office:value-type="float" office:value="4.36999999999995" calcext:value-type="float">
            <text:p>4,36999999999995</text:p>
          </table:table-cell>
          <table:table-cell table:style-name="ce1" table:formula="of:=[.H438]+ h*[.F439]" office:value-type="float" office:value="241.529285458354" calcext:value-type="float">
            <text:p>241,5292854583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39]" office:value-type="float" office:value="4.36999999999995" calcext:value-type="float">
            <text:p>4,36999999999995</text:p>
          </table:table-cell>
          <table:table-cell table:style-name="ce1" table:formula="of:=[.H439]" office:value-type="float" office:value="241.529285458354" calcext:value-type="float">
            <text:p>241,529285458354</text:p>
          </table:table-cell>
          <table:table-cell table:style-name="ce1" table:formula="of:=-68 - ([.E440]^2/Ao)" office:value-type="float" office:value="-97.1681978670115" calcext:value-type="float">
            <text:p>-97,1681978670115</text:p>
          </table:table-cell>
          <table:table-cell table:style-name="ce1" table:formula="of:=[.G439]+h" office:value-type="float" office:value="4.37999999999995" calcext:value-type="float">
            <text:p>4,37999999999995</text:p>
          </table:table-cell>
          <table:table-cell table:style-name="ce1" table:formula="of:=[.H439]+ h*[.F440]" office:value-type="float" office:value="240.557603479684" calcext:value-type="float">
            <text:p>240,5576034796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0]" office:value-type="float" office:value="4.37999999999995" calcext:value-type="float">
            <text:p>4,37999999999995</text:p>
          </table:table-cell>
          <table:table-cell table:style-name="ce1" table:formula="of:=[.H440]" office:value-type="float" office:value="240.557603479684" calcext:value-type="float">
            <text:p>240,557603479684</text:p>
          </table:table-cell>
          <table:table-cell table:style-name="ce1" table:formula="of:=-68 - ([.E441]^2/Ao)" office:value-type="float" office:value="-96.9339802959444" calcext:value-type="float">
            <text:p>-96,9339802959444</text:p>
          </table:table-cell>
          <table:table-cell table:style-name="ce1" table:formula="of:=[.G440]+h" office:value-type="float" office:value="4.38999999999995" calcext:value-type="float">
            <text:p>4,38999999999995</text:p>
          </table:table-cell>
          <table:table-cell table:style-name="ce1" table:formula="of:=[.H440]+ h*[.F441]" office:value-type="float" office:value="239.588263676724" calcext:value-type="float">
            <text:p>239,5882636767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1]" office:value-type="float" office:value="4.38999999999995" calcext:value-type="float">
            <text:p>4,38999999999995</text:p>
          </table:table-cell>
          <table:table-cell table:style-name="ce1" table:formula="of:=[.H441]" office:value-type="float" office:value="239.588263676724" calcext:value-type="float">
            <text:p>239,588263676724</text:p>
          </table:table-cell>
          <table:table-cell table:style-name="ce1" table:formula="of:=-68 - ([.E442]^2/Ao)" office:value-type="float" office:value="-96.7012680458138" calcext:value-type="float">
            <text:p>-96,7012680458138</text:p>
          </table:table-cell>
          <table:table-cell table:style-name="ce1" table:formula="of:=[.G441]+h" office:value-type="float" office:value="4.39999999999995" calcext:value-type="float">
            <text:p>4,39999999999995</text:p>
          </table:table-cell>
          <table:table-cell table:style-name="ce1" table:formula="of:=[.H441]+ h*[.F442]" office:value-type="float" office:value="238.621250996266" calcext:value-type="float">
            <text:p>238,6212509962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2]" office:value-type="float" office:value="4.39999999999995" calcext:value-type="float">
            <text:p>4,39999999999995</text:p>
          </table:table-cell>
          <table:table-cell table:style-name="ce1" table:formula="of:=[.H442]" office:value-type="float" office:value="238.621250996266" calcext:value-type="float">
            <text:p>238,621250996266</text:p>
          </table:table-cell>
          <table:table-cell table:style-name="ce1" table:formula="of:=-68 - ([.E443]^2/Ao)" office:value-type="float" office:value="-96.4700507135115" calcext:value-type="float">
            <text:p>-96,4700507135115</text:p>
          </table:table-cell>
          <table:table-cell table:style-name="ce1" table:formula="of:=[.G442]+h" office:value-type="float" office:value="4.40999999999995" calcext:value-type="float">
            <text:p>4,40999999999995</text:p>
          </table:table-cell>
          <table:table-cell table:style-name="ce1" table:formula="of:=[.H442]+ h*[.F443]" office:value-type="float" office:value="237.656550489131" calcext:value-type="float">
            <text:p>237,6565504891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3]" office:value-type="float" office:value="4.40999999999995" calcext:value-type="float">
            <text:p>4,40999999999995</text:p>
          </table:table-cell>
          <table:table-cell table:style-name="ce1" table:formula="of:=[.H443]" office:value-type="float" office:value="237.656550489131" calcext:value-type="float">
            <text:p>237,656550489131</text:p>
          </table:table-cell>
          <table:table-cell table:style-name="ce1" table:formula="of:=-68 - ([.E444]^2/Ao)" office:value-type="float" office:value="-96.2403179951964" calcext:value-type="float">
            <text:p>-96,2403179951964</text:p>
          </table:table-cell>
          <table:table-cell table:style-name="ce1" table:formula="of:=[.G443]+h" office:value-type="float" office:value="4.41999999999995" calcext:value-type="float">
            <text:p>4,41999999999995</text:p>
          </table:table-cell>
          <table:table-cell table:style-name="ce1" table:formula="of:=[.H443]+ h*[.F444]" office:value-type="float" office:value="236.694147309179" calcext:value-type="float">
            <text:p>236,6941473091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4]" office:value-type="float" office:value="4.41999999999995" calcext:value-type="float">
            <text:p>4,41999999999995</text:p>
          </table:table-cell>
          <table:table-cell table:style-name="ce1" table:formula="of:=[.H444]" office:value-type="float" office:value="236.694147309179" calcext:value-type="float">
            <text:p>236,694147309179</text:p>
          </table:table-cell>
          <table:table-cell table:style-name="ce1" table:formula="of:=-68 - ([.E445]^2/Ao)" office:value-type="float" office:value="-96.0120596852097" calcext:value-type="float">
            <text:p>-96,0120596852097</text:p>
          </table:table-cell>
          <table:table-cell table:style-name="ce1" table:formula="of:=[.G444]+h" office:value-type="float" office:value="4.42999999999995" calcext:value-type="float">
            <text:p>4,42999999999995</text:p>
          </table:table-cell>
          <table:table-cell table:style-name="ce1" table:formula="of:=[.H444]+ h*[.F445]" office:value-type="float" office:value="235.734026712327" calcext:value-type="float">
            <text:p>235,7340267123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5]" office:value-type="float" office:value="4.42999999999995" calcext:value-type="float">
            <text:p>4,42999999999995</text:p>
          </table:table-cell>
          <table:table-cell table:style-name="ce1" table:formula="of:=[.H445]" office:value-type="float" office:value="235.734026712327" calcext:value-type="float">
            <text:p>235,734026712327</text:p>
          </table:table-cell>
          <table:table-cell table:style-name="ce1" table:formula="of:=-68 - ([.E446]^2/Ao)" office:value-type="float" office:value="-95.785265675004" calcext:value-type="float">
            <text:p>-95,785265675004</text:p>
          </table:table-cell>
          <table:table-cell table:style-name="ce1" table:formula="of:=[.G445]+h" office:value-type="float" office:value="4.43999999999995" calcext:value-type="float">
            <text:p>4,43999999999995</text:p>
          </table:table-cell>
          <table:table-cell table:style-name="ce1" table:formula="of:=[.H445]+ h*[.F446]" office:value-type="float" office:value="234.776174055577" calcext:value-type="float">
            <text:p>234,7761740555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6]" office:value-type="float" office:value="4.43999999999995" calcext:value-type="float">
            <text:p>4,43999999999995</text:p>
          </table:table-cell>
          <table:table-cell table:style-name="ce1" table:formula="of:=[.H446]" office:value-type="float" office:value="234.776174055577" calcext:value-type="float">
            <text:p>234,776174055577</text:p>
          </table:table-cell>
          <table:table-cell table:style-name="ce1" table:formula="of:=-68 - ([.E447]^2/Ao)" office:value-type="float" office:value="-95.5599259520872" calcext:value-type="float">
            <text:p>-95,5599259520872</text:p>
          </table:table-cell>
          <table:table-cell table:style-name="ce1" table:formula="of:=[.G446]+h" office:value-type="float" office:value="4.44999999999995" calcext:value-type="float">
            <text:p>4,44999999999995</text:p>
          </table:table-cell>
          <table:table-cell table:style-name="ce1" table:formula="of:=[.H446]+ h*[.F447]" office:value-type="float" office:value="233.820574796056" calcext:value-type="float">
            <text:p>233,8205747960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7]" office:value-type="float" office:value="4.44999999999995" calcext:value-type="float">
            <text:p>4,44999999999995</text:p>
          </table:table-cell>
          <table:table-cell table:style-name="ce1" table:formula="of:=[.H447]" office:value-type="float" office:value="233.820574796056" calcext:value-type="float">
            <text:p>233,820574796056</text:p>
          </table:table-cell>
          <table:table-cell table:style-name="ce1" table:formula="of:=-68 - ([.E448]^2/Ao)" office:value-type="float" office:value="-95.336030598979" calcext:value-type="float">
            <text:p>-95,336030598979</text:p>
          </table:table-cell>
          <table:table-cell table:style-name="ce1" table:formula="of:=[.G447]+h" office:value-type="float" office:value="4.45999999999995" calcext:value-type="float">
            <text:p>4,45999999999995</text:p>
          </table:table-cell>
          <table:table-cell table:style-name="ce1" table:formula="of:=[.H447]+ h*[.F448]" office:value-type="float" office:value="232.867214490066" calcext:value-type="float">
            <text:p>232,8672144900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8]" office:value-type="float" office:value="4.45999999999995" calcext:value-type="float">
            <text:p>4,45999999999995</text:p>
          </table:table-cell>
          <table:table-cell table:style-name="ce1" table:formula="of:=[.H448]" office:value-type="float" office:value="232.867214490066" calcext:value-type="float">
            <text:p>232,867214490066</text:p>
          </table:table-cell>
          <table:table-cell table:style-name="ce1" table:formula="of:=-68 - ([.E449]^2/Ao)" office:value-type="float" office:value="-95.1135697921812" calcext:value-type="float">
            <text:p>-95,1135697921812</text:p>
          </table:table-cell>
          <table:table-cell table:style-name="ce1" table:formula="of:=[.G448]+h" office:value-type="float" office:value="4.46999999999995" calcext:value-type="float">
            <text:p>4,46999999999995</text:p>
          </table:table-cell>
          <table:table-cell table:style-name="ce1" table:formula="of:=[.H448]+ h*[.F449]" office:value-type="float" office:value="231.916078792144" calcext:value-type="float">
            <text:p>231,9160787921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49]" office:value-type="float" office:value="4.46999999999995" calcext:value-type="float">
            <text:p>4,46999999999995</text:p>
          </table:table-cell>
          <table:table-cell table:style-name="ce1" table:formula="of:=[.H449]" office:value-type="float" office:value="231.916078792144" calcext:value-type="float">
            <text:p>231,916078792144</text:p>
          </table:table-cell>
          <table:table-cell table:style-name="ce1" table:formula="of:=-68 - ([.E450]^2/Ao)" office:value-type="float" office:value="-94.8925338011621" calcext:value-type="float">
            <text:p>-94,8925338011621</text:p>
          </table:table-cell>
          <table:table-cell table:style-name="ce1" table:formula="of:=[.G449]+h" office:value-type="float" office:value="4.47999999999995" calcext:value-type="float">
            <text:p>4,47999999999995</text:p>
          </table:table-cell>
          <table:table-cell table:style-name="ce1" table:formula="of:=[.H449]+ h*[.F450]" office:value-type="float" office:value="230.967153454133" calcext:value-type="float">
            <text:p>230,9671534541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0]" office:value-type="float" office:value="4.47999999999995" calcext:value-type="float">
            <text:p>4,47999999999995</text:p>
          </table:table-cell>
          <table:table-cell table:style-name="ce1" table:formula="of:=[.H450]" office:value-type="float" office:value="230.967153454133" calcext:value-type="float">
            <text:p>230,967153454133</text:p>
          </table:table-cell>
          <table:table-cell table:style-name="ce1" table:formula="of:=-68 - ([.E451]^2/Ao)" office:value-type="float" office:value="-94.6729129873525" calcext:value-type="float">
            <text:p>-94,6729129873525</text:p>
          </table:table-cell>
          <table:table-cell table:style-name="ce1" table:formula="of:=[.G450]+h" office:value-type="float" office:value="4.48999999999995" calcext:value-type="float">
            <text:p>4,48999999999995</text:p>
          </table:table-cell>
          <table:table-cell table:style-name="ce1" table:formula="of:=[.H450]+ h*[.F451]" office:value-type="float" office:value="230.020424324259" calcext:value-type="float">
            <text:p>230,0204243242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1]" office:value-type="float" office:value="4.48999999999995" calcext:value-type="float">
            <text:p>4,48999999999995</text:p>
          </table:table-cell>
          <table:table-cell table:style-name="ce1" table:formula="of:=[.H451]" office:value-type="float" office:value="230.020424324259" calcext:value-type="float">
            <text:p>230,020424324259</text:p>
          </table:table-cell>
          <table:table-cell table:style-name="ce1" table:formula="of:=-68 - ([.E452]^2/Ao)" office:value-type="float" office:value="-94.4546978031561" calcext:value-type="float">
            <text:p>-94,4546978031561</text:p>
          </table:table-cell>
          <table:table-cell table:style-name="ce1" table:formula="of:=[.G451]+h" office:value-type="float" office:value="4.49999999999995" calcext:value-type="float">
            <text:p>4,49999999999995</text:p>
          </table:table-cell>
          <table:table-cell table:style-name="ce1" table:formula="of:=[.H451]+ h*[.F452]" office:value-type="float" office:value="229.075877346228" calcext:value-type="float">
            <text:p>229,0758773462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2]" office:value-type="float" office:value="4.49999999999995" calcext:value-type="float">
            <text:p>4,49999999999995</text:p>
          </table:table-cell>
          <table:table-cell table:style-name="ce1" table:formula="of:=[.H452]" office:value-type="float" office:value="229.075877346228" calcext:value-type="float">
            <text:p>229,075877346228</text:p>
          </table:table-cell>
          <table:table-cell table:style-name="ce1" table:formula="of:=-68 - ([.E453]^2/Ao)" office:value-type="float" office:value="-94.237878790972" calcext:value-type="float">
            <text:p>-94,237878790972</text:p>
          </table:table-cell>
          <table:table-cell table:style-name="ce1" table:formula="of:=[.G452]+h" office:value-type="float" office:value="4.50999999999995" calcext:value-type="float">
            <text:p>4,50999999999995</text:p>
          </table:table-cell>
          <table:table-cell table:style-name="ce1" table:formula="of:=[.H452]+ h*[.F453]" office:value-type="float" office:value="228.133498558318" calcext:value-type="float">
            <text:p>228,1334985583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3]" office:value-type="float" office:value="4.50999999999995" calcext:value-type="float">
            <text:p>4,50999999999995</text:p>
          </table:table-cell>
          <table:table-cell table:style-name="ce1" table:formula="of:=[.H453]" office:value-type="float" office:value="228.133498558318" calcext:value-type="float">
            <text:p>228,133498558318</text:p>
          </table:table-cell>
          <table:table-cell table:style-name="ce1" table:formula="of:=-68 - ([.E454]^2/Ao)" office:value-type="float" office:value="-94.022446582229" calcext:value-type="float">
            <text:p>-94,022446582229</text:p>
          </table:table-cell>
          <table:table-cell table:style-name="ce1" table:formula="of:=[.G453]+h" office:value-type="float" office:value="4.51999999999995" calcext:value-type="float">
            <text:p>4,51999999999995</text:p>
          </table:table-cell>
          <table:table-cell table:style-name="ce1" table:formula="of:=[.H453]+ h*[.F454]" office:value-type="float" office:value="227.193274092496" calcext:value-type="float">
            <text:p>227,1932740924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4]" office:value-type="float" office:value="4.51999999999995" calcext:value-type="float">
            <text:p>4,51999999999995</text:p>
          </table:table-cell>
          <table:table-cell table:style-name="ce1" table:formula="of:=[.H454]" office:value-type="float" office:value="227.193274092496" calcext:value-type="float">
            <text:p>227,193274092496</text:p>
          </table:table-cell>
          <table:table-cell table:style-name="ce1" table:formula="of:=-68 - ([.E455]^2/Ao)" office:value-type="float" office:value="-93.8083918964339" calcext:value-type="float">
            <text:p>-93,8083918964339</text:p>
          </table:table-cell>
          <table:table-cell table:style-name="ce1" table:formula="of:=[.G454]+h" office:value-type="float" office:value="4.52999999999995" calcext:value-type="float">
            <text:p>4,52999999999995</text:p>
          </table:table-cell>
          <table:table-cell table:style-name="ce1" table:formula="of:=[.H454]+ h*[.F455]" office:value-type="float" office:value="226.255190173531" calcext:value-type="float">
            <text:p>226,2551901735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5]" office:value-type="float" office:value="4.52999999999995" calcext:value-type="float">
            <text:p>4,52999999999995</text:p>
          </table:table-cell>
          <table:table-cell table:style-name="ce1" table:formula="of:=[.H455]" office:value-type="float" office:value="226.255190173531" calcext:value-type="float">
            <text:p>226,255190173531</text:p>
          </table:table-cell>
          <table:table-cell table:style-name="ce1" table:formula="of:=-68 - ([.E456]^2/Ao)" office:value-type="float" office:value="-93.5957055402304" calcext:value-type="float">
            <text:p>-93,5957055402304</text:p>
          </table:table-cell>
          <table:table-cell table:style-name="ce1" table:formula="of:=[.G455]+h" office:value-type="float" office:value="4.53999999999995" calcext:value-type="float">
            <text:p>4,53999999999995</text:p>
          </table:table-cell>
          <table:table-cell table:style-name="ce1" table:formula="of:=[.H455]+ h*[.F456]" office:value-type="float" office:value="225.319233118129" calcext:value-type="float">
            <text:p>225,3192331181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6]" office:value-type="float" office:value="4.53999999999995" calcext:value-type="float">
            <text:p>4,53999999999995</text:p>
          </table:table-cell>
          <table:table-cell table:style-name="ce1" table:formula="of:=[.H456]" office:value-type="float" office:value="225.319233118129" calcext:value-type="float">
            <text:p>225,319233118129</text:p>
          </table:table-cell>
          <table:table-cell table:style-name="ce1" table:formula="of:=-68 - ([.E457]^2/Ao)" office:value-type="float" office:value="-93.3843784064709" calcext:value-type="float">
            <text:p>-93,3843784064709</text:p>
          </table:table-cell>
          <table:table-cell table:style-name="ce1" table:formula="of:=[.G456]+h" office:value-type="float" office:value="4.54999999999995" calcext:value-type="float">
            <text:p>4,54999999999995</text:p>
          </table:table-cell>
          <table:table-cell table:style-name="ce1" table:formula="of:=[.H456]+ h*[.F457]" office:value-type="float" office:value="224.385389334064" calcext:value-type="float">
            <text:p>224,3853893340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7]" office:value-type="float" office:value="4.54999999999995" calcext:value-type="float">
            <text:p>4,54999999999995</text:p>
          </table:table-cell>
          <table:table-cell table:style-name="ce1" table:formula="of:=[.H457]" office:value-type="float" office:value="224.385389334064" calcext:value-type="float">
            <text:p>224,385389334064</text:p>
          </table:table-cell>
          <table:table-cell table:style-name="ce1" table:formula="of:=-68 - ([.E458]^2/Ao)" office:value-type="float" office:value="-93.1744014732998" calcext:value-type="float">
            <text:p>-93,1744014732998</text:p>
          </table:table-cell>
          <table:table-cell table:style-name="ce1" table:formula="of:=[.G457]+h" office:value-type="float" office:value="4.55999999999995" calcext:value-type="float">
            <text:p>4,55999999999995</text:p>
          </table:table-cell>
          <table:table-cell table:style-name="ce1" table:formula="of:=[.H457]+ h*[.F458]" office:value-type="float" office:value="223.453645319331" calcext:value-type="float">
            <text:p>223,4536453193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8]" office:value-type="float" office:value="4.55999999999995" calcext:value-type="float">
            <text:p>4,55999999999995</text:p>
          </table:table-cell>
          <table:table-cell table:style-name="ce1" table:formula="of:=[.H458]" office:value-type="float" office:value="223.453645319331" calcext:value-type="float">
            <text:p>223,453645319331</text:p>
          </table:table-cell>
          <table:table-cell table:style-name="ce1" table:formula="of:=-68 - ([.E459]^2/Ao)" office:value-type="float" office:value="-92.9657658032487" calcext:value-type="float">
            <text:p>-92,9657658032487</text:p>
          </table:table-cell>
          <table:table-cell table:style-name="ce1" table:formula="of:=[.G458]+h" office:value-type="float" office:value="4.56999999999995" calcext:value-type="float">
            <text:p>4,56999999999995</text:p>
          </table:table-cell>
          <table:table-cell table:style-name="ce1" table:formula="of:=[.H458]+ h*[.F459]" office:value-type="float" office:value="222.523987661299" calcext:value-type="float">
            <text:p>222,5239876612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59]" office:value-type="float" office:value="4.56999999999995" calcext:value-type="float">
            <text:p>4,56999999999995</text:p>
          </table:table-cell>
          <table:table-cell table:style-name="ce1" table:formula="of:=[.H459]" office:value-type="float" office:value="222.523987661299" calcext:value-type="float">
            <text:p>222,523987661299</text:p>
          </table:table-cell>
          <table:table-cell table:style-name="ce1" table:formula="of:=-68 - ([.E460]^2/Ao)" office:value-type="float" office:value="-92.7584625423429" calcext:value-type="float">
            <text:p>-92,7584625423429</text:p>
          </table:table-cell>
          <table:table-cell table:style-name="ce1" table:formula="of:=[.G459]+h" office:value-type="float" office:value="4.57999999999995" calcext:value-type="float">
            <text:p>4,57999999999995</text:p>
          </table:table-cell>
          <table:table-cell table:style-name="ce1" table:formula="of:=[.H459]+ h*[.F460]" office:value-type="float" office:value="221.596403035875" calcext:value-type="float">
            <text:p>221,5964030358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0]" office:value-type="float" office:value="4.57999999999995" calcext:value-type="float">
            <text:p>4,57999999999995</text:p>
          </table:table-cell>
          <table:table-cell table:style-name="ce1" table:formula="of:=[.H460]" office:value-type="float" office:value="221.596403035875" calcext:value-type="float">
            <text:p>221,596403035875</text:p>
          </table:table-cell>
          <table:table-cell table:style-name="ce1" table:formula="of:=-68 - ([.E461]^2/Ao)" office:value-type="float" office:value="-92.5524829192191" calcext:value-type="float">
            <text:p>-92,5524829192191</text:p>
          </table:table-cell>
          <table:table-cell table:style-name="ce1" table:formula="of:=[.G460]+h" office:value-type="float" office:value="4.58999999999995" calcext:value-type="float">
            <text:p>4,58999999999995</text:p>
          </table:table-cell>
          <table:table-cell table:style-name="ce1" table:formula="of:=[.H460]+ h*[.F461]" office:value-type="float" office:value="220.670878206683" calcext:value-type="float">
            <text:p>220,6708782066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1]" office:value-type="float" office:value="4.58999999999995" calcext:value-type="float">
            <text:p>4,58999999999995</text:p>
          </table:table-cell>
          <table:table-cell table:style-name="ce1" table:formula="of:=[.H461]" office:value-type="float" office:value="220.670878206683" calcext:value-type="float">
            <text:p>220,670878206683</text:p>
          </table:table-cell>
          <table:table-cell table:style-name="ce1" table:formula="of:=-68 - ([.E462]^2/Ao)" office:value-type="float" office:value="-92.3478182442544" calcext:value-type="float">
            <text:p>-92,3478182442544</text:p>
          </table:table-cell>
          <table:table-cell table:style-name="ce1" table:formula="of:=[.G461]+h" office:value-type="float" office:value="4.59999999999995" calcext:value-type="float">
            <text:p>4,59999999999995</text:p>
          </table:table-cell>
          <table:table-cell table:style-name="ce1" table:formula="of:=[.H461]+ h*[.F462]" office:value-type="float" office:value="219.747400024241" calcext:value-type="float">
            <text:p>219,7474000242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2]" office:value-type="float" office:value="4.59999999999995" calcext:value-type="float">
            <text:p>4,59999999999995</text:p>
          </table:table-cell>
          <table:table-cell table:style-name="ce1" table:formula="of:=[.H462]" office:value-type="float" office:value="219.747400024241" calcext:value-type="float">
            <text:p>219,747400024241</text:p>
          </table:table-cell>
          <table:table-cell table:style-name="ce1" table:formula="of:=-68 - ([.E463]^2/Ao)" office:value-type="float" office:value="-92.1444599087068" calcext:value-type="float">
            <text:p>-92,1444599087068</text:p>
          </table:table-cell>
          <table:table-cell table:style-name="ce1" table:formula="of:=[.G462]+h" office:value-type="float" office:value="4.60999999999995" calcext:value-type="float">
            <text:p>4,60999999999995</text:p>
          </table:table-cell>
          <table:table-cell table:style-name="ce1" table:formula="of:=[.H462]+ h*[.F463]" office:value-type="float" office:value="218.825955425154" calcext:value-type="float">
            <text:p>218,8259554251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3]" office:value-type="float" office:value="4.60999999999995" calcext:value-type="float">
            <text:p>4,60999999999995</text:p>
          </table:table-cell>
          <table:table-cell table:style-name="ce1" table:formula="of:=[.H463]" office:value-type="float" office:value="218.825955425154" calcext:value-type="float">
            <text:p>218,825955425154</text:p>
          </table:table-cell>
          <table:table-cell table:style-name="ce1" table:formula="of:=-68 - ([.E464]^2/Ao)" office:value-type="float" office:value="-91.9423993838656" calcext:value-type="float">
            <text:p>-91,9423993838656</text:p>
          </table:table-cell>
          <table:table-cell table:style-name="ce1" table:formula="of:=[.G463]+h" office:value-type="float" office:value="4.61999999999995" calcext:value-type="float">
            <text:p>4,61999999999995</text:p>
          </table:table-cell>
          <table:table-cell table:style-name="ce1" table:formula="of:=[.H463]+ h*[.F464]" office:value-type="float" office:value="217.906531431315" calcext:value-type="float">
            <text:p>217,9065314313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4]" office:value-type="float" office:value="4.61999999999995" calcext:value-type="float">
            <text:p>4,61999999999995</text:p>
          </table:table-cell>
          <table:table-cell table:style-name="ce1" table:formula="of:=[.H464]" office:value-type="float" office:value="217.906531431315" calcext:value-type="float">
            <text:p>217,906531431315</text:p>
          </table:table-cell>
          <table:table-cell table:style-name="ce1" table:formula="of:=-68 - ([.E465]^2/Ao)" office:value-type="float" office:value="-91.7416282202133" calcext:value-type="float">
            <text:p>-91,7416282202133</text:p>
          </table:table-cell>
          <table:table-cell table:style-name="ce1" table:formula="of:=[.G464]+h" office:value-type="float" office:value="4.62999999999995" calcext:value-type="float">
            <text:p>4,62999999999995</text:p>
          </table:table-cell>
          <table:table-cell table:style-name="ce1" table:formula="of:=[.H464]+ h*[.F465]" office:value-type="float" office:value="216.989115149113" calcext:value-type="float">
            <text:p>216,9891151491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5]" office:value-type="float" office:value="4.62999999999995" calcext:value-type="float">
            <text:p>4,62999999999995</text:p>
          </table:table-cell>
          <table:table-cell table:style-name="ce1" table:formula="of:=[.H465]" office:value-type="float" office:value="216.989115149113" calcext:value-type="float">
            <text:p>216,989115149113</text:p>
          </table:table-cell>
          <table:table-cell table:style-name="ce1" table:formula="of:=-68 - ([.E466]^2/Ao)" office:value-type="float" office:value="-91.5421380465975" calcext:value-type="float">
            <text:p>-91,5421380465975</text:p>
          </table:table-cell>
          <table:table-cell table:style-name="ce1" table:formula="of:=[.G465]+h" office:value-type="float" office:value="4.63999999999995" calcext:value-type="float">
            <text:p>4,63999999999995</text:p>
          </table:table-cell>
          <table:table-cell table:style-name="ce1" table:formula="of:=[.H465]+ h*[.F466]" office:value-type="float" office:value="216.073693768647" calcext:value-type="float">
            <text:p>216,0736937686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6]" office:value-type="float" office:value="4.63999999999995" calcext:value-type="float">
            <text:p>4,63999999999995</text:p>
          </table:table-cell>
          <table:table-cell table:style-name="ce1" table:formula="of:=[.H466]" office:value-type="float" office:value="216.073693768647" calcext:value-type="float">
            <text:p>216,073693768647</text:p>
          </table:table-cell>
          <table:table-cell table:style-name="ce1" table:formula="of:=-68 - ([.E467]^2/Ao)" office:value-type="float" office:value="-91.3439205694135" calcext:value-type="float">
            <text:p>-91,3439205694135</text:p>
          </table:table-cell>
          <table:table-cell table:style-name="ce1" table:formula="of:=[.G466]+h" office:value-type="float" office:value="4.64999999999995" calcext:value-type="float">
            <text:p>4,64999999999995</text:p>
          </table:table-cell>
          <table:table-cell table:style-name="ce1" table:formula="of:=[.H466]+ h*[.F467]" office:value-type="float" office:value="215.160254562953" calcext:value-type="float">
            <text:p>215,1602545629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7]" office:value-type="float" office:value="4.64999999999995" calcext:value-type="float">
            <text:p>4,64999999999995</text:p>
          </table:table-cell>
          <table:table-cell table:style-name="ce1" table:formula="of:=[.H467]" office:value-type="float" office:value="215.160254562953" calcext:value-type="float">
            <text:p>215,160254562953</text:p>
          </table:table-cell>
          <table:table-cell table:style-name="ce1" table:formula="of:=-68 - ([.E468]^2/Ao)" office:value-type="float" office:value="-91.1469675717973" calcext:value-type="float">
            <text:p>-91,1469675717973</text:p>
          </table:table-cell>
          <table:table-cell table:style-name="ce1" table:formula="of:=[.G467]+h" office:value-type="float" office:value="4.65999999999995" calcext:value-type="float">
            <text:p>4,65999999999995</text:p>
          </table:table-cell>
          <table:table-cell table:style-name="ce1" table:formula="of:=[.H467]+ h*[.F468]" office:value-type="float" office:value="214.248784887235" calcext:value-type="float">
            <text:p>214,2487848872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8]" office:value-type="float" office:value="4.65999999999995" calcext:value-type="float">
            <text:p>4,65999999999995</text:p>
          </table:table-cell>
          <table:table-cell table:style-name="ce1" table:formula="of:=[.H468]" office:value-type="float" office:value="214.248784887235" calcext:value-type="float">
            <text:p>214,248784887235</text:p>
          </table:table-cell>
          <table:table-cell table:style-name="ce1" table:formula="of:=-68 - ([.E469]^2/Ao)" office:value-type="float" office:value="-90.9512709128283" calcext:value-type="float">
            <text:p>-90,9512709128283</text:p>
          </table:table-cell>
          <table:table-cell table:style-name="ce1" table:formula="of:=[.G468]+h" office:value-type="float" office:value="4.66999999999995" calcext:value-type="float">
            <text:p>4,66999999999995</text:p>
          </table:table-cell>
          <table:table-cell table:style-name="ce1" table:formula="of:=[.H468]+ h*[.F469]" office:value-type="float" office:value="213.339272178106" calcext:value-type="float">
            <text:p>213,3392721781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69]" office:value-type="float" office:value="4.66999999999995" calcext:value-type="float">
            <text:p>4,66999999999995</text:p>
          </table:table-cell>
          <table:table-cell table:style-name="ce1" table:formula="of:=[.H469]" office:value-type="float" office:value="213.339272178106" calcext:value-type="float">
            <text:p>213,339272178106</text:p>
          </table:table-cell>
          <table:table-cell table:style-name="ce1" table:formula="of:=-68 - ([.E470]^2/Ao)" office:value-type="float" office:value="-90.7568225267421" calcext:value-type="float">
            <text:p>-90,7568225267421</text:p>
          </table:table-cell>
          <table:table-cell table:style-name="ce1" table:formula="of:=[.G469]+h" office:value-type="float" office:value="4.67999999999995" calcext:value-type="float">
            <text:p>4,67999999999995</text:p>
          </table:table-cell>
          <table:table-cell table:style-name="ce1" table:formula="of:=[.H469]+ h*[.F470]" office:value-type="float" office:value="212.431703952839" calcext:value-type="float">
            <text:p>212,4317039528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0]" office:value-type="float" office:value="4.67999999999995" calcext:value-type="float">
            <text:p>4,67999999999995</text:p>
          </table:table-cell>
          <table:table-cell table:style-name="ce1" table:formula="of:=[.H470]" office:value-type="float" office:value="212.431703952839" calcext:value-type="float">
            <text:p>212,431703952839</text:p>
          </table:table-cell>
          <table:table-cell table:style-name="ce1" table:formula="of:=-68 - ([.E471]^2/Ao)" office:value-type="float" office:value="-90.5636144221533" calcext:value-type="float">
            <text:p>-90,5636144221533</text:p>
          </table:table-cell>
          <table:table-cell table:style-name="ce1" table:formula="of:=[.G470]+h" office:value-type="float" office:value="4.68999999999994" calcext:value-type="float">
            <text:p>4,68999999999994</text:p>
          </table:table-cell>
          <table:table-cell table:style-name="ce1" table:formula="of:=[.H470]+ h*[.F471]" office:value-type="float" office:value="211.526067808617" calcext:value-type="float">
            <text:p>211,5260678086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1]" office:value-type="float" office:value="4.68999999999994" calcext:value-type="float">
            <text:p>4,68999999999994</text:p>
          </table:table-cell>
          <table:table-cell table:style-name="ce1" table:formula="of:=[.H471]" office:value-type="float" office:value="211.526067808617" calcext:value-type="float">
            <text:p>211,526067808617</text:p>
          </table:table-cell>
          <table:table-cell table:style-name="ce1" table:formula="of:=-68 - ([.E472]^2/Ao)" office:value-type="float" office:value="-90.3716386812879" calcext:value-type="float">
            <text:p>-90,3716386812879</text:p>
          </table:table-cell>
          <table:table-cell table:style-name="ce1" table:formula="of:=[.G471]+h" office:value-type="float" office:value="4.69999999999994" calcext:value-type="float">
            <text:p>4,69999999999994</text:p>
          </table:table-cell>
          <table:table-cell table:style-name="ce1" table:formula="of:=[.H471]+ h*[.F472]" office:value-type="float" office:value="210.622351421805" calcext:value-type="float">
            <text:p>210,6223514218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2]" office:value-type="float" office:value="4.69999999999994" calcext:value-type="float">
            <text:p>4,69999999999994</text:p>
          </table:table-cell>
          <table:table-cell table:style-name="ce1" table:formula="of:=[.H472]" office:value-type="float" office:value="210.622351421805" calcext:value-type="float">
            <text:p>210,622351421805</text:p>
          </table:table-cell>
          <table:table-cell table:style-name="ce1" table:formula="of:=-68 - ([.E473]^2/Ao)" office:value-type="float" office:value="-90.1808874592251" calcext:value-type="float">
            <text:p>-90,1808874592251</text:p>
          </table:table-cell>
          <table:table-cell table:style-name="ce1" table:formula="of:=[.G472]+h" office:value-type="float" office:value="4.70999999999994" calcext:value-type="float">
            <text:p>4,70999999999994</text:p>
          </table:table-cell>
          <table:table-cell table:style-name="ce1" table:formula="of:=[.H472]+ h*[.F473]" office:value-type="float" office:value="209.720542547212" calcext:value-type="float">
            <text:p>209,7205425472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3]" office:value-type="float" office:value="4.70999999999994" calcext:value-type="float">
            <text:p>4,70999999999994</text:p>
          </table:table-cell>
          <table:table-cell table:style-name="ce1" table:formula="of:=[.H473]" office:value-type="float" office:value="209.720542547212" calcext:value-type="float">
            <text:p>209,720542547212</text:p>
          </table:table-cell>
          <table:table-cell table:style-name="ce1" table:formula="of:=-68 - ([.E474]^2/Ao)" office:value-type="float" office:value="-89.9913529831485" calcext:value-type="float">
            <text:p>-89,9913529831485</text:p>
          </table:table-cell>
          <table:table-cell table:style-name="ce1" table:formula="of:=[.G473]+h" office:value-type="float" office:value="4.71999999999994" calcext:value-type="float">
            <text:p>4,71999999999994</text:p>
          </table:table-cell>
          <table:table-cell table:style-name="ce1" table:formula="of:=[.H473]+ h*[.F474]" office:value-type="float" office:value="208.820629017381" calcext:value-type="float">
            <text:p>208,8206290173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4]" office:value-type="float" office:value="4.71999999999994" calcext:value-type="float">
            <text:p>4,71999999999994</text:p>
          </table:table-cell>
          <table:table-cell table:style-name="ce1" table:formula="of:=[.H474]" office:value-type="float" office:value="208.820629017381" calcext:value-type="float">
            <text:p>208,820629017381</text:p>
          </table:table-cell>
          <table:table-cell table:style-name="ce1" table:formula="of:=-68 - ([.E475]^2/Ao)" office:value-type="float" office:value="-89.8030275516073" calcext:value-type="float">
            <text:p>-89,8030275516073</text:p>
          </table:table-cell>
          <table:table-cell table:style-name="ce1" table:formula="of:=[.G474]+h" office:value-type="float" office:value="4.72999999999994" calcext:value-type="float">
            <text:p>4,72999999999994</text:p>
          </table:table-cell>
          <table:table-cell table:style-name="ce1" table:formula="of:=[.H474]+ h*[.F475]" office:value-type="float" office:value="207.922598741865" calcext:value-type="float">
            <text:p>207,9225987418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5]" office:value-type="float" office:value="4.72999999999994" calcext:value-type="float">
            <text:p>4,72999999999994</text:p>
          </table:table-cell>
          <table:table-cell table:style-name="ce1" table:formula="of:=[.H475]" office:value-type="float" office:value="207.922598741865" calcext:value-type="float">
            <text:p>207,922598741865</text:p>
          </table:table-cell>
          <table:table-cell table:style-name="ce1" table:formula="of:=-68 - ([.E476]^2/Ao)" office:value-type="float" office:value="-89.6159035337852" calcext:value-type="float">
            <text:p>-89,6159035337852</text:p>
          </table:table-cell>
          <table:table-cell table:style-name="ce1" table:formula="of:=[.G475]+h" office:value-type="float" office:value="4.73999999999994" calcext:value-type="float">
            <text:p>4,73999999999994</text:p>
          </table:table-cell>
          <table:table-cell table:style-name="ce1" table:formula="of:=[.H475]+ h*[.F476]" office:value-type="float" office:value="207.026439706527" calcext:value-type="float">
            <text:p>207,0264397065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6]" office:value-type="float" office:value="4.73999999999994" calcext:value-type="float">
            <text:p>4,73999999999994</text:p>
          </table:table-cell>
          <table:table-cell table:style-name="ce1" table:formula="of:=[.H476]" office:value-type="float" office:value="207.026439706527" calcext:value-type="float">
            <text:p>207,026439706527</text:p>
          </table:table-cell>
          <table:table-cell table:style-name="ce1" table:formula="of:=-68 - ([.E477]^2/Ao)" office:value-type="float" office:value="-89.4299733687801" calcext:value-type="float">
            <text:p>-89,4299733687801</text:p>
          </table:table-cell>
          <table:table-cell table:style-name="ce1" table:formula="of:=[.G476]+h" office:value-type="float" office:value="4.74999999999994" calcext:value-type="float">
            <text:p>4,74999999999994</text:p>
          </table:table-cell>
          <table:table-cell table:style-name="ce1" table:formula="of:=[.H476]+ h*[.F477]" office:value-type="float" office:value="206.132139972839" calcext:value-type="float">
            <text:p>206,1321399728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7]" office:value-type="float" office:value="4.74999999999994" calcext:value-type="float">
            <text:p>4,74999999999994</text:p>
          </table:table-cell>
          <table:table-cell table:style-name="ce1" table:formula="of:=[.H477]" office:value-type="float" office:value="206.132139972839" calcext:value-type="float">
            <text:p>206,132139972839</text:p>
          </table:table-cell>
          <table:table-cell table:style-name="ce1" table:formula="of:=-68 - ([.E478]^2/Ao)" office:value-type="float" office:value="-89.2452295648911" calcext:value-type="float">
            <text:p>-89,2452295648911</text:p>
          </table:table-cell>
          <table:table-cell table:style-name="ce1" table:formula="of:=[.G477]+h" office:value-type="float" office:value="4.75999999999994" calcext:value-type="float">
            <text:p>4,75999999999994</text:p>
          </table:table-cell>
          <table:table-cell table:style-name="ce1" table:formula="of:=[.H477]+ h*[.F478]" office:value-type="float" office:value="205.23968767719" calcext:value-type="float">
            <text:p>205,239687677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8]" office:value-type="float" office:value="4.75999999999994" calcext:value-type="float">
            <text:p>4,75999999999994</text:p>
          </table:table-cell>
          <table:table-cell table:style-name="ce1" table:formula="of:=[.H478]" office:value-type="float" office:value="205.23968767719" calcext:value-type="float">
            <text:p>205,23968767719</text:p>
          </table:table-cell>
          <table:table-cell table:style-name="ce1" table:formula="of:=-68 - ([.E479]^2/Ao)" office:value-type="float" office:value="-89.0616646989153" calcext:value-type="float">
            <text:p>-89,0616646989153</text:p>
          </table:table-cell>
          <table:table-cell table:style-name="ce1" table:formula="of:=[.G478]+h" office:value-type="float" office:value="4.76999999999994" calcext:value-type="float">
            <text:p>4,76999999999994</text:p>
          </table:table-cell>
          <table:table-cell table:style-name="ce1" table:formula="of:=[.H478]+ h*[.F479]" office:value-type="float" office:value="204.349071030201" calcext:value-type="float">
            <text:p>204,3490710302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79]" office:value-type="float" office:value="4.76999999999994" calcext:value-type="float">
            <text:p>4,76999999999994</text:p>
          </table:table-cell>
          <table:table-cell table:style-name="ce1" table:formula="of:=[.H479]" office:value-type="float" office:value="204.349071030201" calcext:value-type="float">
            <text:p>204,349071030201</text:p>
          </table:table-cell>
          <table:table-cell table:style-name="ce1" table:formula="of:=-68 - ([.E480]^2/Ao)" office:value-type="float" office:value="-88.8792714154531" calcext:value-type="float">
            <text:p>-88,8792714154531</text:p>
          </table:table-cell>
          <table:table-cell table:style-name="ce1" table:formula="of:=[.G479]+h" office:value-type="float" office:value="4.77999999999994" calcext:value-type="float">
            <text:p>4,77999999999994</text:p>
          </table:table-cell>
          <table:table-cell table:style-name="ce1" table:formula="of:=[.H479]+ h*[.F480]" office:value-type="float" office:value="203.460278316046" calcext:value-type="float">
            <text:p>203,4602783160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0]" office:value-type="float" office:value="4.77999999999994" calcext:value-type="float">
            <text:p>4,77999999999994</text:p>
          </table:table-cell>
          <table:table-cell table:style-name="ce1" table:formula="of:=[.H480]" office:value-type="float" office:value="203.460278316046" calcext:value-type="float">
            <text:p>203,460278316046</text:p>
          </table:table-cell>
          <table:table-cell table:style-name="ce1" table:formula="of:=-68 - ([.E481]^2/Ao)" office:value-type="float" office:value="-88.6980424262215" calcext:value-type="float">
            <text:p>-88,6980424262215</text:p>
          </table:table-cell>
          <table:table-cell table:style-name="ce1" table:formula="of:=[.G480]+h" office:value-type="float" office:value="4.78999999999994" calcext:value-type="float">
            <text:p>4,78999999999994</text:p>
          </table:table-cell>
          <table:table-cell table:style-name="ce1" table:formula="of:=[.H480]+ h*[.F481]" office:value-type="float" office:value="202.573297891784" calcext:value-type="float">
            <text:p>202,5732978917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1]" office:value-type="float" office:value="4.78999999999994" calcext:value-type="float">
            <text:p>4,78999999999994</text:p>
          </table:table-cell>
          <table:table-cell table:style-name="ce1" table:formula="of:=[.H481]" office:value-type="float" office:value="202.573297891784" calcext:value-type="float">
            <text:p>202,573297891784</text:p>
          </table:table-cell>
          <table:table-cell table:style-name="ce1" table:formula="of:=-68 - ([.E482]^2/Ao)" office:value-type="float" office:value="-88.5179705093768" calcext:value-type="float">
            <text:p>-88,5179705093768</text:p>
          </table:table-cell>
          <table:table-cell table:style-name="ce1" table:formula="of:=[.G481]+h" office:value-type="float" office:value="4.79999999999994" calcext:value-type="float">
            <text:p>4,79999999999994</text:p>
          </table:table-cell>
          <table:table-cell table:style-name="ce1" table:formula="of:=[.H481]+ h*[.F482]" office:value-type="float" office:value="201.68811818669" calcext:value-type="float">
            <text:p>201,688118186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2]" office:value-type="float" office:value="4.79999999999994" calcext:value-type="float">
            <text:p>4,79999999999994</text:p>
          </table:table-cell>
          <table:table-cell table:style-name="ce1" table:formula="of:=[.H482]" office:value-type="float" office:value="201.68811818669" calcext:value-type="float">
            <text:p>201,68811818669</text:p>
          </table:table-cell>
          <table:table-cell table:style-name="ce1" table:formula="of:=-68 - ([.E483]^2/Ao)" office:value-type="float" office:value="-88.3390485088442" calcext:value-type="float">
            <text:p>-88,3390485088442</text:p>
          </table:table-cell>
          <table:table-cell table:style-name="ce1" table:formula="of:=[.G482]+h" office:value-type="float" office:value="4.80999999999994" calcext:value-type="float">
            <text:p>4,80999999999994</text:p>
          </table:table-cell>
          <table:table-cell table:style-name="ce1" table:formula="of:=[.H482]+ h*[.F483]" office:value-type="float" office:value="200.804727701602" calcext:value-type="float">
            <text:p>200,8047277016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3]" office:value-type="float" office:value="4.80999999999994" calcext:value-type="float">
            <text:p>4,80999999999994</text:p>
          </table:table-cell>
          <table:table-cell table:style-name="ce1" table:formula="of:=[.H483]" office:value-type="float" office:value="200.804727701602" calcext:value-type="float">
            <text:p>200,804727701602</text:p>
          </table:table-cell>
          <table:table-cell table:style-name="ce1" table:formula="of:=-68 - ([.E484]^2/Ao)" office:value-type="float" office:value="-88.1612693336573" calcext:value-type="float">
            <text:p>-88,1612693336573</text:p>
          </table:table-cell>
          <table:table-cell table:style-name="ce1" table:formula="of:=[.G483]+h" office:value-type="float" office:value="4.81999999999994" calcext:value-type="float">
            <text:p>4,81999999999994</text:p>
          </table:table-cell>
          <table:table-cell table:style-name="ce1" table:formula="of:=[.H483]+ h*[.F484]" office:value-type="float" office:value="199.923115008265" calcext:value-type="float">
            <text:p>199,9231150082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4]" office:value-type="float" office:value="4.81999999999994" calcext:value-type="float">
            <text:p>4,81999999999994</text:p>
          </table:table-cell>
          <table:table-cell table:style-name="ce1" table:formula="of:=[.H484]" office:value-type="float" office:value="199.923115008265" calcext:value-type="float">
            <text:p>199,923115008265</text:p>
          </table:table-cell>
          <table:table-cell table:style-name="ce1" table:formula="of:=-68 - ([.E485]^2/Ao)" office:value-type="float" office:value="-87.9846259573041" calcext:value-type="float">
            <text:p>-87,9846259573041</text:p>
          </table:table-cell>
          <table:table-cell table:style-name="ce1" table:formula="of:=[.G484]+h" office:value-type="float" office:value="4.82999999999994" calcext:value-type="float">
            <text:p>4,82999999999994</text:p>
          </table:table-cell>
          <table:table-cell table:style-name="ce1" table:formula="of:=[.H484]+ h*[.F485]" office:value-type="float" office:value="199.043268748692" calcext:value-type="float">
            <text:p>199,0432687486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5]" office:value-type="float" office:value="4.82999999999994" calcext:value-type="float">
            <text:p>4,82999999999994</text:p>
          </table:table-cell>
          <table:table-cell table:style-name="ce1" table:formula="of:=[.H485]" office:value-type="float" office:value="199.043268748692" calcext:value-type="float">
            <text:p>199,043268748692</text:p>
          </table:table-cell>
          <table:table-cell table:style-name="ce1" table:formula="of:=-68 - ([.E486]^2/Ao)" office:value-type="float" office:value="-87.8091114170821" calcext:value-type="float">
            <text:p>-87,8091114170821</text:p>
          </table:table-cell>
          <table:table-cell table:style-name="ce1" table:formula="of:=[.G485]+h" office:value-type="float" office:value="4.83999999999994" calcext:value-type="float">
            <text:p>4,83999999999994</text:p>
          </table:table-cell>
          <table:table-cell table:style-name="ce1" table:formula="of:=[.H485]+ h*[.F486]" office:value-type="float" office:value="198.165177634522" calcext:value-type="float">
            <text:p>198,1651776345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6]" office:value-type="float" office:value="4.83999999999994" calcext:value-type="float">
            <text:p>4,83999999999994</text:p>
          </table:table-cell>
          <table:table-cell table:style-name="ce1" table:formula="of:=[.H486]" office:value-type="float" office:value="198.165177634522" calcext:value-type="float">
            <text:p>198,165177634522</text:p>
          </table:table-cell>
          <table:table-cell table:style-name="ce1" table:formula="of:=-68 - ([.E487]^2/Ao)" office:value-type="float" office:value="-87.6347188134608" calcext:value-type="float">
            <text:p>-87,6347188134608</text:p>
          </table:table-cell>
          <table:table-cell table:style-name="ce1" table:formula="of:=[.G486]+h" office:value-type="float" office:value="4.84999999999994" calcext:value-type="float">
            <text:p>4,84999999999994</text:p>
          </table:table-cell>
          <table:table-cell table:style-name="ce1" table:formula="of:=[.H486]+ h*[.F487]" office:value-type="float" office:value="197.288830446387" calcext:value-type="float">
            <text:p>197,2888304463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7]" office:value-type="float" office:value="4.84999999999994" calcext:value-type="float">
            <text:p>4,84999999999994</text:p>
          </table:table-cell>
          <table:table-cell table:style-name="ce1" table:formula="of:=[.H487]" office:value-type="float" office:value="197.288830446387" calcext:value-type="float">
            <text:p>197,288830446387</text:p>
          </table:table-cell>
          <table:table-cell table:style-name="ce1" table:formula="of:=-68 - ([.E488]^2/Ao)" office:value-type="float" office:value="-87.4614413094516" calcext:value-type="float">
            <text:p>-87,4614413094516</text:p>
          </table:table-cell>
          <table:table-cell table:style-name="ce1" table:formula="of:=[.G487]+h" office:value-type="float" office:value="4.85999999999994" calcext:value-type="float">
            <text:p>4,85999999999994</text:p>
          </table:table-cell>
          <table:table-cell table:style-name="ce1" table:formula="of:=[.H487]+ h*[.F488]" office:value-type="float" office:value="196.414216033292" calcext:value-type="float">
            <text:p>196,4142160332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8]" office:value-type="float" office:value="4.85999999999994" calcext:value-type="float">
            <text:p>4,85999999999994</text:p>
          </table:table-cell>
          <table:table-cell table:style-name="ce1" table:formula="of:=[.H488]" office:value-type="float" office:value="196.414216033292" calcext:value-type="float">
            <text:p>196,414216033292</text:p>
          </table:table-cell>
          <table:table-cell table:style-name="ce1" table:formula="of:=-68 - ([.E489]^2/Ao)" office:value-type="float" office:value="-87.2892721299864" calcext:value-type="float">
            <text:p>-87,2892721299864</text:p>
          </table:table-cell>
          <table:table-cell table:style-name="ce1" table:formula="of:=[.G488]+h" office:value-type="float" office:value="4.86999999999994" calcext:value-type="float">
            <text:p>4,86999999999994</text:p>
          </table:table-cell>
          <table:table-cell table:style-name="ce1" table:formula="of:=[.H488]+ h*[.F489]" office:value-type="float" office:value="195.541323311993" calcext:value-type="float">
            <text:p>195,5413233119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89]" office:value-type="float" office:value="4.86999999999994" calcext:value-type="float">
            <text:p>4,86999999999994</text:p>
          </table:table-cell>
          <table:table-cell table:style-name="ce1" table:formula="of:=[.H489]" office:value-type="float" office:value="195.541323311993" calcext:value-type="float">
            <text:p>195,541323311993</text:p>
          </table:table-cell>
          <table:table-cell table:style-name="ce1" table:formula="of:=-68 - ([.E490]^2/Ao)" office:value-type="float" office:value="-87.1182045613026" calcext:value-type="float">
            <text:p>-87,1182045613026</text:p>
          </table:table-cell>
          <table:table-cell table:style-name="ce1" table:formula="of:=[.G489]+h" office:value-type="float" office:value="4.87999999999994" calcext:value-type="float">
            <text:p>4,87999999999994</text:p>
          </table:table-cell>
          <table:table-cell table:style-name="ce1" table:formula="of:=[.H489]+ h*[.F490]" office:value-type="float" office:value="194.67014126638" calcext:value-type="float">
            <text:p>194,670141266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0]" office:value-type="float" office:value="4.87999999999994" calcext:value-type="float">
            <text:p>4,87999999999994</text:p>
          </table:table-cell>
          <table:table-cell table:style-name="ce1" table:formula="of:=[.H490]" office:value-type="float" office:value="194.67014126638" calcext:value-type="float">
            <text:p>194,67014126638</text:p>
          </table:table-cell>
          <table:table-cell table:style-name="ce1" table:formula="of:=-68 - ([.E491]^2/Ao)" office:value-type="float" office:value="-86.9482319503361" calcext:value-type="float">
            <text:p>-86,9482319503361</text:p>
          </table:table-cell>
          <table:table-cell table:style-name="ce1" table:formula="of:=[.G490]+h" office:value-type="float" office:value="4.88999999999994" calcext:value-type="float">
            <text:p>4,88999999999994</text:p>
          </table:table-cell>
          <table:table-cell table:style-name="ce1" table:formula="of:=[.H490]+ h*[.F491]" office:value-type="float" office:value="193.800658946876" calcext:value-type="float">
            <text:p>193,8006589468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1]" office:value-type="float" office:value="4.88999999999994" calcext:value-type="float">
            <text:p>4,88999999999994</text:p>
          </table:table-cell>
          <table:table-cell table:style-name="ce1" table:formula="of:=[.H491]" office:value-type="float" office:value="193.800658946876" calcext:value-type="float">
            <text:p>193,800658946876</text:p>
          </table:table-cell>
          <table:table-cell table:style-name="ce1" table:formula="of:=-68 - ([.E492]^2/Ao)" office:value-type="float" office:value="-86.7793477041217" calcext:value-type="float">
            <text:p>-86,7793477041217</text:p>
          </table:table-cell>
          <table:table-cell table:style-name="ce1" table:formula="of:=[.G491]+h" office:value-type="float" office:value="4.89999999999994" calcext:value-type="float">
            <text:p>4,89999999999994</text:p>
          </table:table-cell>
          <table:table-cell table:style-name="ce1" table:formula="of:=[.H491]+ h*[.F492]" office:value-type="float" office:value="192.932865469835" calcext:value-type="float">
            <text:p>192,9328654698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2]" office:value-type="float" office:value="4.89999999999994" calcext:value-type="float">
            <text:p>4,89999999999994</text:p>
          </table:table-cell>
          <table:table-cell table:style-name="ce1" table:formula="of:=[.H492]" office:value-type="float" office:value="192.932865469835" calcext:value-type="float">
            <text:p>192,932865469835</text:p>
          </table:table-cell>
          <table:table-cell table:style-name="ce1" table:formula="of:=-68 - ([.E493]^2/Ao)" office:value-type="float" office:value="-86.6115452892007" calcext:value-type="float">
            <text:p>-86,6115452892007</text:p>
          </table:table-cell>
          <table:table-cell table:style-name="ce1" table:formula="of:=[.G492]+h" office:value-type="float" office:value="4.90999999999994" calcext:value-type="float">
            <text:p>4,90999999999994</text:p>
          </table:table-cell>
          <table:table-cell table:style-name="ce1" table:formula="of:=[.H492]+ h*[.F493]" office:value-type="float" office:value="192.066750016943" calcext:value-type="float">
            <text:p>192,0667500169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3]" office:value-type="float" office:value="4.90999999999994" calcext:value-type="float">
            <text:p>4,90999999999994</text:p>
          </table:table-cell>
          <table:table-cell table:style-name="ce1" table:formula="of:=[.H493]" office:value-type="float" office:value="192.066750016943" calcext:value-type="float">
            <text:p>192,066750016943</text:p>
          </table:table-cell>
          <table:table-cell table:style-name="ce1" table:formula="of:=-68 - ([.E494]^2/Ao)" office:value-type="float" office:value="-86.4448182310354" calcext:value-type="float">
            <text:p>-86,4448182310354</text:p>
          </table:table-cell>
          <table:table-cell table:style-name="ce1" table:formula="of:=[.G493]+h" office:value-type="float" office:value="4.91999999999994" calcext:value-type="float">
            <text:p>4,91999999999994</text:p>
          </table:table-cell>
          <table:table-cell table:style-name="ce1" table:formula="of:=[.H493]+ h*[.F494]" office:value-type="float" office:value="191.202301834633" calcext:value-type="float">
            <text:p>191,2023018346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4]" office:value-type="float" office:value="4.91999999999994" calcext:value-type="float">
            <text:p>4,91999999999994</text:p>
          </table:table-cell>
          <table:table-cell table:style-name="ce1" table:formula="of:=[.H494]" office:value-type="float" office:value="191.202301834633" calcext:value-type="float">
            <text:p>191,202301834633</text:p>
          </table:table-cell>
          <table:table-cell table:style-name="ce1" table:formula="of:=-68 - ([.E495]^2/Ao)" office:value-type="float" office:value="-86.279160113431" calcext:value-type="float">
            <text:p>-86,279160113431</text:p>
          </table:table-cell>
          <table:table-cell table:style-name="ce1" table:formula="of:=[.G494]+h" office:value-type="float" office:value="4.92999999999994" calcext:value-type="float">
            <text:p>4,92999999999994</text:p>
          </table:table-cell>
          <table:table-cell table:style-name="ce1" table:formula="of:=[.H494]+ h*[.F495]" office:value-type="float" office:value="190.339510233498" calcext:value-type="float">
            <text:p>190,3395102334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5]" office:value-type="float" office:value="4.92999999999994" calcext:value-type="float">
            <text:p>4,92999999999994</text:p>
          </table:table-cell>
          <table:table-cell table:style-name="ce1" table:formula="of:=[.H495]" office:value-type="float" office:value="190.339510233498" calcext:value-type="float">
            <text:p>190,339510233498</text:p>
          </table:table-cell>
          <table:table-cell table:style-name="ce1" table:formula="of:=-68 - ([.E496]^2/Ao)" office:value-type="float" office:value="-86.114564577964" calcext:value-type="float">
            <text:p>-86,114564577964</text:p>
          </table:table-cell>
          <table:table-cell table:style-name="ce1" table:formula="of:=[.G495]+h" office:value-type="float" office:value="4.93999999999994" calcext:value-type="float">
            <text:p>4,93999999999994</text:p>
          </table:table-cell>
          <table:table-cell table:style-name="ce1" table:formula="of:=[.H495]+ h*[.F496]" office:value-type="float" office:value="189.478364587719" calcext:value-type="float">
            <text:p>189,4783645877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6]" office:value-type="float" office:value="4.93999999999994" calcext:value-type="float">
            <text:p>4,93999999999994</text:p>
          </table:table-cell>
          <table:table-cell table:style-name="ce1" table:formula="of:=[.H496]" office:value-type="float" office:value="189.478364587719" calcext:value-type="float">
            <text:p>189,478364587719</text:p>
          </table:table-cell>
          <table:table-cell table:style-name="ce1" table:formula="of:=-68 - ([.E497]^2/Ao)" office:value-type="float" office:value="-85.9510253234182" calcext:value-type="float">
            <text:p>-85,9510253234182</text:p>
          </table:table-cell>
          <table:table-cell table:style-name="ce1" table:formula="of:=[.G496]+h" office:value-type="float" office:value="4.94999999999994" calcext:value-type="float">
            <text:p>4,94999999999994</text:p>
          </table:table-cell>
          <table:table-cell table:style-name="ce1" table:formula="of:=[.H496]+ h*[.F497]" office:value-type="float" office:value="188.618854334484" calcext:value-type="float">
            <text:p>188,6188543344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7]" office:value-type="float" office:value="4.94999999999994" calcext:value-type="float">
            <text:p>4,94999999999994</text:p>
          </table:table-cell>
          <table:table-cell table:style-name="ce1" table:formula="of:=[.H497]" office:value-type="float" office:value="188.618854334484" calcext:value-type="float">
            <text:p>188,618854334484</text:p>
          </table:table-cell>
          <table:table-cell table:style-name="ce1" table:formula="of:=-68 - ([.E498]^2/Ao)" office:value-type="float" office:value="-85.7885361052267" calcext:value-type="float">
            <text:p>-85,7885361052267</text:p>
          </table:table-cell>
          <table:table-cell table:style-name="ce1" table:formula="of:=[.G497]+h" office:value-type="float" office:value="4.95999999999994" calcext:value-type="float">
            <text:p>4,95999999999994</text:p>
          </table:table-cell>
          <table:table-cell table:style-name="ce1" table:formula="of:=[.H497]+ h*[.F498]" office:value-type="float" office:value="187.760968973432" calcext:value-type="float">
            <text:p>187,7609689734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8]" office:value-type="float" office:value="4.95999999999994" calcext:value-type="float">
            <text:p>4,95999999999994</text:p>
          </table:table-cell>
          <table:table-cell table:style-name="ce1" table:formula="of:=[.H498]" office:value-type="float" office:value="187.760968973432" calcext:value-type="float">
            <text:p>187,760968973432</text:p>
          </table:table-cell>
          <table:table-cell table:style-name="ce1" table:formula="of:=-68 - ([.E499]^2/Ao)" office:value-type="float" office:value="-85.6270907349211" calcext:value-type="float">
            <text:p>-85,6270907349211</text:p>
          </table:table-cell>
          <table:table-cell table:style-name="ce1" table:formula="of:=[.G498]+h" office:value-type="float" office:value="4.96999999999994" calcext:value-type="float">
            <text:p>4,96999999999994</text:p>
          </table:table-cell>
          <table:table-cell table:style-name="ce1" table:formula="of:=[.H498]+ h*[.F499]" office:value-type="float" office:value="186.904698066083" calcext:value-type="float">
            <text:p>186,9046980660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499]" office:value-type="float" office:value="4.96999999999994" calcext:value-type="float">
            <text:p>4,96999999999994</text:p>
          </table:table-cell>
          <table:table-cell table:style-name="ce1" table:formula="of:=[.H499]" office:value-type="float" office:value="186.904698066083" calcext:value-type="float">
            <text:p>186,904698066083</text:p>
          </table:table-cell>
          <table:table-cell table:style-name="ce1" table:formula="of:=-68 - ([.E500]^2/Ao)" office:value-type="float" office:value="-85.4666830795868" calcext:value-type="float">
            <text:p>-85,4666830795868</text:p>
          </table:table-cell>
          <table:table-cell table:style-name="ce1" table:formula="of:=[.G499]+h" office:value-type="float" office:value="4.97999999999994" calcext:value-type="float">
            <text:p>4,97999999999994</text:p>
          </table:table-cell>
          <table:table-cell table:style-name="ce1" table:formula="of:=[.H499]+ h*[.F500]" office:value-type="float" office:value="186.050031235287" calcext:value-type="float">
            <text:p>186,0500312352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0]" office:value-type="float" office:value="4.97999999999994" calcext:value-type="float">
            <text:p>4,97999999999994</text:p>
          </table:table-cell>
          <table:table-cell table:style-name="ce1" table:formula="of:=[.H500]" office:value-type="float" office:value="186.050031235287" calcext:value-type="float">
            <text:p>186,050031235287</text:p>
          </table:table-cell>
          <table:table-cell table:style-name="ce1" table:formula="of:=-68 - ([.E501]^2/Ao)" office:value-type="float" office:value="-85.3073070613256" calcext:value-type="float">
            <text:p>-85,3073070613256</text:p>
          </table:table-cell>
          <table:table-cell table:style-name="ce1" table:formula="of:=[.G500]+h" office:value-type="float" office:value="4.98999999999994" calcext:value-type="float">
            <text:p>4,98999999999994</text:p>
          </table:table-cell>
          <table:table-cell table:style-name="ce1" table:formula="of:=[.H500]+ h*[.F501]" office:value-type="float" office:value="185.196958164674" calcext:value-type="float">
            <text:p>185,1969581646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1]" office:value-type="float" office:value="4.98999999999994" calcext:value-type="float">
            <text:p>4,98999999999994</text:p>
          </table:table-cell>
          <table:table-cell table:style-name="ce1" table:formula="of:=[.H501]" office:value-type="float" office:value="185.196958164674" calcext:value-type="float">
            <text:p>185,196958164674</text:p>
          </table:table-cell>
          <table:table-cell table:style-name="ce1" table:formula="of:=-68 - ([.E502]^2/Ao)" office:value-type="float" office:value="-85.148956656724" calcext:value-type="float">
            <text:p>-85,148956656724</text:p>
          </table:table-cell>
          <table:table-cell table:style-name="ce1" table:formula="of:=[.G501]+h" office:value-type="float" office:value="4.99999999999994" calcext:value-type="float">
            <text:p>4,99999999999994</text:p>
          </table:table-cell>
          <table:table-cell table:style-name="ce1" table:formula="of:=[.H501]+ h*[.F502]" office:value-type="float" office:value="184.345468598107" calcext:value-type="float">
            <text:p>184,3454685981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2]" office:value-type="float" office:value="4.99999999999994" calcext:value-type="float">
            <text:p>4,99999999999994</text:p>
          </table:table-cell>
          <table:table-cell table:style-name="ce1" table:formula="of:=[.H502]" office:value-type="float" office:value="184.345468598107" calcext:value-type="float">
            <text:p>184,345468598107</text:p>
          </table:table-cell>
          <table:table-cell table:style-name="ce1" table:formula="of:=-68 - ([.E503]^2/Ao)" office:value-type="float" office:value="-84.9916258963278" calcext:value-type="float">
            <text:p>-84,9916258963278</text:p>
          </table:table-cell>
          <table:table-cell table:style-name="ce1" table:formula="of:=[.G502]+h" office:value-type="float" office:value="5.00999999999994" calcext:value-type="float">
            <text:p>5,00999999999994</text:p>
          </table:table-cell>
          <table:table-cell table:style-name="ce1" table:formula="of:=[.H502]+ h*[.F503]" office:value-type="float" office:value="183.495552339143" calcext:value-type="float">
            <text:p>183,4955523391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3]" office:value-type="float" office:value="5.00999999999994" calcext:value-type="float">
            <text:p>5,00999999999994</text:p>
          </table:table-cell>
          <table:table-cell table:style-name="ce1" table:formula="of:=[.H503]" office:value-type="float" office:value="183.495552339143" calcext:value-type="float">
            <text:p>183,495552339143</text:p>
          </table:table-cell>
          <table:table-cell table:style-name="ce1" table:formula="of:=-68 - ([.E504]^2/Ao)" office:value-type="float" office:value="-84.8353088641237" calcext:value-type="float">
            <text:p>-84,8353088641237</text:p>
          </table:table-cell>
          <table:table-cell table:style-name="ce1" table:formula="of:=[.G503]+h" office:value-type="float" office:value="5.01999999999994" calcext:value-type="float">
            <text:p>5,01999999999994</text:p>
          </table:table-cell>
          <table:table-cell table:style-name="ce1" table:formula="of:=[.H503]+ h*[.F504]" office:value-type="float" office:value="182.647199250502" calcext:value-type="float">
            <text:p>182,6471992505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4]" office:value-type="float" office:value="5.01999999999994" calcext:value-type="float">
            <text:p>5,01999999999994</text:p>
          </table:table-cell>
          <table:table-cell table:style-name="ce1" table:formula="of:=[.H504]" office:value-type="float" office:value="182.647199250502" calcext:value-type="float">
            <text:p>182,647199250502</text:p>
          </table:table-cell>
          <table:table-cell table:style-name="ce1" table:formula="of:=-68 - ([.E505]^2/Ao)" office:value-type="float" office:value="-84.6799996970263" calcext:value-type="float">
            <text:p>-84,6799996970263</text:p>
          </table:table-cell>
          <table:table-cell table:style-name="ce1" table:formula="of:=[.G504]+h" office:value-type="float" office:value="5.02999999999994" calcext:value-type="float">
            <text:p>5,02999999999994</text:p>
          </table:table-cell>
          <table:table-cell table:style-name="ce1" table:formula="of:=[.H504]+ h*[.F505]" office:value-type="float" office:value="181.800399253532" calcext:value-type="float">
            <text:p>181,8003992535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5]" office:value-type="float" office:value="5.02999999999994" calcext:value-type="float">
            <text:p>5,02999999999994</text:p>
          </table:table-cell>
          <table:table-cell table:style-name="ce1" table:formula="of:=[.H505]" office:value-type="float" office:value="181.800399253532" calcext:value-type="float">
            <text:p>181,800399253532</text:p>
          </table:table-cell>
          <table:table-cell table:style-name="ce1" table:formula="of:=-68 - ([.E506]^2/Ao)" office:value-type="float" office:value="-84.5256925843718" calcext:value-type="float">
            <text:p>-84,5256925843718</text:p>
          </table:table-cell>
          <table:table-cell table:style-name="ce1" table:formula="of:=[.G505]+h" office:value-type="float" office:value="5.03999999999994" calcext:value-type="float">
            <text:p>5,03999999999994</text:p>
          </table:table-cell>
          <table:table-cell table:style-name="ce1" table:formula="of:=[.H505]+ h*[.F506]" office:value-type="float" office:value="180.955142327688" calcext:value-type="float">
            <text:p>180,9551423276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6]" office:value-type="float" office:value="5.03999999999994" calcext:value-type="float">
            <text:p>5,03999999999994</text:p>
          </table:table-cell>
          <table:table-cell table:style-name="ce1" table:formula="of:=[.H506]" office:value-type="float" office:value="180.955142327688" calcext:value-type="float">
            <text:p>180,955142327688</text:p>
          </table:table-cell>
          <table:table-cell table:style-name="ce1" table:formula="of:=-68 - ([.E507]^2/Ao)" office:value-type="float" office:value="-84.3723817674169" calcext:value-type="float">
            <text:p>-84,3723817674169</text:p>
          </table:table-cell>
          <table:table-cell table:style-name="ce1" table:formula="of:=[.G506]+h" office:value-type="float" office:value="5.04999999999994" calcext:value-type="float">
            <text:p>5,04999999999994</text:p>
          </table:table-cell>
          <table:table-cell table:style-name="ce1" table:formula="of:=[.H506]+ h*[.F507]" office:value-type="float" office:value="180.111418510014" calcext:value-type="float">
            <text:p>180,1114185100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7]" office:value-type="float" office:value="5.04999999999994" calcext:value-type="float">
            <text:p>5,04999999999994</text:p>
          </table:table-cell>
          <table:table-cell table:style-name="ce1" table:formula="of:=[.H507]" office:value-type="float" office:value="180.111418510014" calcext:value-type="float">
            <text:p>180,111418510014</text:p>
          </table:table-cell>
          <table:table-cell table:style-name="ce1" table:formula="of:=-68 - ([.E508]^2/Ao)" office:value-type="float" office:value="-84.2200615388447" calcext:value-type="float">
            <text:p>-84,2200615388447</text:p>
          </table:table-cell>
          <table:table-cell table:style-name="ce1" table:formula="of:=[.G507]+h" office:value-type="float" office:value="5.05999999999994" calcext:value-type="float">
            <text:p>5,05999999999994</text:p>
          </table:table-cell>
          <table:table-cell table:style-name="ce1" table:formula="of:=[.H507]+ h*[.F508]" office:value-type="float" office:value="179.269217894625" calcext:value-type="float">
            <text:p>179,2692178946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8]" office:value-type="float" office:value="5.05999999999994" calcext:value-type="float">
            <text:p>5,05999999999994</text:p>
          </table:table-cell>
          <table:table-cell table:style-name="ce1" table:formula="of:=[.H508]" office:value-type="float" office:value="179.269217894625" calcext:value-type="float">
            <text:p>179,269217894625</text:p>
          </table:table-cell>
          <table:table-cell table:style-name="ce1" table:formula="of:=-68 - ([.E509]^2/Ao)" office:value-type="float" office:value="-84.0687262422754" calcext:value-type="float">
            <text:p>-84,0687262422754</text:p>
          </table:table-cell>
          <table:table-cell table:style-name="ce1" table:formula="of:=[.G508]+h" office:value-type="float" office:value="5.06999999999994" calcext:value-type="float">
            <text:p>5,06999999999994</text:p>
          </table:table-cell>
          <table:table-cell table:style-name="ce1" table:formula="of:=[.H508]+ h*[.F509]" office:value-type="float" office:value="178.428530632203" calcext:value-type="float">
            <text:p>178,4285306322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09]" office:value-type="float" office:value="5.06999999999994" calcext:value-type="float">
            <text:p>5,06999999999994</text:p>
          </table:table-cell>
          <table:table-cell table:style-name="ce1" table:formula="of:=[.H509]" office:value-type="float" office:value="178.428530632203" calcext:value-type="float">
            <text:p>178,428530632203</text:p>
          </table:table-cell>
          <table:table-cell table:style-name="ce1" table:formula="of:=-68 - ([.E510]^2/Ao)" office:value-type="float" office:value="-83.9183702717835" calcext:value-type="float">
            <text:p>-83,9183702717835</text:p>
          </table:table-cell>
          <table:table-cell table:style-name="ce1" table:formula="of:=[.G509]+h" office:value-type="float" office:value="5.07999999999994" calcext:value-type="float">
            <text:p>5,07999999999994</text:p>
          </table:table-cell>
          <table:table-cell table:style-name="ce1" table:formula="of:=[.H509]+ h*[.F510]" office:value-type="float" office:value="177.589346929485" calcext:value-type="float">
            <text:p>177,5893469294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0]" office:value-type="float" office:value="5.07999999999994" calcext:value-type="float">
            <text:p>5,07999999999994</text:p>
          </table:table-cell>
          <table:table-cell table:style-name="ce1" table:formula="of:=[.H510]" office:value-type="float" office:value="177.589346929485" calcext:value-type="float">
            <text:p>177,589346929485</text:p>
          </table:table-cell>
          <table:table-cell table:style-name="ce1" table:formula="of:=-68 - ([.E511]^2/Ao)" office:value-type="float" office:value="-83.7689880714205" calcext:value-type="float">
            <text:p>-83,7689880714205</text:p>
          </table:table-cell>
          <table:table-cell table:style-name="ce1" table:formula="of:=[.G510]+h" office:value-type="float" office:value="5.08999999999994" calcext:value-type="float">
            <text:p>5,08999999999994</text:p>
          </table:table-cell>
          <table:table-cell table:style-name="ce1" table:formula="of:=[.H510]+ h*[.F511]" office:value-type="float" office:value="176.751657048771" calcext:value-type="float">
            <text:p>176,7516570487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1]" office:value-type="float" office:value="5.08999999999994" calcext:value-type="float">
            <text:p>5,08999999999994</text:p>
          </table:table-cell>
          <table:table-cell table:style-name="ce1" table:formula="of:=[.H511]" office:value-type="float" office:value="176.751657048771" calcext:value-type="float">
            <text:p>176,751657048771</text:p>
          </table:table-cell>
          <table:table-cell table:style-name="ce1" table:formula="of:=-68 - ([.E512]^2/Ao)" office:value-type="float" office:value="-83.6205741347431" calcext:value-type="float">
            <text:p>-83,6205741347431</text:p>
          </table:table-cell>
          <table:table-cell table:style-name="ce1" table:formula="of:=[.G511]+h" office:value-type="float" office:value="5.09999999999994" calcext:value-type="float">
            <text:p>5,09999999999994</text:p>
          </table:table-cell>
          <table:table-cell table:style-name="ce1" table:formula="of:=[.H511]+ h*[.F512]" office:value-type="float" office:value="175.915451307423" calcext:value-type="float">
            <text:p>175,9154513074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2]" office:value-type="float" office:value="5.09999999999994" calcext:value-type="float">
            <text:p>5,09999999999994</text:p>
          </table:table-cell>
          <table:table-cell table:style-name="ce1" table:formula="of:=[.H512]" office:value-type="float" office:value="175.915451307423" calcext:value-type="float">
            <text:p>175,915451307423</text:p>
          </table:table-cell>
          <table:table-cell table:style-name="ce1" table:formula="of:=-68 - ([.E513]^2/Ao)" office:value-type="float" office:value="-83.4731230043472" calcext:value-type="float">
            <text:p>-83,4731230043472</text:p>
          </table:table-cell>
          <table:table-cell table:style-name="ce1" table:formula="of:=[.G512]+h" office:value-type="float" office:value="5.10999999999994" calcext:value-type="float">
            <text:p>5,10999999999994</text:p>
          </table:table-cell>
          <table:table-cell table:style-name="ce1" table:formula="of:=[.H512]+ h*[.F513]" office:value-type="float" office:value="175.08072007738" calcext:value-type="float">
            <text:p>175,080720077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3]" office:value-type="float" office:value="5.10999999999994" calcext:value-type="float">
            <text:p>5,10999999999994</text:p>
          </table:table-cell>
          <table:table-cell table:style-name="ce1" table:formula="of:=[.H513]" office:value-type="float" office:value="175.08072007738" calcext:value-type="float">
            <text:p>175,08072007738</text:p>
          </table:table-cell>
          <table:table-cell table:style-name="ce1" table:formula="of:=-68 - ([.E514]^2/Ao)" office:value-type="float" office:value="-83.3266292714069" calcext:value-type="float">
            <text:p>-83,3266292714069</text:p>
          </table:table-cell>
          <table:table-cell table:style-name="ce1" table:formula="of:=[.G513]+h" office:value-type="float" office:value="5.11999999999994" calcext:value-type="float">
            <text:p>5,11999999999994</text:p>
          </table:table-cell>
          <table:table-cell table:style-name="ce1" table:formula="of:=[.H513]+ h*[.F514]" office:value-type="float" office:value="174.247453784666" calcext:value-type="float">
            <text:p>174,2474537846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4]" office:value-type="float" office:value="5.11999999999994" calcext:value-type="float">
            <text:p>5,11999999999994</text:p>
          </table:table-cell>
          <table:table-cell table:style-name="ce1" table:formula="of:=[.H514]" office:value-type="float" office:value="174.247453784666" calcext:value-type="float">
            <text:p>174,247453784666</text:p>
          </table:table-cell>
          <table:table-cell table:style-name="ce1" table:formula="of:=-68 - ([.E515]^2/Ao)" office:value-type="float" office:value="-83.1810875752196" calcext:value-type="float">
            <text:p>-83,1810875752196</text:p>
          </table:table-cell>
          <table:table-cell table:style-name="ce1" table:formula="of:=[.G514]+h" office:value-type="float" office:value="5.12999999999994" calcext:value-type="float">
            <text:p>5,12999999999994</text:p>
          </table:table-cell>
          <table:table-cell table:style-name="ce1" table:formula="of:=[.H514]+ h*[.F515]" office:value-type="float" office:value="173.415642908914" calcext:value-type="float">
            <text:p>173,4156429089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5]" office:value-type="float" office:value="5.12999999999994" calcext:value-type="float">
            <text:p>5,12999999999994</text:p>
          </table:table-cell>
          <table:table-cell table:style-name="ce1" table:formula="of:=[.H515]" office:value-type="float" office:value="173.415642908914" calcext:value-type="float">
            <text:p>173,415642908914</text:p>
          </table:table-cell>
          <table:table-cell table:style-name="ce1" table:formula="of:=-68 - ([.E516]^2/Ao)" office:value-type="float" office:value="-83.0364926027559" calcext:value-type="float">
            <text:p>-83,0364926027559</text:p>
          </table:table-cell>
          <table:table-cell table:style-name="ce1" table:formula="of:=[.G515]+h" office:value-type="float" office:value="5.13999999999994" calcext:value-type="float">
            <text:p>5,13999999999994</text:p>
          </table:table-cell>
          <table:table-cell table:style-name="ce1" table:formula="of:=[.H515]+ h*[.F516]" office:value-type="float" office:value="172.585277982886" calcext:value-type="float">
            <text:p>172,5852779828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6]" office:value-type="float" office:value="5.13999999999994" calcext:value-type="float">
            <text:p>5,13999999999994</text:p>
          </table:table-cell>
          <table:table-cell table:style-name="ce1" table:formula="of:=[.H516]" office:value-type="float" office:value="172.585277982886" calcext:value-type="float">
            <text:p>172,585277982886</text:p>
          </table:table-cell>
          <table:table-cell table:style-name="ce1" table:formula="of:=-68 - ([.E517]^2/Ao)" office:value-type="float" office:value="-82.892839088215" calcext:value-type="float">
            <text:p>-82,892839088215</text:p>
          </table:table-cell>
          <table:table-cell table:style-name="ce1" table:formula="of:=[.G516]+h" office:value-type="float" office:value="5.14999999999994" calcext:value-type="float">
            <text:p>5,14999999999994</text:p>
          </table:table-cell>
          <table:table-cell table:style-name="ce1" table:formula="of:=[.H516]+ h*[.F517]" office:value-type="float" office:value="171.756349592004" calcext:value-type="float">
            <text:p>171,7563495920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7]" office:value-type="float" office:value="5.14999999999994" calcext:value-type="float">
            <text:p>5,14999999999994</text:p>
          </table:table-cell>
          <table:table-cell table:style-name="ce1" table:formula="of:=[.H517]" office:value-type="float" office:value="171.756349592004" calcext:value-type="float">
            <text:p>171,756349592004</text:p>
          </table:table-cell>
          <table:table-cell table:style-name="ce1" table:formula="of:=-68 - ([.E518]^2/Ao)" office:value-type="float" office:value="-82.7501218125853" calcext:value-type="float">
            <text:p>-82,7501218125853</text:p>
          </table:table-cell>
          <table:table-cell table:style-name="ce1" table:formula="of:=[.G517]+h" office:value-type="float" office:value="5.15999999999993" calcext:value-type="float">
            <text:p>5,15999999999993</text:p>
          </table:table-cell>
          <table:table-cell table:style-name="ce1" table:formula="of:=[.H517]+ h*[.F518]" office:value-type="float" office:value="170.928848373878" calcext:value-type="float">
            <text:p>170,9288483738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8]" office:value-type="float" office:value="5.15999999999993" calcext:value-type="float">
            <text:p>5,15999999999993</text:p>
          </table:table-cell>
          <table:table-cell table:style-name="ce1" table:formula="of:=[.H518]" office:value-type="float" office:value="170.928848373878" calcext:value-type="float">
            <text:p>170,928848373878</text:p>
          </table:table-cell>
          <table:table-cell table:style-name="ce1" table:formula="of:=-68 - ([.E519]^2/Ao)" office:value-type="float" office:value="-82.6083356032101" calcext:value-type="float">
            <text:p>-82,6083356032101</text:p>
          </table:table-cell>
          <table:table-cell table:style-name="ce1" table:formula="of:=[.G518]+h" office:value-type="float" office:value="5.16999999999993" calcext:value-type="float">
            <text:p>5,16999999999993</text:p>
          </table:table-cell>
          <table:table-cell table:style-name="ce1" table:formula="of:=[.H518]+ h*[.F519]" office:value-type="float" office:value="170.102765017846" calcext:value-type="float">
            <text:p>170,1027650178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19]" office:value-type="float" office:value="5.16999999999993" calcext:value-type="float">
            <text:p>5,16999999999993</text:p>
          </table:table-cell>
          <table:table-cell table:style-name="ce1" table:formula="of:=[.H519]" office:value-type="float" office:value="170.102765017846" calcext:value-type="float">
            <text:p>170,102765017846</text:p>
          </table:table-cell>
          <table:table-cell table:style-name="ce1" table:formula="of:=-68 - ([.E520]^2/Ao)" office:value-type="float" office:value="-82.4674753333582" calcext:value-type="float">
            <text:p>-82,4674753333582</text:p>
          </table:table-cell>
          <table:table-cell table:style-name="ce1" table:formula="of:=[.G519]+h" office:value-type="float" office:value="5.17999999999993" calcext:value-type="float">
            <text:p>5,17999999999993</text:p>
          </table:table-cell>
          <table:table-cell table:style-name="ce1" table:formula="of:=[.H519]+ h*[.F520]" office:value-type="float" office:value="169.278090264512" calcext:value-type="float">
            <text:p>169,2780902645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0]" office:value-type="float" office:value="5.17999999999993" calcext:value-type="float">
            <text:p>5,17999999999993</text:p>
          </table:table-cell>
          <table:table-cell table:style-name="ce1" table:formula="of:=[.H520]" office:value-type="float" office:value="169.278090264512" calcext:value-type="float">
            <text:p>169,278090264512</text:p>
          </table:table-cell>
          <table:table-cell table:style-name="ce1" table:formula="of:=-68 - ([.E521]^2/Ao)" office:value-type="float" office:value="-82.3275359218002" calcext:value-type="float">
            <text:p>-82,3275359218002</text:p>
          </table:table-cell>
          <table:table-cell table:style-name="ce1" table:formula="of:=[.G520]+h" office:value-type="float" office:value="5.18999999999993" calcext:value-type="float">
            <text:p>5,18999999999993</text:p>
          </table:table-cell>
          <table:table-cell table:style-name="ce1" table:formula="of:=[.H520]+ h*[.F521]" office:value-type="float" office:value="168.454814905294" calcext:value-type="float">
            <text:p>168,4548149052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1]" office:value-type="float" office:value="5.18999999999993" calcext:value-type="float">
            <text:p>5,18999999999993</text:p>
          </table:table-cell>
          <table:table-cell table:style-name="ce1" table:formula="of:=[.H521]" office:value-type="float" office:value="168.454814905294" calcext:value-type="float">
            <text:p>168,454814905294</text:p>
          </table:table-cell>
          <table:table-cell table:style-name="ce1" table:formula="of:=-68 - ([.E522]^2/Ao)" office:value-type="float" office:value="-82.1885123323885" calcext:value-type="float">
            <text:p>-82,1885123323885</text:p>
          </table:table-cell>
          <table:table-cell table:style-name="ce1" table:formula="of:=[.G521]+h" office:value-type="float" office:value="5.19999999999993" calcext:value-type="float">
            <text:p>5,19999999999993</text:p>
          </table:table-cell>
          <table:table-cell table:style-name="ce1" table:formula="of:=[.H521]+ h*[.F522]" office:value-type="float" office:value="167.63292978197" calcext:value-type="float">
            <text:p>167,632929781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2]" office:value-type="float" office:value="5.19999999999993" calcext:value-type="float">
            <text:p>5,19999999999993</text:p>
          </table:table-cell>
          <table:table-cell table:style-name="ce1" table:formula="of:=[.H522]" office:value-type="float" office:value="167.63292978197" calcext:value-type="float">
            <text:p>167,63292978197</text:p>
          </table:table-cell>
          <table:table-cell table:style-name="ce1" table:formula="of:=-68 - ([.E523]^2/Ao)" office:value-type="float" office:value="-82.0503995736435" calcext:value-type="float">
            <text:p>-82,0503995736435</text:p>
          </table:table-cell>
          <table:table-cell table:style-name="ce1" table:formula="of:=[.G522]+h" office:value-type="float" office:value="5.20999999999993" calcext:value-type="float">
            <text:p>5,20999999999993</text:p>
          </table:table-cell>
          <table:table-cell table:style-name="ce1" table:formula="of:=[.H522]+ h*[.F523]" office:value-type="float" office:value="166.812425786234" calcext:value-type="float">
            <text:p>166,8124257862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3]" office:value-type="float" office:value="5.20999999999993" calcext:value-type="float">
            <text:p>5,20999999999993</text:p>
          </table:table-cell>
          <table:table-cell table:style-name="ce1" table:formula="of:=[.H523]" office:value-type="float" office:value="166.812425786234" calcext:value-type="float">
            <text:p>166,812425786234</text:p>
          </table:table-cell>
          <table:table-cell table:style-name="ce1" table:formula="of:=-68 - ([.E524]^2/Ao)" office:value-type="float" office:value="-81.9131926983439" calcext:value-type="float">
            <text:p>-81,9131926983439</text:p>
          </table:table-cell>
          <table:table-cell table:style-name="ce1" table:formula="of:=[.G523]+h" office:value-type="float" office:value="5.21999999999993" calcext:value-type="float">
            <text:p>5,21999999999993</text:p>
          </table:table-cell>
          <table:table-cell table:style-name="ce1" table:formula="of:=[.H523]+ h*[.F524]" office:value-type="float" office:value="165.993293859251" calcext:value-type="float">
            <text:p>165,9932938592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4]" office:value-type="float" office:value="5.21999999999993" calcext:value-type="float">
            <text:p>5,21999999999993</text:p>
          </table:table-cell>
          <table:table-cell table:style-name="ce1" table:formula="of:=[.H524]" office:value-type="float" office:value="165.993293859251" calcext:value-type="float">
            <text:p>165,993293859251</text:p>
          </table:table-cell>
          <table:table-cell table:style-name="ce1" table:formula="of:=-68 - ([.E525]^2/Ao)" office:value-type="float" office:value="-81.7768868031218" calcext:value-type="float">
            <text:p>-81,7768868031218</text:p>
          </table:table-cell>
          <table:table-cell table:style-name="ce1" table:formula="of:=[.G524]+h" office:value-type="float" office:value="5.22999999999993" calcext:value-type="float">
            <text:p>5,22999999999993</text:p>
          </table:table-cell>
          <table:table-cell table:style-name="ce1" table:formula="of:=[.H524]+ h*[.F525]" office:value-type="float" office:value="165.175524991219" calcext:value-type="float">
            <text:p>165,1755249912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5]" office:value-type="float" office:value="5.22999999999993" calcext:value-type="float">
            <text:p>5,22999999999993</text:p>
          </table:table-cell>
          <table:table-cell table:style-name="ce1" table:formula="of:=[.H525]" office:value-type="float" office:value="165.175524991219" calcext:value-type="float">
            <text:p>165,175524991219</text:p>
          </table:table-cell>
          <table:table-cell table:style-name="ce1" table:formula="of:=-68 - ([.E526]^2/Ao)" office:value-type="float" office:value="-81.6414770280625" calcext:value-type="float">
            <text:p>-81,6414770280625</text:p>
          </table:table-cell>
          <table:table-cell table:style-name="ce1" table:formula="of:=[.G525]+h" office:value-type="float" office:value="5.23999999999993" calcext:value-type="float">
            <text:p>5,23999999999993</text:p>
          </table:table-cell>
          <table:table-cell table:style-name="ce1" table:formula="of:=[.H525]+ h*[.F526]" office:value-type="float" office:value="164.359110220939" calcext:value-type="float">
            <text:p>164,3591102209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6]" office:value-type="float" office:value="5.23999999999993" calcext:value-type="float">
            <text:p>5,23999999999993</text:p>
          </table:table-cell>
          <table:table-cell table:style-name="ce1" table:formula="of:=[.H526]" office:value-type="float" office:value="164.359110220939" calcext:value-type="float">
            <text:p>164,359110220939</text:p>
          </table:table-cell>
          <table:table-cell table:style-name="ce1" table:formula="of:=-68 - ([.E527]^2/Ao)" office:value-type="float" office:value="-81.5069585563093" calcext:value-type="float">
            <text:p>-81,5069585563093</text:p>
          </table:table-cell>
          <table:table-cell table:style-name="ce1" table:formula="of:=[.G526]+h" office:value-type="float" office:value="5.24999999999993" calcext:value-type="float">
            <text:p>5,24999999999993</text:p>
          </table:table-cell>
          <table:table-cell table:style-name="ce1" table:formula="of:=[.H526]+ h*[.F527]" office:value-type="float" office:value="163.544040635376" calcext:value-type="float">
            <text:p>163,5440406353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7]" office:value-type="float" office:value="5.24999999999993" calcext:value-type="float">
            <text:p>5,24999999999993</text:p>
          </table:table-cell>
          <table:table-cell table:style-name="ce1" table:formula="of:=[.H527]" office:value-type="float" office:value="163.544040635376" calcext:value-type="float">
            <text:p>163,544040635376</text:p>
          </table:table-cell>
          <table:table-cell table:style-name="ce1" table:formula="of:=-68 - ([.E528]^2/Ao)" office:value-type="float" office:value="-81.3733266136727" calcext:value-type="float">
            <text:p>-81,3733266136727</text:p>
          </table:table-cell>
          <table:table-cell table:style-name="ce1" table:formula="of:=[.G527]+h" office:value-type="float" office:value="5.25999999999993" calcext:value-type="float">
            <text:p>5,25999999999993</text:p>
          </table:table-cell>
          <table:table-cell table:style-name="ce1" table:formula="of:=[.H527]+ h*[.F528]" office:value-type="float" office:value="162.730307369239" calcext:value-type="float">
            <text:p>162,7303073692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8]" office:value-type="float" office:value="5.25999999999993" calcext:value-type="float">
            <text:p>5,25999999999993</text:p>
          </table:table-cell>
          <table:table-cell table:style-name="ce1" table:formula="of:=[.H528]" office:value-type="float" office:value="162.730307369239" calcext:value-type="float">
            <text:p>162,730307369239</text:p>
          </table:table-cell>
          <table:table-cell table:style-name="ce1" table:formula="of:=-68 - ([.E529]^2/Ao)" office:value-type="float" office:value="-81.2405764682435" calcext:value-type="float">
            <text:p>-81,2405764682435</text:p>
          </table:table-cell>
          <table:table-cell table:style-name="ce1" table:formula="of:=[.G528]+h" office:value-type="float" office:value="5.26999999999993" calcext:value-type="float">
            <text:p>5,26999999999993</text:p>
          </table:table-cell>
          <table:table-cell table:style-name="ce1" table:formula="of:=[.H528]+ h*[.F529]" office:value-type="float" office:value="161.917901604556" calcext:value-type="float">
            <text:p>161,9179016045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29]" office:value-type="float" office:value="5.26999999999993" calcext:value-type="float">
            <text:p>5,26999999999993</text:p>
          </table:table-cell>
          <table:table-cell table:style-name="ce1" table:formula="of:=[.H529]" office:value-type="float" office:value="161.917901604556" calcext:value-type="float">
            <text:p>161,917901604556</text:p>
          </table:table-cell>
          <table:table-cell table:style-name="ce1" table:formula="of:=-68 - ([.E530]^2/Ao)" office:value-type="float" office:value="-81.1087034300114" calcext:value-type="float">
            <text:p>-81,1087034300114</text:p>
          </table:table-cell>
          <table:table-cell table:style-name="ce1" table:formula="of:=[.G529]+h" office:value-type="float" office:value="5.27999999999993" calcext:value-type="float">
            <text:p>5,27999999999993</text:p>
          </table:table-cell>
          <table:table-cell table:style-name="ce1" table:formula="of:=[.H529]+ h*[.F530]" office:value-type="float" office:value="161.106814570256" calcext:value-type="float">
            <text:p>161,1068145702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0]" office:value-type="float" office:value="5.27999999999993" calcext:value-type="float">
            <text:p>5,27999999999993</text:p>
          </table:table-cell>
          <table:table-cell table:style-name="ce1" table:formula="of:=[.H530]" office:value-type="float" office:value="161.106814570256" calcext:value-type="float">
            <text:p>161,106814570256</text:p>
          </table:table-cell>
          <table:table-cell table:style-name="ce1" table:formula="of:=-68 - ([.E531]^2/Ao)" office:value-type="float" office:value="-80.9777028504875" calcext:value-type="float">
            <text:p>-80,9777028504875</text:p>
          </table:table-cell>
          <table:table-cell table:style-name="ce1" table:formula="of:=[.G530]+h" office:value-type="float" office:value="5.28999999999993" calcext:value-type="float">
            <text:p>5,28999999999993</text:p>
          </table:table-cell>
          <table:table-cell table:style-name="ce1" table:formula="of:=[.H530]+ h*[.F531]" office:value-type="float" office:value="160.297037541751" calcext:value-type="float">
            <text:p>160,2970375417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1]" office:value-type="float" office:value="5.28999999999993" calcext:value-type="float">
            <text:p>5,28999999999993</text:p>
          </table:table-cell>
          <table:table-cell table:style-name="ce1" table:formula="of:=[.H531]" office:value-type="float" office:value="160.297037541751" calcext:value-type="float">
            <text:p>160,297037541751</text:p>
          </table:table-cell>
          <table:table-cell table:style-name="ce1" table:formula="of:=-68 - ([.E532]^2/Ao)" office:value-type="float" office:value="-80.8475701223308" calcext:value-type="float">
            <text:p>-80,8475701223308</text:p>
          </table:table-cell>
          <table:table-cell table:style-name="ce1" table:formula="of:=[.G531]+h" office:value-type="float" office:value="5.29999999999993" calcext:value-type="float">
            <text:p>5,29999999999993</text:p>
          </table:table-cell>
          <table:table-cell table:style-name="ce1" table:formula="of:=[.H531]+ h*[.F532]" office:value-type="float" office:value="159.488561840528" calcext:value-type="float">
            <text:p>159,4885618405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2]" office:value-type="float" office:value="5.29999999999993" calcext:value-type="float">
            <text:p>5,29999999999993</text:p>
          </table:table-cell>
          <table:table-cell table:style-name="ce1" table:formula="of:=[.H532]" office:value-type="float" office:value="159.488561840528" calcext:value-type="float">
            <text:p>159,488561840528</text:p>
          </table:table-cell>
          <table:table-cell table:style-name="ce1" table:formula="of:=-68 - ([.E533]^2/Ao)" office:value-type="float" office:value="-80.71830067898" calcext:value-type="float">
            <text:p>-80,71830067898</text:p>
          </table:table-cell>
          <table:table-cell table:style-name="ce1" table:formula="of:=[.G532]+h" office:value-type="float" office:value="5.30999999999993" calcext:value-type="float">
            <text:p>5,30999999999993</text:p>
          </table:table-cell>
          <table:table-cell table:style-name="ce1" table:formula="of:=[.H532]+ h*[.F533]" office:value-type="float" office:value="158.681378833738" calcext:value-type="float">
            <text:p>158,6813788337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3]" office:value-type="float" office:value="5.30999999999993" calcext:value-type="float">
            <text:p>5,30999999999993</text:p>
          </table:table-cell>
          <table:table-cell table:style-name="ce1" table:formula="of:=[.H533]" office:value-type="float" office:value="158.681378833738" calcext:value-type="float">
            <text:p>158,681378833738</text:p>
          </table:table-cell>
          <table:table-cell table:style-name="ce1" table:formula="of:=-68 - ([.E534]^2/Ao)" office:value-type="float" office:value="-80.5898899942882" calcext:value-type="float">
            <text:p>-80,5898899942882</text:p>
          </table:table-cell>
          <table:table-cell table:style-name="ce1" table:formula="of:=[.G533]+h" office:value-type="float" office:value="5.31999999999993" calcext:value-type="float">
            <text:p>5,31999999999993</text:p>
          </table:table-cell>
          <table:table-cell table:style-name="ce1" table:formula="of:=[.H533]+ h*[.F534]" office:value-type="float" office:value="157.875479933795" calcext:value-type="float">
            <text:p>157,8754799337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4]" office:value-type="float" office:value="5.31999999999993" calcext:value-type="float">
            <text:p>5,31999999999993</text:p>
          </table:table-cell>
          <table:table-cell table:style-name="ce1" table:formula="of:=[.H534]" office:value-type="float" office:value="157.875479933795" calcext:value-type="float">
            <text:p>157,875479933795</text:p>
          </table:table-cell>
          <table:table-cell table:style-name="ce1" table:formula="of:=-68 - ([.E535]^2/Ao)" office:value-type="float" office:value="-80.4623335821631" calcext:value-type="float">
            <text:p>-80,4623335821631</text:p>
          </table:table-cell>
          <table:table-cell table:style-name="ce1" table:formula="of:=[.G534]+h" office:value-type="float" office:value="5.32999999999993" calcext:value-type="float">
            <text:p>5,32999999999993</text:p>
          </table:table-cell>
          <table:table-cell table:style-name="ce1" table:formula="of:=[.H534]+ h*[.F535]" office:value-type="float" office:value="157.070856597974" calcext:value-type="float">
            <text:p>157,07085659797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5]" office:value-type="float" office:value="5.32999999999993" calcext:value-type="float">
            <text:p>5,32999999999993</text:p>
          </table:table-cell>
          <table:table-cell table:style-name="ce1" table:formula="of:=[.H535]" office:value-type="float" office:value="157.070856597974" calcext:value-type="float">
            <text:p>157,070856597974</text:p>
          </table:table-cell>
          <table:table-cell table:style-name="ce1" table:formula="of:=-68 - ([.E536]^2/Ao)" office:value-type="float" office:value="-80.3356269962106" calcext:value-type="float">
            <text:p>-80,3356269962106</text:p>
          </table:table-cell>
          <table:table-cell table:style-name="ce1" table:formula="of:=[.G535]+h" office:value-type="float" office:value="5.33999999999993" calcext:value-type="float">
            <text:p>5,33999999999993</text:p>
          </table:table-cell>
          <table:table-cell table:style-name="ce1" table:formula="of:=[.H535]+ h*[.F536]" office:value-type="float" office:value="156.267500328012" calcext:value-type="float">
            <text:p>156,2675003280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6]" office:value-type="float" office:value="5.33999999999993" calcext:value-type="float">
            <text:p>5,33999999999993</text:p>
          </table:table-cell>
          <table:table-cell table:style-name="ce1" table:formula="of:=[.H536]" office:value-type="float" office:value="156.267500328012" calcext:value-type="float">
            <text:p>156,267500328012</text:p>
          </table:table-cell>
          <table:table-cell table:style-name="ce1" table:formula="of:=-68 - ([.E537]^2/Ao)" office:value-type="float" office:value="-80.2097658293826" calcext:value-type="float">
            <text:p>-80,2097658293826</text:p>
          </table:table-cell>
          <table:table-cell table:style-name="ce1" table:formula="of:=[.G536]+h" office:value-type="float" office:value="5.34999999999993" calcext:value-type="float">
            <text:p>5,34999999999993</text:p>
          </table:table-cell>
          <table:table-cell table:style-name="ce1" table:formula="of:=[.H536]+ h*[.F537]" office:value-type="float" office:value="155.465402669718" calcext:value-type="float">
            <text:p>155,4654026697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7]" office:value-type="float" office:value="5.34999999999993" calcext:value-type="float">
            <text:p>5,34999999999993</text:p>
          </table:table-cell>
          <table:table-cell table:style-name="ce1" table:formula="of:=[.H537]" office:value-type="float" office:value="155.465402669718" calcext:value-type="float">
            <text:p>155,465402669718</text:p>
          </table:table-cell>
          <table:table-cell table:style-name="ce1" table:formula="of:=-68 - ([.E538]^2/Ao)" office:value-type="float" office:value="-80.0847457136288" calcext:value-type="float">
            <text:p>-80,0847457136288</text:p>
          </table:table-cell>
          <table:table-cell table:style-name="ce1" table:formula="of:=[.G537]+h" office:value-type="float" office:value="5.35999999999993" calcext:value-type="float">
            <text:p>5,35999999999993</text:p>
          </table:table-cell>
          <table:table-cell table:style-name="ce1" table:formula="of:=[.H537]+ h*[.F538]" office:value-type="float" office:value="154.664555212582" calcext:value-type="float">
            <text:p>154,6645552125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8]" office:value-type="float" office:value="5.35999999999993" calcext:value-type="float">
            <text:p>5,35999999999993</text:p>
          </table:table-cell>
          <table:table-cell table:style-name="ce1" table:formula="of:=[.H538]" office:value-type="float" office:value="154.664555212582" calcext:value-type="float">
            <text:p>154,664555212582</text:p>
          </table:table-cell>
          <table:table-cell table:style-name="ce1" table:formula="of:=-68 - ([.E539]^2/Ao)" office:value-type="float" office:value="-79.9605623195529" calcext:value-type="float">
            <text:p>-79,9605623195529</text:p>
          </table:table-cell>
          <table:table-cell table:style-name="ce1" table:formula="of:=[.G538]+h" office:value-type="float" office:value="5.36999999999993" calcext:value-type="float">
            <text:p>5,36999999999993</text:p>
          </table:table-cell>
          <table:table-cell table:style-name="ce1" table:formula="of:=[.H538]+ h*[.F539]" office:value-type="float" office:value="153.864949589386" calcext:value-type="float">
            <text:p>153,8649495893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39]" office:value-type="float" office:value="5.36999999999993" calcext:value-type="float">
            <text:p>5,36999999999993</text:p>
          </table:table-cell>
          <table:table-cell table:style-name="ce1" table:formula="of:=[.H539]" office:value-type="float" office:value="153.864949589386" calcext:value-type="float">
            <text:p>153,864949589386</text:p>
          </table:table-cell>
          <table:table-cell table:style-name="ce1" table:formula="of:=-68 - ([.E540]^2/Ao)" office:value-type="float" office:value="-79.8372113560722" calcext:value-type="float">
            <text:p>-79,8372113560722</text:p>
          </table:table-cell>
          <table:table-cell table:style-name="ce1" table:formula="of:=[.G539]+h" office:value-type="float" office:value="5.37999999999993" calcext:value-type="float">
            <text:p>5,37999999999993</text:p>
          </table:table-cell>
          <table:table-cell table:style-name="ce1" table:formula="of:=[.H539]+ h*[.F540]" office:value-type="float" office:value="153.066577475825" calcext:value-type="float">
            <text:p>153,0665774758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0]" office:value-type="float" office:value="5.37999999999993" calcext:value-type="float">
            <text:p>5,37999999999993</text:p>
          </table:table-cell>
          <table:table-cell table:style-name="ce1" table:formula="of:=[.H540]" office:value-type="float" office:value="153.066577475825" calcext:value-type="float">
            <text:p>153,066577475825</text:p>
          </table:table-cell>
          <table:table-cell table:style-name="ce1" table:formula="of:=-68 - ([.E541]^2/Ao)" office:value-type="float" office:value="-79.7146885700814" calcext:value-type="float">
            <text:p>-79,7146885700814</text:p>
          </table:table-cell>
          <table:table-cell table:style-name="ce1" table:formula="of:=[.G540]+h" office:value-type="float" office:value="5.38999999999993" calcext:value-type="float">
            <text:p>5,38999999999993</text:p>
          </table:table-cell>
          <table:table-cell table:style-name="ce1" table:formula="of:=[.H540]+ h*[.F541]" office:value-type="float" office:value="152.269430590125" calcext:value-type="float">
            <text:p>152,2694305901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1]" office:value-type="float" office:value="5.38999999999993" calcext:value-type="float">
            <text:p>5,38999999999993</text:p>
          </table:table-cell>
          <table:table-cell table:style-name="ce1" table:formula="of:=[.H541]" office:value-type="float" office:value="152.269430590125" calcext:value-type="float">
            <text:p>152,269430590125</text:p>
          </table:table-cell>
          <table:table-cell table:style-name="ce1" table:formula="of:=-68 - ([.E542]^2/Ao)" office:value-type="float" office:value="-79.5929897461204" calcext:value-type="float">
            <text:p>-79,5929897461204</text:p>
          </table:table-cell>
          <table:table-cell table:style-name="ce1" table:formula="of:=[.G541]+h" office:value-type="float" office:value="5.39999999999993" calcext:value-type="float">
            <text:p>5,39999999999993</text:p>
          </table:table-cell>
          <table:table-cell table:style-name="ce1" table:formula="of:=[.H541]+ h*[.F542]" office:value-type="float" office:value="151.473500692663" calcext:value-type="float">
            <text:p>151,4735006926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2]" office:value-type="float" office:value="5.39999999999993" calcext:value-type="float">
            <text:p>5,39999999999993</text:p>
          </table:table-cell>
          <table:table-cell table:style-name="ce1" table:formula="of:=[.H542]" office:value-type="float" office:value="151.473500692663" calcext:value-type="float">
            <text:p>151,473500692663</text:p>
          </table:table-cell>
          <table:table-cell table:style-name="ce1" table:formula="of:=-68 - ([.E543]^2/Ao)" office:value-type="float" office:value="-79.4721107060451" calcext:value-type="float">
            <text:p>-79,4721107060451</text:p>
          </table:table-cell>
          <table:table-cell table:style-name="ce1" table:formula="of:=[.G542]+h" office:value-type="float" office:value="5.40999999999993" calcext:value-type="float">
            <text:p>5,40999999999993</text:p>
          </table:table-cell>
          <table:table-cell table:style-name="ce1" table:formula="of:=[.H542]+ h*[.F543]" office:value-type="float" office:value="150.678779585603" calcext:value-type="float">
            <text:p>150,6787795856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3]" office:value-type="float" office:value="5.40999999999993" calcext:value-type="float">
            <text:p>5,40999999999993</text:p>
          </table:table-cell>
          <table:table-cell table:style-name="ce1" table:formula="of:=[.H543]" office:value-type="float" office:value="150.678779585603" calcext:value-type="float">
            <text:p>150,678779585603</text:p>
          </table:table-cell>
          <table:table-cell table:style-name="ce1" table:formula="of:=-68 - ([.E544]^2/Ao)" office:value-type="float" office:value="-79.3520473087034" calcext:value-type="float">
            <text:p>-79,3520473087034</text:p>
          </table:table-cell>
          <table:table-cell table:style-name="ce1" table:formula="of:=[.G543]+h" office:value-type="float" office:value="5.41999999999993" calcext:value-type="float">
            <text:p>5,41999999999993</text:p>
          </table:table-cell>
          <table:table-cell table:style-name="ce1" table:formula="of:=[.H543]+ h*[.F544]" office:value-type="float" office:value="149.885259112516" calcext:value-type="float">
            <text:p>149,8852591125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4]" office:value-type="float" office:value="5.41999999999993" calcext:value-type="float">
            <text:p>5,41999999999993</text:p>
          </table:table-cell>
          <table:table-cell table:style-name="ce1" table:formula="of:=[.H544]" office:value-type="float" office:value="149.885259112516" calcext:value-type="float">
            <text:p>149,885259112516</text:p>
          </table:table-cell>
          <table:table-cell table:style-name="ce1" table:formula="of:=-68 - ([.E545]^2/Ao)" office:value-type="float" office:value="-79.232795449613" calcext:value-type="float">
            <text:p>-79,232795449613</text:p>
          </table:table-cell>
          <table:table-cell table:style-name="ce1" table:formula="of:=[.G544]+h" office:value-type="float" office:value="5.42999999999993" calcext:value-type="float">
            <text:p>5,42999999999993</text:p>
          </table:table-cell>
          <table:table-cell table:style-name="ce1" table:formula="of:=[.H544]+ h*[.F545]" office:value-type="float" office:value="149.09293115802" calcext:value-type="float">
            <text:p>149,092931158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5]" office:value-type="float" office:value="5.42999999999993" calcext:value-type="float">
            <text:p>5,42999999999993</text:p>
          </table:table-cell>
          <table:table-cell table:style-name="ce1" table:formula="of:=[.H545]" office:value-type="float" office:value="149.09293115802" calcext:value-type="float">
            <text:p>149,09293115802</text:p>
          </table:table-cell>
          <table:table-cell table:style-name="ce1" table:formula="of:=-68 - ([.E546]^2/Ao)" office:value-type="float" office:value="-79.114351060645" calcext:value-type="float">
            <text:p>-79,114351060645</text:p>
          </table:table-cell>
          <table:table-cell table:style-name="ce1" table:formula="of:=[.G545]+h" office:value-type="float" office:value="5.43999999999993" calcext:value-type="float">
            <text:p>5,43999999999993</text:p>
          </table:table-cell>
          <table:table-cell table:style-name="ce1" table:formula="of:=[.H545]+ h*[.F546]" office:value-type="float" office:value="148.301787647413" calcext:value-type="float">
            <text:p>148,3017876474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6]" office:value-type="float" office:value="5.43999999999993" calcext:value-type="float">
            <text:p>5,43999999999993</text:p>
          </table:table-cell>
          <table:table-cell table:style-name="ce1" table:formula="of:=[.H546]" office:value-type="float" office:value="148.301787647413" calcext:value-type="float">
            <text:p>148,301787647413</text:p>
          </table:table-cell>
          <table:table-cell table:style-name="ce1" table:formula="of:=-68 - ([.E547]^2/Ao)" office:value-type="float" office:value="-78.9967101097092" calcext:value-type="float">
            <text:p>-78,9967101097092</text:p>
          </table:table-cell>
          <table:table-cell table:style-name="ce1" table:formula="of:=[.G546]+h" office:value-type="float" office:value="5.44999999999993" calcext:value-type="float">
            <text:p>5,44999999999993</text:p>
          </table:table-cell>
          <table:table-cell table:style-name="ce1" table:formula="of:=[.H546]+ h*[.F547]" office:value-type="float" office:value="147.511820546316" calcext:value-type="float">
            <text:p>147,5118205463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7]" office:value-type="float" office:value="5.44999999999993" calcext:value-type="float">
            <text:p>5,44999999999993</text:p>
          </table:table-cell>
          <table:table-cell table:style-name="ce1" table:formula="of:=[.H547]" office:value-type="float" office:value="147.511820546316" calcext:value-type="float">
            <text:p>147,511820546316</text:p>
          </table:table-cell>
          <table:table-cell table:style-name="ce1" table:formula="of:=-68 - ([.E548]^2/Ao)" office:value-type="float" office:value="-78.8798686004443" calcext:value-type="float">
            <text:p>-78,8798686004443</text:p>
          </table:table-cell>
          <table:table-cell table:style-name="ce1" table:formula="of:=[.G547]+h" office:value-type="float" office:value="5.45999999999993" calcext:value-type="float">
            <text:p>5,45999999999993</text:p>
          </table:table-cell>
          <table:table-cell table:style-name="ce1" table:formula="of:=[.H547]+ h*[.F548]" office:value-type="float" office:value="146.723021860312" calcext:value-type="float">
            <text:p>146,7230218603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8]" office:value-type="float" office:value="5.45999999999993" calcext:value-type="float">
            <text:p>5,45999999999993</text:p>
          </table:table-cell>
          <table:table-cell table:style-name="ce1" table:formula="of:=[.H548]" office:value-type="float" office:value="146.723021860312" calcext:value-type="float">
            <text:p>146,723021860312</text:p>
          </table:table-cell>
          <table:table-cell table:style-name="ce1" table:formula="of:=-68 - ([.E549]^2/Ao)" office:value-type="float" office:value="-78.7638225719108" calcext:value-type="float">
            <text:p>-78,7638225719108</text:p>
          </table:table-cell>
          <table:table-cell table:style-name="ce1" table:formula="of:=[.G548]+h" office:value-type="float" office:value="5.46999999999993" calcext:value-type="float">
            <text:p>5,46999999999993</text:p>
          </table:table-cell>
          <table:table-cell table:style-name="ce1" table:formula="of:=[.H548]+ h*[.F549]" office:value-type="float" office:value="145.935383634593" calcext:value-type="float">
            <text:p>145,9353836345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49]" office:value-type="float" office:value="5.46999999999993" calcext:value-type="float">
            <text:p>5,46999999999993</text:p>
          </table:table-cell>
          <table:table-cell table:style-name="ce1" table:formula="of:=[.H549]" office:value-type="float" office:value="145.935383634593" calcext:value-type="float">
            <text:p>145,935383634593</text:p>
          </table:table-cell>
          <table:table-cell table:style-name="ce1" table:formula="of:=-68 - ([.E550]^2/Ao)" office:value-type="float" office:value="-78.6485680982879" calcext:value-type="float">
            <text:p>-78,6485680982879</text:p>
          </table:table-cell>
          <table:table-cell table:style-name="ce1" table:formula="of:=[.G549]+h" office:value-type="float" office:value="5.47999999999993" calcext:value-type="float">
            <text:p>5,47999999999993</text:p>
          </table:table-cell>
          <table:table-cell table:style-name="ce1" table:formula="of:=[.H549]+ h*[.F550]" office:value-type="float" office:value="145.14889795361" calcext:value-type="float">
            <text:p>145,148897953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0]" office:value-type="float" office:value="5.47999999999993" calcext:value-type="float">
            <text:p>5,47999999999993</text:p>
          </table:table-cell>
          <table:table-cell table:style-name="ce1" table:formula="of:=[.H550]" office:value-type="float" office:value="145.14889795361" calcext:value-type="float">
            <text:p>145,14889795361</text:p>
          </table:table-cell>
          <table:table-cell table:style-name="ce1" table:formula="of:=-68 - ([.E551]^2/Ao)" office:value-type="float" office:value="-78.5341012885737" calcext:value-type="float">
            <text:p>-78,5341012885737</text:p>
          </table:table-cell>
          <table:table-cell table:style-name="ce1" table:formula="of:=[.G550]+h" office:value-type="float" office:value="5.48999999999993" calcext:value-type="float">
            <text:p>5,48999999999993</text:p>
          </table:table-cell>
          <table:table-cell table:style-name="ce1" table:formula="of:=[.H550]+ h*[.F551]" office:value-type="float" office:value="144.363556940724" calcext:value-type="float">
            <text:p>144,3635569407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1]" office:value-type="float" office:value="5.48999999999993" calcext:value-type="float">
            <text:p>5,48999999999993</text:p>
          </table:table-cell>
          <table:table-cell table:style-name="ce1" table:formula="of:=[.H551]" office:value-type="float" office:value="144.363556940724" calcext:value-type="float">
            <text:p>144,363556940724</text:p>
          </table:table-cell>
          <table:table-cell table:style-name="ce1" table:formula="of:=-68 - ([.E552]^2/Ao)" office:value-type="float" office:value="-78.4204182862888" calcext:value-type="float">
            <text:p>-78,4204182862888</text:p>
          </table:table-cell>
          <table:table-cell table:style-name="ce1" table:formula="of:=[.G551]+h" office:value-type="float" office:value="5.49999999999993" calcext:value-type="float">
            <text:p>5,49999999999993</text:p>
          </table:table-cell>
          <table:table-cell table:style-name="ce1" table:formula="of:=[.H551]+ h*[.F552]" office:value-type="float" office:value="143.579352757861" calcext:value-type="float">
            <text:p>143,5793527578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2]" office:value-type="float" office:value="5.49999999999993" calcext:value-type="float">
            <text:p>5,49999999999993</text:p>
          </table:table-cell>
          <table:table-cell table:style-name="ce1" table:formula="of:=[.H552]" office:value-type="float" office:value="143.579352757861" calcext:value-type="float">
            <text:p>143,579352757861</text:p>
          </table:table-cell>
          <table:table-cell table:style-name="ce1" table:formula="of:=-68 - ([.E553]^2/Ao)" office:value-type="float" office:value="-78.3075152691832" calcext:value-type="float">
            <text:p>-78,3075152691832</text:p>
          </table:table-cell>
          <table:table-cell table:style-name="ce1" table:formula="of:=[.G552]+h" office:value-type="float" office:value="5.50999999999993" calcext:value-type="float">
            <text:p>5,50999999999993</text:p>
          </table:table-cell>
          <table:table-cell table:style-name="ce1" table:formula="of:=[.H552]+ h*[.F553]" office:value-type="float" office:value="142.796277605169" calcext:value-type="float">
            <text:p>142,7962776051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3]" office:value-type="float" office:value="5.50999999999993" calcext:value-type="float">
            <text:p>5,50999999999993</text:p>
          </table:table-cell>
          <table:table-cell table:style-name="ce1" table:formula="of:=[.H553]" office:value-type="float" office:value="142.796277605169" calcext:value-type="float">
            <text:p>142,796277605169</text:p>
          </table:table-cell>
          <table:table-cell table:style-name="ce1" table:formula="of:=-68 - ([.E554]^2/Ao)" office:value-type="float" office:value="-78.1953884489463" calcext:value-type="float">
            <text:p>-78,1953884489463</text:p>
          </table:table-cell>
          <table:table-cell table:style-name="ce1" table:formula="of:=[.G553]+h" office:value-type="float" office:value="5.51999999999993" calcext:value-type="float">
            <text:p>5,51999999999993</text:p>
          </table:table-cell>
          <table:table-cell table:style-name="ce1" table:formula="of:=[.H553]+ h*[.F554]" office:value-type="float" office:value="142.01432372068" calcext:value-type="float">
            <text:p>142,014323720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4]" office:value-type="float" office:value="5.51999999999993" calcext:value-type="float">
            <text:p>5,51999999999993</text:p>
          </table:table-cell>
          <table:table-cell table:style-name="ce1" table:formula="of:=[.H554]" office:value-type="float" office:value="142.01432372068" calcext:value-type="float">
            <text:p>142,01432372068</text:p>
          </table:table-cell>
          <table:table-cell table:style-name="ce1" table:formula="of:=-68 - ([.E555]^2/Ao)" office:value-type="float" office:value="-78.084034070921" calcext:value-type="float">
            <text:p>-78,084034070921</text:p>
          </table:table-cell>
          <table:table-cell table:style-name="ce1" table:formula="of:=[.G554]+h" office:value-type="float" office:value="5.52999999999993" calcext:value-type="float">
            <text:p>5,52999999999993</text:p>
          </table:table-cell>
          <table:table-cell table:style-name="ce1" table:formula="of:=[.H554]+ h*[.F555]" office:value-type="float" office:value="141.233483379971" calcext:value-type="float">
            <text:p>141,2334833799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5]" office:value-type="float" office:value="5.52999999999993" calcext:value-type="float">
            <text:p>5,52999999999993</text:p>
          </table:table-cell>
          <table:table-cell table:style-name="ce1" table:formula="of:=[.H555]" office:value-type="float" office:value="141.233483379971" calcext:value-type="float">
            <text:p>141,233483379971</text:p>
          </table:table-cell>
          <table:table-cell table:style-name="ce1" table:formula="of:=-68 - ([.E556]^2/Ao)" office:value-type="float" office:value="-77.9734484138202" calcext:value-type="float">
            <text:p>-77,9734484138202</text:p>
          </table:table-cell>
          <table:table-cell table:style-name="ce1" table:formula="of:=[.G555]+h" office:value-type="float" office:value="5.53999999999993" calcext:value-type="float">
            <text:p>5,53999999999993</text:p>
          </table:table-cell>
          <table:table-cell table:style-name="ce1" table:formula="of:=[.H555]+ h*[.F556]" office:value-type="float" office:value="140.453748895832" calcext:value-type="float">
            <text:p>140,4537488958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6]" office:value-type="float" office:value="5.53999999999993" calcext:value-type="float">
            <text:p>5,53999999999993</text:p>
          </table:table-cell>
          <table:table-cell table:style-name="ce1" table:formula="of:=[.H556]" office:value-type="float" office:value="140.453748895832" calcext:value-type="float">
            <text:p>140,453748895832</text:p>
          </table:table-cell>
          <table:table-cell table:style-name="ce1" table:formula="of:=-68 - ([.E557]^2/Ao)" office:value-type="float" office:value="-77.8636277894468" calcext:value-type="float">
            <text:p>-77,8636277894468</text:p>
          </table:table-cell>
          <table:table-cell table:style-name="ce1" table:formula="of:=[.G556]+h" office:value-type="float" office:value="5.54999999999993" calcext:value-type="float">
            <text:p>5,54999999999993</text:p>
          </table:table-cell>
          <table:table-cell table:style-name="ce1" table:formula="of:=[.H556]+ h*[.F557]" office:value-type="float" office:value="139.675112617938" calcext:value-type="float">
            <text:p>139,6751126179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7]" office:value-type="float" office:value="5.54999999999993" calcext:value-type="float">
            <text:p>5,54999999999993</text:p>
          </table:table-cell>
          <table:table-cell table:style-name="ce1" table:formula="of:=[.H557]" office:value-type="float" office:value="139.675112617938" calcext:value-type="float">
            <text:p>139,675112617938</text:p>
          </table:table-cell>
          <table:table-cell table:style-name="ce1" table:formula="of:=-68 - ([.E558]^2/Ao)" office:value-type="float" office:value="-77.7545685424168" calcext:value-type="float">
            <text:p>-77,7545685424168</text:p>
          </table:table-cell>
          <table:table-cell table:style-name="ce1" table:formula="of:=[.G557]+h" office:value-type="float" office:value="5.55999999999993" calcext:value-type="float">
            <text:p>5,55999999999993</text:p>
          </table:table-cell>
          <table:table-cell table:style-name="ce1" table:formula="of:=[.H557]+ h*[.F558]" office:value-type="float" office:value="138.897566932514" calcext:value-type="float">
            <text:p>138,8975669325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8]" office:value-type="float" office:value="5.55999999999993" calcext:value-type="float">
            <text:p>5,55999999999993</text:p>
          </table:table-cell>
          <table:table-cell table:style-name="ce1" table:formula="of:=[.H558]" office:value-type="float" office:value="138.897566932514" calcext:value-type="float">
            <text:p>138,897566932514</text:p>
          </table:table-cell>
          <table:table-cell table:style-name="ce1" table:formula="of:=-68 - ([.E559]^2/Ao)" office:value-type="float" office:value="-77.6462670498861" calcext:value-type="float">
            <text:p>-77,6462670498861</text:p>
          </table:table-cell>
          <table:table-cell table:style-name="ce1" table:formula="of:=[.G558]+h" office:value-type="float" office:value="5.56999999999993" calcext:value-type="float">
            <text:p>5,56999999999993</text:p>
          </table:table-cell>
          <table:table-cell table:style-name="ce1" table:formula="of:=[.H558]+ h*[.F559]" office:value-type="float" office:value="138.121104262015" calcext:value-type="float">
            <text:p>138,1211042620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59]" office:value-type="float" office:value="5.56999999999993" calcext:value-type="float">
            <text:p>5,56999999999993</text:p>
          </table:table-cell>
          <table:table-cell table:style-name="ce1" table:formula="of:=[.H559]" office:value-type="float" office:value="138.121104262015" calcext:value-type="float">
            <text:p>138,121104262015</text:p>
          </table:table-cell>
          <table:table-cell table:style-name="ce1" table:formula="of:=-68 - ([.E560]^2/Ao)" office:value-type="float" office:value="-77.5387197212792" calcext:value-type="float">
            <text:p>-77,5387197212792</text:p>
          </table:table-cell>
          <table:table-cell table:style-name="ce1" table:formula="of:=[.G559]+h" office:value-type="float" office:value="5.57999999999993" calcext:value-type="float">
            <text:p>5,57999999999993</text:p>
          </table:table-cell>
          <table:table-cell table:style-name="ce1" table:formula="of:=[.H559]+ h*[.F560]" office:value-type="float" office:value="137.345717064802" calcext:value-type="float">
            <text:p>137,34571706480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0]" office:value-type="float" office:value="5.57999999999993" calcext:value-type="float">
            <text:p>5,57999999999993</text:p>
          </table:table-cell>
          <table:table-cell table:style-name="ce1" table:formula="of:=[.H560]" office:value-type="float" office:value="137.345717064802" calcext:value-type="float">
            <text:p>137,345717064802</text:p>
          </table:table-cell>
          <table:table-cell table:style-name="ce1" table:formula="of:=-68 - ([.E561]^2/Ao)" office:value-type="float" office:value="-77.4319229980223" calcext:value-type="float">
            <text:p>-77,4319229980223</text:p>
          </table:table-cell>
          <table:table-cell table:style-name="ce1" table:formula="of:=[.G560]+h" office:value-type="float" office:value="5.58999999999993" calcext:value-type="float">
            <text:p>5,58999999999993</text:p>
          </table:table-cell>
          <table:table-cell table:style-name="ce1" table:formula="of:=[.H560]+ h*[.F561]" office:value-type="float" office:value="136.571397834822" calcext:value-type="float">
            <text:p>136,5713978348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1]" office:value-type="float" office:value="5.58999999999993" calcext:value-type="float">
            <text:p>5,58999999999993</text:p>
          </table:table-cell>
          <table:table-cell table:style-name="ce1" table:formula="of:=[.H561]" office:value-type="float" office:value="136.571397834822" calcext:value-type="float">
            <text:p>136,571397834822</text:p>
          </table:table-cell>
          <table:table-cell table:style-name="ce1" table:formula="of:=-68 - ([.E562]^2/Ao)" office:value-type="float" office:value="-77.3258733532786" calcext:value-type="float">
            <text:p>-77,3258733532786</text:p>
          </table:table-cell>
          <table:table-cell table:style-name="ce1" table:formula="of:=[.G561]+h" office:value-type="float" office:value="5.59999999999993" calcext:value-type="float">
            <text:p>5,59999999999993</text:p>
          </table:table-cell>
          <table:table-cell table:style-name="ce1" table:formula="of:=[.H561]+ h*[.F562]" office:value-type="float" office:value="135.798139101289" calcext:value-type="float">
            <text:p>135,7981391012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2]" office:value-type="float" office:value="5.59999999999993" calcext:value-type="float">
            <text:p>5,59999999999993</text:p>
          </table:table-cell>
          <table:table-cell table:style-name="ce1" table:formula="of:=[.H562]" office:value-type="float" office:value="135.798139101289" calcext:value-type="float">
            <text:p>135,798139101289</text:p>
          </table:table-cell>
          <table:table-cell table:style-name="ce1" table:formula="of:=-68 - ([.E563]^2/Ao)" office:value-type="float" office:value="-77.2205672916865" calcext:value-type="float">
            <text:p>-77,2205672916865</text:p>
          </table:table-cell>
          <table:table-cell table:style-name="ce1" table:formula="of:=[.G562]+h" office:value-type="float" office:value="5.60999999999993" calcext:value-type="float">
            <text:p>5,60999999999993</text:p>
          </table:table-cell>
          <table:table-cell table:style-name="ce1" table:formula="of:=[.H562]+ h*[.F563]" office:value-type="float" office:value="135.025933428372" calcext:value-type="float">
            <text:p>135,0259334283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3]" office:value-type="float" office:value="5.60999999999993" calcext:value-type="float">
            <text:p>5,60999999999993</text:p>
          </table:table-cell>
          <table:table-cell table:style-name="ce1" table:formula="of:=[.H563]" office:value-type="float" office:value="135.025933428372" calcext:value-type="float">
            <text:p>135,025933428372</text:p>
          </table:table-cell>
          <table:table-cell table:style-name="ce1" table:formula="of:=-68 - ([.E564]^2/Ao)" office:value-type="float" office:value="-77.1160013491016" calcext:value-type="float">
            <text:p>-77,1160013491016</text:p>
          </table:table-cell>
          <table:table-cell table:style-name="ce1" table:formula="of:=[.G563]+h" office:value-type="float" office:value="5.61999999999993" calcext:value-type="float">
            <text:p>5,61999999999993</text:p>
          </table:table-cell>
          <table:table-cell table:style-name="ce1" table:formula="of:=[.H563]+ h*[.F564]" office:value-type="float" office:value="134.254773414881" calcext:value-type="float">
            <text:p>134,2547734148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4]" office:value-type="float" office:value="5.61999999999993" calcext:value-type="float">
            <text:p>5,61999999999993</text:p>
          </table:table-cell>
          <table:table-cell table:style-name="ce1" table:formula="of:=[.H564]" office:value-type="float" office:value="134.254773414881" calcext:value-type="float">
            <text:p>134,254773414881</text:p>
          </table:table-cell>
          <table:table-cell table:style-name="ce1" table:formula="of:=-68 - ([.E565]^2/Ao)" office:value-type="float" office:value="-77.0121720923406" calcext:value-type="float">
            <text:p>-77,0121720923406</text:p>
          </table:table-cell>
          <table:table-cell table:style-name="ce1" table:formula="of:=[.G564]+h" office:value-type="float" office:value="5.62999999999992" calcext:value-type="float">
            <text:p>5,62999999999992</text:p>
          </table:table-cell>
          <table:table-cell table:style-name="ce1" table:formula="of:=[.H564]+ h*[.F565]" office:value-type="float" office:value="133.484651693958" calcext:value-type="float">
            <text:p>133,4846516939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5]" office:value-type="float" office:value="5.62999999999992" calcext:value-type="float">
            <text:p>5,62999999999992</text:p>
          </table:table-cell>
          <table:table-cell table:style-name="ce1" table:formula="of:=[.H565]" office:value-type="float" office:value="133.484651693958" calcext:value-type="float">
            <text:p>133,484651693958</text:p>
          </table:table-cell>
          <table:table-cell table:style-name="ce1" table:formula="of:=-68 - ([.E566]^2/Ao)" office:value-type="float" office:value="-76.9090761189286" calcext:value-type="float">
            <text:p>-76,9090761189286</text:p>
          </table:table-cell>
          <table:table-cell table:style-name="ce1" table:formula="of:=[.G565]+h" office:value-type="float" office:value="5.63999999999992" calcext:value-type="float">
            <text:p>5,63999999999992</text:p>
          </table:table-cell>
          <table:table-cell table:style-name="ce1" table:formula="of:=[.H565]+ h*[.F566]" office:value-type="float" office:value="132.715560932769" calcext:value-type="float">
            <text:p>132,7155609327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6]" office:value-type="float" office:value="5.63999999999992" calcext:value-type="float">
            <text:p>5,63999999999992</text:p>
          </table:table-cell>
          <table:table-cell table:style-name="ce1" table:formula="of:=[.H566]" office:value-type="float" office:value="132.715560932769" calcext:value-type="float">
            <text:p>132,715560932769</text:p>
          </table:table-cell>
          <table:table-cell table:style-name="ce1" table:formula="of:=-68 - ([.E567]^2/Ao)" office:value-type="float" office:value="-76.8067100568497" calcext:value-type="float">
            <text:p>-76,8067100568497</text:p>
          </table:table-cell>
          <table:table-cell table:style-name="ce1" table:formula="of:=[.G566]+h" office:value-type="float" office:value="5.64999999999992" calcext:value-type="float">
            <text:p>5,64999999999992</text:p>
          </table:table-cell>
          <table:table-cell table:style-name="ce1" table:formula="of:=[.H566]+ h*[.F567]" office:value-type="float" office:value="131.9474938322" calcext:value-type="float">
            <text:p>131,94749383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7]" office:value-type="float" office:value="5.64999999999992" calcext:value-type="float">
            <text:p>5,64999999999992</text:p>
          </table:table-cell>
          <table:table-cell table:style-name="ce1" table:formula="of:=[.H567]" office:value-type="float" office:value="131.9474938322" calcext:value-type="float">
            <text:p>131,9474938322</text:p>
          </table:table-cell>
          <table:table-cell table:style-name="ce1" table:formula="of:=-68 - ([.E568]^2/Ao)" office:value-type="float" office:value="-76.7050705642992" calcext:value-type="float">
            <text:p>-76,7050705642992</text:p>
          </table:table-cell>
          <table:table-cell table:style-name="ce1" table:formula="of:=[.G567]+h" office:value-type="float" office:value="5.65999999999992" calcext:value-type="float">
            <text:p>5,65999999999992</text:p>
          </table:table-cell>
          <table:table-cell table:style-name="ce1" table:formula="of:=[.H567]+ h*[.F568]" office:value-type="float" office:value="131.180443126557" calcext:value-type="float">
            <text:p>131,1804431265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8]" office:value-type="float" office:value="5.65999999999992" calcext:value-type="float">
            <text:p>5,65999999999992</text:p>
          </table:table-cell>
          <table:table-cell table:style-name="ce1" table:formula="of:=[.H568]" office:value-type="float" office:value="131.180443126557" calcext:value-type="float">
            <text:p>131,180443126557</text:p>
          </table:table-cell>
          <table:table-cell table:style-name="ce1" table:formula="of:=-68 - ([.E569]^2/Ao)" office:value-type="float" office:value="-76.6041543294399" calcext:value-type="float">
            <text:p>-76,6041543294399</text:p>
          </table:table-cell>
          <table:table-cell table:style-name="ce1" table:formula="of:=[.G568]+h" office:value-type="float" office:value="5.66999999999992" calcext:value-type="float">
            <text:p>5,66999999999992</text:p>
          </table:table-cell>
          <table:table-cell table:style-name="ce1" table:formula="of:=[.H568]+ h*[.F569]" office:value-type="float" office:value="130.414401583263" calcext:value-type="float">
            <text:p>130,4144015832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69]" office:value-type="float" office:value="5.66999999999992" calcext:value-type="float">
            <text:p>5,66999999999992</text:p>
          </table:table-cell>
          <table:table-cell table:style-name="ce1" table:formula="of:=[.H569]" office:value-type="float" office:value="130.414401583263" calcext:value-type="float">
            <text:p>130,414401583263</text:p>
          </table:table-cell>
          <table:table-cell table:style-name="ce1" table:formula="of:=-68 - ([.E570]^2/Ao)" office:value-type="float" office:value="-76.5039580701603" calcext:value-type="float">
            <text:p>-76,5039580701603</text:p>
          </table:table-cell>
          <table:table-cell table:style-name="ce1" table:formula="of:=[.G569]+h" office:value-type="float" office:value="5.67999999999992" calcext:value-type="float">
            <text:p>5,67999999999992</text:p>
          </table:table-cell>
          <table:table-cell table:style-name="ce1" table:formula="of:=[.H569]+ h*[.F570]" office:value-type="float" office:value="129.649362002561" calcext:value-type="float">
            <text:p>129,6493620025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0]" office:value-type="float" office:value="5.67999999999992" calcext:value-type="float">
            <text:p>5,67999999999992</text:p>
          </table:table-cell>
          <table:table-cell table:style-name="ce1" table:formula="of:=[.H570]" office:value-type="float" office:value="129.649362002561" calcext:value-type="float">
            <text:p>129,649362002561</text:p>
          </table:table-cell>
          <table:table-cell table:style-name="ce1" table:formula="of:=-68 - ([.E571]^2/Ao)" office:value-type="float" office:value="-76.4044785338356" calcext:value-type="float">
            <text:p>-76,4044785338356</text:p>
          </table:table-cell>
          <table:table-cell table:style-name="ce1" table:formula="of:=[.G570]+h" office:value-type="float" office:value="5.68999999999992" calcext:value-type="float">
            <text:p>5,68999999999992</text:p>
          </table:table-cell>
          <table:table-cell table:style-name="ce1" table:formula="of:=[.H570]+ h*[.F571]" office:value-type="float" office:value="128.885317217223" calcext:value-type="float">
            <text:p>128,8853172172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1]" office:value-type="float" office:value="5.68999999999992" calcext:value-type="float">
            <text:p>5,68999999999992</text:p>
          </table:table-cell>
          <table:table-cell table:style-name="ce1" table:formula="of:=[.H571]" office:value-type="float" office:value="128.885317217223" calcext:value-type="float">
            <text:p>128,885317217223</text:p>
          </table:table-cell>
          <table:table-cell table:style-name="ce1" table:formula="of:=-68 - ([.E572]^2/Ao)" office:value-type="float" office:value="-76.3057124970921" calcext:value-type="float">
            <text:p>-76,3057124970921</text:p>
          </table:table-cell>
          <table:table-cell table:style-name="ce1" table:formula="of:=[.G571]+h" office:value-type="float" office:value="5.69999999999992" calcext:value-type="float">
            <text:p>5,69999999999992</text:p>
          </table:table-cell>
          <table:table-cell table:style-name="ce1" table:formula="of:=[.H571]+ h*[.F572]" office:value-type="float" office:value="128.122260092252" calcext:value-type="float">
            <text:p>128,1222600922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2]" office:value-type="float" office:value="5.69999999999992" calcext:value-type="float">
            <text:p>5,69999999999992</text:p>
          </table:table-cell>
          <table:table-cell table:style-name="ce1" table:formula="of:=[.H572]" office:value-type="float" office:value="128.122260092252" calcext:value-type="float">
            <text:p>128,122260092252</text:p>
          </table:table-cell>
          <table:table-cell table:style-name="ce1" table:formula="of:=-68 - ([.E573]^2/Ao)" office:value-type="float" office:value="-76.2076567655733" calcext:value-type="float">
            <text:p>-76,2076567655733</text:p>
          </table:table-cell>
          <table:table-cell table:style-name="ce1" table:formula="of:=[.G572]+h" office:value-type="float" office:value="5.70999999999992" calcext:value-type="float">
            <text:p>5,70999999999992</text:p>
          </table:table-cell>
          <table:table-cell table:style-name="ce1" table:formula="of:=[.H572]+ h*[.F573]" office:value-type="float" office:value="127.360183524596" calcext:value-type="float">
            <text:p>127,3601835245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3]" office:value-type="float" office:value="5.70999999999992" calcext:value-type="float">
            <text:p>5,70999999999992</text:p>
          </table:table-cell>
          <table:table-cell table:style-name="ce1" table:formula="of:=[.H573]" office:value-type="float" office:value="127.360183524596" calcext:value-type="float">
            <text:p>127,360183524596</text:p>
          </table:table-cell>
          <table:table-cell table:style-name="ce1" table:formula="of:=-68 - ([.E574]^2/Ao)" office:value-type="float" office:value="-76.1103081737094" calcext:value-type="float">
            <text:p>-76,1103081737094</text:p>
          </table:table-cell>
          <table:table-cell table:style-name="ce1" table:formula="of:=[.G573]+h" office:value-type="float" office:value="5.71999999999992" calcext:value-type="float">
            <text:p>5,71999999999992</text:p>
          </table:table-cell>
          <table:table-cell table:style-name="ce1" table:formula="of:=[.H573]+ h*[.F574]" office:value-type="float" office:value="126.599080442859" calcext:value-type="float">
            <text:p>126,5990804428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4]" office:value-type="float" office:value="5.71999999999992" calcext:value-type="float">
            <text:p>5,71999999999992</text:p>
          </table:table-cell>
          <table:table-cell table:style-name="ce1" table:formula="of:=[.H574]" office:value-type="float" office:value="126.599080442859" calcext:value-type="float">
            <text:p>126,599080442859</text:p>
          </table:table-cell>
          <table:table-cell table:style-name="ce1" table:formula="of:=-68 - ([.E575]^2/Ao)" office:value-type="float" office:value="-76.0136635844887" calcext:value-type="float">
            <text:p>-76,0136635844887</text:p>
          </table:table-cell>
          <table:table-cell table:style-name="ce1" table:formula="of:=[.G574]+h" office:value-type="float" office:value="5.72999999999992" calcext:value-type="float">
            <text:p>5,72999999999992</text:p>
          </table:table-cell>
          <table:table-cell table:style-name="ce1" table:formula="of:=[.H574]+ h*[.F575]" office:value-type="float" office:value="125.838943807014" calcext:value-type="float">
            <text:p>125,8389438070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5]" office:value-type="float" office:value="5.72999999999992" calcext:value-type="float">
            <text:p>5,72999999999992</text:p>
          </table:table-cell>
          <table:table-cell table:style-name="ce1" table:formula="of:=[.H575]" office:value-type="float" office:value="125.838943807014" calcext:value-type="float">
            <text:p>125,838943807014</text:p>
          </table:table-cell>
          <table:table-cell table:style-name="ce1" table:formula="of:=-68 - ([.E576]^2/Ao)" office:value-type="float" office:value="-75.9177198892324" calcext:value-type="float">
            <text:p>-75,9177198892324</text:p>
          </table:table-cell>
          <table:table-cell table:style-name="ce1" table:formula="of:=[.G575]+h" office:value-type="float" office:value="5.73999999999992" calcext:value-type="float">
            <text:p>5,73999999999992</text:p>
          </table:table-cell>
          <table:table-cell table:style-name="ce1" table:formula="of:=[.H575]+ h*[.F576]" office:value-type="float" office:value="125.079766608122" calcext:value-type="float">
            <text:p>125,0797666081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6]" office:value-type="float" office:value="5.73999999999992" calcext:value-type="float">
            <text:p>5,73999999999992</text:p>
          </table:table-cell>
          <table:table-cell table:style-name="ce1" table:formula="of:=[.H576]" office:value-type="float" office:value="125.079766608122" calcext:value-type="float">
            <text:p>125,079766608122</text:p>
          </table:table-cell>
          <table:table-cell table:style-name="ce1" table:formula="of:=-68 - ([.E577]^2/Ao)" office:value-type="float" office:value="-75.8224740073711" calcext:value-type="float">
            <text:p>-75,8224740073711</text:p>
          </table:table-cell>
          <table:table-cell table:style-name="ce1" table:formula="of:=[.G576]+h" office:value-type="float" office:value="5.74999999999992" calcext:value-type="float">
            <text:p>5,74999999999992</text:p>
          </table:table-cell>
          <table:table-cell table:style-name="ce1" table:formula="of:=[.H576]+ h*[.F577]" office:value-type="float" office:value="124.321541868048" calcext:value-type="float">
            <text:p>124,3215418680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7]" office:value-type="float" office:value="5.74999999999992" calcext:value-type="float">
            <text:p>5,74999999999992</text:p>
          </table:table-cell>
          <table:table-cell table:style-name="ce1" table:formula="of:=[.H577]" office:value-type="float" office:value="124.321541868048" calcext:value-type="float">
            <text:p>124,321541868048</text:p>
          </table:table-cell>
          <table:table-cell table:style-name="ce1" table:formula="of:=-68 - ([.E578]^2/Ao)" office:value-type="float" office:value="-75.7279228862244" calcext:value-type="float">
            <text:p>-75,7279228862244</text:p>
          </table:table-cell>
          <table:table-cell table:style-name="ce1" table:formula="of:=[.G577]+h" office:value-type="float" office:value="5.75999999999992" calcext:value-type="float">
            <text:p>5,75999999999992</text:p>
          </table:table-cell>
          <table:table-cell table:style-name="ce1" table:formula="of:=[.H577]+ h*[.F578]" office:value-type="float" office:value="123.564262639186" calcext:value-type="float">
            <text:p>123,5642626391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8]" office:value-type="float" office:value="5.75999999999992" calcext:value-type="float">
            <text:p>5,75999999999992</text:p>
          </table:table-cell>
          <table:table-cell table:style-name="ce1" table:formula="of:=[.H578]" office:value-type="float" office:value="123.564262639186" calcext:value-type="float">
            <text:p>123,564262639186</text:p>
          </table:table-cell>
          <table:table-cell table:style-name="ce1" table:formula="of:=-68 - ([.E579]^2/Ao)" office:value-type="float" office:value="-75.6340635007828" calcext:value-type="float">
            <text:p>-75,6340635007828</text:p>
          </table:table-cell>
          <table:table-cell table:style-name="ce1" table:formula="of:=[.G578]+h" office:value-type="float" office:value="5.76999999999992" calcext:value-type="float">
            <text:p>5,76999999999992</text:p>
          </table:table-cell>
          <table:table-cell table:style-name="ce1" table:formula="of:=[.H578]+ h*[.F579]" office:value-type="float" office:value="122.807922004178" calcext:value-type="float">
            <text:p>122,8079220041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79]" office:value-type="float" office:value="5.76999999999992" calcext:value-type="float">
            <text:p>5,76999999999992</text:p>
          </table:table-cell>
          <table:table-cell table:style-name="ce1" table:formula="of:=[.H579]" office:value-type="float" office:value="122.807922004178" calcext:value-type="float">
            <text:p>122,807922004178</text:p>
          </table:table-cell>
          <table:table-cell table:style-name="ce1" table:formula="of:=-68 - ([.E580]^2/Ao)" office:value-type="float" office:value="-75.5408928534921" calcext:value-type="float">
            <text:p>-75,5408928534921</text:p>
          </table:table-cell>
          <table:table-cell table:style-name="ce1" table:formula="of:=[.G579]+h" office:value-type="float" office:value="5.77999999999992" calcext:value-type="float">
            <text:p>5,77999999999992</text:p>
          </table:table-cell>
          <table:table-cell table:style-name="ce1" table:formula="of:=[.H579]+ h*[.F580]" office:value-type="float" office:value="122.052513075643" calcext:value-type="float">
            <text:p>122,0525130756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0]" office:value-type="float" office:value="5.77999999999992" calcext:value-type="float">
            <text:p>5,77999999999992</text:p>
          </table:table-cell>
          <table:table-cell table:style-name="ce1" table:formula="of:=[.H580]" office:value-type="float" office:value="122.052513075643" calcext:value-type="float">
            <text:p>122,052513075643</text:p>
          </table:table-cell>
          <table:table-cell table:style-name="ce1" table:formula="of:=-68 - ([.E581]^2/Ao)" office:value-type="float" office:value="-75.44840797404" calcext:value-type="float">
            <text:p>-75,44840797404</text:p>
          </table:table-cell>
          <table:table-cell table:style-name="ce1" table:formula="of:=[.G580]+h" office:value-type="float" office:value="5.78999999999992" calcext:value-type="float">
            <text:p>5,78999999999992</text:p>
          </table:table-cell>
          <table:table-cell table:style-name="ce1" table:formula="of:=[.H580]+ h*[.F581]" office:value-type="float" office:value="121.298028995903" calcext:value-type="float">
            <text:p>121,2980289959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1]" office:value-type="float" office:value="5.78999999999992" calcext:value-type="float">
            <text:p>5,78999999999992</text:p>
          </table:table-cell>
          <table:table-cell table:style-name="ce1" table:formula="of:=[.H581]" office:value-type="float" office:value="121.298028995903" calcext:value-type="float">
            <text:p>121,298028995903</text:p>
          </table:table-cell>
          <table:table-cell table:style-name="ce1" table:formula="of:=-68 - ([.E582]^2/Ao)" office:value-type="float" office:value="-75.3566059191454" calcext:value-type="float">
            <text:p>-75,3566059191454</text:p>
          </table:table-cell>
          <table:table-cell table:style-name="ce1" table:formula="of:=[.G581]+h" office:value-type="float" office:value="5.79999999999992" calcext:value-type="float">
            <text:p>5,79999999999992</text:p>
          </table:table-cell>
          <table:table-cell table:style-name="ce1" table:formula="of:=[.H581]+ h*[.F582]" office:value-type="float" office:value="120.544462936711" calcext:value-type="float">
            <text:p>120,5444629367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2]" office:value-type="float" office:value="5.79999999999992" calcext:value-type="float">
            <text:p>5,79999999999992</text:p>
          </table:table-cell>
          <table:table-cell table:style-name="ce1" table:formula="of:=[.H582]" office:value-type="float" office:value="120.544462936711" calcext:value-type="float">
            <text:p>120,544462936711</text:p>
          </table:table-cell>
          <table:table-cell table:style-name="ce1" table:formula="of:=-68 - ([.E583]^2/Ao)" office:value-type="float" office:value="-75.2654837723501" calcext:value-type="float">
            <text:p>-75,2654837723501</text:p>
          </table:table-cell>
          <table:table-cell table:style-name="ce1" table:formula="of:=[.G582]+h" office:value-type="float" office:value="5.80999999999992" calcext:value-type="float">
            <text:p>5,80999999999992</text:p>
          </table:table-cell>
          <table:table-cell table:style-name="ce1" table:formula="of:=[.H582]+ h*[.F583]" office:value-type="float" office:value="119.791808098988" calcext:value-type="float">
            <text:p>119,7918080989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3]" office:value-type="float" office:value="5.80999999999992" calcext:value-type="float">
            <text:p>5,80999999999992</text:p>
          </table:table-cell>
          <table:table-cell table:style-name="ce1" table:formula="of:=[.H583]" office:value-type="float" office:value="119.791808098988" calcext:value-type="float">
            <text:p>119,791808098988</text:p>
          </table:table-cell>
          <table:table-cell table:style-name="ce1" table:formula="of:=-68 - ([.E584]^2/Ao)" office:value-type="float" office:value="-75.1750386438123" calcext:value-type="float">
            <text:p>-75,1750386438123</text:p>
          </table:table-cell>
          <table:table-cell table:style-name="ce1" table:formula="of:=[.G583]+h" office:value-type="float" office:value="5.81999999999992" calcext:value-type="float">
            <text:p>5,81999999999992</text:p>
          </table:table-cell>
          <table:table-cell table:style-name="ce1" table:formula="of:=[.H583]+ h*[.F584]" office:value-type="float" office:value="119.04005771255" calcext:value-type="float">
            <text:p>119,040057712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4]" office:value-type="float" office:value="5.81999999999992" calcext:value-type="float">
            <text:p>5,81999999999992</text:p>
          </table:table-cell>
          <table:table-cell table:style-name="ce1" table:formula="of:=[.H584]" office:value-type="float" office:value="119.04005771255" calcext:value-type="float">
            <text:p>119,04005771255</text:p>
          </table:table-cell>
          <table:table-cell table:style-name="ce1" table:formula="of:=-68 - ([.E585]^2/Ao)" office:value-type="float" office:value="-75.0852676701036" calcext:value-type="float">
            <text:p>-75,0852676701036</text:p>
          </table:table-cell>
          <table:table-cell table:style-name="ce1" table:formula="of:=[.G584]+h" office:value-type="float" office:value="5.82999999999992" calcext:value-type="float">
            <text:p>5,82999999999992</text:p>
          </table:table-cell>
          <table:table-cell table:style-name="ce1" table:formula="of:=[.H584]+ h*[.F585]" office:value-type="float" office:value="118.289205035849" calcext:value-type="float">
            <text:p>118,2892050358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5]" office:value-type="float" office:value="5.82999999999992" calcext:value-type="float">
            <text:p>5,82999999999992</text:p>
          </table:table-cell>
          <table:table-cell table:style-name="ce1" table:formula="of:=[.H585]" office:value-type="float" office:value="118.289205035849" calcext:value-type="float">
            <text:p>118,289205035849</text:p>
          </table:table-cell>
          <table:table-cell table:style-name="ce1" table:formula="of:=-68 - ([.E586]^2/Ao)" office:value-type="float" office:value="-74.9961680140065" calcext:value-type="float">
            <text:p>-74,9961680140065</text:p>
          </table:table-cell>
          <table:table-cell table:style-name="ce1" table:formula="of:=[.G585]+h" office:value-type="float" office:value="5.83999999999992" calcext:value-type="float">
            <text:p>5,83999999999992</text:p>
          </table:table-cell>
          <table:table-cell table:style-name="ce1" table:formula="of:=[.H585]+ h*[.F586]" office:value-type="float" office:value="117.539243355709" calcext:value-type="float">
            <text:p>117,5392433557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6]" office:value-type="float" office:value="5.83999999999992" calcext:value-type="float">
            <text:p>5,83999999999992</text:p>
          </table:table-cell>
          <table:table-cell table:style-name="ce1" table:formula="of:=[.H586]" office:value-type="float" office:value="117.539243355709" calcext:value-type="float">
            <text:p>117,539243355709</text:p>
          </table:table-cell>
          <table:table-cell table:style-name="ce1" table:formula="of:=-68 - ([.E587]^2/Ao)" office:value-type="float" office:value="-74.9077368643162" calcext:value-type="float">
            <text:p>-74,9077368643162</text:p>
          </table:table-cell>
          <table:table-cell table:style-name="ce1" table:formula="of:=[.G586]+h" office:value-type="float" office:value="5.84999999999992" calcext:value-type="float">
            <text:p>5,84999999999992</text:p>
          </table:table-cell>
          <table:table-cell table:style-name="ce1" table:formula="of:=[.H586]+ h*[.F587]" office:value-type="float" office:value="116.790165987065" calcext:value-type="float">
            <text:p>116,7901659870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7]" office:value-type="float" office:value="5.84999999999992" calcext:value-type="float">
            <text:p>5,84999999999992</text:p>
          </table:table-cell>
          <table:table-cell table:style-name="ce1" table:formula="of:=[.H587]" office:value-type="float" office:value="116.790165987065" calcext:value-type="float">
            <text:p>116,790165987065</text:p>
          </table:table-cell>
          <table:table-cell table:style-name="ce1" table:formula="of:=-68 - ([.E588]^2/Ao)" office:value-type="float" office:value="-74.8199714356431" calcext:value-type="float">
            <text:p>-74,8199714356431</text:p>
          </table:table-cell>
          <table:table-cell table:style-name="ce1" table:formula="of:=[.G587]+h" office:value-type="float" office:value="5.85999999999992" calcext:value-type="float">
            <text:p>5,85999999999992</text:p>
          </table:table-cell>
          <table:table-cell table:style-name="ce1" table:formula="of:=[.H587]+ h*[.F588]" office:value-type="float" office:value="116.041966272709" calcext:value-type="float">
            <text:p>116,0419662727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8]" office:value-type="float" office:value="5.85999999999992" calcext:value-type="float">
            <text:p>5,85999999999992</text:p>
          </table:table-cell>
          <table:table-cell table:style-name="ce1" table:formula="of:=[.H588]" office:value-type="float" office:value="116.041966272709" calcext:value-type="float">
            <text:p>116,041966272709</text:p>
          </table:table-cell>
          <table:table-cell table:style-name="ce1" table:formula="of:=-68 - ([.E589]^2/Ao)" office:value-type="float" office:value="-74.7328689682183" calcext:value-type="float">
            <text:p>-74,7328689682183</text:p>
          </table:table-cell>
          <table:table-cell table:style-name="ce1" table:formula="of:=[.G588]+h" office:value-type="float" office:value="5.86999999999992" calcext:value-type="float">
            <text:p>5,86999999999992</text:p>
          </table:table-cell>
          <table:table-cell table:style-name="ce1" table:formula="of:=[.H588]+ h*[.F589]" office:value-type="float" office:value="115.294637583027" calcext:value-type="float">
            <text:p>115,2946375830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89]" office:value-type="float" office:value="5.86999999999992" calcext:value-type="float">
            <text:p>5,86999999999992</text:p>
          </table:table-cell>
          <table:table-cell table:style-name="ce1" table:formula="of:=[.H589]" office:value-type="float" office:value="115.294637583027" calcext:value-type="float">
            <text:p>115,294637583027</text:p>
          </table:table-cell>
          <table:table-cell table:style-name="ce1" table:formula="of:=-68 - ([.E590]^2/Ao)" office:value-type="float" office:value="-74.6464267277007" calcext:value-type="float">
            <text:p>-74,6464267277007</text:p>
          </table:table-cell>
          <table:table-cell table:style-name="ce1" table:formula="of:=[.G589]+h" office:value-type="float" office:value="5.87999999999992" calcext:value-type="float">
            <text:p>5,87999999999992</text:p>
          </table:table-cell>
          <table:table-cell table:style-name="ce1" table:formula="of:=[.H589]+ h*[.F590]" office:value-type="float" office:value="114.54817331575" calcext:value-type="float">
            <text:p>114,548173315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0]" office:value-type="float" office:value="5.87999999999992" calcext:value-type="float">
            <text:p>5,87999999999992</text:p>
          </table:table-cell>
          <table:table-cell table:style-name="ce1" table:formula="of:=[.H590]" office:value-type="float" office:value="114.54817331575" calcext:value-type="float">
            <text:p>114,54817331575</text:p>
          </table:table-cell>
          <table:table-cell table:style-name="ce1" table:formula="of:=-68 - ([.E591]^2/Ao)" office:value-type="float" office:value="-74.5606420049875" calcext:value-type="float">
            <text:p>-74,5606420049875</text:p>
          </table:table-cell>
          <table:table-cell table:style-name="ce1" table:formula="of:=[.G590]+h" office:value-type="float" office:value="5.88999999999992" calcext:value-type="float">
            <text:p>5,88999999999992</text:p>
          </table:table-cell>
          <table:table-cell table:style-name="ce1" table:formula="of:=[.H590]+ h*[.F591]" office:value-type="float" office:value="113.8025668957" calcext:value-type="float">
            <text:p>113,80256689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1]" office:value-type="float" office:value="5.88999999999992" calcext:value-type="float">
            <text:p>5,88999999999992</text:p>
          </table:table-cell>
          <table:table-cell table:style-name="ce1" table:formula="of:=[.H591]" office:value-type="float" office:value="113.8025668957" calcext:value-type="float">
            <text:p>113,8025668957</text:p>
          </table:table-cell>
          <table:table-cell table:style-name="ce1" table:formula="of:=-68 - ([.E592]^2/Ao)" office:value-type="float" office:value="-74.4755121160251" calcext:value-type="float">
            <text:p>-74,4755121160251</text:p>
          </table:table-cell>
          <table:table-cell table:style-name="ce1" table:formula="of:=[.G591]+h" office:value-type="float" office:value="5.89999999999992" calcext:value-type="float">
            <text:p>5,89999999999992</text:p>
          </table:table-cell>
          <table:table-cell table:style-name="ce1" table:formula="of:=[.H591]+ h*[.F592]" office:value-type="float" office:value="113.05781177454" calcext:value-type="float">
            <text:p>113,057811774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2]" office:value-type="float" office:value="5.89999999999992" calcext:value-type="float">
            <text:p>5,89999999999992</text:p>
          </table:table-cell>
          <table:table-cell table:style-name="ce1" table:formula="of:=[.H592]" office:value-type="float" office:value="113.05781177454" calcext:value-type="float">
            <text:p>113,05781177454</text:p>
          </table:table-cell>
          <table:table-cell table:style-name="ce1" table:formula="of:=-68 - ([.E593]^2/Ao)" office:value-type="float" office:value="-74.3910344016236" calcext:value-type="float">
            <text:p>-74,3910344016236</text:p>
          </table:table-cell>
          <table:table-cell table:style-name="ce1" table:formula="of:=[.G592]+h" office:value-type="float" office:value="5.90999999999992" calcext:value-type="float">
            <text:p>5,90999999999992</text:p>
          </table:table-cell>
          <table:table-cell table:style-name="ce1" table:formula="of:=[.H592]+ h*[.F593]" office:value-type="float" office:value="112.313901430523" calcext:value-type="float">
            <text:p>112,3139014305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3]" office:value-type="float" office:value="5.90999999999992" calcext:value-type="float">
            <text:p>5,90999999999992</text:p>
          </table:table-cell>
          <table:table-cell table:style-name="ce1" table:formula="of:=[.H593]" office:value-type="float" office:value="112.313901430523" calcext:value-type="float">
            <text:p>112,313901430523</text:p>
          </table:table-cell>
          <table:table-cell table:style-name="ce1" table:formula="of:=-68 - ([.E594]^2/Ao)" office:value-type="float" office:value="-74.3072062272727" calcext:value-type="float">
            <text:p>-74,3072062272727</text:p>
          </table:table-cell>
          <table:table-cell table:style-name="ce1" table:formula="of:=[.G593]+h" office:value-type="float" office:value="5.91999999999992" calcext:value-type="float">
            <text:p>5,91999999999992</text:p>
          </table:table-cell>
          <table:table-cell table:style-name="ce1" table:formula="of:=[.H593]+ h*[.F594]" office:value-type="float" office:value="111.570829368251" calcext:value-type="float">
            <text:p>111,5708293682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4]" office:value-type="float" office:value="5.91999999999992" calcext:value-type="float">
            <text:p>5,91999999999992</text:p>
          </table:table-cell>
          <table:table-cell table:style-name="ce1" table:formula="of:=[.H594]" office:value-type="float" office:value="111.570829368251" calcext:value-type="float">
            <text:p>111,570829368251</text:p>
          </table:table-cell>
          <table:table-cell table:style-name="ce1" table:formula="of:=-68 - ([.E595]^2/Ao)" office:value-type="float" office:value="-74.2240249829597" calcext:value-type="float">
            <text:p>-74,2240249829597</text:p>
          </table:table-cell>
          <table:table-cell table:style-name="ce1" table:formula="of:=[.G594]+h" office:value-type="float" office:value="5.92999999999992" calcext:value-type="float">
            <text:p>5,92999999999992</text:p>
          </table:table-cell>
          <table:table-cell table:style-name="ce1" table:formula="of:=[.H594]+ h*[.F595]" office:value-type="float" office:value="110.828589118421" calcext:value-type="float">
            <text:p>110,82858911842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5]" office:value-type="float" office:value="5.92999999999992" calcext:value-type="float">
            <text:p>5,92999999999992</text:p>
          </table:table-cell>
          <table:table-cell table:style-name="ce1" table:formula="of:=[.H595]" office:value-type="float" office:value="110.828589118421" calcext:value-type="float">
            <text:p>110,828589118421</text:p>
          </table:table-cell>
          <table:table-cell table:style-name="ce1" table:formula="of:=-68 - ([.E596]^2/Ao)" office:value-type="float" office:value="-74.1414880829899" calcext:value-type="float">
            <text:p>-74,1414880829899</text:p>
          </table:table-cell>
          <table:table-cell table:style-name="ce1" table:formula="of:=[.G595]+h" office:value-type="float" office:value="5.93999999999992" calcext:value-type="float">
            <text:p>5,93999999999992</text:p>
          </table:table-cell>
          <table:table-cell table:style-name="ce1" table:formula="of:=[.H595]+ h*[.F596]" office:value-type="float" office:value="110.087174237591" calcext:value-type="float">
            <text:p>110,0871742375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6]" office:value-type="float" office:value="5.93999999999992" calcext:value-type="float">
            <text:p>5,93999999999992</text:p>
          </table:table-cell>
          <table:table-cell table:style-name="ce1" table:formula="of:=[.H596]" office:value-type="float" office:value="110.087174237591" calcext:value-type="float">
            <text:p>110,087174237591</text:p>
          </table:table-cell>
          <table:table-cell table:style-name="ce1" table:formula="of:=-68 - ([.E597]^2/Ao)" office:value-type="float" office:value="-74.0595929658089" calcext:value-type="float">
            <text:p>-74,0595929658089</text:p>
          </table:table-cell>
          <table:table-cell table:style-name="ce1" table:formula="of:=[.G596]+h" office:value-type="float" office:value="5.94999999999992" calcext:value-type="float">
            <text:p>5,94999999999992</text:p>
          </table:table-cell>
          <table:table-cell table:style-name="ce1" table:formula="of:=[.H596]+ h*[.F597]" office:value-type="float" office:value="109.346578307933" calcext:value-type="float">
            <text:p>109,3465783079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7]" office:value-type="float" office:value="5.94999999999992" calcext:value-type="float">
            <text:p>5,94999999999992</text:p>
          </table:table-cell>
          <table:table-cell table:style-name="ce1" table:formula="of:=[.H597]" office:value-type="float" office:value="109.346578307933" calcext:value-type="float">
            <text:p>109,346578307933</text:p>
          </table:table-cell>
          <table:table-cell table:style-name="ce1" table:formula="of:=-68 - ([.E598]^2/Ao)" office:value-type="float" office:value="-73.9783370938265" calcext:value-type="float">
            <text:p>-73,9783370938265</text:p>
          </table:table-cell>
          <table:table-cell table:style-name="ce1" table:formula="of:=[.G597]+h" office:value-type="float" office:value="5.95999999999992" calcext:value-type="float">
            <text:p>5,95999999999992</text:p>
          </table:table-cell>
          <table:table-cell table:style-name="ce1" table:formula="of:=[.H597]+ h*[.F598]" office:value-type="float" office:value="108.606794936995" calcext:value-type="float">
            <text:p>108,6067949369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8]" office:value-type="float" office:value="5.95999999999992" calcext:value-type="float">
            <text:p>5,95999999999992</text:p>
          </table:table-cell>
          <table:table-cell table:style-name="ce1" table:formula="of:=[.H598]" office:value-type="float" office:value="108.606794936995" calcext:value-type="float">
            <text:p>108,606794936995</text:p>
          </table:table-cell>
          <table:table-cell table:style-name="ce1" table:formula="of:=-68 - ([.E599]^2/Ao)" office:value-type="float" office:value="-73.8977179532432" calcext:value-type="float">
            <text:p>-73,8977179532432</text:p>
          </table:table-cell>
          <table:table-cell table:style-name="ce1" table:formula="of:=[.G598]+h" office:value-type="float" office:value="5.96999999999992" calcext:value-type="float">
            <text:p>5,96999999999992</text:p>
          </table:table-cell>
          <table:table-cell table:style-name="ce1" table:formula="of:=[.H598]+ h*[.F599]" office:value-type="float" office:value="107.867817757462" calcext:value-type="float">
            <text:p>107,8678177574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599]" office:value-type="float" office:value="5.96999999999992" calcext:value-type="float">
            <text:p>5,96999999999992</text:p>
          </table:table-cell>
          <table:table-cell table:style-name="ce1" table:formula="of:=[.H599]" office:value-type="float" office:value="107.867817757462" calcext:value-type="float">
            <text:p>107,867817757462</text:p>
          </table:table-cell>
          <table:table-cell table:style-name="ce1" table:formula="of:=-68 - ([.E600]^2/Ao)" office:value-type="float" office:value="-73.8177330538786" calcext:value-type="float">
            <text:p>-73,8177330538786</text:p>
          </table:table-cell>
          <table:table-cell table:style-name="ce1" table:formula="of:=[.G599]+h" office:value-type="float" office:value="5.97999999999992" calcext:value-type="float">
            <text:p>5,97999999999992</text:p>
          </table:table-cell>
          <table:table-cell table:style-name="ce1" table:formula="of:=[.H599]+ h*[.F600]" office:value-type="float" office:value="107.129640426924" calcext:value-type="float">
            <text:p>107,1296404269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0]" office:value-type="float" office:value="5.97999999999992" calcext:value-type="float">
            <text:p>5,97999999999992</text:p>
          </table:table-cell>
          <table:table-cell table:style-name="ce1" table:formula="of:=[.H600]" office:value-type="float" office:value="107.129640426924" calcext:value-type="float">
            <text:p>107,129640426924</text:p>
          </table:table-cell>
          <table:table-cell table:style-name="ce1" table:formula="of:=-68 - ([.E601]^2/Ao)" office:value-type="float" office:value="-73.738379929001" calcext:value-type="float">
            <text:p>-73,738379929001</text:p>
          </table:table-cell>
          <table:table-cell table:style-name="ce1" table:formula="of:=[.G600]+h" office:value-type="float" office:value="5.98999999999992" calcext:value-type="float">
            <text:p>5,98999999999992</text:p>
          </table:table-cell>
          <table:table-cell table:style-name="ce1" table:formula="of:=[.H600]+ h*[.F601]" office:value-type="float" office:value="106.392256627634" calcext:value-type="float">
            <text:p>106,3922566276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1]" office:value-type="float" office:value="5.98999999999992" calcext:value-type="float">
            <text:p>5,98999999999992</text:p>
          </table:table-cell>
          <table:table-cell table:style-name="ce1" table:formula="of:=[.H601]" office:value-type="float" office:value="106.392256627634" calcext:value-type="float">
            <text:p>106,392256627634</text:p>
          </table:table-cell>
          <table:table-cell table:style-name="ce1" table:formula="of:=-68 - ([.E602]^2/Ao)" office:value-type="float" office:value="-73.6596561351601" calcext:value-type="float">
            <text:p>-73,6596561351601</text:p>
          </table:table-cell>
          <table:table-cell table:style-name="ce1" table:formula="of:=[.G601]+h" office:value-type="float" office:value="5.99999999999992" calcext:value-type="float">
            <text:p>5,99999999999992</text:p>
          </table:table-cell>
          <table:table-cell table:style-name="ce1" table:formula="of:=[.H601]+ h*[.F602]" office:value-type="float" office:value="105.655660066282" calcext:value-type="float">
            <text:p>105,6556600662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2]" office:value-type="float" office:value="5.99999999999992" calcext:value-type="float">
            <text:p>5,99999999999992</text:p>
          </table:table-cell>
          <table:table-cell table:style-name="ce1" table:formula="of:=[.H602]" office:value-type="float" office:value="105.655660066282" calcext:value-type="float">
            <text:p>105,655660066282</text:p>
          </table:table-cell>
          <table:table-cell table:style-name="ce1" table:formula="of:=-68 - ([.E603]^2/Ao)" office:value-type="float" office:value="-73.5815592520209" calcext:value-type="float">
            <text:p>-73,5815592520209</text:p>
          </table:table-cell>
          <table:table-cell table:style-name="ce1" table:formula="of:=[.G602]+h" office:value-type="float" office:value="6.00999999999992" calcext:value-type="float">
            <text:p>6,00999999999992</text:p>
          </table:table-cell>
          <table:table-cell table:style-name="ce1" table:formula="of:=[.H602]+ h*[.F603]" office:value-type="float" office:value="104.919844473762" calcext:value-type="float">
            <text:p>104,91984447376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3]" office:value-type="float" office:value="6.00999999999992" calcext:value-type="float">
            <text:p>6,00999999999992</text:p>
          </table:table-cell>
          <table:table-cell table:style-name="ce1" table:formula="of:=[.H603]" office:value-type="float" office:value="104.919844473762" calcext:value-type="float">
            <text:p>104,919844473762</text:p>
          </table:table-cell>
          <table:table-cell table:style-name="ce1" table:formula="of:=-68 - ([.E604]^2/Ao)" office:value-type="float" office:value="-73.5040868821992" calcext:value-type="float">
            <text:p>-73,5040868821992</text:p>
          </table:table-cell>
          <table:table-cell table:style-name="ce1" table:formula="of:=[.G603]+h" office:value-type="float" office:value="6.01999999999992" calcext:value-type="float">
            <text:p>6,01999999999992</text:p>
          </table:table-cell>
          <table:table-cell table:style-name="ce1" table:formula="of:=[.H603]+ h*[.F604]" office:value-type="float" office:value="104.18480360494" calcext:value-type="float">
            <text:p>104,184803604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4]" office:value-type="float" office:value="6.01999999999992" calcext:value-type="float">
            <text:p>6,01999999999992</text:p>
          </table:table-cell>
          <table:table-cell table:style-name="ce1" table:formula="of:=[.H604]" office:value-type="float" office:value="104.18480360494" calcext:value-type="float">
            <text:p>104,18480360494</text:p>
          </table:table-cell>
          <table:table-cell table:style-name="ce1" table:formula="of:=-68 - ([.E605]^2/Ao)" office:value-type="float" office:value="-73.4272366510999" calcext:value-type="float">
            <text:p>-73,4272366510999</text:p>
          </table:table-cell>
          <table:table-cell table:style-name="ce1" table:formula="of:=[.G604]+h" office:value-type="float" office:value="6.02999999999992" calcext:value-type="float">
            <text:p>6,02999999999992</text:p>
          </table:table-cell>
          <table:table-cell table:style-name="ce1" table:formula="of:=[.H604]+ h*[.F605]" office:value-type="float" office:value="103.450531238429" calcext:value-type="float">
            <text:p>103,4505312384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5]" office:value-type="float" office:value="6.02999999999992" calcext:value-type="float">
            <text:p>6,02999999999992</text:p>
          </table:table-cell>
          <table:table-cell table:style-name="ce1" table:formula="of:=[.H605]" office:value-type="float" office:value="103.450531238429" calcext:value-type="float">
            <text:p>103,450531238429</text:p>
          </table:table-cell>
          <table:table-cell table:style-name="ce1" table:formula="of:=-68 - ([.E606]^2/Ao)" office:value-type="float" office:value="-73.3510062067566" calcext:value-type="float">
            <text:p>-73,3510062067566</text:p>
          </table:table-cell>
          <table:table-cell table:style-name="ce1" table:formula="of:=[.G605]+h" office:value-type="float" office:value="6.03999999999992" calcext:value-type="float">
            <text:p>6,03999999999992</text:p>
          </table:table-cell>
          <table:table-cell table:style-name="ce1" table:formula="of:=[.H605]+ h*[.F606]" office:value-type="float" office:value="102.717021176361" calcext:value-type="float">
            <text:p>102,7170211763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6]" office:value-type="float" office:value="6.03999999999992" calcext:value-type="float">
            <text:p>6,03999999999992</text:p>
          </table:table-cell>
          <table:table-cell table:style-name="ce1" table:formula="of:=[.H606]" office:value-type="float" office:value="102.717021176361" calcext:value-type="float">
            <text:p>102,717021176361</text:p>
          </table:table-cell>
          <table:table-cell table:style-name="ce1" table:formula="of:=-68 - ([.E607]^2/Ao)" office:value-type="float" office:value="-73.2753932196725" calcext:value-type="float">
            <text:p>-73,2753932196725</text:p>
          </table:table-cell>
          <table:table-cell table:style-name="ce1" table:formula="of:=[.G606]+h" office:value-type="float" office:value="6.04999999999992" calcext:value-type="float">
            <text:p>6,04999999999992</text:p>
          </table:table-cell>
          <table:table-cell table:style-name="ce1" table:formula="of:=[.H606]+ h*[.F607]" office:value-type="float" office:value="101.984267244164" calcext:value-type="float">
            <text:p>101,9842672441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7]" office:value-type="float" office:value="6.04999999999992" calcext:value-type="float">
            <text:p>6,04999999999992</text:p>
          </table:table-cell>
          <table:table-cell table:style-name="ce1" table:formula="of:=[.H607]" office:value-type="float" office:value="101.984267244164" calcext:value-type="float">
            <text:p>101,984267244164</text:p>
          </table:table-cell>
          <table:table-cell table:style-name="ce1" table:formula="of:=-68 - ([.E608]^2/Ao)" office:value-type="float" office:value="-73.2003953826646" calcext:value-type="float">
            <text:p>-73,2003953826646</text:p>
          </table:table-cell>
          <table:table-cell table:style-name="ce1" table:formula="of:=[.G607]+h" office:value-type="float" office:value="6.05999999999992" calcext:value-type="float">
            <text:p>6,05999999999992</text:p>
          </table:table-cell>
          <table:table-cell table:style-name="ce1" table:formula="of:=[.H607]+ h*[.F608]" office:value-type="float" office:value="101.252263290338" calcext:value-type="float">
            <text:p>101,25226329033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8]" office:value-type="float" office:value="6.05999999999992" calcext:value-type="float">
            <text:p>6,05999999999992</text:p>
          </table:table-cell>
          <table:table-cell table:style-name="ce1" table:formula="of:=[.H608]" office:value-type="float" office:value="101.252263290338" calcext:value-type="float">
            <text:p>101,252263290338</text:p>
          </table:table-cell>
          <table:table-cell table:style-name="ce1" table:formula="of:=-68 - ([.E609]^2/Ao)" office:value-type="float" office:value="-73.126010410708" calcext:value-type="float">
            <text:p>-73,126010410708</text:p>
          </table:table-cell>
          <table:table-cell table:style-name="ce1" table:formula="of:=[.G608]+h" office:value-type="float" office:value="6.06999999999992" calcext:value-type="float">
            <text:p>6,06999999999992</text:p>
          </table:table-cell>
          <table:table-cell table:style-name="ce1" table:formula="of:=[.H608]+ h*[.F609]" office:value-type="float" office:value="100.521003186231" calcext:value-type="float">
            <text:p>100,5210031862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09]" office:value-type="float" office:value="6.06999999999992" calcext:value-type="float">
            <text:p>6,06999999999992</text:p>
          </table:table-cell>
          <table:table-cell table:style-name="ce1" table:formula="of:=[.H609]" office:value-type="float" office:value="100.521003186231" calcext:value-type="float">
            <text:p>100,521003186231</text:p>
          </table:table-cell>
          <table:table-cell table:style-name="ce1" table:formula="of:=-68 - ([.E610]^2/Ao)" office:value-type="float" office:value="-73.0522360407831" calcext:value-type="float">
            <text:p>-73,0522360407831</text:p>
          </table:table-cell>
          <table:table-cell table:style-name="ce1" table:formula="of:=[.G609]+h" office:value-type="float" office:value="6.07999999999992" calcext:value-type="float">
            <text:p>6,07999999999992</text:p>
          </table:table-cell>
          <table:table-cell table:style-name="ce1" table:formula="of:=[.H609]+ h*[.F610]" office:value-type="float" office:value="99.7904808258229" calcext:value-type="float">
            <text:p>99,79048082582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0]" office:value-type="float" office:value="6.07999999999992" calcext:value-type="float">
            <text:p>6,07999999999992</text:p>
          </table:table-cell>
          <table:table-cell table:style-name="ce1" table:formula="of:=[.H610]" office:value-type="float" office:value="99.7904808258229" calcext:value-type="float">
            <text:p>99,7904808258229</text:p>
          </table:table-cell>
          <table:table-cell table:style-name="ce1" table:formula="of:=-68 - ([.E611]^2/Ao)" office:value-type="float" office:value="-72.9790700317245" calcext:value-type="float">
            <text:p>-72,9790700317245</text:p>
          </table:table-cell>
          <table:table-cell table:style-name="ce1" table:formula="of:=[.G610]+h" office:value-type="float" office:value="6.08999999999992" calcext:value-type="float">
            <text:p>6,08999999999992</text:p>
          </table:table-cell>
          <table:table-cell table:style-name="ce1" table:formula="of:=[.H610]+ h*[.F611]" office:value-type="float" office:value="99.0606901255057" calcext:value-type="float">
            <text:p>99,06069012550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1]" office:value-type="float" office:value="6.08999999999992" calcext:value-type="float">
            <text:p>6,08999999999992</text:p>
          </table:table-cell>
          <table:table-cell table:style-name="ce1" table:formula="of:=[.H611]" office:value-type="float" office:value="99.0606901255057" calcext:value-type="float">
            <text:p>99,0606901255057</text:p>
          </table:table-cell>
          <table:table-cell table:style-name="ce1" table:formula="of:=-68 - ([.E612]^2/Ao)" office:value-type="float" office:value="-72.9065101640707" calcext:value-type="float">
            <text:p>-72,9065101640707</text:p>
          </table:table-cell>
          <table:table-cell table:style-name="ce1" table:formula="of:=[.G611]+h" office:value-type="float" office:value="6.09999999999991" calcext:value-type="float">
            <text:p>6,09999999999991</text:p>
          </table:table-cell>
          <table:table-cell table:style-name="ce1" table:formula="of:=[.H611]+ h*[.F612]" office:value-type="float" office:value="98.3316250238649" calcext:value-type="float">
            <text:p>98,33162502386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2]" office:value-type="float" office:value="6.09999999999991" calcext:value-type="float">
            <text:p>6,09999999999991</text:p>
          </table:table-cell>
          <table:table-cell table:style-name="ce1" table:formula="of:=[.H612]" office:value-type="float" office:value="98.3316250238649" calcext:value-type="float">
            <text:p>98,3316250238649</text:p>
          </table:table-cell>
          <table:table-cell table:style-name="ce1" table:formula="of:=-68 - ([.E613]^2/Ao)" office:value-type="float" office:value="-72.834554239917" calcext:value-type="float">
            <text:p>-72,834554239917</text:p>
          </table:table-cell>
          <table:table-cell table:style-name="ce1" table:formula="of:=[.G612]+h" office:value-type="float" office:value="6.10999999999991" calcext:value-type="float">
            <text:p>6,10999999999991</text:p>
          </table:table-cell>
          <table:table-cell table:style-name="ce1" table:formula="of:=[.H612]+ h*[.F613]" office:value-type="float" office:value="97.6032794814658" calcext:value-type="float">
            <text:p>97,603279481465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3]" office:value-type="float" office:value="6.10999999999991" calcext:value-type="float">
            <text:p>6,10999999999991</text:p>
          </table:table-cell>
          <table:table-cell table:style-name="ce1" table:formula="of:=[.H613]" office:value-type="float" office:value="97.6032794814658" calcext:value-type="float">
            <text:p>97,6032794814658</text:p>
          </table:table-cell>
          <table:table-cell table:style-name="ce1" table:formula="of:=-68 - ([.E614]^2/Ao)" office:value-type="float" office:value="-72.7632000827686" calcext:value-type="float">
            <text:p>-72,7632000827686</text:p>
          </table:table-cell>
          <table:table-cell table:style-name="ce1" table:formula="of:=[.G613]+h" office:value-type="float" office:value="6.11999999999991" calcext:value-type="float">
            <text:p>6,11999999999991</text:p>
          </table:table-cell>
          <table:table-cell table:style-name="ce1" table:formula="of:=[.H613]+ h*[.F614]" office:value-type="float" office:value="96.8756474806381" calcext:value-type="float">
            <text:p>96,87564748063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4]" office:value-type="float" office:value="6.11999999999991" calcext:value-type="float">
            <text:p>6,11999999999991</text:p>
          </table:table-cell>
          <table:table-cell table:style-name="ce1" table:formula="of:=[.H614]" office:value-type="float" office:value="96.8756474806381" calcext:value-type="float">
            <text:p>96,8756474806381</text:p>
          </table:table-cell>
          <table:table-cell table:style-name="ce1" table:formula="of:=-68 - ([.E615]^2/Ao)" office:value-type="float" office:value="-72.6924455373964" calcext:value-type="float">
            <text:p>-72,6924455373964</text:p>
          </table:table-cell>
          <table:table-cell table:style-name="ce1" table:formula="of:=[.G614]+h" office:value-type="float" office:value="6.12999999999991" calcext:value-type="float">
            <text:p>6,12999999999991</text:p>
          </table:table-cell>
          <table:table-cell table:style-name="ce1" table:formula="of:=[.H614]+ h*[.F615]" office:value-type="float" office:value="96.1487230252641" calcext:value-type="float">
            <text:p>96,14872302526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5]" office:value-type="float" office:value="6.12999999999991" calcext:value-type="float">
            <text:p>6,12999999999991</text:p>
          </table:table-cell>
          <table:table-cell table:style-name="ce1" table:formula="of:=[.H615]" office:value-type="float" office:value="96.1487230252641" calcext:value-type="float">
            <text:p>96,1487230252641</text:p>
          </table:table-cell>
          <table:table-cell table:style-name="ce1" table:formula="of:=-68 - ([.E616]^2/Ao)" office:value-type="float" office:value="-72.6222884696945" calcext:value-type="float">
            <text:p>-72,6222884696945</text:p>
          </table:table-cell>
          <table:table-cell table:style-name="ce1" table:formula="of:=[.G615]+h" office:value-type="float" office:value="6.13999999999991" calcext:value-type="float">
            <text:p>6,13999999999991</text:p>
          </table:table-cell>
          <table:table-cell table:style-name="ce1" table:formula="of:=[.H615]+ h*[.F616]" office:value-type="float" office:value="95.4225001405672" calcext:value-type="float">
            <text:p>95,42250014056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6]" office:value-type="float" office:value="6.13999999999991" calcext:value-type="float">
            <text:p>6,13999999999991</text:p>
          </table:table-cell>
          <table:table-cell table:style-name="ce1" table:formula="of:=[.H616]" office:value-type="float" office:value="95.4225001405672" calcext:value-type="float">
            <text:p>95,4225001405672</text:p>
          </table:table-cell>
          <table:table-cell table:style-name="ce1" table:formula="of:=-68 - ([.E617]^2/Ao)" office:value-type="float" office:value="-72.5527267665383" calcext:value-type="float">
            <text:p>-72,5527267665383</text:p>
          </table:table-cell>
          <table:table-cell table:style-name="ce1" table:formula="of:=[.G616]+h" office:value-type="float" office:value="6.14999999999991" calcext:value-type="float">
            <text:p>6,14999999999991</text:p>
          </table:table-cell>
          <table:table-cell table:style-name="ce1" table:formula="of:=[.H616]+ h*[.F617]" office:value-type="float" office:value="94.6969728729018" calcext:value-type="float">
            <text:p>94,69697287290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7]" office:value-type="float" office:value="6.14999999999991" calcext:value-type="float">
            <text:p>6,14999999999991</text:p>
          </table:table-cell>
          <table:table-cell table:style-name="ce1" table:formula="of:=[.H617]" office:value-type="float" office:value="94.6969728729018" calcext:value-type="float">
            <text:p>94,6969728729018</text:p>
          </table:table-cell>
          <table:table-cell table:style-name="ce1" table:formula="of:=-68 - ([.E618]^2/Ao)" office:value-type="float" office:value="-72.4837583356456" calcext:value-type="float">
            <text:p>-72,4837583356456</text:p>
          </table:table-cell>
          <table:table-cell table:style-name="ce1" table:formula="of:=[.G617]+h" office:value-type="float" office:value="6.15999999999991" calcext:value-type="float">
            <text:p>6,15999999999991</text:p>
          </table:table-cell>
          <table:table-cell table:style-name="ce1" table:formula="of:=[.H617]+ h*[.F618]" office:value-type="float" office:value="93.9721352895454" calcext:value-type="float">
            <text:p>93,97213528954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8]" office:value-type="float" office:value="6.15999999999991" calcext:value-type="float">
            <text:p>6,15999999999991</text:p>
          </table:table-cell>
          <table:table-cell table:style-name="ce1" table:formula="of:=[.H618]" office:value-type="float" office:value="93.9721352895454" calcext:value-type="float">
            <text:p>93,9721352895454</text:p>
          </table:table-cell>
          <table:table-cell table:style-name="ce1" table:formula="of:=-68 - ([.E619]^2/Ao)" office:value-type="float" office:value="-72.4153811054383" calcext:value-type="float">
            <text:p>-72,4153811054383</text:p>
          </table:table-cell>
          <table:table-cell table:style-name="ce1" table:formula="of:=[.G618]+h" office:value-type="float" office:value="6.16999999999991" calcext:value-type="float">
            <text:p>6,16999999999991</text:p>
          </table:table-cell>
          <table:table-cell table:style-name="ce1" table:formula="of:=[.H618]+ h*[.F619]" office:value-type="float" office:value="93.247981478491" calcext:value-type="float">
            <text:p>93,2479814784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19]" office:value-type="float" office:value="6.16999999999991" calcext:value-type="float">
            <text:p>6,16999999999991</text:p>
          </table:table-cell>
          <table:table-cell table:style-name="ce1" table:formula="of:=[.H619]" office:value-type="float" office:value="93.247981478491" calcext:value-type="float">
            <text:p>93,247981478491</text:p>
          </table:table-cell>
          <table:table-cell table:style-name="ce1" table:formula="of:=-68 - ([.E620]^2/Ao)" office:value-type="float" office:value="-72.3475930249065" calcext:value-type="float">
            <text:p>-72,3475930249065</text:p>
          </table:table-cell>
          <table:table-cell table:style-name="ce1" table:formula="of:=[.G619]+h" office:value-type="float" office:value="6.17999999999991" calcext:value-type="float">
            <text:p>6,17999999999991</text:p>
          </table:table-cell>
          <table:table-cell table:style-name="ce1" table:formula="of:=[.H619]+ h*[.F620]" office:value-type="float" office:value="92.5245055482419" calcext:value-type="float">
            <text:p>92,52450554824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0]" office:value-type="float" office:value="6.17999999999991" calcext:value-type="float">
            <text:p>6,17999999999991</text:p>
          </table:table-cell>
          <table:table-cell table:style-name="ce1" table:formula="of:=[.H620]" office:value-type="float" office:value="92.5245055482419" calcext:value-type="float">
            <text:p>92,5245055482419</text:p>
          </table:table-cell>
          <table:table-cell table:style-name="ce1" table:formula="of:=-68 - ([.E621]^2/Ao)" office:value-type="float" office:value="-72.2803920634733" calcext:value-type="float">
            <text:p>-72,2803920634733</text:p>
          </table:table-cell>
          <table:table-cell table:style-name="ce1" table:formula="of:=[.G620]+h" office:value-type="float" office:value="6.18999999999991" calcext:value-type="float">
            <text:p>6,18999999999991</text:p>
          </table:table-cell>
          <table:table-cell table:style-name="ce1" table:formula="of:=[.H620]+ h*[.F621]" office:value-type="float" office:value="91.8017016276072" calcext:value-type="float">
            <text:p>91,80170162760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1]" office:value-type="float" office:value="6.18999999999991" calcext:value-type="float">
            <text:p>6,18999999999991</text:p>
          </table:table-cell>
          <table:table-cell table:style-name="ce1" table:formula="of:=[.H621]" office:value-type="float" office:value="91.8017016276072" calcext:value-type="float">
            <text:p>91,8017016276072</text:p>
          </table:table-cell>
          <table:table-cell table:style-name="ce1" table:formula="of:=-68 - ([.E622]^2/Ao)" office:value-type="float" office:value="-72.2137762108621" calcext:value-type="float">
            <text:p>-72,2137762108621</text:p>
          </table:table-cell>
          <table:table-cell table:style-name="ce1" table:formula="of:=[.G621]+h" office:value-type="float" office:value="6.19999999999991" calcext:value-type="float">
            <text:p>6,19999999999991</text:p>
          </table:table-cell>
          <table:table-cell table:style-name="ce1" table:formula="of:=[.H621]+ h*[.F622]" office:value-type="float" office:value="91.0795638654986" calcext:value-type="float">
            <text:p>91,07956386549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2]" office:value-type="float" office:value="6.19999999999991" calcext:value-type="float">
            <text:p>6,19999999999991</text:p>
          </table:table-cell>
          <table:table-cell table:style-name="ce1" table:formula="of:=[.H622]" office:value-type="float" office:value="91.0795638654986" calcext:value-type="float">
            <text:p>91,0795638654986</text:p>
          </table:table-cell>
          <table:table-cell table:style-name="ce1" table:formula="of:=-68 - ([.E623]^2/Ao)" office:value-type="float" office:value="-72.1477434769647" calcext:value-type="float">
            <text:p>-72,1477434769647</text:p>
          </table:table-cell>
          <table:table-cell table:style-name="ce1" table:formula="of:=[.G622]+h" office:value-type="float" office:value="6.20999999999991" calcext:value-type="float">
            <text:p>6,20999999999991</text:p>
          </table:table-cell>
          <table:table-cell table:style-name="ce1" table:formula="of:=[.H622]+ h*[.F623]" office:value-type="float" office:value="90.3580864307289" calcext:value-type="float">
            <text:p>90,358086430728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3]" office:value-type="float" office:value="6.20999999999991" calcext:value-type="float">
            <text:p>6,20999999999991</text:p>
          </table:table-cell>
          <table:table-cell table:style-name="ce1" table:formula="of:=[.H623]" office:value-type="float" office:value="90.3580864307289" calcext:value-type="float">
            <text:p>90,3580864307289</text:p>
          </table:table-cell>
          <table:table-cell table:style-name="ce1" table:formula="of:=-68 - ([.E624]^2/Ao)" office:value-type="float" office:value="-72.0822918917115" calcext:value-type="float">
            <text:p>-72,0822918917115</text:p>
          </table:table-cell>
          <table:table-cell table:style-name="ce1" table:formula="of:=[.G623]+h" office:value-type="float" office:value="6.21999999999991" calcext:value-type="float">
            <text:p>6,21999999999991</text:p>
          </table:table-cell>
          <table:table-cell table:style-name="ce1" table:formula="of:=[.H623]+ h*[.F624]" office:value-type="float" office:value="89.6372635118118" calcext:value-type="float">
            <text:p>89,63726351181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4]" office:value-type="float" office:value="6.21999999999991" calcext:value-type="float">
            <text:p>6,21999999999991</text:p>
          </table:table-cell>
          <table:table-cell table:style-name="ce1" table:formula="of:=[.H624]" office:value-type="float" office:value="89.6372635118118" calcext:value-type="float">
            <text:p>89,6372635118118</text:p>
          </table:table-cell>
          <table:table-cell table:style-name="ce1" table:formula="of:=-68 - ([.E625]^2/Ao)" office:value-type="float" office:value="-72.017419504943" calcext:value-type="float">
            <text:p>-72,017419504943</text:p>
          </table:table-cell>
          <table:table-cell table:style-name="ce1" table:formula="of:=[.G624]+h" office:value-type="float" office:value="6.22999999999991" calcext:value-type="float">
            <text:p>6,22999999999991</text:p>
          </table:table-cell>
          <table:table-cell table:style-name="ce1" table:formula="of:=[.H624]+ h*[.F625]" office:value-type="float" office:value="88.9170893167624" calcext:value-type="float">
            <text:p>88,91708931676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5]" office:value-type="float" office:value="6.22999999999991" calcext:value-type="float">
            <text:p>6,22999999999991</text:p>
          </table:table-cell>
          <table:table-cell table:style-name="ce1" table:formula="of:=[.H625]" office:value-type="float" office:value="88.9170893167624" calcext:value-type="float">
            <text:p>88,9170893167624</text:p>
          </table:table-cell>
          <table:table-cell table:style-name="ce1" table:formula="of:=-68 - ([.E626]^2/Ao)" office:value-type="float" office:value="-71.9531243862826" calcext:value-type="float">
            <text:p>-71,9531243862826</text:p>
          </table:table-cell>
          <table:table-cell table:style-name="ce1" table:formula="of:=[.G625]+h" office:value-type="float" office:value="6.23999999999991" calcext:value-type="float">
            <text:p>6,23999999999991</text:p>
          </table:table-cell>
          <table:table-cell table:style-name="ce1" table:formula="of:=[.H625]+ h*[.F626]" office:value-type="float" office:value="88.1975580728995" calcext:value-type="float">
            <text:p>88,19755807289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6]" office:value-type="float" office:value="6.23999999999991" calcext:value-type="float">
            <text:p>6,23999999999991</text:p>
          </table:table-cell>
          <table:table-cell table:style-name="ce1" table:formula="of:=[.H626]" office:value-type="float" office:value="88.1975580728995" calcext:value-type="float">
            <text:p>88,1975580728995</text:p>
          </table:table-cell>
          <table:table-cell table:style-name="ce1" table:formula="of:=-68 - ([.E627]^2/Ao)" office:value-type="float" office:value="-71.8894046250112" calcext:value-type="float">
            <text:p>-71,8894046250112</text:p>
          </table:table-cell>
          <table:table-cell table:style-name="ce1" table:formula="of:=[.G626]+h" office:value-type="float" office:value="6.24999999999991" calcext:value-type="float">
            <text:p>6,24999999999991</text:p>
          </table:table-cell>
          <table:table-cell table:style-name="ce1" table:formula="of:=[.H626]+ h*[.F627]" office:value-type="float" office:value="87.4786640266494" calcext:value-type="float">
            <text:p>87,478664026649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7]" office:value-type="float" office:value="6.24999999999991" calcext:value-type="float">
            <text:p>6,24999999999991</text:p>
          </table:table-cell>
          <table:table-cell table:style-name="ce1" table:formula="of:=[.H627]" office:value-type="float" office:value="87.4786640266494" calcext:value-type="float">
            <text:p>87,4786640266494</text:p>
          </table:table-cell>
          <table:table-cell table:style-name="ce1" table:formula="of:=-68 - ([.E628]^2/Ao)" office:value-type="float" office:value="-71.8262583299437" calcext:value-type="float">
            <text:p>-71,8262583299437</text:p>
          </table:table-cell>
          <table:table-cell table:style-name="ce1" table:formula="of:=[.G627]+h" office:value-type="float" office:value="6.25999999999991" calcext:value-type="float">
            <text:p>6,25999999999991</text:p>
          </table:table-cell>
          <table:table-cell table:style-name="ce1" table:formula="of:=[.H627]+ h*[.F628]" office:value-type="float" office:value="86.76040144335" calcext:value-type="float">
            <text:p>86,760401443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8]" office:value-type="float" office:value="6.25999999999991" calcext:value-type="float">
            <text:p>6,25999999999991</text:p>
          </table:table-cell>
          <table:table-cell table:style-name="ce1" table:formula="of:=[.H628]" office:value-type="float" office:value="86.76040144335" calcext:value-type="float">
            <text:p>86,76040144335</text:p>
          </table:table-cell>
          <table:table-cell table:style-name="ce1" table:formula="of:=-68 - ([.E629]^2/Ao)" office:value-type="float" office:value="-71.7636836293056" calcext:value-type="float">
            <text:p>-71,7636836293056</text:p>
          </table:table-cell>
          <table:table-cell table:style-name="ce1" table:formula="of:=[.G628]+h" office:value-type="float" office:value="6.26999999999991" calcext:value-type="float">
            <text:p>6,26999999999991</text:p>
          </table:table-cell>
          <table:table-cell table:style-name="ce1" table:formula="of:=[.H628]+ h*[.F629]" office:value-type="float" office:value="86.0427646070569" calcext:value-type="float">
            <text:p>86,042764607056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29]" office:value-type="float" office:value="6.26999999999991" calcext:value-type="float">
            <text:p>6,26999999999991</text:p>
          </table:table-cell>
          <table:table-cell table:style-name="ce1" table:formula="of:=[.H629]" office:value-type="float" office:value="86.0427646070569" calcext:value-type="float">
            <text:p>86,0427646070569</text:p>
          </table:table-cell>
          <table:table-cell table:style-name="ce1" table:formula="of:=-68 - ([.E630]^2/Ao)" office:value-type="float" office:value="-71.7016786706127" calcext:value-type="float">
            <text:p>-71,7016786706127</text:p>
          </table:table-cell>
          <table:table-cell table:style-name="ce1" table:formula="of:=[.G629]+h" office:value-type="float" office:value="6.27999999999991" calcext:value-type="float">
            <text:p>6,27999999999991</text:p>
          </table:table-cell>
          <table:table-cell table:style-name="ce1" table:formula="of:=[.H629]+ h*[.F630]" office:value-type="float" office:value="85.3257478203508" calcext:value-type="float">
            <text:p>85,32574782035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0]" office:value-type="float" office:value="6.27999999999991" calcext:value-type="float">
            <text:p>6,27999999999991</text:p>
          </table:table-cell>
          <table:table-cell table:style-name="ce1" table:formula="of:=[.H630]" office:value-type="float" office:value="85.3257478203508" calcext:value-type="float">
            <text:p>85,3257478203508</text:p>
          </table:table-cell>
          <table:table-cell table:style-name="ce1" table:formula="of:=-68 - ([.E631]^2/Ao)" office:value-type="float" office:value="-71.6402416205511" calcext:value-type="float">
            <text:p>-71,6402416205511</text:p>
          </table:table-cell>
          <table:table-cell table:style-name="ce1" table:formula="of:=[.G630]+h" office:value-type="float" office:value="6.28999999999991" calcext:value-type="float">
            <text:p>6,28999999999991</text:p>
          </table:table-cell>
          <table:table-cell table:style-name="ce1" table:formula="of:=[.H630]+ h*[.F631]" office:value-type="float" office:value="84.6093454041453" calcext:value-type="float">
            <text:p>84,60934540414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1]" office:value-type="float" office:value="6.28999999999991" calcext:value-type="float">
            <text:p>6,28999999999991</text:p>
          </table:table-cell>
          <table:table-cell table:style-name="ce1" table:formula="of:=[.H631]" office:value-type="float" office:value="84.6093454041453" calcext:value-type="float">
            <text:p>84,6093454041453</text:p>
          </table:table-cell>
          <table:table-cell table:style-name="ce1" table:formula="of:=-68 - ([.E632]^2/Ao)" office:value-type="float" office:value="-71.579370664859" calcext:value-type="float">
            <text:p>-71,579370664859</text:p>
          </table:table-cell>
          <table:table-cell table:style-name="ce1" table:formula="of:=[.G631]+h" office:value-type="float" office:value="6.29999999999991" calcext:value-type="float">
            <text:p>6,29999999999991</text:p>
          </table:table-cell>
          <table:table-cell table:style-name="ce1" table:formula="of:=[.H631]+ h*[.F632]" office:value-type="float" office:value="83.8935516974967" calcext:value-type="float">
            <text:p>83,89355169749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2]" office:value-type="float" office:value="6.29999999999991" calcext:value-type="float">
            <text:p>6,29999999999991</text:p>
          </table:table-cell>
          <table:table-cell table:style-name="ce1" table:formula="of:=[.H632]" office:value-type="float" office:value="83.8935516974967" calcext:value-type="float">
            <text:p>83,8935516974967</text:p>
          </table:table-cell>
          <table:table-cell table:style-name="ce1" table:formula="of:=-68 - ([.E633]^2/Ao)" office:value-type="float" office:value="-71.5190640082103" calcext:value-type="float">
            <text:p>-71,5190640082103</text:p>
          </table:table-cell>
          <table:table-cell table:style-name="ce1" table:formula="of:=[.G632]+h" office:value-type="float" office:value="6.30999999999991" calcext:value-type="float">
            <text:p>6,30999999999991</text:p>
          </table:table-cell>
          <table:table-cell table:style-name="ce1" table:formula="of:=[.H632]+ h*[.F633]" office:value-type="float" office:value="83.1783610574146" calcext:value-type="float">
            <text:p>83,178361057414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3]" office:value-type="float" office:value="6.30999999999991" calcext:value-type="float">
            <text:p>6,30999999999991</text:p>
          </table:table-cell>
          <table:table-cell table:style-name="ce1" table:formula="of:=[.H633]" office:value-type="float" office:value="83.1783610574146" calcext:value-type="float">
            <text:p>83,1783610574146</text:p>
          </table:table-cell>
          <table:table-cell table:style-name="ce1" table:formula="of:=-68 - ([.E634]^2/Ao)" office:value-type="float" office:value="-71.4593198740988" calcext:value-type="float">
            <text:p>-71,4593198740988</text:p>
          </table:table-cell>
          <table:table-cell table:style-name="ce1" table:formula="of:=[.G633]+h" office:value-type="float" office:value="6.31999999999991" calcext:value-type="float">
            <text:p>6,31999999999991</text:p>
          </table:table-cell>
          <table:table-cell table:style-name="ce1" table:formula="of:=[.H633]+ h*[.F634]" office:value-type="float" office:value="82.4637678586736" calcext:value-type="float">
            <text:p>82,46376785867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4]" office:value-type="float" office:value="6.31999999999991" calcext:value-type="float">
            <text:p>6,31999999999991</text:p>
          </table:table-cell>
          <table:table-cell table:style-name="ce1" table:formula="of:=[.H634]" office:value-type="float" office:value="82.4637678586736" calcext:value-type="float">
            <text:p>82,4637678586736</text:p>
          </table:table-cell>
          <table:table-cell table:style-name="ce1" table:formula="of:=-68 - ([.E635]^2/Ao)" office:value-type="float" office:value="-71.4001365047246" calcext:value-type="float">
            <text:p>-71,4001365047246</text:p>
          </table:table-cell>
          <table:table-cell table:style-name="ce1" table:formula="of:=[.G634]+h" office:value-type="float" office:value="6.32999999999991" calcext:value-type="float">
            <text:p>6,32999999999991</text:p>
          </table:table-cell>
          <table:table-cell table:style-name="ce1" table:formula="of:=[.H634]+ h*[.F635]" office:value-type="float" office:value="81.7497664936264" calcext:value-type="float">
            <text:p>81,74976649362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5]" office:value-type="float" office:value="6.32999999999991" calcext:value-type="float">
            <text:p>6,32999999999991</text:p>
          </table:table-cell>
          <table:table-cell table:style-name="ce1" table:formula="of:=[.H635]" office:value-type="float" office:value="81.7497664936264" calcext:value-type="float">
            <text:p>81,7497664936264</text:p>
          </table:table-cell>
          <table:table-cell table:style-name="ce1" table:formula="of:=-68 - ([.E636]^2/Ao)" office:value-type="float" office:value="-71.3415121608812" calcext:value-type="float">
            <text:p>-71,3415121608812</text:p>
          </table:table-cell>
          <table:table-cell table:style-name="ce1" table:formula="of:=[.G635]+h" office:value-type="float" office:value="6.33999999999991" calcext:value-type="float">
            <text:p>6,33999999999991</text:p>
          </table:table-cell>
          <table:table-cell table:style-name="ce1" table:formula="of:=[.H635]+ h*[.F636]" office:value-type="float" office:value="81.0363513720176" calcext:value-type="float">
            <text:p>81,03635137201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6]" office:value-type="float" office:value="6.33999999999991" calcext:value-type="float">
            <text:p>6,33999999999991</text:p>
          </table:table-cell>
          <table:table-cell table:style-name="ce1" table:formula="of:=[.H636]" office:value-type="float" office:value="81.0363513720176" calcext:value-type="float">
            <text:p>81,0363513720176</text:p>
          </table:table-cell>
          <table:table-cell table:style-name="ce1" table:formula="of:=-68 - ([.E637]^2/Ao)" office:value-type="float" office:value="-71.2834451218446" calcext:value-type="float">
            <text:p>-71,2834451218446</text:p>
          </table:table-cell>
          <table:table-cell table:style-name="ce1" table:formula="of:=[.G636]+h" office:value-type="float" office:value="6.34999999999991" calcext:value-type="float">
            <text:p>6,34999999999991</text:p>
          </table:table-cell>
          <table:table-cell table:style-name="ce1" table:formula="of:=[.H636]+ h*[.F637]" office:value-type="float" office:value="80.3235169207991" calcext:value-type="float">
            <text:p>80,32351692079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7]" office:value-type="float" office:value="6.34999999999991" calcext:value-type="float">
            <text:p>6,34999999999991</text:p>
          </table:table-cell>
          <table:table-cell table:style-name="ce1" table:formula="of:=[.H637]" office:value-type="float" office:value="80.3235169207991" calcext:value-type="float">
            <text:p>80,3235169207991</text:p>
          </table:table-cell>
          <table:table-cell table:style-name="ce1" table:formula="of:=-68 - ([.E638]^2/Ao)" office:value-type="float" office:value="-71.2259336852629" calcext:value-type="float">
            <text:p>-71,2259336852629</text:p>
          </table:table-cell>
          <table:table-cell table:style-name="ce1" table:formula="of:=[.G637]+h" office:value-type="float" office:value="6.35999999999991" calcext:value-type="float">
            <text:p>6,35999999999991</text:p>
          </table:table-cell>
          <table:table-cell table:style-name="ce1" table:formula="of:=[.H637]+ h*[.F638]" office:value-type="float" office:value="79.6112575839465" calcext:value-type="float">
            <text:p>79,611257583946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8]" office:value-type="float" office:value="6.35999999999991" calcext:value-type="float">
            <text:p>6,35999999999991</text:p>
          </table:table-cell>
          <table:table-cell table:style-name="ce1" table:formula="of:=[.H638]" office:value-type="float" office:value="79.6112575839465" calcext:value-type="float">
            <text:p>79,6112575839465</text:p>
          </table:table-cell>
          <table:table-cell table:style-name="ce1" table:formula="of:=-68 - ([.E639]^2/Ao)" office:value-type="float" office:value="-71.1689761670487" calcext:value-type="float">
            <text:p>-71,1689761670487</text:p>
          </table:table-cell>
          <table:table-cell table:style-name="ce1" table:formula="of:=[.G638]+h" office:value-type="float" office:value="6.36999999999991" calcext:value-type="float">
            <text:p>6,36999999999991</text:p>
          </table:table-cell>
          <table:table-cell table:style-name="ce1" table:formula="of:=[.H638]+ h*[.F639]" office:value-type="float" office:value="78.899567822276" calcext:value-type="float">
            <text:p>78,89956782227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39]" office:value-type="float" office:value="6.36999999999991" calcext:value-type="float">
            <text:p>6,36999999999991</text:p>
          </table:table-cell>
          <table:table-cell table:style-name="ce1" table:formula="of:=[.H639]" office:value-type="float" office:value="78.899567822276" calcext:value-type="float">
            <text:p>78,899567822276</text:p>
          </table:table-cell>
          <table:table-cell table:style-name="ce1" table:formula="of:=-68 - ([.E640]^2/Ao)" office:value-type="float" office:value="-71.112570901271" calcext:value-type="float">
            <text:p>-71,112570901271</text:p>
          </table:table-cell>
          <table:table-cell table:style-name="ce1" table:formula="of:=[.G639]+h" office:value-type="float" office:value="6.37999999999991" calcext:value-type="float">
            <text:p>6,37999999999991</text:p>
          </table:table-cell>
          <table:table-cell table:style-name="ce1" table:formula="of:=[.H639]+ h*[.F640]" office:value-type="float" office:value="78.1884421132633" calcext:value-type="float">
            <text:p>78,18844211326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0]" office:value-type="float" office:value="6.37999999999991" calcext:value-type="float">
            <text:p>6,37999999999991</text:p>
          </table:table-cell>
          <table:table-cell table:style-name="ce1" table:formula="of:=[.H640]" office:value-type="float" office:value="78.1884421132633" calcext:value-type="float">
            <text:p>78,1884421132633</text:p>
          </table:table-cell>
          <table:table-cell table:style-name="ce1" table:formula="of:=-68 - ([.E641]^2/Ao)" office:value-type="float" office:value="-71.0567162400496" calcext:value-type="float">
            <text:p>-71,0567162400496</text:p>
          </table:table-cell>
          <table:table-cell table:style-name="ce1" table:formula="of:=[.G640]+h" office:value-type="float" office:value="6.38999999999991" calcext:value-type="float">
            <text:p>6,38999999999991</text:p>
          </table:table-cell>
          <table:table-cell table:style-name="ce1" table:formula="of:=[.H640]+ h*[.F641]" office:value-type="float" office:value="77.4778749508628" calcext:value-type="float">
            <text:p>77,477874950862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1]" office:value-type="float" office:value="6.38999999999991" calcext:value-type="float">
            <text:p>6,38999999999991</text:p>
          </table:table-cell>
          <table:table-cell table:style-name="ce1" table:formula="of:=[.H641]" office:value-type="float" office:value="77.4778749508628" calcext:value-type="float">
            <text:p>77,4778749508628</text:p>
          </table:table-cell>
          <table:table-cell table:style-name="ce1" table:formula="of:=-68 - ([.E642]^2/Ao)" office:value-type="float" office:value="-71.0014105534508" calcext:value-type="float">
            <text:p>-71,0014105534508</text:p>
          </table:table-cell>
          <table:table-cell table:style-name="ce1" table:formula="of:=[.G641]+h" office:value-type="float" office:value="6.39999999999991" calcext:value-type="float">
            <text:p>6,39999999999991</text:p>
          </table:table-cell>
          <table:table-cell table:style-name="ce1" table:formula="of:=[.H641]+ h*[.F642]" office:value-type="float" office:value="76.7678608453283" calcext:value-type="float">
            <text:p>76,76786084532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2]" office:value-type="float" office:value="6.39999999999991" calcext:value-type="float">
            <text:p>6,39999999999991</text:p>
          </table:table-cell>
          <table:table-cell table:style-name="ce1" table:formula="of:=[.H642]" office:value-type="float" office:value="76.7678608453283" calcext:value-type="float">
            <text:p>76,7678608453283</text:p>
          </table:table-cell>
          <table:table-cell table:style-name="ce1" table:formula="of:=-68 - ([.E643]^2/Ao)" office:value-type="float" office:value="-70.9466522293838" calcext:value-type="float">
            <text:p>-70,9466522293838</text:p>
          </table:table-cell>
          <table:table-cell table:style-name="ce1" table:formula="of:=[.G642]+h" office:value-type="float" office:value="6.40999999999991" calcext:value-type="float">
            <text:p>6,40999999999991</text:p>
          </table:table-cell>
          <table:table-cell table:style-name="ce1" table:formula="of:=[.H642]+ h*[.F643]" office:value-type="float" office:value="76.0583943230345" calcext:value-type="float">
            <text:p>76,05839432303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3]" office:value-type="float" office:value="6.40999999999991" calcext:value-type="float">
            <text:p>6,40999999999991</text:p>
          </table:table-cell>
          <table:table-cell table:style-name="ce1" table:formula="of:=[.H643]" office:value-type="float" office:value="76.0583943230345" calcext:value-type="float">
            <text:p>76,0583943230345</text:p>
          </table:table-cell>
          <table:table-cell table:style-name="ce1" table:formula="of:=-68 - ([.E644]^2/Ao)" office:value-type="float" office:value="-70.8924396734991" calcext:value-type="float">
            <text:p>-70,8924396734991</text:p>
          </table:table-cell>
          <table:table-cell table:style-name="ce1" table:formula="of:=[.G643]+h" office:value-type="float" office:value="6.41999999999991" calcext:value-type="float">
            <text:p>6,41999999999991</text:p>
          </table:table-cell>
          <table:table-cell table:style-name="ce1" table:formula="of:=[.H643]+ h*[.F644]" office:value-type="float" office:value="75.3494699262995" calcext:value-type="float">
            <text:p>75,349469926299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4]" office:value-type="float" office:value="6.41999999999991" calcext:value-type="float">
            <text:p>6,41999999999991</text:p>
          </table:table-cell>
          <table:table-cell table:style-name="ce1" table:formula="of:=[.H644]" office:value-type="float" office:value="75.3494699262995" calcext:value-type="float">
            <text:p>75,3494699262995</text:p>
          </table:table-cell>
          <table:table-cell table:style-name="ce1" table:formula="of:=-68 - ([.E645]^2/Ao)" office:value-type="float" office:value="-70.8387713090872" calcext:value-type="float">
            <text:p>-70,8387713090872</text:p>
          </table:table-cell>
          <table:table-cell table:style-name="ce1" table:formula="of:=[.G644]+h" office:value-type="float" office:value="6.42999999999991" calcext:value-type="float">
            <text:p>6,42999999999991</text:p>
          </table:table-cell>
          <table:table-cell table:style-name="ce1" table:formula="of:=[.H644]+ h*[.F645]" office:value-type="float" office:value="74.6410822132086" calcext:value-type="float">
            <text:p>74,64108221320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5]" office:value-type="float" office:value="6.42999999999991" calcext:value-type="float">
            <text:p>6,42999999999991</text:p>
          </table:table-cell>
          <table:table-cell table:style-name="ce1" table:formula="of:=[.H645]" office:value-type="float" office:value="74.6410822132086" calcext:value-type="float">
            <text:p>74,6410822132086</text:p>
          </table:table-cell>
          <table:table-cell table:style-name="ce1" table:formula="of:=-68 - ([.E646]^2/Ao)" office:value-type="float" office:value="-70.7856455769795" calcext:value-type="float">
            <text:p>-70,7856455769795</text:p>
          </table:table-cell>
          <table:table-cell table:style-name="ce1" table:formula="of:=[.G645]+h" office:value-type="float" office:value="6.43999999999991" calcext:value-type="float">
            <text:p>6,43999999999991</text:p>
          </table:table-cell>
          <table:table-cell table:style-name="ce1" table:formula="of:=[.H645]+ h*[.F646]" office:value-type="float" office:value="73.9332257574388" calcext:value-type="float">
            <text:p>73,93322575743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6]" office:value-type="float" office:value="6.43999999999991" calcext:value-type="float">
            <text:p>6,43999999999991</text:p>
          </table:table-cell>
          <table:table-cell table:style-name="ce1" table:formula="of:=[.H646]" office:value-type="float" office:value="73.9332257574388" calcext:value-type="float">
            <text:p>73,9332257574388</text:p>
          </table:table-cell>
          <table:table-cell table:style-name="ce1" table:formula="of:=-68 - ([.E647]^2/Ao)" office:value-type="float" office:value="-70.7330609354502" calcext:value-type="float">
            <text:p>-70,7330609354502</text:p>
          </table:table-cell>
          <table:table-cell table:style-name="ce1" table:formula="of:=[.G646]+h" office:value-type="float" office:value="6.44999999999991" calcext:value-type="float">
            <text:p>6,44999999999991</text:p>
          </table:table-cell>
          <table:table-cell table:style-name="ce1" table:formula="of:=[.H646]+ h*[.F647]" office:value-type="float" office:value="73.2258951480843" calcext:value-type="float">
            <text:p>73,22589514808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7]" office:value-type="float" office:value="6.44999999999991" calcext:value-type="float">
            <text:p>6,44999999999991</text:p>
          </table:table-cell>
          <table:table-cell table:style-name="ce1" table:formula="of:=[.H647]" office:value-type="float" office:value="73.2258951480843" calcext:value-type="float">
            <text:p>73,2258951480843</text:p>
          </table:table-cell>
          <table:table-cell table:style-name="ce1" table:formula="of:=-68 - ([.E648]^2/Ao)" office:value-type="float" office:value="-70.6810158601191" calcext:value-type="float">
            <text:p>-70,6810158601191</text:p>
          </table:table-cell>
          <table:table-cell table:style-name="ce1" table:formula="of:=[.G647]+h" office:value-type="float" office:value="6.45999999999991" calcext:value-type="float">
            <text:p>6,45999999999991</text:p>
          </table:table-cell>
          <table:table-cell table:style-name="ce1" table:formula="of:=[.H647]+ h*[.F648]" office:value-type="float" office:value="72.5190849894831" calcext:value-type="float">
            <text:p>72,51908498948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8]" office:value-type="float" office:value="6.45999999999991" calcext:value-type="float">
            <text:p>6,45999999999991</text:p>
          </table:table-cell>
          <table:table-cell table:style-name="ce1" table:formula="of:=[.H648]" office:value-type="float" office:value="72.5190849894831" calcext:value-type="float">
            <text:p>72,5190849894831</text:p>
          </table:table-cell>
          <table:table-cell table:style-name="ce1" table:formula="of:=-68 - ([.E649]^2/Ao)" office:value-type="float" office:value="-70.6295088438559" calcext:value-type="float">
            <text:p>-70,6295088438559</text:p>
          </table:table-cell>
          <table:table-cell table:style-name="ce1" table:formula="of:=[.G648]+h" office:value-type="float" office:value="6.46999999999991" calcext:value-type="float">
            <text:p>6,46999999999991</text:p>
          </table:table-cell>
          <table:table-cell table:style-name="ce1" table:formula="of:=[.H648]+ h*[.F649]" office:value-type="float" office:value="71.8127899010445" calcext:value-type="float">
            <text:p>71,81278990104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49]" office:value-type="float" office:value="6.46999999999991" calcext:value-type="float">
            <text:p>6,46999999999991</text:p>
          </table:table-cell>
          <table:table-cell table:style-name="ce1" table:formula="of:=[.H649]" office:value-type="float" office:value="71.8127899010445" calcext:value-type="float">
            <text:p>71,8127899010445</text:p>
          </table:table-cell>
          <table:table-cell table:style-name="ce1" table:formula="of:=-68 - ([.E650]^2/Ao)" office:value-type="float" office:value="-70.5785383966858" calcext:value-type="float">
            <text:p>-70,5785383966858</text:p>
          </table:table-cell>
          <table:table-cell table:style-name="ce1" table:formula="of:=[.G649]+h" office:value-type="float" office:value="6.47999999999991" calcext:value-type="float">
            <text:p>6,47999999999991</text:p>
          </table:table-cell>
          <table:table-cell table:style-name="ce1" table:formula="of:=[.H649]+ h*[.F650]" office:value-type="float" office:value="71.1070045170777" calcext:value-type="float">
            <text:p>71,10700451707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0]" office:value-type="float" office:value="6.47999999999991" calcext:value-type="float">
            <text:p>6,47999999999991</text:p>
          </table:table-cell>
          <table:table-cell table:style-name="ce1" table:formula="of:=[.H650]" office:value-type="float" office:value="71.1070045170777" calcext:value-type="float">
            <text:p>71,1070045170777</text:p>
          </table:table-cell>
          <table:table-cell table:style-name="ce1" table:formula="of:=-68 - ([.E651]^2/Ao)" office:value-type="float" office:value="-70.5281030456959" calcext:value-type="float">
            <text:p>-70,5281030456959</text:p>
          </table:table-cell>
          <table:table-cell table:style-name="ce1" table:formula="of:=[.G650]+h" office:value-type="float" office:value="6.48999999999991" calcext:value-type="float">
            <text:p>6,48999999999991</text:p>
          </table:table-cell>
          <table:table-cell table:style-name="ce1" table:formula="of:=[.H650]+ h*[.F651]" office:value-type="float" office:value="70.4017234866207" calcext:value-type="float">
            <text:p>70,401723486620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1]" office:value-type="float" office:value="6.48999999999991" calcext:value-type="float">
            <text:p>6,48999999999991</text:p>
          </table:table-cell>
          <table:table-cell table:style-name="ce1" table:formula="of:=[.H651]" office:value-type="float" office:value="70.4017234866207" calcext:value-type="float">
            <text:p>70,4017234866207</text:p>
          </table:table-cell>
          <table:table-cell table:style-name="ce1" table:formula="of:=-68 - ([.E652]^2/Ao)" office:value-type="float" office:value="-70.4782013349433" calcext:value-type="float">
            <text:p>-70,4782013349433</text:p>
          </table:table-cell>
          <table:table-cell table:style-name="ce1" table:formula="of:=[.G651]+h" office:value-type="float" office:value="6.49999999999991" calcext:value-type="float">
            <text:p>6,49999999999991</text:p>
          </table:table-cell>
          <table:table-cell table:style-name="ce1" table:formula="of:=[.H651]+ h*[.F652]" office:value-type="float" office:value="69.6969414732713" calcext:value-type="float">
            <text:p>69,69694147327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2]" office:value-type="float" office:value="6.49999999999991" calcext:value-type="float">
            <text:p>6,49999999999991</text:p>
          </table:table-cell>
          <table:table-cell table:style-name="ce1" table:formula="of:=[.H652]" office:value-type="float" office:value="69.6969414732713" calcext:value-type="float">
            <text:p>69,6969414732713</text:p>
          </table:table-cell>
          <table:table-cell table:style-name="ce1" table:formula="of:=-68 - ([.E653]^2/Ao)" office:value-type="float" office:value="-70.4288318253643" calcext:value-type="float">
            <text:p>-70,4288318253643</text:p>
          </table:table-cell>
          <table:table-cell table:style-name="ce1" table:formula="of:=[.G652]+h" office:value-type="float" office:value="6.50999999999991" calcext:value-type="float">
            <text:p>6,50999999999991</text:p>
          </table:table-cell>
          <table:table-cell table:style-name="ce1" table:formula="of:=[.H652]+ h*[.F653]" office:value-type="float" office:value="68.9926531550177" calcext:value-type="float">
            <text:p>68,99265315501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3]" office:value-type="float" office:value="6.50999999999991" calcext:value-type="float">
            <text:p>6,50999999999991</text:p>
          </table:table-cell>
          <table:table-cell table:style-name="ce1" table:formula="of:=[.H653]" office:value-type="float" office:value="68.9926531550177" calcext:value-type="float">
            <text:p>68,9926531550177</text:p>
          </table:table-cell>
          <table:table-cell table:style-name="ce1" table:formula="of:=-68 - ([.E654]^2/Ao)" office:value-type="float" office:value="-70.3799930946843" calcext:value-type="float">
            <text:p>-70,3799930946843</text:p>
          </table:table-cell>
          <table:table-cell table:style-name="ce1" table:formula="of:=[.G653]+h" office:value-type="float" office:value="6.51999999999991" calcext:value-type="float">
            <text:p>6,51999999999991</text:p>
          </table:table-cell>
          <table:table-cell table:style-name="ce1" table:formula="of:=[.H653]+ h*[.F654]" office:value-type="float" office:value="68.2888532240708" calcext:value-type="float">
            <text:p>68,28885322407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4]" office:value-type="float" office:value="6.51999999999991" calcext:value-type="float">
            <text:p>6,51999999999991</text:p>
          </table:table-cell>
          <table:table-cell table:style-name="ce1" table:formula="of:=[.H654]" office:value-type="float" office:value="68.2888532240708" calcext:value-type="float">
            <text:p>68,2888532240708</text:p>
          </table:table-cell>
          <table:table-cell table:style-name="ce1" table:formula="of:=-68 - ([.E655]^2/Ao)" office:value-type="float" office:value="-70.3316837373293" calcext:value-type="float">
            <text:p>-70,3316837373293</text:p>
          </table:table-cell>
          <table:table-cell table:style-name="ce1" table:formula="of:=[.G654]+h" office:value-type="float" office:value="6.52999999999991" calcext:value-type="float">
            <text:p>6,52999999999991</text:p>
          </table:table-cell>
          <table:table-cell table:style-name="ce1" table:formula="of:=[.H654]+ h*[.F655]" office:value-type="float" office:value="67.5855363866975" calcext:value-type="float">
            <text:p>67,58553638669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5]" office:value-type="float" office:value="6.52999999999991" calcext:value-type="float">
            <text:p>6,52999999999991</text:p>
          </table:table-cell>
          <table:table-cell table:style-name="ce1" table:formula="of:=[.H655]" office:value-type="float" office:value="67.5855363866975" calcext:value-type="float">
            <text:p>67,5855363866975</text:p>
          </table:table-cell>
          <table:table-cell table:style-name="ce1" table:formula="of:=-68 - ([.E656]^2/Ao)" office:value-type="float" office:value="-70.2839023643388" calcext:value-type="float">
            <text:p>-70,2839023643388</text:p>
          </table:table-cell>
          <table:table-cell table:style-name="ce1" table:formula="of:=[.G655]+h" office:value-type="float" office:value="6.53999999999991" calcext:value-type="float">
            <text:p>6,53999999999991</text:p>
          </table:table-cell>
          <table:table-cell table:style-name="ce1" table:formula="of:=[.H655]+ h*[.F656]" office:value-type="float" office:value="66.8826973630541" calcext:value-type="float">
            <text:p>66,88269736305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6]" office:value-type="float" office:value="6.53999999999991" calcext:value-type="float">
            <text:p>6,53999999999991</text:p>
          </table:table-cell>
          <table:table-cell table:style-name="ce1" table:formula="of:=[.H656]" office:value-type="float" office:value="66.8826973630541" calcext:value-type="float">
            <text:p>66,8826973630541</text:p>
          </table:table-cell>
          <table:table-cell table:style-name="ce1" table:formula="of:=-68 - ([.E657]^2/Ao)" office:value-type="float" office:value="-70.2366476032789" calcext:value-type="float">
            <text:p>-70,2366476032789</text:p>
          </table:table-cell>
          <table:table-cell table:style-name="ce1" table:formula="of:=[.G656]+h" office:value-type="float" office:value="6.54999999999991" calcext:value-type="float">
            <text:p>6,54999999999991</text:p>
          </table:table-cell>
          <table:table-cell table:style-name="ce1" table:formula="of:=[.H656]+ h*[.F657]" office:value-type="float" office:value="66.1803308870213" calcext:value-type="float">
            <text:p>66,18033088702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7]" office:value-type="float" office:value="6.54999999999991" calcext:value-type="float">
            <text:p>6,54999999999991</text:p>
          </table:table-cell>
          <table:table-cell table:style-name="ce1" table:formula="of:=[.H657]" office:value-type="float" office:value="66.1803308870213" calcext:value-type="float">
            <text:p>66,1803308870213</text:p>
          </table:table-cell>
          <table:table-cell table:style-name="ce1" table:formula="of:=-68 - ([.E658]^2/Ao)" office:value-type="float" office:value="-70.1899180981578" calcext:value-type="float">
            <text:p>-70,1899180981578</text:p>
          </table:table-cell>
          <table:table-cell table:style-name="ce1" table:formula="of:=[.G657]+h" office:value-type="float" office:value="6.55999999999991" calcext:value-type="float">
            <text:p>6,55999999999991</text:p>
          </table:table-cell>
          <table:table-cell table:style-name="ce1" table:formula="of:=[.H657]+ h*[.F658]" office:value-type="float" office:value="65.4784317060397" calcext:value-type="float">
            <text:p>65,478431706039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8]" office:value-type="float" office:value="6.55999999999991" calcext:value-type="float">
            <text:p>6,55999999999991</text:p>
          </table:table-cell>
          <table:table-cell table:style-name="ce1" table:formula="of:=[.H658]" office:value-type="float" office:value="65.4784317060397" calcext:value-type="float">
            <text:p>65,4784317060397</text:p>
          </table:table-cell>
          <table:table-cell table:style-name="ce1" table:formula="of:=-68 - ([.E659]^2/Ao)" office:value-type="float" office:value="-70.1437125093413" calcext:value-type="float">
            <text:p>-70,1437125093413</text:p>
          </table:table-cell>
          <table:table-cell table:style-name="ce1" table:formula="of:=[.G658]+h" office:value-type="float" office:value="6.5699999999999" calcext:value-type="float">
            <text:p>6,5699999999999</text:p>
          </table:table-cell>
          <table:table-cell table:style-name="ce1" table:formula="of:=[.H658]+ h*[.F659]" office:value-type="float" office:value="64.7769945809463" calcext:value-type="float">
            <text:p>64,776994580946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59]" office:value-type="float" office:value="6.5699999999999" calcext:value-type="float">
            <text:p>6,5699999999999</text:p>
          </table:table-cell>
          <table:table-cell table:style-name="ce1" table:formula="of:=[.H659]" office:value-type="float" office:value="64.7769945809463" calcext:value-type="float">
            <text:p>64,7769945809463</text:p>
          </table:table-cell>
          <table:table-cell table:style-name="ce1" table:formula="of:=-68 - ([.E660]^2/Ao)" office:value-type="float" office:value="-70.09802951347" calcext:value-type="float">
            <text:p>-70,09802951347</text:p>
          </table:table-cell>
          <table:table-cell table:style-name="ce1" table:formula="of:=[.G659]+h" office:value-type="float" office:value="6.5799999999999" calcext:value-type="float">
            <text:p>6,5799999999999</text:p>
          </table:table-cell>
          <table:table-cell table:style-name="ce1" table:formula="of:=[.H659]+ h*[.F660]" office:value-type="float" office:value="64.0760142858116" calcext:value-type="float">
            <text:p>64,07601428581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0]" office:value-type="float" office:value="6.5799999999999" calcext:value-type="float">
            <text:p>6,5799999999999</text:p>
          </table:table-cell>
          <table:table-cell table:style-name="ce1" table:formula="of:=[.H660]" office:value-type="float" office:value="64.0760142858116" calcext:value-type="float">
            <text:p>64,0760142858116</text:p>
          </table:table-cell>
          <table:table-cell table:style-name="ce1" table:formula="of:=-68 - ([.E661]^2/Ao)" office:value-type="float" office:value="-70.0528678033778" calcext:value-type="float">
            <text:p>-70,0528678033778</text:p>
          </table:table-cell>
          <table:table-cell table:style-name="ce1" table:formula="of:=[.G660]+h" office:value-type="float" office:value="6.5899999999999" calcext:value-type="float">
            <text:p>6,5899999999999</text:p>
          </table:table-cell>
          <table:table-cell table:style-name="ce1" table:formula="of:=[.H660]+ h*[.F661]" office:value-type="float" office:value="63.3754856077779" calcext:value-type="float">
            <text:p>63,37548560777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1]" office:value-type="float" office:value="6.5899999999999" calcext:value-type="float">
            <text:p>6,5899999999999</text:p>
          </table:table-cell>
          <table:table-cell table:style-name="ce1" table:formula="of:=[.H661]" office:value-type="float" office:value="63.3754856077779" calcext:value-type="float">
            <text:p>63,3754856077779</text:p>
          </table:table-cell>
          <table:table-cell table:style-name="ce1" table:formula="of:=-68 - ([.E662]^2/Ao)" office:value-type="float" office:value="-70.0082260880108" calcext:value-type="float">
            <text:p>-70,0082260880108</text:p>
          </table:table-cell>
          <table:table-cell table:style-name="ce1" table:formula="of:=[.G661]+h" office:value-type="float" office:value="6.5999999999999" calcext:value-type="float">
            <text:p>6,5999999999999</text:p>
          </table:table-cell>
          <table:table-cell table:style-name="ce1" table:formula="of:=[.H661]+ h*[.F662]" office:value-type="float" office:value="62.6754033468978" calcext:value-type="float">
            <text:p>62,67540334689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2]" office:value-type="float" office:value="6.5999999999999" calcext:value-type="float">
            <text:p>6,5999999999999</text:p>
          </table:table-cell>
          <table:table-cell table:style-name="ce1" table:formula="of:=[.H662]" office:value-type="float" office:value="62.6754033468978" calcext:value-type="float">
            <text:p>62,6754033468978</text:p>
          </table:table-cell>
          <table:table-cell table:style-name="ce1" table:formula="of:=-68 - ([.E663]^2/Ao)" office:value-type="float" office:value="-69.9641030923482" calcext:value-type="float">
            <text:p>-69,9641030923482</text:p>
          </table:table-cell>
          <table:table-cell table:style-name="ce1" table:formula="of:=[.G662]+h" office:value-type="float" office:value="6.6099999999999" calcext:value-type="float">
            <text:p>6,6099999999999</text:p>
          </table:table-cell>
          <table:table-cell table:style-name="ce1" table:formula="of:=[.H662]+ h*[.F663]" office:value-type="float" office:value="61.9757623159743" calcext:value-type="float">
            <text:p>61,97576231597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3]" office:value-type="float" office:value="6.6099999999999" calcext:value-type="float">
            <text:p>6,6099999999999</text:p>
          </table:table-cell>
          <table:table-cell table:style-name="ce1" table:formula="of:=[.H663]" office:value-type="float" office:value="61.9757623159743" calcext:value-type="float">
            <text:p>61,9757623159743</text:p>
          </table:table-cell>
          <table:table-cell table:style-name="ce1" table:formula="of:=-68 - ([.E664]^2/Ao)" office:value-type="float" office:value="-69.9204975573231" calcext:value-type="float">
            <text:p>-69,9204975573231</text:p>
          </table:table-cell>
          <table:table-cell table:style-name="ce1" table:formula="of:=[.G663]+h" office:value-type="float" office:value="6.6199999999999" calcext:value-type="float">
            <text:p>6,6199999999999</text:p>
          </table:table-cell>
          <table:table-cell table:style-name="ce1" table:formula="of:=[.H663]+ h*[.F664]" office:value-type="float" office:value="61.276557340401" calcext:value-type="float">
            <text:p>61,2765573404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4]" office:value-type="float" office:value="6.6199999999999" calcext:value-type="float">
            <text:p>6,6199999999999</text:p>
          </table:table-cell>
          <table:table-cell table:style-name="ce1" table:formula="of:=[.H664]" office:value-type="float" office:value="61.276557340401" calcext:value-type="float">
            <text:p>61,276557340401</text:p>
          </table:table-cell>
          <table:table-cell table:style-name="ce1" table:formula="of:=-68 - ([.E665]^2/Ao)" office:value-type="float" office:value="-69.8774082397457" calcext:value-type="float">
            <text:p>-69,8774082397457</text:p>
          </table:table-cell>
          <table:table-cell table:style-name="ce1" table:formula="of:=[.G664]+h" office:value-type="float" office:value="6.6299999999999" calcext:value-type="float">
            <text:p>6,6299999999999</text:p>
          </table:table-cell>
          <table:table-cell table:style-name="ce1" table:formula="of:=[.H664]+ h*[.F665]" office:value-type="float" office:value="60.5777832580036" calcext:value-type="float">
            <text:p>60,57778325800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5]" office:value-type="float" office:value="6.6299999999999" calcext:value-type="float">
            <text:p>6,6299999999999</text:p>
          </table:table-cell>
          <table:table-cell table:style-name="ce1" table:formula="of:=[.H665]" office:value-type="float" office:value="60.5777832580036" calcext:value-type="float">
            <text:p>60,5777832580036</text:p>
          </table:table-cell>
          <table:table-cell table:style-name="ce1" table:formula="of:=-68 - ([.E666]^2/Ao)" office:value-type="float" office:value="-69.8348339122268" calcext:value-type="float">
            <text:p>-69,8348339122268</text:p>
          </table:table-cell>
          <table:table-cell table:style-name="ce1" table:formula="of:=[.G665]+h" office:value-type="float" office:value="6.6399999999999" calcext:value-type="float">
            <text:p>6,6399999999999</text:p>
          </table:table-cell>
          <table:table-cell table:style-name="ce1" table:formula="of:=[.H665]+ h*[.F666]" office:value-type="float" office:value="59.8794349188813" calcext:value-type="float">
            <text:p>59,87943491888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6]" office:value-type="float" office:value="6.6399999999999" calcext:value-type="float">
            <text:p>6,6399999999999</text:p>
          </table:table-cell>
          <table:table-cell table:style-name="ce1" table:formula="of:=[.H666]" office:value-type="float" office:value="59.8794349188813" calcext:value-type="float">
            <text:p>59,8794349188813</text:p>
          </table:table-cell>
          <table:table-cell table:style-name="ce1" table:formula="of:=-68 - ([.E667]^2/Ao)" office:value-type="float" office:value="-69.7927733631023" calcext:value-type="float">
            <text:p>-69,7927733631023</text:p>
          </table:table-cell>
          <table:table-cell table:style-name="ce1" table:formula="of:=[.G666]+h" office:value-type="float" office:value="6.6499999999999" calcext:value-type="float">
            <text:p>6,6499999999999</text:p>
          </table:table-cell>
          <table:table-cell table:style-name="ce1" table:formula="of:=[.H666]+ h*[.F667]" office:value-type="float" office:value="59.1815071852503" calcext:value-type="float">
            <text:p>59,18150718525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7]" office:value-type="float" office:value="6.6499999999999" calcext:value-type="float">
            <text:p>6,6499999999999</text:p>
          </table:table-cell>
          <table:table-cell table:style-name="ce1" table:formula="of:=[.H667]" office:value-type="float" office:value="59.1815071852503" calcext:value-type="float">
            <text:p>59,1815071852503</text:p>
          </table:table-cell>
          <table:table-cell table:style-name="ce1" table:formula="of:=-68 - ([.E668]^2/Ao)" office:value-type="float" office:value="-69.7512253963589" calcext:value-type="float">
            <text:p>-69,7512253963589</text:p>
          </table:table-cell>
          <table:table-cell table:style-name="ce1" table:formula="of:=[.G667]+h" office:value-type="float" office:value="6.6599999999999" calcext:value-type="float">
            <text:p>6,6599999999999</text:p>
          </table:table-cell>
          <table:table-cell table:style-name="ce1" table:formula="of:=[.H667]+ h*[.F668]" office:value-type="float" office:value="58.4839949312867" calcext:value-type="float">
            <text:p>58,48399493128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8]" office:value-type="float" office:value="6.6599999999999" calcext:value-type="float">
            <text:p>6,6599999999999</text:p>
          </table:table-cell>
          <table:table-cell table:style-name="ce1" table:formula="of:=[.H668]" office:value-type="float" office:value="58.4839949312867" calcext:value-type="float">
            <text:p>58,4839949312867</text:p>
          </table:table-cell>
          <table:table-cell table:style-name="ce1" table:formula="of:=-68 - ([.E669]^2/Ao)" office:value-type="float" office:value="-69.7101888315614" calcext:value-type="float">
            <text:p>-69,7101888315614</text:p>
          </table:table-cell>
          <table:table-cell table:style-name="ce1" table:formula="of:=[.G668]+h" office:value-type="float" office:value="6.6699999999999" calcext:value-type="float">
            <text:p>6,6699999999999</text:p>
          </table:table-cell>
          <table:table-cell table:style-name="ce1" table:formula="of:=[.H668]+ h*[.F669]" office:value-type="float" office:value="57.7868930429711" calcext:value-type="float">
            <text:p>57,78689304297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69]" office:value-type="float" office:value="6.6699999999999" calcext:value-type="float">
            <text:p>6,6699999999999</text:p>
          </table:table-cell>
          <table:table-cell table:style-name="ce1" table:formula="of:=[.H669]" office:value-type="float" office:value="57.7868930429711" calcext:value-type="float">
            <text:p>57,7868930429711</text:p>
          </table:table-cell>
          <table:table-cell table:style-name="ce1" table:formula="of:=-68 - ([.E670]^2/Ao)" office:value-type="float" office:value="-69.6696625037799" calcext:value-type="float">
            <text:p>-69,6696625037799</text:p>
          </table:table-cell>
          <table:table-cell table:style-name="ce1" table:formula="of:=[.G669]+h" office:value-type="float" office:value="6.6799999999999" calcext:value-type="float">
            <text:p>6,6799999999999</text:p>
          </table:table-cell>
          <table:table-cell table:style-name="ce1" table:formula="of:=[.H669]+ h*[.F670]" office:value-type="float" office:value="57.0901964179333" calcext:value-type="float">
            <text:p>57,090196417933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0]" office:value-type="float" office:value="6.6799999999999" calcext:value-type="float">
            <text:p>6,6799999999999</text:p>
          </table:table-cell>
          <table:table-cell table:style-name="ce1" table:formula="of:=[.H670]" office:value-type="float" office:value="57.0901964179333" calcext:value-type="float">
            <text:p>57,0901964179333</text:p>
          </table:table-cell>
          <table:table-cell table:style-name="ce1" table:formula="of:=-68 - ([.E671]^2/Ao)" office:value-type="float" office:value="-69.6296452635191" calcext:value-type="float">
            <text:p>-69,6296452635191</text:p>
          </table:table-cell>
          <table:table-cell table:style-name="ce1" table:formula="of:=[.G670]+h" office:value-type="float" office:value="6.6899999999999" calcext:value-type="float">
            <text:p>6,6899999999999</text:p>
          </table:table-cell>
          <table:table-cell table:style-name="ce1" table:formula="of:=[.H670]+ h*[.F671]" office:value-type="float" office:value="56.3938999652981" calcext:value-type="float">
            <text:p>56,393899965298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1]" office:value-type="float" office:value="6.6899999999999" calcext:value-type="float">
            <text:p>6,6899999999999</text:p>
          </table:table-cell>
          <table:table-cell table:style-name="ce1" table:formula="of:=[.H671]" office:value-type="float" office:value="56.3938999652981" calcext:value-type="float">
            <text:p>56,3938999652981</text:p>
          </table:table-cell>
          <table:table-cell table:style-name="ce1" table:formula="of:=-68 - ([.E672]^2/Ao)" office:value-type="float" office:value="-69.590135976648" calcext:value-type="float">
            <text:p>-69,590135976648</text:p>
          </table:table-cell>
          <table:table-cell table:style-name="ce1" table:formula="of:=[.G671]+h" office:value-type="float" office:value="6.6999999999999" calcext:value-type="float">
            <text:p>6,6999999999999</text:p>
          </table:table-cell>
          <table:table-cell table:style-name="ce1" table:formula="of:=[.H671]+ h*[.F672]" office:value-type="float" office:value="55.6979986055316" calcext:value-type="float">
            <text:p>55,69799860553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2]" office:value-type="float" office:value="6.6999999999999" calcext:value-type="float">
            <text:p>6,6999999999999</text:p>
          </table:table-cell>
          <table:table-cell table:style-name="ce1" table:formula="of:=[.H672]" office:value-type="float" office:value="55.6979986055316" calcext:value-type="float">
            <text:p>55,6979986055316</text:p>
          </table:table-cell>
          <table:table-cell table:style-name="ce1" table:formula="of:=-68 - ([.E673]^2/Ao)" office:value-type="float" office:value="-69.5511335243309" calcext:value-type="float">
            <text:p>-69,5511335243309</text:p>
          </table:table-cell>
          <table:table-cell table:style-name="ce1" table:formula="of:=[.G672]+h" office:value-type="float" office:value="6.7099999999999" calcext:value-type="float">
            <text:p>6,7099999999999</text:p>
          </table:table-cell>
          <table:table-cell table:style-name="ce1" table:formula="of:=[.H672]+ h*[.F673]" office:value-type="float" office:value="55.0024872702883" calcext:value-type="float">
            <text:p>55,00248727028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3]" office:value-type="float" office:value="6.7099999999999" calcext:value-type="float">
            <text:p>6,7099999999999</text:p>
          </table:table-cell>
          <table:table-cell table:style-name="ce1" table:formula="of:=[.H673]" office:value-type="float" office:value="55.0024872702883" calcext:value-type="float">
            <text:p>55,0024872702883</text:p>
          </table:table-cell>
          <table:table-cell table:style-name="ce1" table:formula="of:=-68 - ([.E674]^2/Ao)" office:value-type="float" office:value="-69.5126368029591" calcext:value-type="float">
            <text:p>-69,5126368029591</text:p>
          </table:table-cell>
          <table:table-cell table:style-name="ce1" table:formula="of:=[.G673]+h" office:value-type="float" office:value="6.7199999999999" calcext:value-type="float">
            <text:p>6,7199999999999</text:p>
          </table:table-cell>
          <table:table-cell table:style-name="ce1" table:formula="of:=[.H673]+ h*[.F674]" office:value-type="float" office:value="54.3073609022587" calcext:value-type="float">
            <text:p>54,30736090225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4]" office:value-type="float" office:value="6.7199999999999" calcext:value-type="float">
            <text:p>6,7199999999999</text:p>
          </table:table-cell>
          <table:table-cell table:style-name="ce1" table:formula="of:=[.H674]" office:value-type="float" office:value="54.3073609022587" calcext:value-type="float">
            <text:p>54,3073609022587</text:p>
          </table:table-cell>
          <table:table-cell table:style-name="ce1" table:formula="of:=-68 - ([.E675]^2/Ao)" office:value-type="float" office:value="-69.4746447240841" calcext:value-type="float">
            <text:p>-69,4746447240841</text:p>
          </table:table-cell>
          <table:table-cell table:style-name="ce1" table:formula="of:=[.G674]+h" office:value-type="float" office:value="6.7299999999999" calcext:value-type="float">
            <text:p>6,7299999999999</text:p>
          </table:table-cell>
          <table:table-cell table:style-name="ce1" table:formula="of:=[.H674]+ h*[.F675]" office:value-type="float" office:value="53.6126144550179" calcext:value-type="float">
            <text:p>53,61261445501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5]" office:value-type="float" office:value="6.7299999999999" calcext:value-type="float">
            <text:p>6,7299999999999</text:p>
          </table:table-cell>
          <table:table-cell table:style-name="ce1" table:formula="of:=[.H675]" office:value-type="float" office:value="53.6126144550179" calcext:value-type="float">
            <text:p>53,6126144550179</text:p>
          </table:table-cell>
          <table:table-cell table:style-name="ce1" table:formula="of:=-68 - ([.E676]^2/Ao)" office:value-type="float" office:value="-69.4371562143512" calcext:value-type="float">
            <text:p>-69,4371562143512</text:p>
          </table:table-cell>
          <table:table-cell table:style-name="ce1" table:formula="of:=[.G675]+h" office:value-type="float" office:value="6.7399999999999" calcext:value-type="float">
            <text:p>6,7399999999999</text:p>
          </table:table-cell>
          <table:table-cell table:style-name="ce1" table:formula="of:=[.H675]+ h*[.F676]" office:value-type="float" office:value="52.9182428928744" calcext:value-type="float">
            <text:p>52,91824289287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6]" office:value-type="float" office:value="6.7399999999999" calcext:value-type="float">
            <text:p>6,7399999999999</text:p>
          </table:table-cell>
          <table:table-cell table:style-name="ce1" table:formula="of:=[.H676]" office:value-type="float" office:value="52.9182428928744" calcext:value-type="float">
            <text:p>52,9182428928744</text:p>
          </table:table-cell>
          <table:table-cell table:style-name="ce1" table:formula="of:=-68 - ([.E677]^2/Ao)" office:value-type="float" office:value="-69.4001702154346" calcext:value-type="float">
            <text:p>-69,4001702154346</text:p>
          </table:table-cell>
          <table:table-cell table:style-name="ce1" table:formula="of:=[.G676]+h" office:value-type="float" office:value="6.7499999999999" calcext:value-type="float">
            <text:p>6,7499999999999</text:p>
          </table:table-cell>
          <table:table-cell table:style-name="ce1" table:formula="of:=[.H676]+ h*[.F677]" office:value-type="float" office:value="52.22424119072" calcext:value-type="float">
            <text:p>52,224241190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7]" office:value-type="float" office:value="6.7499999999999" calcext:value-type="float">
            <text:p>6,7499999999999</text:p>
          </table:table-cell>
          <table:table-cell table:style-name="ce1" table:formula="of:=[.H677]" office:value-type="float" office:value="52.22424119072" calcext:value-type="float">
            <text:p>52,22424119072</text:p>
          </table:table-cell>
          <table:table-cell table:style-name="ce1" table:formula="of:=-68 - ([.E678]^2/Ao)" office:value-type="float" office:value="-69.3636856839732" calcext:value-type="float">
            <text:p>-69,3636856839732</text:p>
          </table:table-cell>
          <table:table-cell table:style-name="ce1" table:formula="of:=[.G677]+h" office:value-type="float" office:value="6.7599999999999" calcext:value-type="float">
            <text:p>6,7599999999999</text:p>
          </table:table-cell>
          <table:table-cell table:style-name="ce1" table:formula="of:=[.H677]+ h*[.F678]" office:value-type="float" office:value="51.5306043338803" calcext:value-type="float">
            <text:p>51,53060433388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8]" office:value-type="float" office:value="6.7599999999999" calcext:value-type="float">
            <text:p>6,7599999999999</text:p>
          </table:table-cell>
          <table:table-cell table:style-name="ce1" table:formula="of:=[.H678]" office:value-type="float" office:value="51.5306043338803" calcext:value-type="float">
            <text:p>51,5306043338803</text:p>
          </table:table-cell>
          <table:table-cell table:style-name="ce1" table:formula="of:=-68 - ([.E679]^2/Ao)" office:value-type="float" office:value="-69.3277015915075" calcext:value-type="float">
            <text:p>-69,3277015915075</text:p>
          </table:table-cell>
          <table:table-cell table:style-name="ce1" table:formula="of:=[.G678]+h" office:value-type="float" office:value="6.7699999999999" calcext:value-type="float">
            <text:p>6,7699999999999</text:p>
          </table:table-cell>
          <table:table-cell table:style-name="ce1" table:formula="of:=[.H678]+ h*[.F679]" office:value-type="float" office:value="50.8373273179652" calcext:value-type="float">
            <text:p>50,83732731796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79]" office:value-type="float" office:value="6.7699999999999" calcext:value-type="float">
            <text:p>6,7699999999999</text:p>
          </table:table-cell>
          <table:table-cell table:style-name="ce1" table:formula="of:=[.H679]" office:value-type="float" office:value="50.8373273179652" calcext:value-type="float">
            <text:p>50,8373273179652</text:p>
          </table:table-cell>
          <table:table-cell table:style-name="ce1" table:formula="of:=-68 - ([.E680]^2/Ao)" office:value-type="float" office:value="-69.292216924417" calcext:value-type="float">
            <text:p>-69,292216924417</text:p>
          </table:table-cell>
          <table:table-cell table:style-name="ce1" table:formula="of:=[.G679]+h" office:value-type="float" office:value="6.7799999999999" calcext:value-type="float">
            <text:p>6,7799999999999</text:p>
          </table:table-cell>
          <table:table-cell table:style-name="ce1" table:formula="of:=[.H679]+ h*[.F680]" office:value-type="float" office:value="50.1444051487211" calcext:value-type="float">
            <text:p>50,14440514872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0]" office:value-type="float" office:value="6.7799999999999" calcext:value-type="float">
            <text:p>6,7799999999999</text:p>
          </table:table-cell>
          <table:table-cell table:style-name="ce1" table:formula="of:=[.H680]" office:value-type="float" office:value="50.1444051487211" calcext:value-type="float">
            <text:p>50,1444051487211</text:p>
          </table:table-cell>
          <table:table-cell table:style-name="ce1" table:formula="of:=-68 - ([.E681]^2/Ao)" office:value-type="float" office:value="-69.2572306838596" calcext:value-type="float">
            <text:p>-69,2572306838596</text:p>
          </table:table-cell>
          <table:table-cell table:style-name="ce1" table:formula="of:=[.G680]+h" office:value-type="float" office:value="6.7899999999999" calcext:value-type="float">
            <text:p>6,7899999999999</text:p>
          </table:table-cell>
          <table:table-cell table:style-name="ce1" table:formula="of:=[.H680]+ h*[.F681]" office:value-type="float" office:value="49.4518328418825" calcext:value-type="float">
            <text:p>49,45183284188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1]" office:value-type="float" office:value="6.7899999999999" calcext:value-type="float">
            <text:p>6,7899999999999</text:p>
          </table:table-cell>
          <table:table-cell table:style-name="ce1" table:formula="of:=[.H681]" office:value-type="float" office:value="49.4518328418825" calcext:value-type="float">
            <text:p>49,4518328418825</text:p>
          </table:table-cell>
          <table:table-cell table:style-name="ce1" table:formula="of:=-68 - ([.E682]^2/Ao)" office:value-type="float" office:value="-69.2227418857108" calcext:value-type="float">
            <text:p>-69,2227418857108</text:p>
          </table:table-cell>
          <table:table-cell table:style-name="ce1" table:formula="of:=[.G681]+h" office:value-type="float" office:value="6.7999999999999" calcext:value-type="float">
            <text:p>6,7999999999999</text:p>
          </table:table-cell>
          <table:table-cell table:style-name="ce1" table:formula="of:=[.H681]+ h*[.F682]" office:value-type="float" office:value="48.7596054230254" calcext:value-type="float">
            <text:p>48,75960542302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2]" office:value-type="float" office:value="6.7999999999999" calcext:value-type="float">
            <text:p>6,7999999999999</text:p>
          </table:table-cell>
          <table:table-cell table:style-name="ce1" table:formula="of:=[.H682]" office:value-type="float" office:value="48.7596054230254" calcext:value-type="float">
            <text:p>48,7596054230254</text:p>
          </table:table-cell>
          <table:table-cell table:style-name="ce1" table:formula="of:=-68 - ([.E683]^2/Ao)" office:value-type="float" office:value="-69.1887495605046" calcext:value-type="float">
            <text:p>-69,1887495605046</text:p>
          </table:table-cell>
          <table:table-cell table:style-name="ce1" table:formula="of:=[.G682]+h" office:value-type="float" office:value="6.8099999999999" calcext:value-type="float">
            <text:p>6,8099999999999</text:p>
          </table:table-cell>
          <table:table-cell table:style-name="ce1" table:formula="of:=[.H682]+ h*[.F683]" office:value-type="float" office:value="48.0677179274203" calcext:value-type="float">
            <text:p>48,06771792742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3]" office:value-type="float" office:value="6.8099999999999" calcext:value-type="float">
            <text:p>6,8099999999999</text:p>
          </table:table-cell>
          <table:table-cell table:style-name="ce1" table:formula="of:=[.H683]" office:value-type="float" office:value="48.0677179274203" calcext:value-type="float">
            <text:p>48,0677179274203</text:p>
          </table:table-cell>
          <table:table-cell table:style-name="ce1" table:formula="of:=-68 - ([.E684]^2/Ao)" office:value-type="float" office:value="-69.155252753375" calcext:value-type="float">
            <text:p>-69,155252753375</text:p>
          </table:table-cell>
          <table:table-cell table:style-name="ce1" table:formula="of:=[.G683]+h" office:value-type="float" office:value="6.8199999999999" calcext:value-type="float">
            <text:p>6,8199999999999</text:p>
          </table:table-cell>
          <table:table-cell table:style-name="ce1" table:formula="of:=[.H683]+ h*[.F684]" office:value-type="float" office:value="47.3761653998866" calcext:value-type="float">
            <text:p>47,37616539988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4]" office:value-type="float" office:value="6.8199999999999" calcext:value-type="float">
            <text:p>6,8199999999999</text:p>
          </table:table-cell>
          <table:table-cell table:style-name="ce1" table:formula="of:=[.H684]" office:value-type="float" office:value="47.3761653998866" calcext:value-type="float">
            <text:p>47,3761653998866</text:p>
          </table:table-cell>
          <table:table-cell table:style-name="ce1" table:formula="of:=-68 - ([.E685]^2/Ao)" office:value-type="float" office:value="-69.1222505239987" calcext:value-type="float">
            <text:p>-69,1222505239987</text:p>
          </table:table-cell>
          <table:table-cell table:style-name="ce1" table:formula="of:=[.G684]+h" office:value-type="float" office:value="6.8299999999999" calcext:value-type="float">
            <text:p>6,8299999999999</text:p>
          </table:table-cell>
          <table:table-cell table:style-name="ce1" table:formula="of:=[.H684]+ h*[.F685]" office:value-type="float" office:value="46.6849428946466" calcext:value-type="float">
            <text:p>46,68494289464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5]" office:value-type="float" office:value="6.8299999999999" calcext:value-type="float">
            <text:p>6,8299999999999</text:p>
          </table:table-cell>
          <table:table-cell table:style-name="ce1" table:formula="of:=[.H685]" office:value-type="float" office:value="46.6849428946466" calcext:value-type="float">
            <text:p>46,6849428946466</text:p>
          </table:table-cell>
          <table:table-cell table:style-name="ce1" table:formula="of:=-68 - ([.E686]^2/Ao)" office:value-type="float" office:value="-69.0897419465382" calcext:value-type="float">
            <text:p>-69,0897419465382</text:p>
          </table:table-cell>
          <table:table-cell table:style-name="ce1" table:formula="of:=[.G685]+h" office:value-type="float" office:value="6.8399999999999" calcext:value-type="float">
            <text:p>6,8399999999999</text:p>
          </table:table-cell>
          <table:table-cell table:style-name="ce1" table:formula="of:=[.H685]+ h*[.F686]" office:value-type="float" office:value="45.9940454751812" calcext:value-type="float">
            <text:p>45,99404547518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6]" office:value-type="float" office:value="6.8399999999999" calcext:value-type="float">
            <text:p>6,8399999999999</text:p>
          </table:table-cell>
          <table:table-cell table:style-name="ce1" table:formula="of:=[.H686]" office:value-type="float" office:value="45.9940454751812" calcext:value-type="float">
            <text:p>45,9940454751812</text:p>
          </table:table-cell>
          <table:table-cell table:style-name="ce1" table:formula="of:=-68 - ([.E687]^2/Ao)" office:value-type="float" office:value="-69.0577261095865" calcext:value-type="float">
            <text:p>-69,0577261095865</text:p>
          </table:table-cell>
          <table:table-cell table:style-name="ce1" table:formula="of:=[.G686]+h" office:value-type="float" office:value="6.8499999999999" calcext:value-type="float">
            <text:p>6,8499999999999</text:p>
          </table:table-cell>
          <table:table-cell table:style-name="ce1" table:formula="of:=[.H686]+ h*[.F687]" office:value-type="float" office:value="45.3034682140853" calcext:value-type="float">
            <text:p>45,30346821408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7]" office:value-type="float" office:value="6.8499999999999" calcext:value-type="float">
            <text:p>6,8499999999999</text:p>
          </table:table-cell>
          <table:table-cell table:style-name="ce1" table:formula="of:=[.H687]" office:value-type="float" office:value="45.3034682140853" calcext:value-type="float">
            <text:p>45,3034682140853</text:p>
          </table:table-cell>
          <table:table-cell table:style-name="ce1" table:formula="of:=-68 - ([.E688]^2/Ao)" office:value-type="float" office:value="-69.0262021161123" calcext:value-type="float">
            <text:p>-69,0262021161123</text:p>
          </table:table-cell>
          <table:table-cell table:style-name="ce1" table:formula="of:=[.G687]+h" office:value-type="float" office:value="6.8599999999999" calcext:value-type="float">
            <text:p>6,8599999999999</text:p>
          </table:table-cell>
          <table:table-cell table:style-name="ce1" table:formula="of:=[.H687]+ h*[.F688]" office:value-type="float" office:value="44.6132061929242" calcext:value-type="float">
            <text:p>44,61320619292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8]" office:value-type="float" office:value="6.8599999999999" calcext:value-type="float">
            <text:p>6,8599999999999</text:p>
          </table:table-cell>
          <table:table-cell table:style-name="ce1" table:formula="of:=[.H688]" office:value-type="float" office:value="44.6132061929242" calcext:value-type="float">
            <text:p>44,6132061929242</text:p>
          </table:table-cell>
          <table:table-cell table:style-name="ce1" table:formula="of:=-68 - ([.E689]^2/Ao)" office:value-type="float" office:value="-68.9951690834062" calcext:value-type="float">
            <text:p>-68,9951690834062</text:p>
          </table:table-cell>
          <table:table-cell table:style-name="ce1" table:formula="of:=[.G688]+h" office:value-type="float" office:value="6.8699999999999" calcext:value-type="float">
            <text:p>6,8699999999999</text:p>
          </table:table-cell>
          <table:table-cell table:style-name="ce1" table:formula="of:=[.H688]+ h*[.F689]" office:value-type="float" office:value="43.9232545020901" calcext:value-type="float">
            <text:p>43,92325450209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89]" office:value-type="float" office:value="6.8699999999999" calcext:value-type="float">
            <text:p>6,8699999999999</text:p>
          </table:table-cell>
          <table:table-cell table:style-name="ce1" table:formula="of:=[.H689]" office:value-type="float" office:value="43.9232545020901" calcext:value-type="float">
            <text:p>43,9232545020901</text:p>
          </table:table-cell>
          <table:table-cell table:style-name="ce1" table:formula="of:=-68 - ([.E690]^2/Ao)" office:value-type="float" office:value="-68.9646261430277" calcext:value-type="float">
            <text:p>-68,9646261430277</text:p>
          </table:table-cell>
          <table:table-cell table:style-name="ce1" table:formula="of:=[.G689]+h" office:value-type="float" office:value="6.8799999999999" calcext:value-type="float">
            <text:p>6,8799999999999</text:p>
          </table:table-cell>
          <table:table-cell table:style-name="ce1" table:formula="of:=[.H689]+ h*[.F690]" office:value-type="float" office:value="43.2336082406599" calcext:value-type="float">
            <text:p>43,23360824065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0]" office:value-type="float" office:value="6.8799999999999" calcext:value-type="float">
            <text:p>6,8799999999999</text:p>
          </table:table-cell>
          <table:table-cell table:style-name="ce1" table:formula="of:=[.H690]" office:value-type="float" office:value="43.2336082406599" calcext:value-type="float">
            <text:p>43,2336082406599</text:p>
          </table:table-cell>
          <table:table-cell table:style-name="ce1" table:formula="of:=-68 - ([.E691]^2/Ao)" office:value-type="float" office:value="-68.9345724407534" calcext:value-type="float">
            <text:p>-68,9345724407534</text:p>
          </table:table-cell>
          <table:table-cell table:style-name="ce1" table:formula="of:=[.G690]+h" office:value-type="float" office:value="6.8899999999999" calcext:value-type="float">
            <text:p>6,8899999999999</text:p>
          </table:table-cell>
          <table:table-cell table:style-name="ce1" table:formula="of:=[.H690]+ h*[.F691]" office:value-type="float" office:value="42.5442625162523" calcext:value-type="float">
            <text:p>42,54426251625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1]" office:value-type="float" office:value="6.8899999999999" calcext:value-type="float">
            <text:p>6,8899999999999</text:p>
          </table:table-cell>
          <table:table-cell table:style-name="ce1" table:formula="of:=[.H691]" office:value-type="float" office:value="42.5442625162523" calcext:value-type="float">
            <text:p>42,5442625162523</text:p>
          </table:table-cell>
          <table:table-cell table:style-name="ce1" table:formula="of:=-68 - ([.E692]^2/Ao)" office:value-type="float" office:value="-68.9050071365259" calcext:value-type="float">
            <text:p>-68,9050071365259</text:p>
          </table:table-cell>
          <table:table-cell table:style-name="ce1" table:formula="of:=[.G691]+h" office:value-type="float" office:value="6.8999999999999" calcext:value-type="float">
            <text:p>6,8999999999999</text:p>
          </table:table-cell>
          <table:table-cell table:style-name="ce1" table:formula="of:=[.H691]+ h*[.F692]" office:value-type="float" office:value="41.8552124448871" calcext:value-type="float">
            <text:p>41,85521244488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2]" office:value-type="float" office:value="6.8999999999999" calcext:value-type="float">
            <text:p>6,8999999999999</text:p>
          </table:table-cell>
          <table:table-cell table:style-name="ce1" table:formula="of:=[.H692]" office:value-type="float" office:value="41.8552124448871" calcext:value-type="float">
            <text:p>41,8552124448871</text:p>
          </table:table-cell>
          <table:table-cell table:style-name="ce1" table:formula="of:=-68 - ([.E693]^2/Ao)" office:value-type="float" office:value="-68.8759294044033" calcext:value-type="float">
            <text:p>-68,8759294044033</text:p>
          </table:table-cell>
          <table:table-cell table:style-name="ce1" table:formula="of:=[.G692]+h" office:value-type="float" office:value="6.9099999999999" calcext:value-type="float">
            <text:p>6,9099999999999</text:p>
          </table:table-cell>
          <table:table-cell table:style-name="ce1" table:formula="of:=[.H692]+ h*[.F693]" office:value-type="float" office:value="41.166453150843" calcext:value-type="float">
            <text:p>41,1664531508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3]" office:value-type="float" office:value="6.9099999999999" calcext:value-type="float">
            <text:p>6,9099999999999</text:p>
          </table:table-cell>
          <table:table-cell table:style-name="ce1" table:formula="of:=[.H693]" office:value-type="float" office:value="41.166453150843" calcext:value-type="float">
            <text:p>41,166453150843</text:p>
          </table:table-cell>
          <table:table-cell table:style-name="ce1" table:formula="of:=-68 - ([.E694]^2/Ao)" office:value-type="float" office:value="-68.8473384325103" calcext:value-type="float">
            <text:p>-68,8473384325103</text:p>
          </table:table-cell>
          <table:table-cell table:style-name="ce1" table:formula="of:=[.G693]+h" office:value-type="float" office:value="6.9199999999999" calcext:value-type="float">
            <text:p>6,9199999999999</text:p>
          </table:table-cell>
          <table:table-cell table:style-name="ce1" table:formula="of:=[.H693]+ h*[.F694]" office:value-type="float" office:value="40.4779797665179" calcext:value-type="float">
            <text:p>40,477979766517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4]" office:value-type="float" office:value="6.9199999999999" calcext:value-type="float">
            <text:p>6,9199999999999</text:p>
          </table:table-cell>
          <table:table-cell table:style-name="ce1" table:formula="of:=[.H694]" office:value-type="float" office:value="40.4779797665179" calcext:value-type="float">
            <text:p>40,4779797665179</text:p>
          </table:table-cell>
          <table:table-cell table:style-name="ce1" table:formula="of:=-68 - ([.E695]^2/Ao)" office:value-type="float" office:value="-68.8192334229893" calcext:value-type="float">
            <text:p>-68,8192334229893</text:p>
          </table:table-cell>
          <table:table-cell table:style-name="ce1" table:formula="of:=[.G694]+h" office:value-type="float" office:value="6.9299999999999" calcext:value-type="float">
            <text:p>6,9299999999999</text:p>
          </table:table-cell>
          <table:table-cell table:style-name="ce1" table:formula="of:=[.H694]+ h*[.F695]" office:value-type="float" office:value="39.789787432288" calcext:value-type="float">
            <text:p>39,7897874322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5]" office:value-type="float" office:value="6.9299999999999" calcext:value-type="float">
            <text:p>6,9299999999999</text:p>
          </table:table-cell>
          <table:table-cell table:style-name="ce1" table:formula="of:=[.H695]" office:value-type="float" office:value="39.789787432288" calcext:value-type="float">
            <text:p>39,789787432288</text:p>
          </table:table-cell>
          <table:table-cell table:style-name="ce1" table:formula="of:=-68 - ([.E696]^2/Ao)" office:value-type="float" office:value="-68.7916135919533" calcext:value-type="float">
            <text:p>-68,7916135919533</text:p>
          </table:table-cell>
          <table:table-cell table:style-name="ce1" table:formula="of:=[.G695]+h" office:value-type="float" office:value="6.9399999999999" calcext:value-type="float">
            <text:p>6,9399999999999</text:p>
          </table:table-cell>
          <table:table-cell table:style-name="ce1" table:formula="of:=[.H695]+ h*[.F696]" office:value-type="float" office:value="39.1018712963685" calcext:value-type="float">
            <text:p>39,101871296368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6]" office:value-type="float" office:value="6.9399999999999" calcext:value-type="float">
            <text:p>6,9399999999999</text:p>
          </table:table-cell>
          <table:table-cell table:style-name="ce1" table:formula="of:=[.H696]" office:value-type="float" office:value="39.1018712963685" calcext:value-type="float">
            <text:p>39,1018712963685</text:p>
          </table:table-cell>
          <table:table-cell table:style-name="ce1" table:formula="of:=-68 - ([.E697]^2/Ao)" office:value-type="float" office:value="-68.7644781694389" calcext:value-type="float">
            <text:p>-68,7644781694389</text:p>
          </table:table-cell>
          <table:table-cell table:style-name="ce1" table:formula="of:=[.G696]+h" office:value-type="float" office:value="6.9499999999999" calcext:value-type="float">
            <text:p>6,9499999999999</text:p>
          </table:table-cell>
          <table:table-cell table:style-name="ce1" table:formula="of:=[.H696]+ h*[.F697]" office:value-type="float" office:value="38.4142265146741" calcext:value-type="float">
            <text:p>38,414226514674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7]" office:value-type="float" office:value="6.9499999999999" calcext:value-type="float">
            <text:p>6,9499999999999</text:p>
          </table:table-cell>
          <table:table-cell table:style-name="ce1" table:formula="of:=[.H697]" office:value-type="float" office:value="38.4142265146741" calcext:value-type="float">
            <text:p>38,4142265146741</text:p>
          </table:table-cell>
          <table:table-cell table:style-name="ce1" table:formula="of:=-68 - ([.E698]^2/Ao)" office:value-type="float" office:value="-68.7378263993603" calcext:value-type="float">
            <text:p>-68,7378263993603</text:p>
          </table:table-cell>
          <table:table-cell table:style-name="ce1" table:formula="of:=[.G697]+h" office:value-type="float" office:value="6.9599999999999" calcext:value-type="float">
            <text:p>6,9599999999999</text:p>
          </table:table-cell>
          <table:table-cell table:style-name="ce1" table:formula="of:=[.H697]+ h*[.F698]" office:value-type="float" office:value="37.7268482506805" calcext:value-type="float">
            <text:p>37,726848250680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8]" office:value-type="float" office:value="6.9599999999999" calcext:value-type="float">
            <text:p>6,9599999999999</text:p>
          </table:table-cell>
          <table:table-cell table:style-name="ce1" table:formula="of:=[.H698]" office:value-type="float" office:value="37.7268482506805" calcext:value-type="float">
            <text:p>37,7268482506805</text:p>
          </table:table-cell>
          <table:table-cell table:style-name="ce1" table:formula="of:=-68 - ([.E699]^2/Ao)" office:value-type="float" office:value="-68.7116575394649" calcext:value-type="float">
            <text:p>-68,7116575394649</text:p>
          </table:table-cell>
          <table:table-cell table:style-name="ce1" table:formula="of:=[.G698]+h" office:value-type="float" office:value="6.9699999999999" calcext:value-type="float">
            <text:p>6,9699999999999</text:p>
          </table:table-cell>
          <table:table-cell table:style-name="ce1" table:formula="of:=[.H698]+ h*[.F699]" office:value-type="float" office:value="37.0397316752859" calcext:value-type="float">
            <text:p>37,039731675285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699]" office:value-type="float" office:value="6.9699999999999" calcext:value-type="float">
            <text:p>6,9699999999999</text:p>
          </table:table-cell>
          <table:table-cell table:style-name="ce1" table:formula="of:=[.H699]" office:value-type="float" office:value="37.0397316752859" calcext:value-type="float">
            <text:p>37,0397316752859</text:p>
          </table:table-cell>
          <table:table-cell table:style-name="ce1" table:formula="of:=-68 - ([.E700]^2/Ao)" office:value-type="float" office:value="-68.6859708612886" calcext:value-type="float">
            <text:p>-68,6859708612886</text:p>
          </table:table-cell>
          <table:table-cell table:style-name="ce1" table:formula="of:=[.G699]+h" office:value-type="float" office:value="6.9799999999999" calcext:value-type="float">
            <text:p>6,9799999999999</text:p>
          </table:table-cell>
          <table:table-cell table:style-name="ce1" table:formula="of:=[.H699]+ h*[.F700]" office:value-type="float" office:value="36.352871966673" calcext:value-type="float">
            <text:p>36,3528719666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0]" office:value-type="float" office:value="6.9799999999999" calcext:value-type="float">
            <text:p>6,9799999999999</text:p>
          </table:table-cell>
          <table:table-cell table:style-name="ce1" table:formula="of:=[.H700]" office:value-type="float" office:value="36.352871966673" calcext:value-type="float">
            <text:p>36,352871966673</text:p>
          </table:table-cell>
          <table:table-cell table:style-name="ce1" table:formula="of:=-68 - ([.E701]^2/Ao)" office:value-type="float" office:value="-68.6607656501127" calcext:value-type="float">
            <text:p>-68,6607656501127</text:p>
          </table:table-cell>
          <table:table-cell table:style-name="ce1" table:formula="of:=[.G700]+h" office:value-type="float" office:value="6.9899999999999" calcext:value-type="float">
            <text:p>6,9899999999999</text:p>
          </table:table-cell>
          <table:table-cell table:style-name="ce1" table:formula="of:=[.H700]+ h*[.F701]" office:value-type="float" office:value="35.6662643101719" calcext:value-type="float">
            <text:p>35,666264310171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1]" office:value-type="float" office:value="6.9899999999999" calcext:value-type="float">
            <text:p>6,9899999999999</text:p>
          </table:table-cell>
          <table:table-cell table:style-name="ce1" table:formula="of:=[.H701]" office:value-type="float" office:value="35.6662643101719" calcext:value-type="float">
            <text:p>35,6662643101719</text:p>
          </table:table-cell>
          <table:table-cell table:style-name="ce1" table:formula="of:=-68 - ([.E702]^2/Ao)" office:value-type="float" office:value="-68.6360412049215" calcext:value-type="float">
            <text:p>-68,6360412049215</text:p>
          </table:table-cell>
          <table:table-cell table:style-name="ce1" table:formula="of:=[.G701]+h" office:value-type="float" office:value="6.9999999999999" calcext:value-type="float">
            <text:p>6,9999999999999</text:p>
          </table:table-cell>
          <table:table-cell table:style-name="ce1" table:formula="of:=[.H701]+ h*[.F702]" office:value-type="float" office:value="34.9799038981226" calcext:value-type="float">
            <text:p>34,97990389812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2]" office:value-type="float" office:value="6.9999999999999" calcext:value-type="float">
            <text:p>6,9999999999999</text:p>
          </table:table-cell>
          <table:table-cell table:style-name="ce1" table:formula="of:=[.H702]" office:value-type="float" office:value="34.9799038981226" calcext:value-type="float">
            <text:p>34,9799038981226</text:p>
          </table:table-cell>
          <table:table-cell table:style-name="ce1" table:formula="of:=-68 - ([.E703]^2/Ao)" office:value-type="float" office:value="-68.611796838361" calcext:value-type="float">
            <text:p>-68,611796838361</text:p>
          </table:table-cell>
          <table:table-cell table:style-name="ce1" table:formula="of:=[.G702]+h" office:value-type="float" office:value="7.0099999999999" calcext:value-type="float">
            <text:p>7,0099999999999</text:p>
          </table:table-cell>
          <table:table-cell table:style-name="ce1" table:formula="of:=[.H702]+ h*[.F703]" office:value-type="float" office:value="34.293785929739" calcext:value-type="float">
            <text:p>34,29378592973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3]" office:value-type="float" office:value="7.0099999999999" calcext:value-type="float">
            <text:p>7,0099999999999</text:p>
          </table:table-cell>
          <table:table-cell table:style-name="ce1" table:formula="of:=[.H703]" office:value-type="float" office:value="34.293785929739" calcext:value-type="float">
            <text:p>34,293785929739</text:p>
          </table:table-cell>
          <table:table-cell table:style-name="ce1" table:formula="of:=-68 - ([.E704]^2/Ao)" office:value-type="float" office:value="-68.5880318766974" calcext:value-type="float">
            <text:p>-68,5880318766974</text:p>
          </table:table-cell>
          <table:table-cell table:style-name="ce1" table:formula="of:=[.G703]+h" office:value-type="float" office:value="7.0199999999999" calcext:value-type="float">
            <text:p>7,0199999999999</text:p>
          </table:table-cell>
          <table:table-cell table:style-name="ce1" table:formula="of:=[.H703]+ h*[.F704]" office:value-type="float" office:value="33.607905610972" calcext:value-type="float">
            <text:p>33,6079056109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4]" office:value-type="float" office:value="7.0199999999999" calcext:value-type="float">
            <text:p>7,0199999999999</text:p>
          </table:table-cell>
          <table:table-cell table:style-name="ce1" table:formula="of:=[.H704]" office:value-type="float" office:value="33.607905610972" calcext:value-type="float">
            <text:p>33,607905610972</text:p>
          </table:table-cell>
          <table:table-cell table:style-name="ce1" table:formula="of:=-68 - ([.E705]^2/Ao)" office:value-type="float" office:value="-68.564745659778" calcext:value-type="float">
            <text:p>-68,564745659778</text:p>
          </table:table-cell>
          <table:table-cell table:style-name="ce1" table:formula="of:=[.G704]+h" office:value-type="float" office:value="7.02999999999989" calcext:value-type="float">
            <text:p>7,02999999999989</text:p>
          </table:table-cell>
          <table:table-cell table:style-name="ce1" table:formula="of:=[.H704]+ h*[.F705]" office:value-type="float" office:value="32.9222581543743" calcext:value-type="float">
            <text:p>32,922258154374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5]" office:value-type="float" office:value="7.02999999999989" calcext:value-type="float">
            <text:p>7,02999999999989</text:p>
          </table:table-cell>
          <table:table-cell table:style-name="ce1" table:formula="of:=[.H705]" office:value-type="float" office:value="32.9222581543743" calcext:value-type="float">
            <text:p>32,9222581543743</text:p>
          </table:table-cell>
          <table:table-cell table:style-name="ce1" table:formula="of:=-68 - ([.E706]^2/Ao)" office:value-type="float" office:value="-68.5419375409916" calcext:value-type="float">
            <text:p>-68,5419375409916</text:p>
          </table:table-cell>
          <table:table-cell table:style-name="ce1" table:formula="of:=[.G705]+h" office:value-type="float" office:value="7.03999999999989" calcext:value-type="float">
            <text:p>7,03999999999989</text:p>
          </table:table-cell>
          <table:table-cell table:style-name="ce1" table:formula="of:=[.H705]+ h*[.F706]" office:value-type="float" office:value="32.2368387789644" calcext:value-type="float">
            <text:p>32,23683877896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6]" office:value-type="float" office:value="7.03999999999989" calcext:value-type="float">
            <text:p>7,03999999999989</text:p>
          </table:table-cell>
          <table:table-cell table:style-name="ce1" table:formula="of:=[.H706]" office:value-type="float" office:value="32.2368387789644" calcext:value-type="float">
            <text:p>32,2368387789644</text:p>
          </table:table-cell>
          <table:table-cell table:style-name="ce1" table:formula="of:=-68 - ([.E707]^2/Ao)" office:value-type="float" office:value="-68.5196068872305" calcext:value-type="float">
            <text:p>-68,5196068872305</text:p>
          </table:table-cell>
          <table:table-cell table:style-name="ce1" table:formula="of:=[.G706]+h" office:value-type="float" office:value="7.04999999999989" calcext:value-type="float">
            <text:p>7,04999999999989</text:p>
          </table:table-cell>
          <table:table-cell table:style-name="ce1" table:formula="of:=[.H706]+ h*[.F707]" office:value-type="float" office:value="31.551642710092" calcext:value-type="float">
            <text:p>31,5516427100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7]" office:value-type="float" office:value="7.04999999999989" calcext:value-type="float">
            <text:p>7,04999999999989</text:p>
          </table:table-cell>
          <table:table-cell table:style-name="ce1" table:formula="of:=[.H707]" office:value-type="float" office:value="31.551642710092" calcext:value-type="float">
            <text:p>31,551642710092</text:p>
          </table:table-cell>
          <table:table-cell table:style-name="ce1" table:formula="of:=-68 - ([.E708]^2/Ao)" office:value-type="float" office:value="-68.4977530788527" calcext:value-type="float">
            <text:p>-68,4977530788527</text:p>
          </table:table-cell>
          <table:table-cell table:style-name="ce1" table:formula="of:=[.G707]+h" office:value-type="float" office:value="7.05999999999989" calcext:value-type="float">
            <text:p>7,05999999999989</text:p>
          </table:table-cell>
          <table:table-cell table:style-name="ce1" table:formula="of:=[.H707]+ h*[.F708]" office:value-type="float" office:value="30.8666651793035" calcext:value-type="float">
            <text:p>30,86666517930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8]" office:value-type="float" office:value="7.05999999999989" calcext:value-type="float">
            <text:p>7,05999999999989</text:p>
          </table:table-cell>
          <table:table-cell table:style-name="ce1" table:formula="of:=[.H708]" office:value-type="float" office:value="30.8666651793035" calcext:value-type="float">
            <text:p>30,8666651793035</text:p>
          </table:table-cell>
          <table:table-cell table:style-name="ce1" table:formula="of:=-68 - ([.E709]^2/Ao)" office:value-type="float" office:value="-68.4763755096456" calcext:value-type="float">
            <text:p>-68,4763755096456</text:p>
          </table:table-cell>
          <table:table-cell table:style-name="ce1" table:formula="of:=[.G708]+h" office:value-type="float" office:value="7.06999999999989" calcext:value-type="float">
            <text:p>7,06999999999989</text:p>
          </table:table-cell>
          <table:table-cell table:style-name="ce1" table:formula="of:=[.H708]+ h*[.F709]" office:value-type="float" office:value="30.1819014242071" calcext:value-type="float">
            <text:p>30,181901424207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09]" office:value-type="float" office:value="7.06999999999989" calcext:value-type="float">
            <text:p>7,06999999999989</text:p>
          </table:table-cell>
          <table:table-cell table:style-name="ce1" table:formula="of:=[.H709]" office:value-type="float" office:value="30.1819014242071" calcext:value-type="float">
            <text:p>30,1819014242071</text:p>
          </table:table-cell>
          <table:table-cell table:style-name="ce1" table:formula="of:=-68 - ([.E710]^2/Ao)" office:value-type="float" office:value="-68.4554735867903" calcext:value-type="float">
            <text:p>-68,4554735867903</text:p>
          </table:table-cell>
          <table:table-cell table:style-name="ce1" table:formula="of:=[.G709]+h" office:value-type="float" office:value="7.07999999999989" calcext:value-type="float">
            <text:p>7,07999999999989</text:p>
          </table:table-cell>
          <table:table-cell table:style-name="ce1" table:formula="of:=[.H709]+ h*[.F710]" office:value-type="float" office:value="29.4973466883392" calcext:value-type="float">
            <text:p>29,497346688339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0]" office:value-type="float" office:value="7.07999999999989" calcext:value-type="float">
            <text:p>7,07999999999989</text:p>
          </table:table-cell>
          <table:table-cell table:style-name="ce1" table:formula="of:=[.H710]" office:value-type="float" office:value="29.4973466883392" calcext:value-type="float">
            <text:p>29,4973466883392</text:p>
          </table:table-cell>
          <table:table-cell table:style-name="ce1" table:formula="of:=-68 - ([.E711]^2/Ao)" office:value-type="float" office:value="-68.435046730826" calcext:value-type="float">
            <text:p>-68,435046730826</text:p>
          </table:table-cell>
          <table:table-cell table:style-name="ce1" table:formula="of:=[.G710]+h" office:value-type="float" office:value="7.08999999999989" calcext:value-type="float">
            <text:p>7,08999999999989</text:p>
          </table:table-cell>
          <table:table-cell table:style-name="ce1" table:formula="of:=[.H710]+ h*[.F711]" office:value-type="float" office:value="28.8129962210309" calcext:value-type="float">
            <text:p>28,81299622103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1]" office:value-type="float" office:value="7.08999999999989" calcext:value-type="float">
            <text:p>7,08999999999989</text:p>
          </table:table-cell>
          <table:table-cell table:style-name="ce1" table:formula="of:=[.H711]" office:value-type="float" office:value="28.8129962210309" calcext:value-type="float">
            <text:p>28,8129962210309</text:p>
          </table:table-cell>
          <table:table-cell table:style-name="ce1" table:formula="of:=-68 - ([.E712]^2/Ao)" office:value-type="float" office:value="-68.4150943756166" calcext:value-type="float">
            <text:p>-68,4150943756166</text:p>
          </table:table-cell>
          <table:table-cell table:style-name="ce1" table:formula="of:=[.G711]+h" office:value-type="float" office:value="7.09999999999989" calcext:value-type="float">
            <text:p>7,09999999999989</text:p>
          </table:table-cell>
          <table:table-cell table:style-name="ce1" table:formula="of:=[.H711]+ h*[.F712]" office:value-type="float" office:value="28.1288452772747" calcext:value-type="float">
            <text:p>28,12884527727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2]" office:value-type="float" office:value="7.09999999999989" calcext:value-type="float">
            <text:p>7,09999999999989</text:p>
          </table:table-cell>
          <table:table-cell table:style-name="ce1" table:formula="of:=[.H712]" office:value-type="float" office:value="28.1288452772747" calcext:value-type="float">
            <text:p>28,1288452772747</text:p>
          </table:table-cell>
          <table:table-cell table:style-name="ce1" table:formula="of:=-68 - ([.E713]^2/Ao)" office:value-type="float" office:value="-68.3956159683164" calcext:value-type="float">
            <text:p>-68,3956159683164</text:p>
          </table:table-cell>
          <table:table-cell table:style-name="ce1" table:formula="of:=[.G712]+h" office:value-type="float" office:value="7.10999999999989" calcext:value-type="float">
            <text:p>7,10999999999989</text:p>
          </table:table-cell>
          <table:table-cell table:style-name="ce1" table:formula="of:=[.H712]+ h*[.F713]" office:value-type="float" office:value="27.4448891175916" calcext:value-type="float">
            <text:p>27,44488911759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3]" office:value-type="float" office:value="7.10999999999989" calcext:value-type="float">
            <text:p>7,10999999999989</text:p>
          </table:table-cell>
          <table:table-cell table:style-name="ce1" table:formula="of:=[.H713]" office:value-type="float" office:value="27.4448891175916" calcext:value-type="float">
            <text:p>27,4448891175916</text:p>
          </table:table-cell>
          <table:table-cell table:style-name="ce1" table:formula="of:=-68 - ([.E714]^2/Ao)" office:value-type="float" office:value="-68.3766109693384" calcext:value-type="float">
            <text:p>-68,3766109693384</text:p>
          </table:table-cell>
          <table:table-cell table:style-name="ce1" table:formula="of:=[.G713]+h" office:value-type="float" office:value="7.11999999999989" calcext:value-type="float">
            <text:p>7,11999999999989</text:p>
          </table:table-cell>
          <table:table-cell table:style-name="ce1" table:formula="of:=[.H713]+ h*[.F714]" office:value-type="float" office:value="26.7611230078982" calcext:value-type="float">
            <text:p>26,76112300789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4]" office:value-type="float" office:value="7.11999999999989" calcext:value-type="float">
            <text:p>7,11999999999989</text:p>
          </table:table-cell>
          <table:table-cell table:style-name="ce1" table:formula="of:=[.H714]" office:value-type="float" office:value="26.7611230078982" calcext:value-type="float">
            <text:p>26,7611230078982</text:p>
          </table:table-cell>
          <table:table-cell table:style-name="ce1" table:formula="of:=-68 - ([.E715]^2/Ao)" office:value-type="float" office:value="-68.3580788523219" calcext:value-type="float">
            <text:p>-68,3580788523219</text:p>
          </table:table-cell>
          <table:table-cell table:style-name="ce1" table:formula="of:=[.G714]+h" office:value-type="float" office:value="7.12999999999989" calcext:value-type="float">
            <text:p>7,12999999999989</text:p>
          </table:table-cell>
          <table:table-cell table:style-name="ce1" table:formula="of:=[.H714]+ h*[.F715]" office:value-type="float" office:value="26.077542219375" calcext:value-type="float">
            <text:p>26,0775422193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5]" office:value-type="float" office:value="7.12999999999989" calcext:value-type="float">
            <text:p>7,12999999999989</text:p>
          </table:table-cell>
          <table:table-cell table:style-name="ce1" table:formula="of:=[.H715]" office:value-type="float" office:value="26.077542219375" calcext:value-type="float">
            <text:p>26,077542219375</text:p>
          </table:table-cell>
          <table:table-cell table:style-name="ce1" table:formula="of:=-68 - ([.E716]^2/Ao)" office:value-type="float" office:value="-68.3400191041016" calcext:value-type="float">
            <text:p>-68,3400191041016</text:p>
          </table:table-cell>
          <table:table-cell table:style-name="ce1" table:formula="of:=[.G715]+h" office:value-type="float" office:value="7.13999999999989" calcext:value-type="float">
            <text:p>7,13999999999989</text:p>
          </table:table-cell>
          <table:table-cell table:style-name="ce1" table:formula="of:=[.H715]+ h*[.F716]" office:value-type="float" office:value="25.394142028334" calcext:value-type="float">
            <text:p>25,3941420283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6]" office:value-type="float" office:value="7.13999999999989" calcext:value-type="float">
            <text:p>7,13999999999989</text:p>
          </table:table-cell>
          <table:table-cell table:style-name="ce1" table:formula="of:=[.H716]" office:value-type="float" office:value="25.394142028334" calcext:value-type="float">
            <text:p>25,394142028334</text:p>
          </table:table-cell>
          <table:table-cell table:style-name="ce1" table:formula="of:=-68 - ([.E717]^2/Ao)" office:value-type="float" office:value="-68.3224312246776" calcext:value-type="float">
            <text:p>-68,3224312246776</text:p>
          </table:table-cell>
          <table:table-cell table:style-name="ce1" table:formula="of:=[.G716]+h" office:value-type="float" office:value="7.14999999999989" calcext:value-type="float">
            <text:p>7,14999999999989</text:p>
          </table:table-cell>
          <table:table-cell table:style-name="ce1" table:formula="of:=[.H716]+ h*[.F717]" office:value-type="float" office:value="24.7109177160872" calcext:value-type="float">
            <text:p>24,71091771608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7]" office:value-type="float" office:value="7.14999999999989" calcext:value-type="float">
            <text:p>7,14999999999989</text:p>
          </table:table-cell>
          <table:table-cell table:style-name="ce1" table:formula="of:=[.H717]" office:value-type="float" office:value="24.7109177160872" calcext:value-type="float">
            <text:p>24,7109177160872</text:p>
          </table:table-cell>
          <table:table-cell table:style-name="ce1" table:formula="of:=-68 - ([.E718]^2/Ao)" office:value-type="float" office:value="-68.3053147271856" calcext:value-type="float">
            <text:p>-68,3053147271856</text:p>
          </table:table-cell>
          <table:table-cell table:style-name="ce1" table:formula="of:=[.G717]+h" office:value-type="float" office:value="7.15999999999989" calcext:value-type="float">
            <text:p>7,15999999999989</text:p>
          </table:table-cell>
          <table:table-cell table:style-name="ce1" table:formula="of:=[.H717]+ h*[.F718]" office:value-type="float" office:value="24.0278645688153" calcext:value-type="float">
            <text:p>24,02786456881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8]" office:value-type="float" office:value="7.15999999999989" calcext:value-type="float">
            <text:p>7,15999999999989</text:p>
          </table:table-cell>
          <table:table-cell table:style-name="ce1" table:formula="of:=[.H718]" office:value-type="float" office:value="24.0278645688153" calcext:value-type="float">
            <text:p>24,0278645688153</text:p>
          </table:table-cell>
          <table:table-cell table:style-name="ce1" table:formula="of:=-68 - ([.E719]^2/Ao)" office:value-type="float" office:value="-68.2886691378687" calcext:value-type="float">
            <text:p>-68,2886691378687</text:p>
          </table:table-cell>
          <table:table-cell table:style-name="ce1" table:formula="of:=[.G718]+h" office:value-type="float" office:value="7.16999999999989" calcext:value-type="float">
            <text:p>7,16999999999989</text:p>
          </table:table-cell>
          <table:table-cell table:style-name="ce1" table:formula="of:=[.H718]+ h*[.F719]" office:value-type="float" office:value="23.3449778774366" calcext:value-type="float">
            <text:p>23,344977877436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19]" office:value-type="float" office:value="7.16999999999989" calcext:value-type="float">
            <text:p>7,16999999999989</text:p>
          </table:table-cell>
          <table:table-cell table:style-name="ce1" table:formula="of:=[.H719]" office:value-type="float" office:value="23.3449778774366" calcext:value-type="float">
            <text:p>23,3449778774366</text:p>
          </table:table-cell>
          <table:table-cell table:style-name="ce1" table:formula="of:=-68 - ([.E720]^2/Ao)" office:value-type="float" office:value="-68.272493996049" calcext:value-type="float">
            <text:p>-68,272493996049</text:p>
          </table:table-cell>
          <table:table-cell table:style-name="ce1" table:formula="of:=[.G719]+h" office:value-type="float" office:value="7.17999999999989" calcext:value-type="float">
            <text:p>7,17999999999989</text:p>
          </table:table-cell>
          <table:table-cell table:style-name="ce1" table:formula="of:=[.H719]+ h*[.F720]" office:value-type="float" office:value="22.6622529374761" calcext:value-type="float">
            <text:p>22,66225293747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0]" office:value-type="float" office:value="7.17999999999989" calcext:value-type="float">
            <text:p>7,17999999999989</text:p>
          </table:table-cell>
          <table:table-cell table:style-name="ce1" table:formula="of:=[.H720]" office:value-type="float" office:value="22.6622529374761" calcext:value-type="float">
            <text:p>22,6622529374761</text:p>
          </table:table-cell>
          <table:table-cell table:style-name="ce1" table:formula="of:=-68 - ([.E721]^2/Ao)" office:value-type="float" office:value="-68.2567888541011" calcext:value-type="float">
            <text:p>-68,2567888541011</text:p>
          </table:table-cell>
          <table:table-cell table:style-name="ce1" table:formula="of:=[.G720]+h" office:value-type="float" office:value="7.18999999999989" calcext:value-type="float">
            <text:p>7,18999999999989</text:p>
          </table:table-cell>
          <table:table-cell table:style-name="ce1" table:formula="of:=[.H720]+ h*[.F721]" office:value-type="float" office:value="21.9796850489351" calcext:value-type="float">
            <text:p>21,979685048935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1]" office:value-type="float" office:value="7.18999999999989" calcext:value-type="float">
            <text:p>7,18999999999989</text:p>
          </table:table-cell>
          <table:table-cell table:style-name="ce1" table:formula="of:=[.H721]" office:value-type="float" office:value="21.9796850489351" calcext:value-type="float">
            <text:p>21,9796850489351</text:p>
          </table:table-cell>
          <table:table-cell table:style-name="ce1" table:formula="of:=-68 - ([.E722]^2/Ao)" office:value-type="float" office:value="-68.2415532774252" calcext:value-type="float">
            <text:p>-68,2415532774252</text:p>
          </table:table-cell>
          <table:table-cell table:style-name="ce1" table:formula="of:=[.G721]+h" office:value-type="float" office:value="7.19999999999989" calcext:value-type="float">
            <text:p>7,19999999999989</text:p>
          </table:table-cell>
          <table:table-cell table:style-name="ce1" table:formula="of:=[.H721]+ h*[.F722]" office:value-type="float" office:value="21.2972695161609" calcext:value-type="float">
            <text:p>21,29726951616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2]" office:value-type="float" office:value="7.19999999999989" calcext:value-type="float">
            <text:p>7,19999999999989</text:p>
          </table:table-cell>
          <table:table-cell table:style-name="ce1" table:formula="of:=[.H722]" office:value-type="float" office:value="21.2972695161609" calcext:value-type="float">
            <text:p>21,2972695161609</text:p>
          </table:table-cell>
          <table:table-cell table:style-name="ce1" table:formula="of:=-68 - ([.E723]^2/Ao)" office:value-type="float" office:value="-68.226786844422" calcext:value-type="float">
            <text:p>-68,226786844422</text:p>
          </table:table-cell>
          <table:table-cell table:style-name="ce1" table:formula="of:=[.G722]+h" office:value-type="float" office:value="7.20999999999989" calcext:value-type="float">
            <text:p>7,20999999999989</text:p>
          </table:table-cell>
          <table:table-cell table:style-name="ce1" table:formula="of:=[.H722]+ h*[.F723]" office:value-type="float" office:value="20.6150016477167" calcext:value-type="float">
            <text:p>20,615001647716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3]" office:value-type="float" office:value="7.20999999999989" calcext:value-type="float">
            <text:p>7,20999999999989</text:p>
          </table:table-cell>
          <table:table-cell table:style-name="ce1" table:formula="of:=[.H723]" office:value-type="float" office:value="20.6150016477167" calcext:value-type="float">
            <text:p>20,6150016477167</text:p>
          </table:table-cell>
          <table:table-cell table:style-name="ce1" table:formula="of:=-68 - ([.E724]^2/Ao)" office:value-type="float" office:value="-68.2124891464677" calcext:value-type="float">
            <text:p>-68,2124891464677</text:p>
          </table:table-cell>
          <table:table-cell table:style-name="ce1" table:formula="of:=[.G723]+h" office:value-type="float" office:value="7.21999999999989" calcext:value-type="float">
            <text:p>7,21999999999989</text:p>
          </table:table-cell>
          <table:table-cell table:style-name="ce1" table:formula="of:=[.H723]+ h*[.F724]" office:value-type="float" office:value="19.932876756252" calcext:value-type="float">
            <text:p>19,93287675625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4]" office:value-type="float" office:value="7.21999999999989" calcext:value-type="float">
            <text:p>7,21999999999989</text:p>
          </table:table-cell>
          <table:table-cell table:style-name="ce1" table:formula="of:=[.H724]" office:value-type="float" office:value="19.932876756252" calcext:value-type="float">
            <text:p>19,932876756252</text:p>
          </table:table-cell>
          <table:table-cell table:style-name="ce1" table:formula="of:=-68 - ([.E725]^2/Ao)" office:value-type="float" office:value="-68.19865978789" calcext:value-type="float">
            <text:p>-68,19865978789</text:p>
          </table:table-cell>
          <table:table-cell table:style-name="ce1" table:formula="of:=[.G724]+h" office:value-type="float" office:value="7.22999999999989" calcext:value-type="float">
            <text:p>7,22999999999989</text:p>
          </table:table-cell>
          <table:table-cell table:style-name="ce1" table:formula="of:=[.H724]+ h*[.F725]" office:value-type="float" office:value="19.2508901583731" calcext:value-type="float">
            <text:p>19,250890158373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5]" office:value-type="float" office:value="7.22999999999989" calcext:value-type="float">
            <text:p>7,22999999999989</text:p>
          </table:table-cell>
          <table:table-cell table:style-name="ce1" table:formula="of:=[.H725]" office:value-type="float" office:value="19.2508901583731" calcext:value-type="float">
            <text:p>19,2508901583731</text:p>
          </table:table-cell>
          <table:table-cell table:style-name="ce1" table:formula="of:=-68 - ([.E726]^2/Ao)" office:value-type="float" office:value="-68.1852983859449" calcext:value-type="float">
            <text:p>-68,1852983859449</text:p>
          </table:table-cell>
          <table:table-cell table:style-name="ce1" table:formula="of:=[.G725]+h" office:value-type="float" office:value="7.23999999999989" calcext:value-type="float">
            <text:p>7,23999999999989</text:p>
          </table:table-cell>
          <table:table-cell table:style-name="ce1" table:formula="of:=[.H725]+ h*[.F726]" office:value-type="float" office:value="18.5690371745136" calcext:value-type="float">
            <text:p>18,56903717451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6]" office:value-type="float" office:value="7.23999999999989" calcext:value-type="float">
            <text:p>7,23999999999989</text:p>
          </table:table-cell>
          <table:table-cell table:style-name="ce1" table:formula="of:=[.H726]" office:value-type="float" office:value="18.5690371745136" calcext:value-type="float">
            <text:p>18,5690371745136</text:p>
          </table:table-cell>
          <table:table-cell table:style-name="ce1" table:formula="of:=-68 - ([.E727]^2/Ao)" office:value-type="float" office:value="-68.1724045707942" calcext:value-type="float">
            <text:p>-68,1724045707942</text:p>
          </table:table-cell>
          <table:table-cell table:style-name="ce1" table:formula="of:=[.G726]+h" office:value-type="float" office:value="7.24999999999989" calcext:value-type="float">
            <text:p>7,24999999999989</text:p>
          </table:table-cell>
          <table:table-cell table:style-name="ce1" table:formula="of:=[.H726]+ h*[.F727]" office:value-type="float" office:value="17.8873131288057" calcext:value-type="float">
            <text:p>17,887313128805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7]" office:value-type="float" office:value="7.24999999999989" calcext:value-type="float">
            <text:p>7,24999999999989</text:p>
          </table:table-cell>
          <table:table-cell table:style-name="ce1" table:formula="of:=[.H727]" office:value-type="float" office:value="17.8873131288057" calcext:value-type="float">
            <text:p>17,8873131288057</text:p>
          </table:table-cell>
          <table:table-cell table:style-name="ce1" table:formula="of:=-68 - ([.E728]^2/Ao)" office:value-type="float" office:value="-68.159977985484" calcext:value-type="float">
            <text:p>-68,159977985484</text:p>
          </table:table-cell>
          <table:table-cell table:style-name="ce1" table:formula="of:=[.G727]+h" office:value-type="float" office:value="7.25999999999989" calcext:value-type="float">
            <text:p>7,25999999999989</text:p>
          </table:table-cell>
          <table:table-cell table:style-name="ce1" table:formula="of:=[.H727]+ h*[.F728]" office:value-type="float" office:value="17.2057133489509" calcext:value-type="float">
            <text:p>17,20571334895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8]" office:value-type="float" office:value="7.25999999999989" calcext:value-type="float">
            <text:p>7,25999999999989</text:p>
          </table:table-cell>
          <table:table-cell table:style-name="ce1" table:formula="of:=[.H728]" office:value-type="float" office:value="17.2057133489509" calcext:value-type="float">
            <text:p>17,2057133489509</text:p>
          </table:table-cell>
          <table:table-cell table:style-name="ce1" table:formula="of:=-68 - ([.E729]^2/Ao)" office:value-type="float" office:value="-68.1480182859231" calcext:value-type="float">
            <text:p>-68,1480182859231</text:p>
          </table:table-cell>
          <table:table-cell table:style-name="ce1" table:formula="of:=[.G728]+h" office:value-type="float" office:value="7.26999999999989" calcext:value-type="float">
            <text:p>7,26999999999989</text:p>
          </table:table-cell>
          <table:table-cell table:style-name="ce1" table:formula="of:=[.H728]+ h*[.F729]" office:value-type="float" office:value="16.5242331660916" calcext:value-type="float">
            <text:p>16,52423316609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29]" office:value-type="float" office:value="7.26999999999989" calcext:value-type="float">
            <text:p>7,26999999999989</text:p>
          </table:table-cell>
          <table:table-cell table:style-name="ce1" table:formula="of:=[.H729]" office:value-type="float" office:value="16.5242331660916" calcext:value-type="float">
            <text:p>16,5242331660916</text:p>
          </table:table-cell>
          <table:table-cell table:style-name="ce1" table:formula="of:=-68 - ([.E730]^2/Ao)" office:value-type="float" office:value="-68.1365251408637" calcext:value-type="float">
            <text:p>-68,1365251408637</text:p>
          </table:table-cell>
          <table:table-cell table:style-name="ce1" table:formula="of:=[.G729]+h" office:value-type="float" office:value="7.27999999999989" calcext:value-type="float">
            <text:p>7,27999999999989</text:p>
          </table:table-cell>
          <table:table-cell table:style-name="ce1" table:formula="of:=[.H729]+ h*[.F730]" office:value-type="float" office:value="15.842867914683" calcext:value-type="float">
            <text:p>15,8428679146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0]" office:value-type="float" office:value="7.27999999999989" calcext:value-type="float">
            <text:p>7,27999999999989</text:p>
          </table:table-cell>
          <table:table-cell table:style-name="ce1" table:formula="of:=[.H730]" office:value-type="float" office:value="15.842867914683" calcext:value-type="float">
            <text:p>15,842867914683</text:p>
          </table:table-cell>
          <table:table-cell table:style-name="ce1" table:formula="of:=-68 - ([.E731]^2/Ao)" office:value-type="float" office:value="-68.125498231881" calcext:value-type="float">
            <text:p>-68,125498231881</text:p>
          </table:table-cell>
          <table:table-cell table:style-name="ce1" table:formula="of:=[.G730]+h" office:value-type="float" office:value="7.28999999999989" calcext:value-type="float">
            <text:p>7,28999999999989</text:p>
          </table:table-cell>
          <table:table-cell table:style-name="ce1" table:formula="of:=[.H730]+ h*[.F731]" office:value-type="float" office:value="15.1616129323642" calcext:value-type="float">
            <text:p>15,16161293236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1]" office:value-type="float" office:value="7.28999999999989" calcext:value-type="float">
            <text:p>7,28999999999989</text:p>
          </table:table-cell>
          <table:table-cell table:style-name="ce1" table:formula="of:=[.H731]" office:value-type="float" office:value="15.1616129323642" calcext:value-type="float">
            <text:p>15,1616129323642</text:p>
          </table:table-cell>
          <table:table-cell table:style-name="ce1" table:formula="of:=-68 - ([.E732]^2/Ao)" office:value-type="float" office:value="-68.1149372533554" calcext:value-type="float">
            <text:p>-68,1149372533554</text:p>
          </table:table-cell>
          <table:table-cell table:style-name="ce1" table:formula="of:=[.G731]+h" office:value-type="float" office:value="7.29999999999989" calcext:value-type="float">
            <text:p>7,29999999999989</text:p>
          </table:table-cell>
          <table:table-cell table:style-name="ce1" table:formula="of:=[.H731]+ h*[.F732]" office:value-type="float" office:value="14.4804635598306" calcext:value-type="float">
            <text:p>14,480463559830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2]" office:value-type="float" office:value="7.29999999999989" calcext:value-type="float">
            <text:p>7,29999999999989</text:p>
          </table:table-cell>
          <table:table-cell table:style-name="ce1" table:formula="of:=[.H732]" office:value-type="float" office:value="14.4804635598306" calcext:value-type="float">
            <text:p>14,4804635598306</text:p>
          </table:table-cell>
          <table:table-cell table:style-name="ce1" table:formula="of:=-68 - ([.E733]^2/Ao)" office:value-type="float" office:value="-68.1048419124538" calcext:value-type="float">
            <text:p>-68,1048419124538</text:p>
          </table:table-cell>
          <table:table-cell table:style-name="ce1" table:formula="of:=[.G732]+h" office:value-type="float" office:value="7.30999999999989" calcext:value-type="float">
            <text:p>7,30999999999989</text:p>
          </table:table-cell>
          <table:table-cell table:style-name="ce1" table:formula="of:=[.H732]+ h*[.F733]" office:value-type="float" office:value="13.7994151407061" calcext:value-type="float">
            <text:p>13,799415140706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3]" office:value-type="float" office:value="7.30999999999989" calcext:value-type="float">
            <text:p>7,30999999999989</text:p>
          </table:table-cell>
          <table:table-cell table:style-name="ce1" table:formula="of:=[.H733]" office:value-type="float" office:value="13.7994151407061" calcext:value-type="float">
            <text:p>13,7994151407061</text:p>
          </table:table-cell>
          <table:table-cell table:style-name="ce1" table:formula="of:=-68 - ([.E734]^2/Ao)" office:value-type="float" office:value="-68.0952119291128" calcext:value-type="float">
            <text:p>-68,0952119291128</text:p>
          </table:table-cell>
          <table:table-cell table:style-name="ce1" table:formula="of:=[.G733]+h" office:value-type="float" office:value="7.31999999999989" calcext:value-type="float">
            <text:p>7,31999999999989</text:p>
          </table:table-cell>
          <table:table-cell table:style-name="ce1" table:formula="of:=[.H733]+ h*[.F734]" office:value-type="float" office:value="13.118463021415" calcext:value-type="float">
            <text:p>13,1184630214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4]" office:value-type="float" office:value="7.31999999999989" calcext:value-type="float">
            <text:p>7,31999999999989</text:p>
          </table:table-cell>
          <table:table-cell table:style-name="ce1" table:formula="of:=[.H734]" office:value-type="float" office:value="13.118463021415" calcext:value-type="float">
            <text:p>13,118463021415</text:p>
          </table:table-cell>
          <table:table-cell table:style-name="ce1" table:formula="of:=-68 - ([.E735]^2/Ao)" office:value-type="float" office:value="-68.0860470360221" calcext:value-type="float">
            <text:p>-68,0860470360221</text:p>
          </table:table-cell>
          <table:table-cell table:style-name="ce1" table:formula="of:=[.G734]+h" office:value-type="float" office:value="7.32999999999989" calcext:value-type="float">
            <text:p>7,32999999999989</text:p>
          </table:table-cell>
          <table:table-cell table:style-name="ce1" table:formula="of:=[.H734]+ h*[.F735]" office:value-type="float" office:value="12.4376025510547" calcext:value-type="float">
            <text:p>12,437602551054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5]" office:value-type="float" office:value="7.32999999999989" calcext:value-type="float">
            <text:p>7,32999999999989</text:p>
          </table:table-cell>
          <table:table-cell table:style-name="ce1" table:formula="of:=[.H735]" office:value-type="float" office:value="12.4376025510547" calcext:value-type="float">
            <text:p>12,4376025510547</text:p>
          </table:table-cell>
          <table:table-cell table:style-name="ce1" table:formula="of:=-68 - ([.E736]^2/Ao)" office:value-type="float" office:value="-68.077346978609" calcext:value-type="float">
            <text:p>-68,077346978609</text:p>
          </table:table-cell>
          <table:table-cell table:style-name="ce1" table:formula="of:=[.G735]+h" office:value-type="float" office:value="7.33999999999989" calcext:value-type="float">
            <text:p>7,33999999999989</text:p>
          </table:table-cell>
          <table:table-cell table:style-name="ce1" table:formula="of:=[.H735]+ h*[.F736]" office:value-type="float" office:value="11.7568290812686" calcext:value-type="float">
            <text:p>11,75682908126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6]" office:value-type="float" office:value="7.33999999999989" calcext:value-type="float">
            <text:p>7,33999999999989</text:p>
          </table:table-cell>
          <table:table-cell table:style-name="ce1" table:formula="of:=[.H736]" office:value-type="float" office:value="11.7568290812686" calcext:value-type="float">
            <text:p>11,7568290812686</text:p>
          </table:table-cell>
          <table:table-cell table:style-name="ce1" table:formula="of:=-68 - ([.E737]^2/Ao)" office:value-type="float" office:value="-68.0691115150231" calcext:value-type="float">
            <text:p>-68,0691115150231</text:p>
          </table:table-cell>
          <table:table-cell table:style-name="ce1" table:formula="of:=[.G736]+h" office:value-type="float" office:value="7.34999999999989" calcext:value-type="float">
            <text:p>7,34999999999989</text:p>
          </table:table-cell>
          <table:table-cell table:style-name="ce1" table:formula="of:=[.H736]+ h*[.F737]" office:value-type="float" office:value="11.0761379661184" calcext:value-type="float">
            <text:p>11,07613796611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7]" office:value-type="float" office:value="7.34999999999989" calcext:value-type="float">
            <text:p>7,34999999999989</text:p>
          </table:table-cell>
          <table:table-cell table:style-name="ce1" table:formula="of:=[.H737]" office:value-type="float" office:value="11.0761379661184" calcext:value-type="float">
            <text:p>11,0761379661184</text:p>
          </table:table-cell>
          <table:table-cell table:style-name="ce1" table:formula="of:=-68 - ([.E738]^2/Ao)" office:value-type="float" office:value="-68.0613404161223" calcext:value-type="float">
            <text:p>-68,0613404161223</text:p>
          </table:table-cell>
          <table:table-cell table:style-name="ce1" table:formula="of:=[.G737]+h" office:value-type="float" office:value="7.35999999999989" calcext:value-type="float">
            <text:p>7,35999999999989</text:p>
          </table:table-cell>
          <table:table-cell table:style-name="ce1" table:formula="of:=[.H737]+ h*[.F738]" office:value-type="float" office:value="10.3955245619572" calcext:value-type="float">
            <text:p>10,395524561957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8]" office:value-type="float" office:value="7.35999999999989" calcext:value-type="float">
            <text:p>7,35999999999989</text:p>
          </table:table-cell>
          <table:table-cell table:style-name="ce1" table:formula="of:=[.H738]" office:value-type="float" office:value="10.3955245619572" calcext:value-type="float">
            <text:p>10,3955245619572</text:p>
          </table:table-cell>
          <table:table-cell table:style-name="ce1" table:formula="of:=-68 - ([.E739]^2/Ao)" office:value-type="float" office:value="-68.0540334654591" calcext:value-type="float">
            <text:p>-68,0540334654591</text:p>
          </table:table-cell>
          <table:table-cell table:style-name="ce1" table:formula="of:=[.G738]+h" office:value-type="float" office:value="7.36999999999989" calcext:value-type="float">
            <text:p>7,36999999999989</text:p>
          </table:table-cell>
          <table:table-cell table:style-name="ce1" table:formula="of:=[.H738]+ h*[.F739]" office:value-type="float" office:value="9.7149842273026" calcext:value-type="float">
            <text:p>9,714984227302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39]" office:value-type="float" office:value="7.36999999999989" calcext:value-type="float">
            <text:p>7,36999999999989</text:p>
          </table:table-cell>
          <table:table-cell table:style-name="ce1" table:formula="of:=[.H739]" office:value-type="float" office:value="9.7149842273026" calcext:value-type="float">
            <text:p>9,7149842273026</text:p>
          </table:table-cell>
          <table:table-cell table:style-name="ce1" table:formula="of:=-68 - ([.E740]^2/Ao)" office:value-type="float" office:value="-68.0471904592684" calcext:value-type="float">
            <text:p>-68,0471904592684</text:p>
          </table:table-cell>
          <table:table-cell table:style-name="ce1" table:formula="of:=[.G739]+h" office:value-type="float" office:value="7.37999999999989" calcext:value-type="float">
            <text:p>7,37999999999989</text:p>
          </table:table-cell>
          <table:table-cell table:style-name="ce1" table:formula="of:=[.H739]+ h*[.F740]" office:value-type="float" office:value="9.03451232270991" calcext:value-type="float">
            <text:p>9,0345123227099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0]" office:value-type="float" office:value="7.37999999999989" calcext:value-type="float">
            <text:p>7,37999999999989</text:p>
          </table:table-cell>
          <table:table-cell table:style-name="ce1" table:formula="of:=[.H740]" office:value-type="float" office:value="9.03451232270991" calcext:value-type="float">
            <text:p>9,03451232270991</text:p>
          </table:table-cell>
          <table:table-cell table:style-name="ce1" table:formula="of:=-68 - ([.E741]^2/Ao)" office:value-type="float" office:value="-68.0408112064546" calcext:value-type="float">
            <text:p>-68,0408112064546</text:p>
          </table:table-cell>
          <table:table-cell table:style-name="ce1" table:formula="of:=[.G740]+h" office:value-type="float" office:value="7.38999999999989" calcext:value-type="float">
            <text:p>7,38999999999989</text:p>
          </table:table-cell>
          <table:table-cell table:style-name="ce1" table:formula="of:=[.H740]+ h*[.F741]" office:value-type="float" office:value="8.35410421064537" calcext:value-type="float">
            <text:p>8,354104210645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1]" office:value-type="float" office:value="7.38999999999989" calcext:value-type="float">
            <text:p>7,38999999999989</text:p>
          </table:table-cell>
          <table:table-cell table:style-name="ce1" table:formula="of:=[.H741]" office:value-type="float" office:value="8.35410421064537" calcext:value-type="float">
            <text:p>8,35410421064537</text:p>
          </table:table-cell>
          <table:table-cell table:style-name="ce1" table:formula="of:=-68 - ([.E742]^2/Ao)" office:value-type="float" office:value="-68.0348955285812" calcext:value-type="float">
            <text:p>-68,0348955285812</text:p>
          </table:table-cell>
          <table:table-cell table:style-name="ce1" table:formula="of:=[.G741]+h" office:value-type="float" office:value="7.39999999999989" calcext:value-type="float">
            <text:p>7,39999999999989</text:p>
          </table:table-cell>
          <table:table-cell table:style-name="ce1" table:formula="of:=[.H741]+ h*[.F742]" office:value-type="float" office:value="7.67375525535956" calcext:value-type="float">
            <text:p>7,673755255359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2]" office:value-type="float" office:value="7.39999999999989" calcext:value-type="float">
            <text:p>7,39999999999989</text:p>
          </table:table-cell>
          <table:table-cell table:style-name="ce1" table:formula="of:=[.H742]" office:value-type="float" office:value="7.67375525535956" calcext:value-type="float">
            <text:p>7,67375525535956</text:p>
          </table:table-cell>
          <table:table-cell table:style-name="ce1" table:formula="of:=-68 - ([.E743]^2/Ao)" office:value-type="float" office:value="-68.0294432598596" calcext:value-type="float">
            <text:p>-68,0294432598596</text:p>
          </table:table-cell>
          <table:table-cell table:style-name="ce1" table:formula="of:=[.G742]+h" office:value-type="float" office:value="7.40999999999989" calcext:value-type="float">
            <text:p>7,40999999999989</text:p>
          </table:table-cell>
          <table:table-cell table:style-name="ce1" table:formula="of:=[.H742]+ h*[.F743]" office:value-type="float" office:value="6.99346082276096" calcext:value-type="float">
            <text:p>6,9934608227609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3]" office:value-type="float" office:value="7.40999999999989" calcext:value-type="float">
            <text:p>7,40999999999989</text:p>
          </table:table-cell>
          <table:table-cell table:style-name="ce1" table:formula="of:=[.H743]" office:value-type="float" office:value="6.99346082276096" calcext:value-type="float">
            <text:p>6,99346082276096</text:p>
          </table:table-cell>
          <table:table-cell table:style-name="ce1" table:formula="of:=-68 - ([.E744]^2/Ao)" office:value-type="float" office:value="-68.0244542471397" calcext:value-type="float">
            <text:p>-68,0244542471397</text:p>
          </table:table-cell>
          <table:table-cell table:style-name="ce1" table:formula="of:=[.G743]+h" office:value-type="float" office:value="7.41999999999989" calcext:value-type="float">
            <text:p>7,41999999999989</text:p>
          </table:table-cell>
          <table:table-cell table:style-name="ce1" table:formula="of:=[.H743]+ h*[.F744]" office:value-type="float" office:value="6.31321628028956" calcext:value-type="float">
            <text:p>6,313216280289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4]" office:value-type="float" office:value="7.41999999999989" calcext:value-type="float">
            <text:p>7,41999999999989</text:p>
          </table:table-cell>
          <table:table-cell table:style-name="ce1" table:formula="of:=[.H744]" office:value-type="float" office:value="6.31321628028956" calcext:value-type="float">
            <text:p>6,31321628028956</text:p>
          </table:table-cell>
          <table:table-cell table:style-name="ce1" table:formula="of:=-68 - ([.E745]^2/Ao)" office:value-type="float" office:value="-68.0199283499009" calcext:value-type="float">
            <text:p>-68,0199283499009</text:p>
          </table:table-cell>
          <table:table-cell table:style-name="ce1" table:formula="of:=[.G744]+h" office:value-type="float" office:value="7.42999999999989" calcext:value-type="float">
            <text:p>7,42999999999989</text:p>
          </table:table-cell>
          <table:table-cell table:style-name="ce1" table:formula="of:=[.H744]+ h*[.F745]" office:value-type="float" office:value="5.63301699679055" calcext:value-type="float">
            <text:p>5,633016996790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5]" office:value-type="float" office:value="7.42999999999989" calcext:value-type="float">
            <text:p>7,42999999999989</text:p>
          </table:table-cell>
          <table:table-cell table:style-name="ce1" table:formula="of:=[.H745]" office:value-type="float" office:value="5.63301699679055" calcext:value-type="float">
            <text:p>5,63301699679055</text:p>
          </table:table-cell>
          <table:table-cell table:style-name="ce1" table:formula="of:=-68 - ([.E746]^2/Ao)" office:value-type="float" office:value="-68.0158654402431" calcext:value-type="float">
            <text:p>-68,0158654402431</text:p>
          </table:table-cell>
          <table:table-cell table:style-name="ce1" table:formula="of:=[.G745]+h" office:value-type="float" office:value="7.43999999999989" calcext:value-type="float">
            <text:p>7,43999999999989</text:p>
          </table:table-cell>
          <table:table-cell table:style-name="ce1" table:formula="of:=[.H745]+ h*[.F746]" office:value-type="float" office:value="4.95285834238812" calcext:value-type="float">
            <text:p>4,952858342388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6]" office:value-type="float" office:value="7.43999999999989" calcext:value-type="float">
            <text:p>7,43999999999989</text:p>
          </table:table-cell>
          <table:table-cell table:style-name="ce1" table:formula="of:=[.H746]" office:value-type="float" office:value="4.95285834238812" calcext:value-type="float">
            <text:p>4,95285834238812</text:p>
          </table:table-cell>
          <table:table-cell table:style-name="ce1" table:formula="of:=-68 - ([.E747]^2/Ao)" office:value-type="float" office:value="-68.0122654028799" calcext:value-type="float">
            <text:p>-68,0122654028799</text:p>
          </table:table-cell>
          <table:table-cell table:style-name="ce1" table:formula="of:=[.G746]+h" office:value-type="float" office:value="7.44999999999989" calcext:value-type="float">
            <text:p>7,44999999999989</text:p>
          </table:table-cell>
          <table:table-cell table:style-name="ce1" table:formula="of:=[.H746]+ h*[.F747]" office:value-type="float" office:value="4.27273568835932" calcext:value-type="float">
            <text:p>4,272735688359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7]" office:value-type="float" office:value="7.44999999999989" calcext:value-type="float">
            <text:p>7,44999999999989</text:p>
          </table:table-cell>
          <table:table-cell table:style-name="ce1" table:formula="of:=[.H747]" office:value-type="float" office:value="4.27273568835932" calcext:value-type="float">
            <text:p>4,27273568835932</text:p>
          </table:table-cell>
          <table:table-cell table:style-name="ce1" table:formula="of:=-68 - ([.E748]^2/Ao)" office:value-type="float" office:value="-68.0091281351313" calcext:value-type="float">
            <text:p>-68,0091281351313</text:p>
          </table:table-cell>
          <table:table-cell table:style-name="ce1" table:formula="of:=[.G747]+h" office:value-type="float" office:value="7.45999999999989" calcext:value-type="float">
            <text:p>7,45999999999989</text:p>
          </table:table-cell>
          <table:table-cell table:style-name="ce1" table:formula="of:=[.H747]+ h*[.F748]" office:value-type="float" office:value="3.59264440700801" calcext:value-type="float">
            <text:p>3,592644407008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8]" office:value-type="float" office:value="7.45999999999989" calcext:value-type="float">
            <text:p>7,45999999999989</text:p>
          </table:table-cell>
          <table:table-cell table:style-name="ce1" table:formula="of:=[.H748]" office:value-type="float" office:value="3.59264440700801" calcext:value-type="float">
            <text:p>3,59264440700801</text:p>
          </table:table-cell>
          <table:table-cell table:style-name="ce1" table:formula="of:=-68 - ([.E749]^2/Ao)" office:value-type="float" office:value="-68.0064535469176" calcext:value-type="float">
            <text:p>-68,0064535469176</text:p>
          </table:table-cell>
          <table:table-cell table:style-name="ce1" table:formula="of:=[.G748]+h" office:value-type="float" office:value="7.46999999999989" calcext:value-type="float">
            <text:p>7,46999999999989</text:p>
          </table:table-cell>
          <table:table-cell table:style-name="ce1" table:formula="of:=[.H748]+ h*[.F749]" office:value-type="float" office:value="2.91257987153884" calcext:value-type="float">
            <text:p>2,912579871538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49]" office:value-type="float" office:value="7.46999999999989" calcext:value-type="float">
            <text:p>7,46999999999989</text:p>
          </table:table-cell>
          <table:table-cell table:style-name="ce1" table:formula="of:=[.H749]" office:value-type="float" office:value="2.91257987153884" calcext:value-type="float">
            <text:p>2,91257987153884</text:p>
          </table:table-cell>
          <table:table-cell table:style-name="ce1" table:formula="of:=-68 - ([.E750]^2/Ao)" office:value-type="float" office:value="-68.0042415607541" calcext:value-type="float">
            <text:p>-68,0042415607541</text:p>
          </table:table-cell>
          <table:table-cell table:style-name="ce1" table:formula="of:=[.G749]+h" office:value-type="float" office:value="7.47999999999989" calcext:value-type="float">
            <text:p>7,47999999999989</text:p>
          </table:table-cell>
          <table:table-cell table:style-name="ce1" table:formula="of:=[.H749]+ h*[.F750]" office:value-type="float" office:value="2.23253745593129" calcext:value-type="float">
            <text:p>2,232537455931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0]" office:value-type="float" office:value="7.47999999999989" calcext:value-type="float">
            <text:p>7,47999999999989</text:p>
          </table:table-cell>
          <table:table-cell table:style-name="ce1" table:formula="of:=[.H750]" office:value-type="float" office:value="2.23253745593129" calcext:value-type="float">
            <text:p>2,23253745593129</text:p>
          </table:table-cell>
          <table:table-cell table:style-name="ce1" table:formula="of:=-68 - ([.E751]^2/Ao)" office:value-type="float" office:value="-68.0024921117461" calcext:value-type="float">
            <text:p>-68,0024921117461</text:p>
          </table:table-cell>
          <table:table-cell table:style-name="ce1" table:formula="of:=[.G750]+h" office:value-type="float" office:value="7.48999999999989" calcext:value-type="float">
            <text:p>7,48999999999989</text:p>
          </table:table-cell>
          <table:table-cell table:style-name="ce1" table:formula="of:=[.H750]+ h*[.F751]" office:value-type="float" office:value="1.55251253481383" calcext:value-type="float">
            <text:p>1,5525125348138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1]" office:value-type="float" office:value="7.48999999999989" calcext:value-type="float">
            <text:p>7,48999999999989</text:p>
          </table:table-cell>
          <table:table-cell table:style-name="ce1" table:formula="of:=[.H751]" office:value-type="float" office:value="1.55251253481383" calcext:value-type="float">
            <text:p>1,55251253481383</text:p>
          </table:table-cell>
          <table:table-cell table:style-name="ce1" table:formula="of:=-68 - ([.E752]^2/Ao)" office:value-type="float" office:value="-68.0012051475854" calcext:value-type="float">
            <text:p>-68,0012051475854</text:p>
          </table:table-cell>
          <table:table-cell table:style-name="ce1" table:formula="of:=[.G751]+h" office:value-type="float" office:value="7.49999999999988" calcext:value-type="float">
            <text:p>7,49999999999988</text:p>
          </table:table-cell>
          <table:table-cell table:style-name="ce1" table:formula="of:=[.H751]+ h*[.F752]" office:value-type="float" office:value="0.87250048333798" calcext:value-type="float">
            <text:p>0,8725004833379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2]" office:value-type="float" office:value="7.49999999999988" calcext:value-type="float">
            <text:p>7,49999999999988</text:p>
          </table:table-cell>
          <table:table-cell table:style-name="ce1" table:formula="of:=[.H752]" office:value-type="float" office:value="0.87250048333798" calcext:value-type="float">
            <text:p>0,87250048333798</text:p>
          </table:table-cell>
          <table:table-cell table:style-name="ce1" table:formula="of:=-68 - ([.E753]^2/Ao)" office:value-type="float" office:value="-68.0003806285467" calcext:value-type="float">
            <text:p>-68,0003806285467</text:p>
          </table:table-cell>
          <table:table-cell table:style-name="ce1" table:formula="of:=[.G752]+h" office:value-type="float" office:value="7.50999999999988" calcext:value-type="float">
            <text:p>7,50999999999988</text:p>
          </table:table-cell>
          <table:table-cell table:style-name="ce1" table:formula="of:=[.H752]+ h*[.F753]" office:value-type="float" office:value="0.192496677052513" calcext:value-type="float">
            <text:p>0,19249667705251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3]" office:value-type="float" office:value="7.50999999999988" calcext:value-type="float">
            <text:p>7,50999999999988</text:p>
          </table:table-cell>
          <table:table-cell table:style-name="ce1" table:formula="of:=[.H753]" office:value-type="float" office:value="0.192496677052513" calcext:value-type="float">
            <text:p>0,192496677052513</text:p>
          </table:table-cell>
          <table:table-cell table:style-name="ce1" table:formula="of:=-68 - ([.E754]^2/Ao)" office:value-type="float" office:value="-68.0000185274853" calcext:value-type="float">
            <text:p>-68,0000185274853</text:p>
          </table:table-cell>
          <table:table-cell table:style-name="ce1" table:formula="of:=[.G753]+h" office:value-type="float" office:value="7.51999999999988" calcext:value-type="float">
            <text:p>7,51999999999988</text:p>
          </table:table-cell>
          <table:table-cell table:style-name="ce1" table:formula="of:=[.H753]+ h*[.F754]" office:value-type="float" office:value="-0.48750350822234" calcext:value-type="float">
            <text:p>-0,4875035082223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table:formula="of:=[.G754]" office:value-type="float" office:value="7.51999999999988" calcext:value-type="float">
            <text:p>7,51999999999988</text:p>
          </table:table-cell>
          <table:table-cell table:style-name="ce1" table:formula="of:=[.H754]" office:value-type="float" office:value="-0.48750350822234" calcext:value-type="float">
            <text:p>-0,48750350822234</text:p>
          </table:table-cell>
          <table:table-cell table:style-name="ce1" table:formula="of:=-68 - ([.E755]^2/Ao)" office:value-type="float" office:value="-68.0001188298353" calcext:value-type="float">
            <text:p>-68,0001188298353</text:p>
          </table:table-cell>
          <table:table-cell table:style-name="ce1" table:formula="of:=[.G754]+h" office:value-type="float" office:value="7.52999999999988" calcext:value-type="float">
            <text:p>7,52999999999988</text:p>
          </table:table-cell>
          <table:table-cell table:style-name="ce1" table:formula="of:=[.H754]+ h*[.F755]" office:value-type="float" office:value="-1.16750469652069" calcext:value-type="float">
            <text:p>-1,16750469652069</text:p>
          </table:table-cell>
          <table:table-cell table:number-columns-repeated="4"/>
        </table:table-row>
        <table:table-row table:style-name="ro2" table:number-rows-repeated="136">
          <table:table-cell table:number-columns-repeated="3"/>
          <table:table-cell table:style-name="ce1" table:number-columns-repeated="5"/>
          <table:table-cell table:number-columns-repeated="4"/>
        </table:table-row>
        <table:table-row table:style-name="ro2" table:number-rows-repeated="1047684">
          <table:table-cell table:number-columns-repeated="12"/>
        </table:table-row>
        <table:table-row table:style-name="ro2">
          <table:table-cell table:number-columns-repeated="12"/>
        </table:table-row>
        <table:named-expressions>
          <table:named-range table:name="Ao" table:base-cell-address="$'Ao = 2000'.$B$3" table:cell-range-address="$'Ao = 2000'.$B$3"/>
          <table:named-range table:name="h" table:base-cell-address="$'Ao = 2000'.$A$1" table:cell-range-address="$'Ao = 2000'.$B$1"/>
          <table:named-range table:name="to" table:base-cell-address="$'Ao = 2000'.$A$1" table:cell-range-address="$'Ao = 2000'.$B$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9T17:26:00.964541300</meta:creation-date>
    <dc:date>2026-06-19T17:52:14.048436900</dc:date>
    <meta:editing-duration>PT26M12S</meta:editing-duration>
    <meta:editing-cycles>3</meta:editing-cycles>
    <meta:generator>LibreOffice/26.2.3.2$Windows_AARCH64 LibreOffice_project/70e089b17412e4cb7773e41413306b17a2328c34</meta:generator>
    <meta:document-statistic meta:table-count="3" meta:cell-count="9530" meta:object-count="0"/>
  </office:meta>
</office:document-meta>
</file>